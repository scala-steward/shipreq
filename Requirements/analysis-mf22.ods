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3.814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251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280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e6e6e6" style:vertical-align="top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e6e6e6" fo:wrap-option="wrap" style:vertical-align="top"/>
    </style:style>
    <style:style style:name="ce1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mo" fo:font-weight="normal" style:font-name-asian="AR PL UMing CN" style:font-weight-asian="normal" style:font-name-complex="FreeSans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2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4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list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7"/>
        <table:table-column table:style-name="co2" table:number-columns-repeated="1018" table:default-cell-style-name="ce7"/>
        <table:table-row table:style-name="ro1">
          <table:table-cell table:style-name="ce1" office:value-type="string" calcext:value-type="string">
            <text:p>[High-Level Requirements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12" office:value-type="string" calcext:value-type="string">
            <text:p>TL;DR</text:p>
          </table:table-cell>
          <table:table-cell table:style-name="ce12" office:value-type="string" calcext:value-type="string">
            <text:p>Solutio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  <table:table-cell office:value-type="string" calcext:value-type="string">
            <text:p>See [types] tab</text:p>
          </table:table-cell>
          <table:table-cell office:value-type="string" calcext:value-type="string">
            <text:p>hard to distinguish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Requirement types will not likely be shared between HL &amp; LL.</text:p>
          </table:table-cell>
          <table:table-cell office:value-type="string" calcext:value-type="string">
            <text:p>Req-type is likely LL \/ HL</text:p>
          </table:table-cell>
          <table:table-cell office:value-type="string" calcext:value-type="string">
            <text:p>reqtypes divide /prob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  <table:table-cell office:value-type="string" calcext:value-type="string">
            <text:p>Req-type ok to be LL \/ HL</text:p>
            <text:p>Adding a LL/HL/Ln distinction doesn't seem smart.</text:p>
            <text:p>It doesn't seem smart as a single-value attribute,</text:p>
            <text:p>and it doesn't seem to reflect RWM.</text:p>
          </table:table-cell>
          <table:table-cell office:value-type="string" calcext:value-type="string">
            <text:p>reqtypes divide /can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  <table:table-cell office:value-type="string" calcext:value-type="string">
            <text:p>How should that affect System?</text:p>
            <text:p>How often are they read?</text:p>
          </table:table-cell>
          <table:table-cell office:value-type="string" calcext:value-type="string">
            <text:p>HL edit less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HL edit first, overlap rare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Usually filter</text:p>
          </table:table-cell>
          <table:table-cell office:value-type="string" calcext:value-type="string">
            <text:p>Filter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office:value-type="string" calcext:value-type="string">
            <text:p>Question of all HL reqs being used in MF-13</text:p>
          </table:table-cell>
          <table:table-cell office:value-type="string" calcext:value-type="string">
            <text:p>HL &amp; MF-13</text:p>
          </table:table-cell>
          <table:table-cell office:value-type="string" calcext:value-type="string">
            <text:p>MF-1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tersection</text:p>
          </table:table-cell>
          <table:table-cell table:style-name="ce10" office:value-type="string" calcext:value-type="string">
            <text:p>All “HL” reqs can be used for justification therefore it is important that System support them.</text:p>
          </table:table-cell>
          <table:table-cell office:value-type="string" calcext:value-type="string">
            <text:p>MF-13</text:p>
          </table:table-cell>
          <table:table-cell office:value-type="string" calcext:value-type="string">
            <text:p>HL not optional</text:p>
          </table:table-cell>
          <table:table-cell office:value-type="string" calcext:value-type="string">
            <text:p>MF-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It's hard to quantify the distinction between high &amp; low level.</text:p>
          </table:table-cell>
          <table:table-cell office:value-type="string" calcext:value-type="string">
            <text:p>Can a distinction even be made? If so, should it?</text:p>
            <text:p>Instead should probably focus on finding how the imagined distinction affects behaviour, and allowing it.</text:p>
          </table:table-cell>
          <table:table-cell office:value-type="string" calcext:value-type="string">
            <text:p>HL Δ LL = ?</text:p>
          </table:table-cell>
          <table:table-cell office:value-type="string" calcext:value-type="string">
            <text:p>No division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eatures: MF ⊃ FE ≅ MF-07?</text:p>
          </table:table-cell>
          <table:table-cell table:style-name="ce8"/>
          <table:table-cell table:style-name="ce11" table:number-columns-repeated="2"/>
          <table:table-cell table:style-name="ce8" table:number-columns-repeated="2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office:value-type="string" calcext:value-type="string">
            <text:p>Also overlap with sem-ids in MF-12</text:p>
          </table:table-cell>
          <table:table-cell office:value-type="string" calcext:value-type="string">
            <text:p>MF &amp; MF-07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/>
          <table:table-cell office:value-type="string" calcext:value-type="string">
            <text:p>MF has F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office:value-type="string" calcext:value-type="string">
            <text:p>Turn this into use case or at least provide a detailed example.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office:value-type="string" calcext:value-type="string">
            <text:p>Why? Would it be beneficial &amp; used if available?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ybe MF should just be FE then it would nest happily.</text:p>
          </table:table-cell>
          <table:table-cell office:value-type="string" calcext:value-type="string">
            <text:p>MF-13 then becomes the problem.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style-name="ce4" office:value-type="string" calcext:value-type="string">
            <text:p>How does [HL]L distinction affect or reflect usage?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less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first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re to edit both HL&amp; LL simultaneously. → Problem=view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5" office:value-type="string" calcext:value-type="string">
            <text:p>Should System distinguish?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No)</text:p>
          </table:table-cell>
          <table:table-cell office:value-type="string" calcext:value-type="string">
            <text:p>It seems that an easy-to-use req-type filter will solve the problem.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4"/>
        <table:table-column table:style-name="co9" table:default-cell-style-name="ce34"/>
        <table:table-column table:style-name="co10" table:number-columns-repeated="2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2" table:number-columns-repeated="1014" table:default-cell-style-name="Default"/>
        <table:table-row table:style-name="ro3">
          <table:table-cell table:style-name="ce13" table:number-columns-repeated="2"/>
          <table:table-cell table:style-name="ce22" office:value-type="string" calcext:value-type="string">
            <text:p>Business</text:p>
            <text:p>Objectives &amp;</text:p>
            <text:p>Success</text:p>
            <text:p>Criteria</text:p>
          </table:table-cell>
          <table:table-cell table:style-name="ce22" office:value-type="string" calcext:value-type="string">
            <text:p>Business</text:p>
            <text:p>Risks</text:p>
          </table:table-cell>
          <table:table-cell table:style-name="ce22" office:value-type="string" calcext:value-type="string">
            <text:p>Major</text:p>
            <text:p>Feature</text:p>
          </table:table-cell>
          <table:table-cell table:style-name="ce22" office:value-type="string" calcext:value-type="string">
            <text:p>Feature</text:p>
          </table:table-cell>
          <table:table-cell table:style-name="ce22" office:value-type="string" calcext:value-type="string">
            <text:p>Exclusions &amp;</text:p>
            <text:p>Limitations</text:p>
          </table:table-cell>
          <table:table-cell table:style-name="ce22" office:value-type="string" calcext:value-type="string">
            <text:p>Assumptions &amp;</text:p>
            <text:p>Dependencies</text:p>
          </table:table-cell>
          <table:table-cell table:style-name="ce22" office:value-type="string" calcext:value-type="string">
            <text:p>Operating</text:p>
            <text:p>Environment</text:p>
          </table:table-cell>
          <table:table-cell table:style-name="ce22" office:value-type="string" calcext:value-type="string">
            <text:p>Quality</text:p>
            <text:p>Attributes</text:p>
          </table:table-cell>
          <table:table-cell table:style-name="ce44" table:number-columns-repeated="1014"/>
        </table:table-row>
        <table:table-row table:style-name="ro2">
          <table:table-cell table:style-name="ce14" office:value-type="string" calcext:value-type="string" table:number-columns-spanned="1" table:number-rows-spanned="6">
            <text:p><text:span text:style-name="T1">Impact within scope</text:span></text:p>
            <text:p><text:span text:style-name="T2">0=None</text:span></text:p>
            <text:p><text:span text:style-name="T2">1=Pedantically</text:span></text:p>
            <text:p><text:span text:style-name="T2">3=Indirectly</text:span></text:p>
            <text:p><text:span text:style-name="T2">5=Direct</text:span></text:p>
          </table:table-cell>
          <table:table-cell table:style-name="ce19" office:value-type="string" calcext:value-type="string">
            <text:p>Business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Entire System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4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Component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HL</text:p>
          </table:table-cell>
          <table:table-cell table:style-name="ce24" table:formula="of:=([.C2]*4+[.C3]*2+[.C4])/7" office:value-type="float" office:value="3.57142857142857" calcext:value-type="float">
            <text:p/>
          </table:table-cell>
          <table:table-cell table:style-name="ce24" table:formula="of:=([.D2]*4+[.D3]*2+[.D4])/7" office:value-type="float" office:value="3.57142857142857" calcext:value-type="float">
            <text:p/>
          </table:table-cell>
          <table:table-cell table:style-name="ce24" table:formula="of:=([.E2]*4+[.E3]*2+[.E4])/7" office:value-type="float" office:value="4.71428571428571" calcext:value-type="float">
            <text:p/>
          </table:table-cell>
          <table:table-cell table:style-name="ce37" table:formula="of:=([.F2]*4+[.F3]*2+[.F4])/7" office:value-type="float" office:value="3.42857142857143" calcext:value-type="float">
            <text:p/>
          </table:table-cell>
          <table:table-cell table:style-name="ce24" table:formula="of:=([.G2]*4+[.G3]*2+[.G4])/7" office:value-type="float" office:value="4.71428571428571" calcext:value-type="float">
            <text:p/>
          </table:table-cell>
          <table:table-cell table:style-name="ce26" table:formula="of:=([.H2]*4+[.H3]*2+[.H4])/7" office:value-type="float" office:value="3.14285714285714" calcext:value-type="float">
            <text:p/>
          </table:table-cell>
          <table:table-cell table:style-name="ce37" table:formula="of:=([.I2]*4+[.I3]*2+[.I4])/7" office:value-type="float" office:value="4.42857142857143" calcext:value-type="float">
            <text:p/>
          </table:table-cell>
          <table:table-cell table:style-name="ce26" table:formula="of:=([.J2]*4+[.J3]*2+[.J4])/7" office:value-type="float" office:value="3.85714285714286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LL</text:p>
          </table:table-cell>
          <table:table-cell table:style-name="ce25" table:formula="of:=([.C2]+[.C3]*2+[.C4]*4)/7" office:value-type="float" office:value="1.85714285714286" calcext:value-type="float">
            <text:p/>
          </table:table-cell>
          <table:table-cell table:style-name="ce25" table:formula="of:=([.D2]+[.D3]*2+[.D4]*4)/7" office:value-type="float" office:value="1.85714285714286" calcext:value-type="float">
            <text:p/>
          </table:table-cell>
          <table:table-cell table:style-name="ce25" table:formula="of:=([.E2]+[.E3]*2+[.E4]*4)/7" office:value-type="float" office:value="3.85714285714286" calcext:value-type="float">
            <text:p/>
          </table:table-cell>
          <table:table-cell table:style-name="ce38" table:formula="of:=([.F2]+[.F3]*2+[.F4]*4)/7" office:value-type="float" office:value="3.85714285714286" calcext:value-type="float">
            <text:p/>
          </table:table-cell>
          <table:table-cell table:style-name="ce25" table:formula="of:=([.G2]+[.G3]*2+[.G4]*4)/7" office:value-type="float" office:value="3.85714285714286" calcext:value-type="float">
            <text:p/>
          </table:table-cell>
          <table:table-cell table:style-name="ce40" table:formula="of:=([.H2]+[.H3]*2+[.H4]*4)/7" office:value-type="float" office:value="4" calcext:value-type="float">
            <text:p/>
          </table:table-cell>
          <table:table-cell table:style-name="ce38" table:formula="of:=([.I2]+[.I3]*2+[.I4]*4)/7" office:value-type="float" office:value="4.85714285714286" calcext:value-type="float">
            <text:p/>
          </table:table-cell>
          <table:table-cell table:style-name="ce40" table:formula="of:=([.J2]+[.J3]*2+[.J4]*4)/7" office:value-type="float" office:value="4.71428571428571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19" office:value-type="string" calcext:value-type="string">
            <text:p>dist</text:p>
          </table:table-cell>
          <table:table-cell table:style-name="ce26" table:formula="of:=ABS([.C5]-[.C6])" office:value-type="float" office:value="1.71428571428571" calcext:value-type="float">
            <text:p/>
          </table:table-cell>
          <table:table-cell table:style-name="ce26" table:formula="of:=ABS([.D5]-[.D6])" office:value-type="float" office:value="1.71428571428571" calcext:value-type="float">
            <text:p/>
          </table:table-cell>
          <table:table-cell table:style-name="ce26" table:formula="of:=ABS([.E5]-[.E6])" office:value-type="float" office:value="0.857142857142857" calcext:value-type="float">
            <text:p/>
          </table:table-cell>
          <table:table-cell table:style-name="ce26" table:formula="of:=ABS([.F5]-[.F6])" office:value-type="float" office:value="0.428571428571429" calcext:value-type="float">
            <text:p/>
          </table:table-cell>
          <table:table-cell table:style-name="ce26" table:formula="of:=ABS([.G5]-[.G6])" office:value-type="float" office:value="0.857142857142857" calcext:value-type="float">
            <text:p/>
          </table:table-cell>
          <table:table-cell table:style-name="ce26" table:formula="of:=ABS([.H5]-[.H6])" office:value-type="float" office:value="0.857142857142857" calcext:value-type="float">
            <text:p/>
          </table:table-cell>
          <table:table-cell table:style-name="ce26" table:formula="of:=ABS([.I5]-[.I6])" office:value-type="float" office:value="0.428571428571428" calcext:value-type="float">
            <text:p/>
          </table:table-cell>
          <table:table-cell table:style-name="ce26" table:formula="of:=ABS([.J5]-[.J6])" office:value-type="float" office:value="0.857142857142857" calcext:value-type="float">
            <text:p/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 table:number-columns-spanned="1" table:number-rows-spanned="8">
            <text:p><text:span text:style-name="T1">Interest/user-class</text:span></text:p>
            <text:p>S=Source of req</text:p>
            <text:p>I=Influenced by</text:p>
          </table:table-cell>
          <table:table-cell table:style-name="ce20" office:value-type="string" calcext:value-type="string">
            <text:p>Sponsor/client</text:p>
          </table:table-cell>
          <table:table-cell table:number-columns-repeated="3" table:style-name="ce27" office:value-type="string" calcext:value-type="string">
            <text:p>S</text:p>
          </table:table-cell>
          <table:table-cell table:style-name="ce39" office:value-type="string" calcext:value-type="string">
            <text:p>-</text:p>
          </table:table-cell>
          <table:table-cell table:style-name="ce27" office:value-type="string" calcext:value-type="string">
            <text:p>S</text:p>
          </table:table-cell>
          <table:table-cell table:number-columns-repeated="3" table:style-name="ce41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6"/>
          <table:table-cell office:value-type="string" calcext:value-type="string">
            <text:p>Stakeholder/bus-usrs</text:p>
          </table:table-cell>
          <table:table-cell table:number-columns-repeated="2"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3" table:style-name="ce28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6"/>
          <table:table-cell office:value-type="string" calcext:value-type="string">
            <text:p>Sales/marketting/bus-mngr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6"/>
          <table:table-cell office:value-type="string" calcext:value-type="string">
            <text:p>PM</text:p>
          </table:table-cell>
          <table:table-cell table:style-name="ce30" office:value-type="string" calcext:value-type="string">
            <text:p>I</text:p>
          </table:table-cell>
          <table:table-cell table:style-name="ce31" office:value-type="string" calcext:value-type="string">
            <text:p>i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ch-lead/arch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style-name="ce30" office:value-type="string" calcext:value-type="string">
            <text:p>I</text:p>
          </table:table-cell>
          <table:table-cell table:number-columns-repeated="4"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ev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2" table:style-name="ce30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st</text:p>
          </table:table-cell>
          <table:table-cell table:style-name="ce31" office:value-type="string" calcext:value-type="string">
            <text:p>i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i</text:p>
          </table:table-cell>
          <table:table-cell table:style-name="ce30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2" table:style-name="ce30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 table:style-name="ce17"/>
          <table:table-cell table:style-name="ce17" office:value-type="string" calcext:value-type="string">
            <text:p>Ops</text:p>
          </table:table-cell>
          <table:table-cell table:style-name="ce32" office:value-type="string" calcext:value-type="string">
            <text:p>i</text:p>
          </table:table-cell>
          <table:table-cell table:style-name="ce35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i</text:p>
          </table:table-cell>
          <table:table-cell table:style-name="ce42" office:value-type="string" calcext:value-type="string">
            <text:p>I</text:p>
          </table:table-cell>
          <table:table-cell table:style-name="ce35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Classification</text:p>
          </table:table-cell>
          <table:table-cell table:style-name="ce21" office:value-type="string" calcext:value-type="string">
            <text:p>Business?</text:p>
          </table:table-cell>
          <table:table-cell table:style-name="ce33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number-columns-repeated="5" table:style-name="ce36" office:value-type="string" calcext:value-type="string">
            <text:p>n</text:p>
          </table:table-cell>
          <table:table-cell table:style-name="ce43" office:value-type="string" calcext:value-type="string">
            <text:p>n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10:42:14.255210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5-28T11:12:15.686879274</dc:date>
    <meta:editing-duration>PT3H25M43S</meta:editing-duration>
    <meta:editing-cycles>10</meta:editing-cycles>
    <meta:generator>LibreOffice/4.2.3.3$Linux_X86_64 LibreOffice_project/420m0$Build-3</meta:generator>
    <meta:document-statistic meta:table-count="2" meta:cell-count="235" meta:object-count="0"/>
  </office:meta>
</office:document-meta>
</file>