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34cm"/>
    </style:style>
    <style:style style:name="co2" style:family="table-column">
      <style:table-column-properties fo:break-before="auto" style:column-width="13.769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02cm" fo:break-before="auto" style:use-optimal-row-height="true"/>
    </style:style>
    <style:style style:name="ro2" style:family="table-row">
      <style:table-row-properties style:row-height="0.448cm" fo:break-before="auto" style:use-optimal-row-height="false"/>
    </style:style>
    <style:style style:name="ro3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3" style:family="table-cell" style:parent-style-name="Default" style:data-style-name="N111">
      <style:table-cell-properties style:text-align-source="fix" style:repeat-content="false" fo:border="0.06pt solid #000000"/>
      <style:paragraph-properties fo:text-align="start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e6e6e6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ri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10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<text:s/>Feature</text:p>
          </table:table-cell>
          <table:table-cell table:style-name="ce1" office:value-type="string" calcext:value-type="string">
            <text:p>Pri</text:p>
          </table:table-cell>
          <table:table-cell table:style-name="ce11" table:number-columns-repeated="1016"/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ce6"/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7" office:value-type="string" calcext:value-type="string">
            <text:p>Use Case Editor</text:p>
          </table:table-cell>
          <table:table-cell table:style-name="ce8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7" office:value-type="string" calcext:value-type="string">
            <text:p>Low-level Requirements (CO, FR, BR, etc.)</text:p>
          </table:table-cell>
          <table:table-cell table:style-name="ce8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3" office:value-type="float" office:value="9" calcext:value-type="float">
            <text:p>MF-09</text:p>
          </table:table-cell>
          <table:table-cell table:style-name="ce7" office:value-type="string" calcext:value-type="string">
            <text:p>Collaboration: authoring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" office:value-type="float" office:value="10" calcext:value-type="float">
            <text:p>MF-10</text:p>
          </table:table-cell>
          <table:table-cell table:style-name="ce7" office:value-type="string" calcext:value-type="string">
            <text:p>Collaboration: stakeholder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7" office:value-type="string" calcext:value-type="string">
            <text:p>Field Customisation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7" office:value-type="string" calcext:value-type="string">
            <text:p>Organisation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ce6"/>
          <table:table-cell table:number-columns-repeated="1016"/>
        </table:table-row>
        <table:table-row table:style-name="ro1">
          <table:table-cell table:style-name="ce3" office:value-type="float" office:value="11" calcext:value-type="float">
            <text:p>MF-11</text:p>
          </table:table-cell>
          <table:table-cell table:style-name="ce7" office:value-type="string" calcext:value-type="string">
            <text:p>Collaboration: change mgnt &amp; approval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" office:value-type="float" office:value="3" calcext:value-type="float">
            <text:p>MF-03</text:p>
          </table:table-cell>
          <table:table-cell table:style-name="ce7" office:value-type="string" calcext:value-type="string">
            <text:p>Export (Read UCs, PDF, DOC, MD, TXT, XLS)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7" office:value-type="string" calcext:value-type="string">
            <text:p>Requirement Extraction (UC→FR, etc.)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2" table:number-columns-spanned="3" table:number-rows-spanned="1"/>
          <table:covered-table-cell table:style-name="ce7"/>
          <table:covered-table-cell table:style-name="ce8"/>
          <table:table-cell table:number-columns-repeated="1016"/>
        </table:table-row>
        <table:table-row table:style-name="ro1">
          <table:table-cell table:style-name="ce3" office:value-type="float" office:value="20" calcext:value-type="float">
            <text:p>MF-20</text:p>
          </table:table-cell>
          <table:table-cell table:style-name="ce7" office:value-type="string" calcext:value-type="string">
            <text:p>Generic artifact storage (DOC, PDF, PNG, XLS)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" office:value-type="float" office:value="22" calcext:value-type="float">
            <text:p>MF-22</text:p>
          </table:table-cell>
          <table:table-cell table:style-name="ce7" office:value-type="string" calcext:value-type="string">
            <text:p>High-level Requirements (MF, BO, SC, etc.)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" office:value-type="float" office:value="8" calcext:value-type="float">
            <text:p>MF-08</text:p>
          </table:table-cell>
          <table:table-cell table:style-name="ce7" office:value-type="string" calcext:value-type="string">
            <text:p>History/Audit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7" office:value-type="string" calcext:value-type="string">
            <text:p>Incompletions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" office:value-type="float" office:value="24" calcext:value-type="float">
            <text:p>MF-24</text:p>
          </table:table-cell>
          <table:table-cell table:style-name="ce7" office:value-type="string" calcext:value-type="string">
            <text:p>Requirement Lint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2" table:number-columns-spanned="3" table:number-rows-spanned="1"/>
          <table:covered-table-cell table:style-name="ce7"/>
          <table:covered-table-cell table:style-name="ce8"/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MF-02</text:p>
          </table:table-cell>
          <table:table-cell table:style-name="ce7" office:value-type="string" calcext:value-type="string">
            <text:p>Anonymous Shar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MF-21</text:p>
          </table:table-cell>
          <table:table-cell table:style-name="ce7" office:value-type="string" calcext:value-type="string">
            <text:p>Doc authoring (V&amp;S, URD, SRS)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 office:value-type="float" office:value="23" calcext:value-type="float">
            <text:p>MF-23</text:p>
          </table:table-cell>
          <table:table-cell table:style-name="ce7" office:value-type="string" calcext:value-type="string">
            <text:p>Import external requirement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 office:value-type="float" office:value="4" calcext:value-type="float">
            <text:p>MF-04</text:p>
          </table:table-cell>
          <table:table-cell table:style-name="ce7" office:value-type="string" calcext:value-type="string">
            <text:p>Templat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 office:value-type="float" office:value="14" calcext:value-type="float">
            <text:p>MF-14</text:p>
          </table:table-cell>
          <table:table-cell table:style-name="ce7" office:value-type="string" calcext:value-type="string">
            <text:p>Text-generated Diagram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 office:value-type="float" office:value="15" calcext:value-type="float">
            <text:p>MF-15</text:p>
          </table:table-cell>
          <table:table-cell table:style-name="ce7" office:value-type="string" calcext:value-type="string">
            <text:p>Tracability matrix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2" table:number-columns-spanned="3" table:number-rows-spanned="1"/>
          <table:covered-table-cell table:style-name="ce7"/>
          <table:covered-table-cell table:style-name="ce8"/>
          <table:table-cell table:number-columns-repeated="1016"/>
        </table:table-row>
        <table:table-row table:style-name="ro1">
          <table:table-cell table:style-name="ce3" office:value-type="float" office:value="16" calcext:value-type="float">
            <text:p>MF-16</text:p>
          </table:table-cell>
          <table:table-cell table:style-name="ce7" office:value-type="string" calcext:value-type="string">
            <text:p>CRUDL Matri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office:value-type="float" office:value="18" calcext:value-type="float">
            <text:p>MF-18</text:p>
          </table:table-cell>
          <table:table-cell table:style-name="ce7" office:value-type="string" calcext:value-type="string">
            <text:p>Data dictionar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office:value-type="float" office:value="19" calcext:value-type="float">
            <text:p>MF-19</text:p>
          </table:table-cell>
          <table:table-cell table:style-name="ce7" office:value-type="string" calcext:value-type="string">
            <text:p>Glossar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office:value-type="float" office:value="17" calcext:value-type="float">
            <text:p>MF-17</text:p>
          </table:table-cell>
          <table:table-cell table:style-name="ce7" office:value-type="string" calcext:value-type="string">
            <text:p>Undo &amp; Auto-save</text:p>
          </table:table-cell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3" table:number-rows-repeated="1048545">
          <table:table-cell table:number-columns-repeated="1019"/>
        </table:table-row>
        <table:table-row table:style-name="ro3">
          <table:table-cell table:number-columns-repeated="1019"/>
        </table:table-row>
      </table:table>
      <table:table table:name="Ord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10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<text:s/>Feature</text:p>
          </table:table-cell>
          <table:table-cell table:style-name="ce1" office:value-type="string" calcext:value-type="string">
            <text:p>Pri</text:p>
          </table:table-cell>
          <table:table-cell table:style-name="ce11" table:number-columns-repeated="1016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7" office:value-type="string" calcext:value-type="string">
            <text:p>Use Case Editor</text:p>
          </table:table-cell>
          <table:table-cell table:style-name="ce8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MF-02</text:p>
          </table:table-cell>
          <table:table-cell table:style-name="ce7" office:value-type="string" calcext:value-type="string">
            <text:p>Anonymous Shar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 office:value-type="float" office:value="3" calcext:value-type="float">
            <text:p>MF-03</text:p>
          </table:table-cell>
          <table:table-cell table:style-name="ce7" office:value-type="string" calcext:value-type="string">
            <text:p>Export (Read UCs, PDF, DOC, MD, TXT, XLS)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" office:value-type="float" office:value="4" calcext:value-type="float">
            <text:p>MF-04</text:p>
          </table:table-cell>
          <table:table-cell table:style-name="ce7" office:value-type="string" calcext:value-type="string">
            <text:p>Templat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7" office:value-type="string" calcext:value-type="string">
            <text:p>Field Customisation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7" office:value-type="string" calcext:value-type="string">
            <text:p>Incompletions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MF-07</text:p>
          </table:table-cell>
          <table:table-cell table:style-name="ce7" office:value-type="string" calcext:value-type="string">
            <text:p>Organisation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" office:value-type="float" office:value="8" calcext:value-type="float">
            <text:p>MF-08</text:p>
          </table:table-cell>
          <table:table-cell table:style-name="ce7" office:value-type="string" calcext:value-type="string">
            <text:p>History/Audit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" office:value-type="float" office:value="9" calcext:value-type="float">
            <text:p>MF-09</text:p>
          </table:table-cell>
          <table:table-cell table:style-name="ce7" office:value-type="string" calcext:value-type="string">
            <text:p>Collaboration: authoring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" office:value-type="float" office:value="10" calcext:value-type="float">
            <text:p>MF-10</text:p>
          </table:table-cell>
          <table:table-cell table:style-name="ce7" office:value-type="string" calcext:value-type="string">
            <text:p>Collaboration: stakeholder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" office:value-type="float" office:value="11" calcext:value-type="float">
            <text:p>MF-11</text:p>
          </table:table-cell>
          <table:table-cell table:style-name="ce7" office:value-type="string" calcext:value-type="string">
            <text:p>Collaboration: change mgnt &amp; approval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7" office:value-type="string" calcext:value-type="string">
            <text:p>Low-level Requirements (CO, FR, BR, etc.)</text:p>
          </table:table-cell>
          <table:table-cell table:style-name="ce8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7" office:value-type="string" calcext:value-type="string">
            <text:p>Requirement Extraction (UC→FR, etc.)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" office:value-type="float" office:value="14" calcext:value-type="float">
            <text:p>MF-14</text:p>
          </table:table-cell>
          <table:table-cell table:style-name="ce7" office:value-type="string" calcext:value-type="string">
            <text:p>Text-generated Diagram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 office:value-type="float" office:value="15" calcext:value-type="float">
            <text:p>MF-15</text:p>
          </table:table-cell>
          <table:table-cell table:style-name="ce7" office:value-type="string" calcext:value-type="string">
            <text:p>Tracability matrix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 office:value-type="float" office:value="16" calcext:value-type="float">
            <text:p>MF-16</text:p>
          </table:table-cell>
          <table:table-cell table:style-name="ce7" office:value-type="string" calcext:value-type="string">
            <text:p>CRUDL Matri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office:value-type="float" office:value="17" calcext:value-type="float">
            <text:p>MF-17</text:p>
          </table:table-cell>
          <table:table-cell table:style-name="ce7" office:value-type="string" calcext:value-type="string">
            <text:p>Undo &amp; Auto-save</text:p>
          </table:table-cell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float" office:value="18" calcext:value-type="float">
            <text:p>MF-18</text:p>
          </table:table-cell>
          <table:table-cell table:style-name="ce7" office:value-type="string" calcext:value-type="string">
            <text:p>Data dictionar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office:value-type="float" office:value="19" calcext:value-type="float">
            <text:p>MF-19</text:p>
          </table:table-cell>
          <table:table-cell table:style-name="ce7" office:value-type="string" calcext:value-type="string">
            <text:p>Glossar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office:value-type="float" office:value="20" calcext:value-type="float">
            <text:p>MF-20</text:p>
          </table:table-cell>
          <table:table-cell table:style-name="ce7" office:value-type="string" calcext:value-type="string">
            <text:p>Generic artifact storage (DOC, PDF, PNG, XLS)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MF-21</text:p>
          </table:table-cell>
          <table:table-cell table:style-name="ce7" office:value-type="string" calcext:value-type="string">
            <text:p>Doc authoring (V&amp;S, URD, SRS)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 office:value-type="float" office:value="22" calcext:value-type="float">
            <text:p>MF-22</text:p>
          </table:table-cell>
          <table:table-cell table:style-name="ce7" office:value-type="string" calcext:value-type="string">
            <text:p>High-level Requirements (MF, BO, SC, etc.)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" office:value-type="float" office:value="23" calcext:value-type="float">
            <text:p>MF-23</text:p>
          </table:table-cell>
          <table:table-cell table:style-name="ce7" office:value-type="string" calcext:value-type="string">
            <text:p>Import external requirement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 office:value-type="float" office:value="24" calcext:value-type="float">
            <text:p>MF-24</text:p>
          </table:table-cell>
          <table:table-cell table:style-name="ce7" office:value-type="string" calcext:value-type="string">
            <text:p>Requirement Lint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3" table:number-rows-repeated="1048550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  <table:database-ranges>
        <table:database-range table:name="__Anonymous_Sheet_DB__0" table:target-range-address="Pri.A5:Pri.AMF29" table:contains-header="false">
          <table:sort>
            <table:sort-by table:field-number="2" table:order="descending" table:data-type="automatic"/>
            <table:sort-by table:field-number="1" table:data-type="automatic"/>
          </table:sort>
        </table:database-range>
        <table:database-range table:name="__Anonymous_Sheet_DB__1" table:target-range-address="Ord.A1:Ord.C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text>MF-</number:text>
      <number:number number:decimal-places="0" number:min-integer-digits="0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fo:margin-top="1cm" fo:margin-bottom="1cm" fo:margin-left="1cm" fo:margin-right="1cm" style:shadow="none" fo:background-color="transparent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 style:data-style-name="N2" text:time-value="0000-00-00T11:41:02.523699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3T12:29:32.953854968</meta:creation-date>
    <dc:date>2014-02-18T12:02:22.011967285</dc:date>
    <meta:editing-duration>PT4H6M2S</meta:editing-duration>
    <meta:editing-cycles>29</meta:editing-cycles>
    <meta:generator>LibreOffice/4.1.5.3$Linux_X86_64 LibreOffice_project/410m0$Build-3</meta:generator>
    <meta:document-statistic meta:table-count="2" meta:cell-count="150" meta:object-count="0"/>
  </office:meta>
</office:document-meta>
</file>