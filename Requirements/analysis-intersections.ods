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5.31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color="#b3b3b3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color="#cccccc"/>
    </style:style>
    <style:style style:name="ce9" style:family="table-cell" style:parent-style-name="Default">
      <style:table-cell-properties style:vertical-align="top"/>
      <style:text-properties fo:color="#b3b3b3"/>
    </style:style>
    <style:style style:name="ce10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style:vertical-align="top"/>
      <style:text-properties fo:color="#999999"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color="#999999"/>
    </style:style>
    <style:style style:name="ce18" style:family="table-cell" style:parent-style-name="Default">
      <style:table-cell-properties fo:wrap-option="wrap" style:vertical-align="top"/>
      <style:text-properties fo:color="#999999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style:vertical-align="top"/>
      <style:text-properties fo:color="#ff0000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Grouping Fields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4" table:default-cell-style-name="ce6"/>
        <table:table-row table:style-name="ro1">
          <table:table-cell table:style-name="ce1" office:value-type="string" calcext:value-type="string">
            <text:p>MF-5</text:p>
            <text:p>Field</text:p>
          </table:table-cell>
          <table:table-cell table:style-name="ce1" office:value-type="string" calcext:value-type="string">
            <text:p>MF-6</text:p>
            <text:p>Inc</text:p>
          </table:table-cell>
          <table:table-cell table:style-name="ce1" office:value-type="string" calcext:value-type="string">
            <text:p>MF-7</text:p>
            <text:p>Org</text:p>
          </table:table-cell>
          <table:table-cell table:style-name="ce1" office:value-type="string" calcext:value-type="string">
            <text:p>MF-12</text:p>
            <text:p>LLR</text:p>
          </table:table-cell>
          <table:table-cell table:style-name="ce5" table:number-columns-repeated="1019"/>
        </table:table-row>
        <table:table-row table:style-name="ro2">
          <table:table-cell table:number-columns-repeated="4"/>
          <table:table-cell table:style-name="ce5" office:value-type="string" calcext:value-type="string">
            <text:p>Grouping Fi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eate a UC field that is linked to the grouping called “Priority”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7" office:value-type="string" calcext:value-type="string">
            <text:p><text:s text:c="3"/>Automatically uses G.name as the field name. <text:s text:c="2"/>This prevents groupings being used for multiple meanings. [bad luck: create diff grouping tree]</text:p>
          </table:table-cell>
          <table:table-cell table:style-name="ce7" table:number-columns-repeated="1018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 text:c="3"/>BA can declare it mandatory or no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hen displaying the grouping field, its underlying storage in the model is the UC's grouping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3"/>Regardless of where the user applies a grouping (UC global or in the field), it goes into the same set, of which grouping fields are just a view.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Groupings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oesn't make sense to have multiple pris to the same req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Groupings have types? {Umbrella, Enum, Flags/Tag/Labels}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Grouping type can constrain its childrens' types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6"/>Umbrella can have any children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6"/>Enum ?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 text:c="3"/>How would this affect many-to-many?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<text:s text:c="3"/>Grouping can specify that only one of {self, children} is allowed at once. Seems easiest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   In RWM, keys are values <text:span text:style-name="T1">are</text:span><text:span text:style-name="T2"> different, yet I'm not representing it as such... The difference results in an 'unapplicability' flag. (CH-1)</text:span>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How are grouping fields affected?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5" office:value-type="string" calcext:value-type="string">
            <text:p>Variables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Field existence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Field.group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<text:s text:c="2"/>Group existence</text:p>
          </table:table-cell>
          <table:table-cell office:value-type="string" calcext:value-type="string">
            <text:p>Field is now an incomple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 text:c="2"/>Group.children</text:p>
          </table:table-cell>
          <table:table-cell office:value-type="string" calcext:value-type="string">
            <text:p>NOP, only view changes.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Mandatoryness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Grouping ⇔ ReqType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Field: Grouping ⇔ (UC ∨ ¬UC)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Why should custom fields be separated by (UC ∨ ¬UC)? How about just ordered list of fields, each has “Applies to req-types” attr.</text:p>
            <text:p>Field : Grouping ⇔ ReqType</text:p>
          </table:table-cell>
          <table:table-cell table:number-columns-repeated="1018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4"/>
          <table:table-cell table:style-name="ce5" office:value-type="string" calcext:value-type="string">
            <text:p>Two options:</text:p>
          </table:table-cell>
          <table:table-cell table:style-name="ce5" office:value-type="string" calcext:value-type="string">
            <text:p>Option 1</text:p>
          </table:table-cell>
          <table:table-cell table:style-name="ce16" office:value-type="string" calcext:value-type="string">
            <text:p>Option 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Fields/grouping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Grouping mandatoryness.</text:p>
          </table:table-cell>
          <table:table-cell office:value-type="string" calcext:value-type="string">
            <text:p>Per project. (per field)</text:p>
          </table:table-cell>
          <table:table-cell table:style-name="ce17" office:value-type="string" calcext:value-type="string">
            <text:p>Per req-type.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Mutually exclusive groupings (enum)</text:p>
          </table:table-cell>
          <table:table-cell office:value-type="string" calcext:value-type="string">
            <text:p>Supported.</text:p>
          </table:table-cell>
          <table:table-cell table:style-name="ce17" office:value-type="string" calcext:value-type="string">
            <text:p>In each pool, fine. Between general pool &amp; field, ?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Grouping field storage</text:p>
          </table:table-cell>
          <table:table-cell office:value-type="string" calcext:value-type="string">
            <text:p>Shared pool per UC or LL.</text:p>
          </table:table-cell>
          <table:table-cell table:style-name="ce17" office:value-type="string" calcext:value-type="string">
            <text:p>Dedicated storage.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Issues</text:p>
          </table:table-cell>
          <table:table-cell table:style-name="ce15" office:value-type="string" calcext:value-type="string">
            <text:p>If 2 priorities are required for diff purposes, the grouping tree must have 2 copies to reflect each purpose.</text:p>
          </table:table-cell>
          <table:table-cell table:style-name="ce18" office:value-type="string" calcext:value-type="string">
            <text:p>Groupings need to be stored in the correct field.</text:p>
            <text:p>Applying to general grouping field is semantically separate.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Impl</text:p>
          </table:table-cell>
          <table:table-cell office:value-type="string" calcext:value-type="string">
            <text:p>Easy</text:p>
          </table:table-cell>
          <table:table-cell table:style-name="ce17" office:value-type="string" calcext:value-type="string">
            <text:p>Hard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Yay!</text:p>
          </table:table-cell>
          <table:table-cell table:style-name="ce17" office:value-type="string" calcext:value-type="string">
            <text:p>Nay.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style-name="ce10" office:value-type="string" calcext:value-type="string">
            <text:p>Field Sets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cope</text:p>
          </table:table-cell>
          <table:table-cell table:style-name="ce19" office:value-type="string" calcext:value-type="string">
            <text:p>Mandatory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Business Priority</text:p>
          </table:table-cell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Not: CO, DD.</text:p>
          </table:table-cell>
          <table:table-cell table:style-name="ce20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Internal Priority</text:p>
          </table:table-cell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Not: CO, DD.</text:p>
          </table:table-cell>
          <table:table-cell table:style-name="ce20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Extra Info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Not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Actors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Pre-Cond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Post-Cond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number-columns-repeated="2" table:style-name="ce12" office:value-type="string" calcext:value-type="string">
            <text:p>UC Courses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Flow Graph</text:p>
          </table:table-cell>
          <table:table-cell table:style-name="ce12" office:value-type="string" calcext:value-type="string">
            <text:p>UC Flow Graph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string" calcext:value-type="string">
            <text:p>Constraints &amp; Business Rules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Only: UC.</text:p>
          </table:table-cell>
          <table:table-cell table:style-name="ce20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Non-customisable stuff shouldn't even be displayed.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For UCs: Title, UC groupings (?).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For LLs: Req, groupings (?), implications {in,out}, sem ID</text:p>
          </table:table-cell>
          <table:table-cell table:style-name="Default" table:number-columns-repeated="2"/>
          <table:table-cell table:style-name="ce21"/>
          <table:table-cell table:number-columns-repeated="1015"/>
        </table:table-row>
        <table:table-row table:style-name="ro2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C Fields &amp; Steps" table:style-name="ta1">
        <office:forms form:automatic-focus="false" form:apply-design-mode="false"/>
        <table:table-column table:style-name="co6" table:default-cell-style-name="ce6"/>
        <table:table-column table:style-name="co7" table:number-columns-repeated="2" table:default-cell-style-name="ce6"/>
        <table:table-row table:style-name="ro2">
          <table:table-cell table:style-name="ce22" office:value-type="string" calcext:value-type="string">
            <text:p>UC fields and steps are req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m a modelling sense, groupings apply to a UC in its entirety, or a UC field, or a UC ste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 fields should be considered reqs, just not displayed that way. Why? UC Field ⇒ Req ∨ UC Field ⊗ 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at about UC steps? Same deal as above.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Effects:</text:p>
          </table:table-cell>
          <table:table-cell table:style-name="ce13" office:value-type="string" calcext:value-type="string">
            <text:p>UC Field</text:p>
          </table:table-cell>
          <table:table-cell table:style-name="ce13" office:value-type="string" calcext:value-type="string">
            <text:p>UC Step</text:p>
          </table:table-cell>
        </table:table-row>
        <table:table-row table:style-name="ro2">
          <table:table-cell office:value-type="string" calcext:value-type="string">
            <text:p><text:s text:c="4"/>Refs from within UC</text:p>
          </table:table-cell>
          <table:table-cell table:style-name="ce23" office:value-type="string" calcext:value-type="string">
            <text:p>need new ref fm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<text:s text:c="4"/>Refs from outside UC</text:p>
          </table:table-cell>
          <table:table-cell table:style-name="ce23" office:value-type="string" calcext:value-type="string">
            <text:p>need new ref fmt</text:p>
          </table:table-cell>
          <table:table-cell office:value-type="string" calcext:value-type="string">
            <text:p>should be fine via parsing</text:p>
          </table:table-cell>
        </table:table-row>
        <table:table-row table:style-name="ro2">
          <table:table-cell office:value-type="string" calcext:value-type="string">
            <text:p><text:s text:c="4"/>Refs implication (causality)</text:p>
          </table:table-cell>
          <table:table-cell table:number-columns-repeated="2" table:style-name="ce23" office:value-type="string" calcext:value-type="string">
            <text:p>specify how?</text:p>
          </table:table-cell>
        </table:table-row>
        <table:table-row table:style-name="ro2">
          <table:table-cell office:value-type="string" calcext:value-type="string">
            <text:p><text:s text:c="4"/>Grouping application</text:p>
          </table:table-cell>
          <table:table-cell table:number-columns-repeated="2" office:value-type="string" calcext:value-type="string">
            <text:p>should be fine via token parsing</text:p>
          </table:table-cell>
        </table:table-row>
        <table:table-row table:style-name="ro2">
          <table:table-cell office:value-type="string" calcext:value-type="string">
            <text:p><text:s text:c="4"/>Grouping browsing</text:p>
          </table:table-cell>
          <table:table-cell table:number-columns-repeated="2" table:style-name="ce24" office:value-type="string" calcext:value-type="string">
            <text:p>hmm?</text:p>
          </table:table-cell>
        </table:table-row>
        <table:table-row table:style-name="ro2">
          <table:table-cell office:value-type="string" calcext:value-type="string">
            <text:p><text:s text:c="4"/>Incompletions</text:p>
          </table:table-cell>
          <table:table-cell table:number-columns-repeated="2" table:style-name="ce24" office:value-type="string" calcext:value-type="string">
            <text:p>hmm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4:26:19.52283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1:06:38.221347751</meta:creation-date>
    <dc:date>2014-06-09T14:27:03.940252617</dc:date>
    <meta:editing-duration>PT2H15M3S</meta:editing-duration>
    <meta:editing-cycles>16</meta:editing-cycles>
    <meta:generator>LibreOffice/4.2.4.2$Linux_x86 LibreOffice_project/420m0$Build-2</meta:generator>
    <meta:document-statistic meta:table-count="2" meta:cell-count="167" meta:object-count="0"/>
  </office:meta>
</office:document-meta>
</file>