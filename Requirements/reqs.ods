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14.91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2.591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57cm" fo:break-before="auto" style:use-optimal-row-height="true"/>
    </style:style>
    <style:style style:name="ro6" style:family="table-row">
      <style:table-row-properties style:row-height="1.314cm" fo:break-before="auto" style:use-optimal-row-height="true"/>
    </style:style>
    <style:style style:name="ro7" style:family="table-row">
      <style:table-row-properties style:row-height="1.734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4.244cm" fo:break-before="auto" style:use-optimal-row-height="true"/>
    </style:style>
    <style:style style:name="ro10" style:family="table-row">
      <style:table-row-properties style:row-height="2.152cm" fo:break-before="auto" style:use-optimal-row-height="true"/>
    </style:style>
    <style:style style:name="ro11" style:family="table-row">
      <style:table-row-properties style:row-height="2.988cm" fo:break-before="auto" style:use-optimal-row-height="true"/>
    </style:style>
    <style:style style:name="ro12" style:family="table-row">
      <style:table-row-properties style:row-height="1.249cm" fo:break-before="auto" style:use-optimal-row-height="true"/>
    </style:style>
    <style:style style:name="ro13" style:family="table-row">
      <style:table-row-properties style:row-height="0.46cm" fo:break-before="auto" style:use-optimal-row-height="tru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7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2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4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6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3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4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7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3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35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36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order="0.06pt solid #000000" style:vertical-align="top"/>
    </style:style>
    <style:style style:name="ce38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cc" fo:border="0.06pt solid #000000" style:vertical-align="top"/>
    </style:style>
    <style:style style:name="ce42" style:family="table-cell" style:parent-style-name="Default">
      <style:table-cell-properties fo:border="0.06pt solid #000000" style:vertical-align="top"/>
      <style:text-properties style:use-window-font-color="true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transparent" fo:border="0.06pt solid #000000" style:vertical-align="top"/>
    </style:style>
    <style:style style:name="ce47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48" style:family="table-cell" style:parent-style-name="Default">
      <style:table-cell-properties fo:background-color="#008000" style:vertical-align="top"/>
      <style:text-properties fo:color="#ffffff"/>
    </style:style>
    <style:style style:name="ce49" style:family="table-cell" style:parent-style-name="Default">
      <style:table-cell-properties fo:background-color="#cccccc" style:vertical-align="top"/>
      <style:text-properties style:use-window-font-color="true"/>
    </style:style>
    <style:style style:name="ce50" style:family="table-cell" style:parent-style-name="Default">
      <style:table-cell-properties fo:border="0.06pt solid #000000" style:vertical-align="top"/>
      <style:text-properties fo:color="#b3b3b3"/>
    </style:style>
    <style:style style:name="ce51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52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53" style:family="table-cell" style:parent-style-name="Default">
      <style:table-cell-properties style:vertical-align="top"/>
    </style:style>
    <style:style style:name="ce54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56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57" style:family="table-cell" style:parent-style-name="Default">
      <style:table-cell-properties fo:wrap-option="wrap" fo:border="0.06pt solid #000000" style:vertical-align="top"/>
    </style:style>
    <style:style style:name="ce58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60" style:family="table-cell" style:parent-style-name="Default">
      <style:table-cell-properties fo:background-color="#ffffcc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62" style:family="table-cell" style:parent-style-name="Default">
      <style:table-cell-properties fo:wrap-option="wrap" fo:border="0.06pt solid #000000"/>
    </style:style>
    <style:style style:name="ce63" style:family="table-cell" style:parent-style-name="Default">
      <style:table-cell-properties fo:background-color="transparent" fo:wrap-option="wrap" fo:border="0.06pt solid #000000" style:vertical-align="top"/>
    </style:style>
    <style:style style:name="ce64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65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66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70" style:family="table-cell" style:parent-style-name="Default">
      <style:table-cell-properties fo:background-color="#ffffcc" fo:wrap-option="wrap" fo:border="0.06pt solid #000000"/>
    </style:style>
    <style:style style:name="ce71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73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75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77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78" style:family="table-cell" style:parent-style-name="Default">
      <style:table-cell-properties fo:wrap-option="wrap" style:vertical-align="top"/>
    </style:style>
    <style:style style:name="ce7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80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8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82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008000" fo:wrap-option="wrap" style:vertical-align="top"/>
      <style:text-properties fo:color="#ffffff"/>
    </style:style>
    <style:style style:name="ce8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7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8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89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90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91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93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94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9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0" style:family="table-cell" style:parent-style-name="Default">
      <style:table-cell-properties style:vertical-align="top"/>
      <style:text-properties style:use-window-font-color="true"/>
    </style:style>
    <style:style style:name="ce101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02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03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04" style:family="table-cell" style:parent-style-name="Default">
      <style:table-cell-properties fo:background-color="transparent" fo:wrap-option="wrap" fo:border="0.06pt solid #000000"/>
    </style:style>
    <style:style style:name="ce105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wrap-option="wrap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8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112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115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6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17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19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color="#66666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 fo:color="#666666"/>
    </style:style>
    <style:style style:name="T5" style:family="text"/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666666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53"/>
        <table:table-column table:style-name="co4" table:default-cell-style-name="ce78"/>
        <table:table-column table:style-name="co5" table:default-cell-style-name="ce78"/>
        <table:table-column table:style-name="co6" table:default-cell-style-name="ce78"/>
        <table:table-column table:style-name="co7" table:default-cell-style-name="ce15"/>
        <table:table-column table:style-name="co8" table:default-cell-style-name="ce15"/>
        <table:table-column table:style-name="co9" table:default-cell-style-name="ce97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number-columns-repeated="1010" table:default-cell-style-name="ce53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4" table:formula="of:=MAX([.C$2:.C$580])+1" office:value-type="float" office:value="242" calcext:value-type="float">
            <text:p/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95" office:value-type="string" calcext:value-type="string">
            <text:p>Complete</text:p>
          </table:table-cell>
          <table:table-cell table:style-name="ce95" office:value-type="string" calcext:value-type="string">
            <text:p>Correct</text:p>
          </table:table-cell>
          <table:table-cell table:style-name="ce95" office:value-type="string" calcext:value-type="string">
            <text:p>Feasible</text:p>
          </table:table-cell>
          <table:table-cell table:style-name="ce95" office:value-type="string" calcext:value-type="string">
            <text:p>Necessary</text:p>
          </table:table-cell>
          <table:table-cell table:style-name="ce95" office:value-type="string" calcext:value-type="string">
            <text:p>Prioritised</text:p>
          </table:table-cell>
          <table:table-cell table:style-name="ce95" office:value-type="string" calcext:value-type="string">
            <text:p>Unambiguous</text:p>
          </table:table-cell>
          <table:table-cell table:style-name="ce95" office:value-type="string" calcext:value-type="string">
            <text:p>Verifiable</text:p>
          </table:table-cell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uce</text:p>
          </table:table-cell>
          <table:table-cell table:style-name="ce54" office:value-type="string" calcext:value-type="string">
            <text:p>MF-01: Use Case Editor</text:p>
          </table:table-cell>
          <table:table-cell table:style-name="ce54" table:number-columns-repeated="2"/>
          <table:table-cell table:style-name="ce95" table:number-columns-repeated="7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82" calcext:value-type="float">
            <text:p>82</text:p>
          </table:table-cell>
          <table:table-cell table:style-name="ce37" office:value-type="string" calcext:value-type="string">
            <text:p>-</text:p>
          </table:table-cell>
          <table:table-cell table:style-name="ce55" office:value-type="string" calcext:value-type="string">
            <text:p>BA shall be able to reference reqs from UC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50" calcext:value-type="float">
            <text:p>150</text:p>
          </table:table-cell>
          <table:table-cell table:style-name="ce37" office:value-type="string" calcext:value-type="string">
            <text:p>-</text:p>
          </table:table-cell>
          <table:table-cell table:style-name="ce55" office:value-type="string" calcext:value-type="string">
            <text:p>BA shall be able to reference SHRs from UC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string" calcext:value-type="string">
            <text:p>.org-ap</text:p>
          </table:table-cell>
          <table:table-cell table:style-name="ce56" office:value-type="string" calcext:value-type="string">
            <text:p>Groupings</text:p>
          </table:table-cell>
          <table:table-cell table:style-name="ce56" table:number-columns-repeated="2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7" calcext:value-type="float">
            <text:p>7</text:p>
          </table:table-cell>
          <table:table-cell table:style-name="ce37" office:value-type="string" calcext:value-type="string">
            <text:p><text:s text:c="2"/>.add</text:p>
          </table:table-cell>
          <table:table-cell table:style-name="ce55" office:value-type="string" calcext:value-type="string">
            <text:p>BA shall be able to apply groupings to UC using the UCE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37" office:value-type="string" calcext:value-type="string">
            <text:p><text:s text:c="2"/>.remove</text:p>
          </table:table-cell>
          <table:table-cell table:style-name="ce55" office:value-type="string" calcext:value-type="string">
            <text:p>BA shall be able to remove groupings to UC using the UCE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23" calcext:value-type="float">
            <text:p>23</text:p>
          </table:table-cell>
          <table:table-cell table:style-name="ce37" office:value-type="string" calcext:value-type="string">
            <text:p><text:s text:c="2"/>.fields</text:p>
          </table:table-cell>
          <table:table-cell table:style-name="ce57" office:value-type="string" calcext:value-type="string">
            <text:p>BA shall be able to apply groupings to fields within a UC.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fieldset</text:p>
          </table:table-cell>
          <table:table-cell table:style-name="ce54" office:value-type="string" calcext:value-type="string">
            <text:p>MF-05: Field Customisation</text:p>
          </table:table-cell>
          <table:table-cell table:style-name="ce54" table:number-columns-repeated="2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uc.mod</text:p>
          </table:table-cell>
          <table:table-cell table:style-name="ce58" office:value-type="string" calcext:value-type="string">
            <text:p>Modifying a UC field set</text:p>
          </table:table-cell>
          <table:table-cell table:style-name="ce58" table:number-columns-repeated="2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114" calcext:value-type="float">
            <text:p>114</text:p>
          </table:table-cell>
          <table:table-cell table:style-name="ce37" office:value-type="string" calcext:value-type="string">
            <text:p><text:s text:c="2"/>.list</text:p>
          </table:table-cell>
          <table:table-cell table:style-name="ce57" office:value-type="string" calcext:value-type="string">
            <text:p>BA shall be able to see a list of all existing UC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string" calcext:value-type="string">
            <text:p><text:s text:c="2"/>.create</text:p>
          </table:table-cell>
          <table:table-cell table:style-name="ce57" office:value-type="string" calcext:value-type="string">
            <text:p>BA shall be able to add UC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57" office:value-type="string" calcext:value-type="string">
            <text:p>BA shall be able to modify UC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40" office:value-type="string" calcext:value-type="string">
            <text:p><text:s text:c="4"/>.order</text:p>
          </table:table-cell>
          <table:table-cell table:style-name="ce57" office:value-type="string" calcext:value-type="string">
            <text:p>BA shall be able to reorder UC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40" office:value-type="string" calcext:value-type="string">
            <text:p><text:s text:c="2"/>.delete</text:p>
          </table:table-cell>
          <table:table-cell table:style-name="ce57" office:value-type="string" calcext:value-type="string">
            <text:p>BA shall be able to (soft) delete UC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55" office:value-type="string" calcext:value-type="string">
            <text:p>System shall indicate how many UCs have content for each UC field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37" office:value-type="string" calcext:value-type="string">
            <text:p><text:s text:c="4"/>.usage-inspect</text:p>
          </table:table-cell>
          <table:table-cell table:style-name="ce55" office:value-type="string" calcext:value-type="string">
            <text:p>BA shall be able to see each instance of content for a UC field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47" calcext:value-type="float">
            <text:p>47</text:p>
          </table:table-cell>
          <table:table-cell table:style-name="ce40" office:value-type="string" calcext:value-type="string">
            <text:p><text:s text:c="4"/>.bin</text:p>
          </table:table-cell>
          <table:table-cell table:style-name="ce57" office:value-type="string" calcext:value-type="string">
            <text:p>When (soft) deleting a UC field, System shall move it to the bi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40" calcext:value-type="float">
            <text:p>40</text:p>
          </table:table-cell>
          <table:table-cell table:style-name="ce40" office:value-type="string" calcext:value-type="string">
            <text:p><text:s text:c="2"/>.restore</text:p>
          </table:table-cell>
          <table:table-cell table:style-name="ce57" office:value-type="string" calcext:value-type="string">
            <text:p>BA shall be able to restore deleted UC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41" calcext:value-type="float">
            <text:p>41</text:p>
          </table:table-cell>
          <table:table-cell table:style-name="ce40" office:value-type="string" calcext:value-type="string">
            <text:p><text:s text:c="4"/>.data</text:p>
          </table:table-cell>
          <table:table-cell table:style-name="ce57" office:value-type="string" calcext:value-type="string">
            <text:p>When a UC field is restored, System shall restore corresponding field values for each UC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26" office:value-type="float" office:value="65" calcext:value-type="float">
            <text:p>65</text:p>
          </table:table-cell>
          <table:table-cell table:style-name="ce40" office:value-type="string" calcext:value-type="string">
            <text:p><text:s text:c="2"/>.mandatory</text:p>
          </table:table-cell>
          <table:table-cell table:style-name="ce57" office:value-type="string" calcext:value-type="string">
            <text:p>BA shall be able to specify mandatory-ness of UC field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89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llreq.mod</text:p>
          </table:table-cell>
          <table:table-cell table:style-name="ce58" office:value-type="string" calcext:value-type="string">
            <text:p>Modifying an LL-req field set</text:p>
          </table:table-cell>
          <table:table-cell table:style-name="ce58" table:number-columns-repeated="2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26" calcext:value-type="float">
            <text:p>126</text:p>
          </table:table-cell>
          <table:table-cell table:style-name="ce37" office:value-type="string" calcext:value-type="string">
            <text:p><text:s text:c="2"/>.list</text:p>
          </table:table-cell>
          <table:table-cell table:style-name="ce57" office:value-type="string" calcext:value-type="string">
            <text:p>BA shall be able to see a list of all existing LL-req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27" calcext:value-type="float">
            <text:p>127</text:p>
          </table:table-cell>
          <table:table-cell table:style-name="ce37" office:value-type="string" calcext:value-type="string">
            <text:p><text:s text:c="2"/>.create</text:p>
          </table:table-cell>
          <table:table-cell table:style-name="ce57" office:value-type="string" calcext:value-type="string">
            <text:p>BA shall be able to add LL-req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28" calcext:value-type="float">
            <text:p>128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57" office:value-type="string" calcext:value-type="string">
            <text:p>BA shall be able to modify LL-req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29" calcext:value-type="float">
            <text:p>129</text:p>
          </table:table-cell>
          <table:table-cell table:style-name="ce40" office:value-type="string" calcext:value-type="string">
            <text:p><text:s text:c="4"/>.order</text:p>
          </table:table-cell>
          <table:table-cell table:style-name="ce57" office:value-type="string" calcext:value-type="string">
            <text:p>BA shall be able to reorder LL-req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30" calcext:value-type="float">
            <text:p>130</text:p>
          </table:table-cell>
          <table:table-cell table:style-name="ce40" office:value-type="string" calcext:value-type="string">
            <text:p><text:s text:c="2"/>.delete</text:p>
          </table:table-cell>
          <table:table-cell table:style-name="ce57" office:value-type="string" calcext:value-type="string">
            <text:p>BA shall be able to (soft) delete LL-req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34" calcext:value-type="float">
            <text:p>134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55" office:value-type="string" calcext:value-type="string">
            <text:p>System shall indicate how many LL-reqs have content for each LL-req field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35" calcext:value-type="float">
            <text:p>135</text:p>
          </table:table-cell>
          <table:table-cell table:style-name="ce37" office:value-type="string" calcext:value-type="string">
            <text:p><text:s text:c="4"/>.usage-inspect</text:p>
          </table:table-cell>
          <table:table-cell table:style-name="ce55" office:value-type="string" calcext:value-type="string">
            <text:p>BA shall be able to see each instance of content for an LL-req field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31" calcext:value-type="float">
            <text:p>131</text:p>
          </table:table-cell>
          <table:table-cell table:style-name="ce40" office:value-type="string" calcext:value-type="string">
            <text:p><text:s text:c="4"/>.bin</text:p>
          </table:table-cell>
          <table:table-cell table:style-name="ce57" office:value-type="string" calcext:value-type="string">
            <text:p>When (soft) deleting an LL-req field, System shall move it to the bi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32" calcext:value-type="float">
            <text:p>132</text:p>
          </table:table-cell>
          <table:table-cell table:style-name="ce40" office:value-type="string" calcext:value-type="string">
            <text:p><text:s text:c="2"/>.restore</text:p>
          </table:table-cell>
          <table:table-cell table:style-name="ce57" office:value-type="string" calcext:value-type="string">
            <text:p>BA shall be able to restore deleted LL-req fiel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33" calcext:value-type="float">
            <text:p>133</text:p>
          </table:table-cell>
          <table:table-cell table:style-name="ce40" office:value-type="string" calcext:value-type="string">
            <text:p><text:s text:c="4"/>.data</text:p>
          </table:table-cell>
          <table:table-cell table:style-name="ce57" office:value-type="string" calcext:value-type="string">
            <text:p>When an LL-req field is restored, System shall restore corresponding field values for each LL-req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6</text:p>
            <text:p>MF-12</text:p>
          </table:table-cell>
          <table:table-cell table:style-name="ce26" office:value-type="float" office:value="136" calcext:value-type="float">
            <text:p>136</text:p>
          </table:table-cell>
          <table:table-cell table:style-name="ce40" office:value-type="string" calcext:value-type="string">
            <text:p><text:s text:c="2"/>.mandatory</text:p>
          </table:table-cell>
          <table:table-cell table:style-name="ce57" office:value-type="string" calcext:value-type="string">
            <text:p>BA shall be able to specify mandatory-ness of LL-req field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89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39" office:value-type="string" calcext:value-type="string">
            <text:p>.types</text:p>
          </table:table-cell>
          <table:table-cell table:style-name="ce58" office:value-type="string" calcext:value-type="string">
            <text:p>Field types</text:p>
          </table:table-cell>
          <table:table-cell table:style-name="ce58" table:number-columns-repeated="2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43" calcext:value-type="float">
            <text:p>43</text:p>
          </table:table-cell>
          <table:table-cell table:style-name="ce40" office:value-type="string" calcext:value-type="string">
            <text:p><text:s text:c="2"/>.text</text:p>
          </table:table-cell>
          <table:table-cell table:style-name="ce57" office:value-type="string" calcext:value-type="string">
            <text:p>System shall provide a field type: Text field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44" calcext:value-type="float">
            <text:p>44</text:p>
          </table:table-cell>
          <table:table-cell table:style-name="ce40" office:value-type="string" calcext:value-type="string">
            <text:p><text:s text:c="4"/>.name</text:p>
          </table:table-cell>
          <table:table-cell table:style-name="ce57" office:value-type="string" calcext:value-type="string">
            <text:p>BA shall be able to configure text fields' name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46" calcext:value-type="float">
            <text:p>46</text:p>
          </table:table-cell>
          <table:table-cell table:style-name="ce40" office:value-type="string" calcext:value-type="string">
            <text:p><text:s text:c="2"/>.grouping</text:p>
          </table:table-cell>
          <table:table-cell table:style-name="ce57" office:value-type="string" calcext:value-type="string">
            <text:p>System shall provide a field type derived from a grouping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89" office:value-type="string" calcext:value-type="string">
            <text:p>Work out config details</text:p>
          </table:table-cell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26" office:value-type="float" office:value="66" calcext:value-type="float">
            <text:p>66</text:p>
          </table:table-cell>
          <table:table-cell table:style-name="ce40" office:value-type="string" calcext:value-type="string">
            <text:p><text:s text:c="2"/>.zero</text:p>
          </table:table-cell>
          <table:table-cell table:style-name="ce57" office:value-type="string" calcext:value-type="string">
            <text:p>All field types that have a concept of mandatory-ness must also provide an emptyness test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89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45" calcext:value-type="float">
            <text:p>45</text:p>
          </table:table-cell>
          <table:table-cell table:style-name="ce40" office:value-type="string" calcext:value-type="string">
            <text:p><text:s text:c="2"/>.uc.flowgraph</text:p>
          </table:table-cell>
          <table:table-cell table:style-name="ce57" office:value-type="string" calcext:value-type="string">
            <text:p>System shall provide a UC field type: Flow graph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incompletions</text:p>
          </table:table-cell>
          <table:table-cell table:style-name="ce54" office:value-type="string" calcext:value-type="string">
            <text:p>MF-06: Incompletions</text:p>
          </table:table-cell>
          <table:table-cell table:style-name="ce54" table:number-columns-repeated="2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52" calcext:value-type="float">
            <text:p>52</text:p>
          </table:table-cell>
          <table:table-cell table:style-name="ce37" office:value-type="string" calcext:value-type="string">
            <text:p><text:s text:c="2"/>.render.txt</text:p>
          </table:table-cell>
          <table:table-cell table:style-name="ce57" office:value-type="string" calcext:value-type="string">
            <text:p>System shall render incompletions in reqs, red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92" calcext:value-type="float">
            <text:p>92</text:p>
          </table:table-cell>
          <table:table-cell table:style-name="ce37" office:value-type="string" calcext:value-type="string">
            <text:p><text:s text:c="2"/>.render.empty</text:p>
          </table:table-cell>
          <table:table-cell table:style-name="ce57" office:value-type="string" calcext:value-type="string">
            <text:p>System shall render blank, mandatory fields with a red background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7"/>
          <table:table-cell table:style-name="ce95"/>
          <table:table-cell/>
          <table:table-cell table:style-name="ce15"/>
          <table:table-cell table:style-name="ce95" table:number-columns-repeated="4"/>
          <table:table-cell table:style-name="ce99" table:number-columns-repeated="1008"/>
          <table:table-cell table:number-columns-repeated="2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<text:s text:c="2"/>.inspect</text:p>
          </table:table-cell>
          <table:table-cell table:style-name="ce59" office:value-type="string" calcext:value-type="string">
            <text:p>Inspection</text:p>
          </table:table-cell>
          <table:table-cell table:style-name="ce59" table:number-columns-repeated="2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48" calcext:value-type="float">
            <text:p>48</text:p>
          </table:table-cell>
          <table:table-cell table:style-name="ce37" office:value-type="string" calcext:value-type="string">
            <text:p><text:s text:c="4"/>.total</text:p>
          </table:table-cell>
          <table:table-cell table:style-name="ce57" office:value-type="string" calcext:value-type="string">
            <text:p>BA shall be able to see the sum total of incompletions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95"/>
          <table:table-cell table:number-columns-repeated="101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49" calcext:value-type="float">
            <text:p>49</text:p>
          </table:table-cell>
          <table:table-cell table:style-name="ce37" office:value-type="string" calcext:value-type="string">
            <text:p><text:s text:c="4"/>.breakdown.uc</text:p>
          </table:table-cell>
          <table:table-cell table:style-name="ce57" office:value-type="string" calcext:value-type="string">
            <text:p>BA shall be able to see a list of UCs and the number of incompletions in each. [Pri=?]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9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95" calcext:value-type="float">
            <text:p>195</text:p>
          </table:table-cell>
          <table:table-cell table:style-name="ce37" office:value-type="string" calcext:value-type="string">
            <text:p><text:s text:c="4"/>.breakdown.llreq</text:p>
          </table:table-cell>
          <table:table-cell table:style-name="ce57" office:value-type="string" calcext:value-type="string">
            <text:p>BA shall be able to see a list of LL-reqs and the number of incompletions in each. [Pri=?]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90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41" office:value-type="string" calcext:value-type="string">
            <text:p><text:s text:c="4"/>.filter</text:p>
          </table:table-cell>
          <table:table-cell table:style-name="ce60"/>
          <table:table-cell table:style-name="ce80"/>
          <table:table-cell table:style-name="ce6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50" calcext:value-type="float">
            <text:p>50</text:p>
          </table:table-cell>
          <table:table-cell table:style-name="ce37" office:value-type="string" calcext:value-type="string">
            <text:p><text:s text:c="8"/>.org</text:p>
          </table:table-cell>
          <table:table-cell table:style-name="ce57" office:value-type="string" calcext:value-type="string">
            <text:p>When viewing incompletion results, BA shall be able to filter by grouping(s)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6" office:value-type="float" office:value="51" calcext:value-type="float">
            <text:p>51</text:p>
          </table:table-cell>
          <table:table-cell table:style-name="ce37" office:value-type="string" calcext:value-type="string">
            <text:p><text:s text:c="8"/>.inc-type</text:p>
          </table:table-cell>
          <table:table-cell table:style-name="ce57" office:value-type="string" calcext:value-type="string">
            <text:p>When viewing incompletion results, BA shall be able to filter by incompletion type(s)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12" calcext:value-type="float">
            <text:p>112</text:p>
          </table:table-cell>
          <table:table-cell table:style-name="ce37" office:value-type="string" calcext:value-type="string">
            <text:p><text:s text:c="8"/>.req-type</text:p>
          </table:table-cell>
          <table:table-cell table:style-name="ce57" office:value-type="string" calcext:value-type="string">
            <text:p>When viewing incompletion results, BA shall be able to filter by requirement type(s)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8" office:value-type="float" office:value="67" calcext:value-type="float">
            <text:p>67</text:p>
          </table:table-cell>
          <table:table-cell table:style-name="ce38" office:value-type="string" calcext:value-type="string">
            <text:p><text:s text:c="4"/>.list</text:p>
          </table:table-cell>
          <table:table-cell table:style-name="ce56" office:value-type="string" calcext:value-type="string">
            <text:p>BA shall be able to see a list of incompletions.</text:p>
            <text:p><text:span text:style-name="T1">When viewing a list of incompletions...</text:span></text:p>
          </table:table-cell>
          <table:table-cell table:style-name="ce56" table:number-columns-repeated="2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13" calcext:value-type="float">
            <text:p>113</text:p>
          </table:table-cell>
          <table:table-cell table:style-name="ce37" office:value-type="string" calcext:value-type="string">
            <text:p><text:s text:c="6"/>.req-id</text:p>
          </table:table-cell>
          <table:table-cell table:style-name="ce57" office:value-type="string" calcext:value-type="string">
            <text:p>System shall display the ID of the requirement in which the incompletion exist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1" calcext:value-type="float">
            <text:p>61</text:p>
          </table:table-cell>
          <table:table-cell table:style-name="ce37" office:value-type="string" calcext:value-type="string">
            <text:p><text:s text:c="6"/>.req-name</text:p>
          </table:table-cell>
          <table:table-cell table:style-name="ce57" office:value-type="string" calcext:value-type="string">
            <text:p>System shall display the name of the requirement in which the incompletion exist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2" calcext:value-type="float">
            <text:p>62</text:p>
          </table:table-cell>
          <table:table-cell table:style-name="ce37" office:value-type="string" calcext:value-type="string">
            <text:p><text:s text:c="6"/>.ucf</text:p>
          </table:table-cell>
          <table:table-cell table:style-name="ce57" office:value-type="string" calcext:value-type="string">
            <text:p>System shall display the name of the UC field in which the incompletion exist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3" calcext:value-type="float">
            <text:p>63</text:p>
          </table:table-cell>
          <table:table-cell table:style-name="ce37" office:value-type="string" calcext:value-type="string">
            <text:p><text:s text:c="6"/>.supp</text:p>
          </table:table-cell>
          <table:table-cell table:style-name="ce57" office:value-type="string" calcext:value-type="string">
            <text:p>System shall display the incompletion tag's additional info (if specified)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4" calcext:value-type="float">
            <text:p>64</text:p>
          </table:table-cell>
          <table:table-cell table:style-name="ce37" office:value-type="string" calcext:value-type="string">
            <text:p><text:s text:c="6"/>.surrounds</text:p>
          </table:table-cell>
          <table:table-cell table:style-name="ce57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90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<text:s text:c="2"/>.track</text:p>
          </table:table-cell>
          <table:table-cell table:style-name="ce59" office:value-type="string" calcext:value-type="string">
            <text:p>Tracking</text:p>
          </table:table-cell>
          <table:table-cell table:style-name="ce59" table:number-columns-repeated="2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3" calcext:value-type="float">
            <text:p>53</text:p>
          </table:table-cell>
          <table:table-cell table:style-name="ce37" office:value-type="string" calcext:value-type="string">
            <text:p><text:s text:c="4"/>.empty</text:p>
          </table:table-cell>
          <table:table-cell table:style-name="ce57" office:value-type="string" calcext:value-type="string">
            <text:p>System shall track emptiness of mandatory fields as incompletion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4" calcext:value-type="float">
            <text:p>54</text:p>
          </table:table-cell>
          <table:table-cell table:style-name="ce37" office:value-type="string" calcext:value-type="string">
            <text:p><text:s text:c="4"/>.ref.invalid</text:p>
          </table:table-cell>
          <table:table-cell table:style-name="ce57" office:value-type="string" calcext:value-type="string">
            <text:p>System shall track invalid refs as incompletion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5" calcext:value-type="float">
            <text:p>55</text:p>
          </table:table-cell>
          <table:table-cell table:style-name="ce37" office:value-type="string" calcext:value-type="string">
            <text:p><text:s text:c="4"/>.ref.deleted</text:p>
          </table:table-cell>
          <table:table-cell table:style-name="ce57" office:value-type="string" calcext:value-type="string">
            <text:p>System shall track [DELETED] refs as incompletion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26" office:value-type="float" office:value="207" calcext:value-type="float">
            <text:p>207</text:p>
          </table:table-cell>
          <table:table-cell table:style-name="ce37" office:value-type="string" calcext:value-type="string">
            <text:p><text:s text:c="4"/>.rel.missing</text:p>
          </table:table-cell>
          <table:table-cell table:style-name="ce57" office:value-type="string" calcext:value-type="string">
            <text:p>BA shall be able to track reqs without active (non-deleted) implying reqs (MF-13) as incompletions, where the req-type is marked for such behaviour [FR-205,206].</text:p>
            <text:p><text:span text:style-name="T2">Example: UC missing priority should be an incompletion.</text:span>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74" calcext:value-type="float">
            <text:p>74</text:p>
          </table:table-cell>
          <table:table-cell table:style-name="ce37" office:value-type="string" calcext:value-type="string">
            <text:p><text:s text:c="4"/>.org.missing</text:p>
          </table:table-cell>
          <table:table-cell table:style-name="ce57" office:value-type="string" calcext:value-type="string">
            <text:p>BA shall be able to track missing orgs (MF-07) by making an org field (FR-46) mandatory.</text:p>
            <text:p><text:span text:style-name="T2">Example: UC missing priority should be an incompletion.</text:span>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145" calcext:value-type="float">
            <text:p>145</text:p>
          </table:table-cell>
          <table:table-cell table:style-name="ce37" office:value-type="string" calcext:value-type="string">
            <text:p><text:s text:c="4"/>.smr</text:p>
          </table:table-cell>
          <table:table-cell table:style-name="ce57" office:value-type="string" calcext:value-type="string">
            <text:p>System shall track Semantic Header Rows without children as incompletion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<text:s text:c="2"/>.tag</text:p>
          </table:table-cell>
          <table:table-cell table:style-name="ce59" office:value-type="string" calcext:value-type="string">
            <text:p>Incompletion tags</text:p>
          </table:table-cell>
          <table:table-cell table:style-name="ce59" table:number-columns-repeated="2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6" calcext:value-type="float">
            <text:p>56</text:p>
          </table:table-cell>
          <table:table-cell table:style-name="ce37" office:value-type="string" calcext:value-type="string">
            <text:p><text:s text:c="4"/>.uc</text:p>
          </table:table-cell>
          <table:table-cell table:style-name="ce57" office:value-type="string" calcext:value-type="string">
            <text:p>BA shall be able to specify incompletion tags in reqs.</text:p>
            <text:p>Example: “#TODO”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7" calcext:value-type="float">
            <text:p>57</text:p>
          </table:table-cell>
          <table:table-cell table:style-name="ce37" office:value-type="string" calcext:value-type="string">
            <text:p><text:s text:c="4"/>.supp</text:p>
          </table:table-cell>
          <table:table-cell table:style-name="ce57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8" calcext:value-type="float">
            <text:p>58</text:p>
          </table:table-cell>
          <table:table-cell table:style-name="ce37" office:value-type="string" calcext:value-type="string">
            <text:p><text:s text:c="4"/>.loose</text:p>
          </table:table-cell>
          <table:table-cell table:style-name="ce57" office:value-type="string" calcext:value-type="string">
            <text:p>BA shall be able to specify incompletion tags as loose notes, i.e. bound to a project but not a specific req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59" calcext:value-type="float">
            <text:p>59</text:p>
          </table:table-cell>
          <table:table-cell table:style-name="ce37" office:value-type="string" calcext:value-type="string">
            <text:p><text:s text:c="4"/>.ref.reqs</text:p>
          </table:table-cell>
          <table:table-cell table:style-name="ce61" office:value-type="string" calcext:value-type="string">
            <text:p>BA shall be able to specify refs to reqs when providing additional info to an incompletion. <text:span text:style-name="T3">[Pri=Nice]</text:span>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0" calcext:value-type="float">
            <text:p>60</text:p>
          </table:table-cell>
          <table:table-cell table:style-name="ce37" office:value-type="string" calcext:value-type="string">
            <text:p><text:s text:c="4"/>.ref.steps</text:p>
          </table:table-cell>
          <table:table-cell table:style-name="ce61" office:value-type="string" calcext:value-type="string">
            <text:p>BA shall be able to specify step refs when providing additional info to an incompletion in a UC field. <text:span text:style-name="T3">[Pri=Nice]</text:span>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1" office:value-type="string" calcext:value-type="string">
            <text:p><text:s text:c="4"/>.type</text:p>
          </table:table-cell>
          <table:table-cell table:style-name="ce56" office:value-type="string" calcext:value-type="string">
            <text:p>Tag types</text:p>
          </table:table-cell>
          <table:table-cell table:style-name="ce80"/>
          <table:table-cell table:style-name="ce60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15" calcext:value-type="float">
            <text:p>115</text:p>
          </table:table-cell>
          <table:table-cell table:style-name="ce37" office:value-type="string" calcext:value-type="string">
            <text:p><text:s text:c="6"/>.list</text:p>
          </table:table-cell>
          <table:table-cell table:style-name="ce57" office:value-type="string" calcext:value-type="string">
            <text:p>BA shall be able to see a list of all incompletion tag type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8" calcext:value-type="float">
            <text:p>68</text:p>
          </table:table-cell>
          <table:table-cell table:style-name="ce37" office:value-type="string" calcext:value-type="string">
            <text:p><text:s text:c="6"/>.create</text:p>
          </table:table-cell>
          <table:table-cell table:style-name="ce57" office:value-type="string" calcext:value-type="string">
            <text:p>BA shall be able to create new types of incompletion tags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69" calcext:value-type="float">
            <text:p>69</text:p>
          </table:table-cell>
          <table:table-cell table:style-name="ce37" office:value-type="string" calcext:value-type="string">
            <text:p><text:s text:c="6"/>.update</text:p>
          </table:table-cell>
          <table:table-cell table:style-name="ce57" office:value-type="string" calcext:value-type="string">
            <text:p>BA shall be able to rename incompletion tag types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70" calcext:value-type="float">
            <text:p>70</text:p>
          </table:table-cell>
          <table:table-cell table:style-name="ce37" office:value-type="string" calcext:value-type="string">
            <text:p><text:s text:c="8"/>.refs</text:p>
          </table:table-cell>
          <table:table-cell table:style-name="ce57" office:value-type="string" calcext:value-type="string">
            <text:p>System shall appear to rename all instances of a tag when its type is renamed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71" calcext:value-type="float">
            <text:p>71</text:p>
          </table:table-cell>
          <table:table-cell table:style-name="ce40" office:value-type="string" calcext:value-type="string">
            <text:p><text:s text:c="2"/>.delete</text:p>
          </table:table-cell>
          <table:table-cell table:style-name="ce57" office:value-type="string" calcext:value-type="string">
            <text:p>BA shall be able to delete incompletion tags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72" calcext:value-type="float">
            <text:p>72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57" office:value-type="string" calcext:value-type="string">
            <text:p>Before incompletion tag deletion, user shall be able to see a summary of usage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73" calcext:value-type="float">
            <text:p>73</text:p>
          </table:table-cell>
          <table:table-cell table:style-name="ce37" office:value-type="string" calcext:value-type="string">
            <text:p><text:s text:c="4"/>.usage-inspect</text:p>
          </table:table-cell>
          <table:table-cell table:style-name="ce57" office:value-type="string" calcext:value-type="string">
            <text:p>Before incompletion tag deletion, user shall be able to see each instance of entity's values and associations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57"/>
          <table:table-cell table:style-name="ce53" table:number-columns-repeated="7"/>
          <table:table-cell table:number-columns-repeated="1010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96" calcext:value-type="float">
            <text:p>196</text:p>
          </table:table-cell>
          <table:table-cell table:style-name="ce37" office:value-type="string" calcext:value-type="string">
            <text:p><text:s text:c="4"/>.warn</text:p>
          </table:table-cell>
          <table:table-cell table:style-name="ce57" office:value-type="string" calcext:value-type="string">
            <text:p>If there are active associations, System shall warn the user that they will be <text:span text:style-name="T3">permanently</text:span> deleted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90" office:value-type="string" calcext:value-type="string">
            <text:p>Should this be a soft-deletion? How does this affect history &amp; deleted-reqs?</text:p>
          </table:table-cell>
          <table:table-cell table:style-name="ce53" table:number-columns-repeated="7"/>
          <table:table-cell table:number-columns-repeated="101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groupings</text:p>
          </table:table-cell>
          <table:table-cell table:style-name="ce54" office:value-type="string" calcext:value-type="string">
            <text:p>MF-07: Organisation</text:p>
          </table:table-cell>
          <table:table-cell table:style-name="ce54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5" calcext:value-type="float">
            <text:p>25</text:p>
          </table:table-cell>
          <table:table-cell table:style-name="ce37" office:value-type="string" calcext:value-type="string">
            <text:p>.transitive</text:p>
          </table:table-cell>
          <table:table-cell table:style-name="ce57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types</text:p>
          </table:table-cell>
          <table:table-cell table:style-name="ce58" office:value-type="string" calcext:value-type="string">
            <text:p>Grouping types</text:p>
          </table:table-cell>
          <table:table-cell table:style-name="ce58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3" calcext:value-type="float">
            <text:p>13</text:p>
          </table:table-cell>
          <table:table-cell table:style-name="ce37" office:value-type="string" calcext:value-type="string">
            <text:p><text:s text:c="2"/>.tree</text:p>
          </table:table-cell>
          <table:table-cell table:style-name="ce57" office:value-type="string" calcext:value-type="string">
            <text:p>BA shall be able to create a tree of groupings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4" calcext:value-type="float">
            <text:p>14</text:p>
          </table:table-cell>
          <table:table-cell table:style-name="ce37" office:value-type="string" calcext:value-type="string">
            <text:p><text:s text:c="4"/>.order</text:p>
          </table:table-cell>
          <table:table-cell table:style-name="ce57" office:value-type="string" calcext:value-type="string">
            <text:p>When modifying groupings in a tree, BA shall be able to specify the order of children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42" office:value-type="string" calcext:value-type="string">
            <text:p><text:s text:c="4"/>.many2many</text:p>
          </table:table-cell>
          <table:table-cell table:style-name="ce57" office:value-type="string" calcext:value-type="string">
            <text:p>When modifying groupings in a tree, BA shall be able to specify multiple parents of a child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9" calcext:value-type="float">
            <text:p>19</text:p>
          </table:table-cell>
          <table:table-cell table:style-name="ce37" office:value-type="string" calcext:value-type="string">
            <text:p><text:s text:c="2"/>.list</text:p>
          </table:table-cell>
          <table:table-cell table:style-name="ce57" office:value-type="string" calcext:value-type="string">
            <text:p>BA shall be able to list all groupings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6" calcext:value-type="float">
            <text:p>16</text:p>
          </table:table-cell>
          <table:table-cell table:style-name="ce37" office:value-type="string" calcext:value-type="string">
            <text:p><text:s text:c="2"/>.create</text:p>
          </table:table-cell>
          <table:table-cell table:style-name="ce57" office:value-type="string" calcext:value-type="string">
            <text:p>BA shall be able to create groupings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7" calcext:value-type="float">
            <text:p>17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57" office:value-type="string" calcext:value-type="string">
            <text:p>BA shall be able to modify groupings.</text:p>
          </table:table-cell>
          <table:table-cell table:style-name="ce79" office:value-type="date" office:date-value="2014-02-07" calcext:value-type="date">
            <text:p>41677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85" calcext:value-type="float">
            <text:p>185</text:p>
          </table:table-cell>
          <table:table-cell table:style-name="ce43" office:value-type="string" calcext:value-type="string">
            <text:p><text:s text:c="4"/>.refs</text:p>
          </table:table-cell>
          <table:table-cell table:style-name="ce57" office:value-type="string" calcext:value-type="string">
            <text:p>System shall appear to rename all references of a grouping after it is renamed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8" calcext:value-type="float">
            <text:p>18</text:p>
          </table:table-cell>
          <table:table-cell table:style-name="ce37" office:value-type="string" calcext:value-type="string">
            <text:p><text:s text:c="2"/>.delete</text:p>
          </table:table-cell>
          <table:table-cell table:style-name="ce57" office:value-type="string" calcext:value-type="string">
            <text:p>BA shall be able to (soft) delete groupings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26" office:value-type="float" office:value="33" calcext:value-type="float">
            <text:p>33</text:p>
          </table:table-cell>
          <table:table-cell table:style-name="ce37" office:value-type="string" calcext:value-type="string">
            <text:p><text:s text:c="4"/>.fieldset</text:p>
          </table:table-cell>
          <table:table-cell table:style-name="ce57" office:value-type="string" calcext:value-type="string">
            <text:p>When a grouping is deleted, System shall keep fields based on that grouping intact. (They will become incompletion problems, see ???)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90" office:value-type="string" calcext:value-type="string">
            <text:p>See what? Confirm this is how it will work</text:p>
          </table:table-cell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86" calcext:value-type="float">
            <text:p>186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62" office:value-type="string" calcext:value-type="string">
            <text:p>Before grouping deletion, user shall be able to see a summary of usage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9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87" calcext:value-type="float">
            <text:p>187</text:p>
          </table:table-cell>
          <table:table-cell table:style-name="ce37" office:value-type="string" calcext:value-type="string">
            <text:p><text:s text:c="4"/>.usage-inspect</text:p>
          </table:table-cell>
          <table:table-cell table:style-name="ce62" office:value-type="string" calcext:value-type="string">
            <text:p>Before grouping deletion, user shall be able to see each instance of grouping's values and associations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9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88" calcext:value-type="float">
            <text:p>188</text:p>
          </table:table-cell>
          <table:table-cell table:style-name="ce37" office:value-type="string" calcext:value-type="string">
            <text:p><text:s text:c="4"/>.hard</text:p>
          </table:table-cell>
          <table:table-cell table:style-name="ce62" office:value-type="string" calcext:value-type="string">
            <text:p>System shall hard-delete an grouping only when it has never been used and has no associations (including soft-deleted associations)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9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189" calcext:value-type="float">
            <text:p>189</text:p>
          </table:table-cell>
          <table:table-cell table:style-name="ce37" office:value-type="string" calcext:value-type="string">
            <text:p><text:s text:c="4"/>.bin</text:p>
          </table:table-cell>
          <table:table-cell table:style-name="ce57" office:value-type="string" calcext:value-type="string">
            <text:p>Upon grouping deletion, System shall move it to the bin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9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31" calcext:value-type="float">
            <text:p>31</text:p>
          </table:table-cell>
          <table:table-cell table:style-name="ce37" office:value-type="string" calcext:value-type="string">
            <text:p><text:s text:c="2"/>.restore</text:p>
          </table:table-cell>
          <table:table-cell table:style-name="ce57" office:value-type="string" calcext:value-type="string">
            <text:p>BA shall be able to restore deleted groupings.</text:p>
          </table:table-cell>
          <table:table-cell table:style-name="ce79" office:value-type="date" office:date-value="2014-02-13" calcext:value-type="date">
            <text:p>4168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32" calcext:value-type="float">
            <text:p>32</text:p>
          </table:table-cell>
          <table:table-cell table:style-name="ce37" office:value-type="string" calcext:value-type="string">
            <text:p><text:s text:c="4"/>.aps</text:p>
          </table:table-cell>
          <table:table-cell table:style-name="ce57" office:value-type="string" calcext:value-type="string">
            <text:p>When a grouping is restored, its requirement applications should be restored too.</text:p>
          </table:table-cell>
          <table:table-cell table:style-name="ce79" office:value-type="date" office:date-value="2014-02-13" calcext:value-type="date">
            <text:p>4168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filter</text:p>
          </table:table-cell>
          <table:table-cell table:style-name="ce58" office:value-type="string" calcext:value-type="string">
            <text:p>Filtering</text:p>
          </table:table-cell>
          <table:table-cell table:style-name="ce58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28" calcext:value-type="float">
            <text:p>28</text:p>
          </table:table-cell>
          <table:table-cell table:style-name="ce37" office:value-type="string" calcext:value-type="string">
            <text:p><text:s text:c="2"/>.not</text:p>
          </table:table-cell>
          <table:table-cell table:style-name="ce57" office:value-type="string" calcext:value-type="string">
            <text:p>When specifying a grouping filter, User shall be able to specify NOT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29" calcext:value-type="float">
            <text:p>29</text:p>
          </table:table-cell>
          <table:table-cell table:style-name="ce37" office:value-type="string" calcext:value-type="string">
            <text:p><text:s text:c="2"/>.and</text:p>
          </table:table-cell>
          <table:table-cell table:style-name="ce57" office:value-type="string" calcext:value-type="string">
            <text:p>When specifying a grouping filter, User shall be able to specify AND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30" calcext:value-type="float">
            <text:p>30</text:p>
          </table:table-cell>
          <table:table-cell table:style-name="ce37" office:value-type="string" calcext:value-type="string">
            <text:p><text:s text:c="2"/>.or</text:p>
          </table:table-cell>
          <table:table-cell table:style-name="ce57" office:value-type="string" calcext:value-type="string">
            <text:p>When specifying a grouping filter, User shall be able to specify OR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29" office:value-type="float" office:value="34" calcext:value-type="float">
            <text:p>34</text:p>
          </table:table-cell>
          <table:table-cell table:style-name="ce39" office:value-type="string" calcext:value-type="string">
            <text:p>.browse</text:p>
          </table:table-cell>
          <table:table-cell table:style-name="ce58" office:value-type="string" calcext:value-type="string">
            <text:p>BA shall be able to browse groupings.</text:p>
          </table:table-cell>
          <table:table-cell table:style-name="ce81" office:value-type="date" office:date-value="2014-02-13" calcext:value-type="date">
            <text:p>41683</text:p>
          </table:table-cell>
          <table:table-cell table:style-name="ce58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5" calcext:value-type="float">
            <text:p>225</text:p>
          </table:table-cell>
          <table:table-cell table:style-name="ce37" office:value-type="string" calcext:value-type="string">
            <text:p><text:s text:c="2"/>.req-filter</text:p>
          </table:table-cell>
          <table:table-cell table:style-name="ce63" office:value-type="string" calcext:value-type="string">
            <text:p>When browsing groupings, BA shall be able to apply a filter to the requirement scope.</text:p>
            <text:p>(This affects allocations graphs and req lists.)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<text:s text:c="2"/>.bars</text:p>
          </table:table-cell>
          <table:table-cell table:style-name="ce64" office:value-type="string" calcext:value-type="string">
            <text:p>Grouping allocation graph</text:p>
          </table:table-cell>
          <table:table-cell table:style-name="ce68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2" calcext:value-type="float">
            <text:p>222</text:p>
          </table:table-cell>
          <table:table-cell table:style-name="ce37" office:value-type="string" calcext:value-type="string">
            <text:p><text:s text:c="4"/>.seg-not</text:p>
          </table:table-cell>
          <table:table-cell table:style-name="ce57" office:value-type="string" calcext:value-type="string">
            <text:p>When displaying a grouping allocation graph, System shall display a segment corresponding to reqs subject unapplied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3" calcext:value-type="float">
            <text:p>223</text:p>
          </table:table-cell>
          <table:table-cell table:style-name="ce37" office:value-type="string" calcext:value-type="string">
            <text:p><text:s text:c="4"/>.seg-parent</text:p>
          </table:table-cell>
          <table:table-cell table:style-name="ce57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4" calcext:value-type="float">
            <text:p>224</text:p>
          </table:table-cell>
          <table:table-cell table:style-name="ce37" office:value-type="string" calcext:value-type="string">
            <text:p><text:s text:c="4"/>.seq-child</text:p>
          </table:table-cell>
          <table:table-cell table:style-name="ce57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8" calcext:value-type="float">
            <text:p>238</text:p>
          </table:table-cell>
          <table:table-cell table:style-name="ce37" office:value-type="string" calcext:value-type="string">
            <text:p><text:s text:c="4"/>.seq-inspect</text:p>
          </table:table-cell>
          <table:table-cell table:style-name="ce57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0" calcext:value-type="float">
            <text:p>220</text:p>
          </table:table-cell>
          <table:table-cell table:style-name="ce37" office:value-type="string" calcext:value-type="string">
            <text:p><text:s text:c="2"/>.top</text:p>
          </table:table-cell>
          <table:table-cell table:style-name="ce57" office:value-type="string" calcext:value-type="string">
            <text:p>When first browsing groupings, System presents top-level groupings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1" calcext:value-type="float">
            <text:p>221</text:p>
          </table:table-cell>
          <table:table-cell table:style-name="ce37" office:value-type="string" calcext:value-type="string">
            <text:p><text:s text:c="2"/>.top-bars</text:p>
          </table:table-cell>
          <table:table-cell table:style-name="ce57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31" office:value-type="float" office:value="226" calcext:value-type="float">
            <text:p>226</text:p>
          </table:table-cell>
          <table:table-cell table:style-name="ce44" office:value-type="string" calcext:value-type="string">
            <text:p><text:s text:c="2"/>.detail</text:p>
          </table:table-cell>
          <table:table-cell table:style-name="ce64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4">When browsing a grouping in detail...</text:span></text:p>
          </table:table-cell>
          <table:table-cell table:style-name="ce82" office:value-type="date" office:date-value="2014-06-03" calcext:value-type="date">
            <text:p>41793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7" calcext:value-type="float">
            <text:p>227</text:p>
          </table:table-cell>
          <table:table-cell table:style-name="ce37" office:value-type="string" calcext:value-type="string">
            <text:p><text:s text:c="4"/>.bar</text:p>
          </table:table-cell>
          <table:table-cell table:style-name="ce57" office:value-type="string" calcext:value-type="string">
            <text:p>System shall present a (stacked-bar) grouping allocation graph for the subject grouping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float" office:value="35" calcext:value-type="float">
            <text:p>35</text:p>
          </table:table-cell>
          <table:table-cell table:style-name="ce42" office:value-type="string" calcext:value-type="string">
            <text:p><text:s text:c="4"/>.rescope-down</text:p>
          </table:table-cell>
          <table:table-cell table:style-name="ce65" office:value-type="string" calcext:value-type="string">
            <text:p>BA shall be able to change the grouping scope to a child of the subject grouping.</text:p>
          </table:table-cell>
          <table:table-cell table:style-name="ce83" office:value-type="date" office:date-value="2014-06-03" calcext:value-type="date">
            <text:p>41793</text:p>
          </table:table-cell>
          <table:table-cell table:style-name="ce65"/>
          <table:table-cell table:style-name="ce96" table:number-columns-repeated="2"/>
          <table:table-cell table:style-name="ce98"/>
          <table:table-cell table:style-name="ce96" table:number-columns-repeated="4"/>
          <table:table-cell table:style-name="ce100" table:number-columns-repeated="1010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float" office:value="239" calcext:value-type="float">
            <text:p>239</text:p>
          </table:table-cell>
          <table:table-cell table:style-name="ce42" office:value-type="string" calcext:value-type="string">
            <text:p><text:s text:c="4"/>.rescope-up</text:p>
          </table:table-cell>
          <table:table-cell table:style-name="ce65" office:value-type="string" calcext:value-type="string">
            <text:p>BA shall be able to change the grouping scope to the subject grouping's parent.</text:p>
          </table:table-cell>
          <table:table-cell table:style-name="ce83" office:value-type="date" office:date-value="2014-06-03" calcext:value-type="date">
            <text:p>41793</text:p>
          </table:table-cell>
          <table:table-cell table:style-name="ce65"/>
          <table:table-cell table:style-name="ce96" table:number-columns-repeated="2"/>
          <table:table-cell table:style-name="ce98"/>
          <table:table-cell table:style-name="ce96" table:number-columns-repeated="4"/>
          <table:table-cell table:style-name="ce100" table:number-columns-repeated="1010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8" office:value-type="string" calcext:value-type="string">
            <text:p>-</text:p>
          </table:table-cell>
          <table:table-cell table:style-name="ce32" office:value-type="float" office:value="240" calcext:value-type="float">
            <text:p>240</text:p>
          </table:table-cell>
          <table:table-cell table:style-name="ce42" office:value-type="string" calcext:value-type="string">
            <text:p><text:s text:c="4"/>.rescope-root</text:p>
          </table:table-cell>
          <table:table-cell table:style-name="ce65" office:value-type="string" calcext:value-type="string">
            <text:p>BA shall be able to change the grouping scope to the top-level. [FR-220]</text:p>
          </table:table-cell>
          <table:table-cell table:style-name="ce83" office:value-type="date" office:date-value="2014-06-03" calcext:value-type="date">
            <text:p>41793</text:p>
          </table:table-cell>
          <table:table-cell table:style-name="ce65"/>
          <table:table-cell table:style-name="ce96" table:number-columns-repeated="2"/>
          <table:table-cell table:style-name="ce98"/>
          <table:table-cell table:style-name="ce96" table:number-columns-repeated="4"/>
          <table:table-cell table:style-name="ce100" table:number-columns-repeated="101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8" calcext:value-type="float">
            <text:p>228</text:p>
          </table:table-cell>
          <table:table-cell table:style-name="ce45" office:value-type="string" calcext:value-type="string">
            <text:p><text:s text:c="4"/>.reqs</text:p>
          </table:table-cell>
          <table:table-cell table:style-name="ce57" office:value-type="string" calcext:value-type="string">
            <text:p>System shall present a list of all requirements (in scope [FR-225])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29" calcext:value-type="float">
            <text:p>229</text:p>
          </table:table-cell>
          <table:table-cell table:style-name="ce37" office:value-type="string" calcext:value-type="string">
            <text:p><text:s text:c="6"/>.ord-seg</text:p>
          </table:table-cell>
          <table:table-cell table:style-name="ce57" office:value-type="string" calcext:value-type="string">
            <text:p>System order requirements so that they are grouped the same way that segments are in the allocation graph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0" calcext:value-type="float">
            <text:p>230</text:p>
          </table:table-cell>
          <table:table-cell table:style-name="ce37" office:value-type="string" calcext:value-type="string">
            <text:p><text:s text:c="6"/>.select</text:p>
          </table:table-cell>
          <table:table-cell table:style-name="ce57" office:value-type="string" calcext:value-type="string">
            <text:p>BA shall be able to select and deselect requirements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1" calcext:value-type="float">
            <text:p>231</text:p>
          </table:table-cell>
          <table:table-cell table:style-name="ce37" office:value-type="string" calcext:value-type="string">
            <text:p><text:s text:c="8"/>.apply</text:p>
          </table:table-cell>
          <table:table-cell table:style-name="ce57" office:value-type="string" calcext:value-type="string">
            <text:p>BA shall be able to apply the subject grouping or one of its children, to selected requirements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2" calcext:value-type="float">
            <text:p>232</text:p>
          </table:table-cell>
          <table:table-cell table:style-name="ce37" office:value-type="string" calcext:value-type="string">
            <text:p><text:s text:c="8"/>.remove</text:p>
          </table:table-cell>
          <table:table-cell table:style-name="ce57" office:value-type="string" calcext:value-type="string">
            <text:p>BA shall be able to remove the subject grouping or one of its children, from selected requirements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3" calcext:value-type="float">
            <text:p>233</text:p>
          </table:table-cell>
          <table:table-cell table:style-name="ce37" office:value-type="string" calcext:value-type="string">
            <text:p><text:s text:c="8"/>.replace</text:p>
          </table:table-cell>
          <table:table-cell table:style-name="ce57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<text:s text:c="4"/>.groupings</text:p>
          </table:table-cell>
          <table:table-cell table:style-name="ce66" office:value-type="string" calcext:value-type="string">
            <text:p>Edit groupings</text:p>
          </table:table-cell>
          <table:table-cell table:style-name="ce68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4" calcext:value-type="float">
            <text:p>234</text:p>
          </table:table-cell>
          <table:table-cell table:style-name="ce37" office:value-type="string" calcext:value-type="string">
            <text:p><text:s text:c="6"/>.add</text:p>
          </table:table-cell>
          <table:table-cell table:style-name="ce57" office:value-type="string" calcext:value-type="string">
            <text:p>BA shall be able to add a new grouping as a child of the subject grouping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5" calcext:value-type="float">
            <text:p>235</text:p>
          </table:table-cell>
          <table:table-cell table:style-name="ce37" office:value-type="string" calcext:value-type="string">
            <text:p><text:s text:c="6"/>.edit</text:p>
          </table:table-cell>
          <table:table-cell table:style-name="ce57" office:value-type="string" calcext:value-type="string">
            <text:p>BA shall be able to edit the subject grouping or one of its children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6" calcext:value-type="float">
            <text:p>236</text:p>
          </table:table-cell>
          <table:table-cell table:style-name="ce37" office:value-type="string" calcext:value-type="string">
            <text:p><text:s text:c="6"/>.delete</text:p>
          </table:table-cell>
          <table:table-cell table:style-name="ce57" office:value-type="string" calcext:value-type="string">
            <text:p>BA shall be able to delete the subject grouping or one of its children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26" office:value-type="float" office:value="237" calcext:value-type="float">
            <text:p>237</text:p>
          </table:table-cell>
          <table:table-cell table:style-name="ce37" office:value-type="string" calcext:value-type="string">
            <text:p><text:s text:c="6"/>.restore</text:p>
          </table:table-cell>
          <table:table-cell table:style-name="ce57" office:value-type="string" calcext:value-type="string">
            <text:p>BA shall be able to restore a deleted child grouping of <text:s/>the subject grouping.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 office:value-type="string" calcext:value-type="string">
            <text:p>llreq</text:p>
          </table:table-cell>
          <table:table-cell table:style-name="ce54" office:value-type="string" calcext:value-type="string">
            <text:p>MF-12: Low-level Requirements</text:p>
          </table:table-cell>
          <table:table-cell table:style-name="ce54" table:number-columns-repeated="2"/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data</text:p>
          </table:table-cell>
          <table:table-cell table:style-name="ce59" office:value-type="string" calcext:value-type="string">
            <text:p>Req Data</text:p>
          </table:table-cell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78" calcext:value-type="float">
            <text:p>78</text:p>
          </table:table-cell>
          <table:table-cell table:style-name="ce37" office:value-type="string" calcext:value-type="string">
            <text:p><text:s text:c="2"/>.id.auto</text:p>
          </table:table-cell>
          <table:table-cell table:style-name="ce55" office:value-type="string" calcext:value-type="string">
            <text:p>System shall allocate reqs a unique ID automatically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79" calcext:value-type="float">
            <text:p>79</text:p>
          </table:table-cell>
          <table:table-cell table:style-name="ce37" office:value-type="string" calcext:value-type="string">
            <text:p><text:s text:c="2"/>.id.fmt</text:p>
          </table:table-cell>
          <table:table-cell table:style-name="ce55" office:value-type="string" calcext:value-type="string">
            <text:p>System shall create unique ID reqs by combining a req-type's mnemonic &amp; a number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77" calcext:value-type="float">
            <text:p>77</text:p>
          </table:table-cell>
          <table:table-cell table:style-name="ce37" office:value-type="string" calcext:value-type="string">
            <text:p><text:s text:c="2"/>.last-updated</text:p>
          </table:table-cell>
          <table:table-cell table:style-name="ce55" office:value-type="string" calcext:value-type="string">
            <text:p>System shall maintain the last-updated timestamp of reqs automatically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0" calcext:value-type="float">
            <text:p>80</text:p>
          </table:table-cell>
          <table:table-cell table:style-name="ce37" office:value-type="string" calcext:value-type="string">
            <text:p><text:s text:c="2"/>.ref.reqs</text:p>
          </table:table-cell>
          <table:table-cell table:style-name="ce55" office:value-type="string" calcext:value-type="string">
            <text:p>BA shall be able to reference reqs from req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8" calcext:value-type="float">
            <text:p>148</text:p>
          </table:table-cell>
          <table:table-cell table:style-name="ce37" office:value-type="string" calcext:value-type="string">
            <text:p><text:s text:c="2"/>.ref.shr</text:p>
          </table:table-cell>
          <table:table-cell table:style-name="ce55" office:value-type="string" calcext:value-type="string">
            <text:p>BA shall be able to reference SHRs from req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1" calcext:value-type="float">
            <text:p>81</text:p>
          </table:table-cell>
          <table:table-cell table:style-name="ce37" office:value-type="string" calcext:value-type="string">
            <text:p><text:s text:c="2"/>.ref.ucs</text:p>
          </table:table-cell>
          <table:table-cell table:style-name="ce55" office:value-type="string" calcext:value-type="string">
            <text:p>BA shall be able to reference UCs from req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33" office:value-type="float" office:value="102" calcext:value-type="float">
            <text:p>102</text:p>
          </table:table-cell>
          <table:table-cell table:style-name="ce39" office:value-type="string" calcext:value-type="string">
            <text:p>.delete</text:p>
          </table:table-cell>
          <table:table-cell table:style-name="ce59" office:value-type="string" calcext:value-type="string">
            <text:p>BA shall be able to (soft) delete reqs.</text:p>
          </table:table-cell>
          <table:table-cell table:style-name="ce81" office:value-type="date" office:date-value="2014-05-15" calcext:value-type="date">
            <text:p>41774</text:p>
          </table:table-cell>
          <table:table-cell table:style-name="ce9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4" calcext:value-type="float">
            <text:p>104</text:p>
          </table:table-cell>
          <table:table-cell table:style-name="ce37" office:value-type="string" calcext:value-type="string">
            <text:p><text:s text:c="2"/>.hide</text:p>
          </table:table-cell>
          <table:table-cell table:style-name="ce55" office:value-type="string" calcext:value-type="string">
            <text:p>BA shall be able to hide deleted reqs from view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3" calcext:value-type="float">
            <text:p>103</text:p>
          </table:table-cell>
          <table:table-cell table:style-name="ce37" office:value-type="string" calcext:value-type="string">
            <text:p><text:s text:c="2"/>.read</text:p>
          </table:table-cell>
          <table:table-cell table:style-name="ce55" office:value-type="string" calcext:value-type="string">
            <text:p>BA shall be able to read deleted reqs (usually in light grey and/or strikethrough)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6" calcext:value-type="float">
            <text:p>106</text:p>
          </table:table-cell>
          <table:table-cell table:style-name="ce37" office:value-type="string" calcext:value-type="string">
            <text:p><text:s text:c="2"/>.restore</text:p>
          </table:table-cell>
          <table:table-cell table:style-name="ce55" office:value-type="string" calcext:value-type="string">
            <text:p>BA shall be able to restore deleted req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26" office:value-type="float" office:value="107" calcext:value-type="float">
            <text:p>107</text:p>
          </table:table-cell>
          <table:table-cell table:style-name="ce37" office:value-type="string" calcext:value-type="string">
            <text:p><text:s text:c="5"/>.refs</text:p>
          </table:table-cell>
          <table:table-cell table:style-name="ce67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9"/>
          <table:table-cell table:style-name="ce39" office:value-type="string" calcext:value-type="string">
            <text:p>.reqtypes</text:p>
          </table:table-cell>
          <table:table-cell table:style-name="ce59" office:value-type="string" calcext:value-type="string">
            <text:p>Requirement Types</text:p>
          </table:table-cell>
          <table:table-cell table:style-name="ce81" office:value-type="date" office:date-value="2014-05-16" calcext:value-type="date">
            <text:p>41775</text:p>
          </table:table-cell>
          <table:table-cell table:style-name="ce9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16" calcext:value-type="float">
            <text:p>116</text:p>
          </table:table-cell>
          <table:table-cell table:style-name="ce37" office:value-type="string" calcext:value-type="string">
            <text:p><text:s text:c="2"/>.list</text:p>
          </table:table-cell>
          <table:table-cell table:style-name="ce57" office:value-type="string" calcext:value-type="string">
            <text:p>BA shall be able to list all existing req type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17" calcext:value-type="float">
            <text:p>117</text:p>
          </table:table-cell>
          <table:table-cell table:style-name="ce37" office:value-type="string" calcext:value-type="string">
            <text:p><text:s text:c="2"/>.create</text:p>
          </table:table-cell>
          <table:table-cell table:style-name="ce57" office:value-type="string" calcext:value-type="string">
            <text:p>BA shall be able to add a new req type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18" calcext:value-type="float">
            <text:p>118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57" office:value-type="string" calcext:value-type="string">
            <text:p>BA shall be able to modify a req type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19" calcext:value-type="float">
            <text:p>119</text:p>
          </table:table-cell>
          <table:table-cell table:style-name="ce37" office:value-type="string" calcext:value-type="string">
            <text:p><text:s text:c="4"/>.refs</text:p>
          </table:table-cell>
          <table:table-cell table:style-name="ce57" office:value-type="string" calcext:value-type="string">
            <text:p>When a req type's mnemonic is changed, System shall appear to rename all refs that include the mnemonic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22" calcext:value-type="float">
            <text:p>122</text:p>
          </table:table-cell>
          <table:table-cell table:style-name="ce37" office:value-type="string" calcext:value-type="string">
            <text:p><text:s text:c="4"/>.mnemonic</text:p>
          </table:table-cell>
          <table:table-cell table:style-name="ce57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20" calcext:value-type="float">
            <text:p>120</text:p>
          </table:table-cell>
          <table:table-cell table:style-name="ce40" office:value-type="string" calcext:value-type="string">
            <text:p><text:s text:c="2"/>.delete</text:p>
          </table:table-cell>
          <table:table-cell table:style-name="ce57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21" calcext:value-type="float">
            <text:p>121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57" office:value-type="string" calcext:value-type="string">
            <text:p>When listing req types, BA shall be able to see a summary of usage. (i.e. count of associated reqs)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23" calcext:value-type="float">
            <text:p>123</text:p>
          </table:table-cell>
          <table:table-cell table:style-name="ce37" office:value-type="string" calcext:value-type="string">
            <text:p><text:s text:c="4"/>.hard</text:p>
          </table:table-cell>
          <table:table-cell table:style-name="ce57" office:value-type="string" calcext:value-type="string">
            <text:p>System shall hard-delete a req type only when it has never had any association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24" calcext:value-type="float">
            <text:p>124</text:p>
          </table:table-cell>
          <table:table-cell table:style-name="ce40" office:value-type="string" calcext:value-type="string">
            <text:p><text:s text:c="4"/>.after</text:p>
          </table:table-cell>
          <table:table-cell table:style-name="ce65" office:value-type="string" calcext:value-type="string">
            <text:p>After soft-deletion, req types should move to the bi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25" calcext:value-type="float">
            <text:p>125</text:p>
          </table:table-cell>
          <table:table-cell table:style-name="ce40" office:value-type="string" calcext:value-type="string">
            <text:p><text:s text:c="2"/>.restore</text:p>
          </table:table-cell>
          <table:table-cell table:style-name="ce65" office:value-type="string" calcext:value-type="string">
            <text:p>BA shall be able to restore req types from the bi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view</text:p>
          </table:table-cell>
          <table:table-cell table:style-name="ce59" office:value-type="string" calcext:value-type="string">
            <text:p>Req View</text:p>
          </table:table-cell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4" calcext:value-type="float">
            <text:p>84</text:p>
          </table:table-cell>
          <table:table-cell table:style-name="ce37" office:value-type="string" calcext:value-type="string">
            <text:p><text:s text:c="2"/>.rows</text:p>
          </table:table-cell>
          <table:table-cell table:style-name="ce55" office:value-type="string" calcext:value-type="string">
            <text:p>BA shall be able to view all LL reqs with each req on its own row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3" calcext:value-type="float">
            <text:p>83</text:p>
          </table:table-cell>
          <table:table-cell table:style-name="ce37" office:value-type="string" calcext:value-type="string">
            <text:p><text:s text:c="2"/>.table</text:p>
          </table:table-cell>
          <table:table-cell table:style-name="ce55" office:value-type="string" calcext:value-type="string">
            <text:p>BA shall be able to view all LL reqs as a table/grid.</text:p>
          </table:table-cell>
          <table:table-cell table:style-name="ce79" office:value-type="date" office:date-value="2014-05-19" calcext:value-type="date">
            <text:p>41778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6" calcext:value-type="float">
            <text:p>176</text:p>
          </table:table-cell>
          <table:table-cell table:style-name="ce37" office:value-type="string" calcext:value-type="string">
            <text:p><text:s text:c="2"/>.create</text:p>
          </table:table-cell>
          <table:table-cell table:style-name="ce55" office:value-type="string" calcext:value-type="string">
            <text:p>BA shall be able to create new LL-reqs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169" calcext:value-type="float">
            <text:p>169</text:p>
          </table:table-cell>
          <table:table-cell table:style-name="ce37" office:value-type="string" calcext:value-type="string">
            <text:p><text:s text:c="2"/>.ucs</text:p>
          </table:table-cell>
          <table:table-cell table:style-name="ce55" office:value-type="string" calcext:value-type="string">
            <text:p>System shall display UCs as rows in the req view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170" calcext:value-type="float">
            <text:p>170</text:p>
          </table:table-cell>
          <table:table-cell table:style-name="ce40" office:value-type="string" calcext:value-type="string">
            <text:p><text:s text:c="4"/>.semid</text:p>
          </table:table-cell>
          <table:table-cell table:style-name="ce55" office:value-type="string" calcext:value-type="string">
            <text:p>BA shall be able to perform on UCs, all semantic-ID related behaviour applicable to LL-reqs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<text:s text:c="2"/>.columns</text:p>
          </table:table-cell>
          <table:table-cell table:style-name="ce68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0" calcext:value-type="float">
            <text:p>140</text:p>
          </table:table-cell>
          <table:table-cell table:style-name="ce37" office:value-type="string" calcext:value-type="string">
            <text:p><text:s text:c="4"/>.desc</text:p>
          </table:table-cell>
          <table:table-cell table:style-name="ce55" office:value-type="string" calcext:value-type="string">
            <text:p>In the LL-req table, System shall always display a column of req desc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38" calcext:value-type="float">
            <text:p>138</text:p>
          </table:table-cell>
          <table:table-cell table:style-name="ce37" office:value-type="string" calcext:value-type="string">
            <text:p><text:s text:c="4"/>.ids</text:p>
          </table:table-cell>
          <table:table-cell table:style-name="ce55" office:value-type="string" calcext:value-type="string">
            <text:p>In the LL-req table, System shall always display a column of req I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39" calcext:value-type="float">
            <text:p>139</text:p>
          </table:table-cell>
          <table:table-cell table:style-name="ce37" office:value-type="string" calcext:value-type="string">
            <text:p><text:s text:c="4"/>.semid</text:p>
          </table:table-cell>
          <table:table-cell table:style-name="ce55" office:value-type="string" calcext:value-type="string">
            <text:p>In the LL-req table, System shall always display a column of semantic IDs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5" calcext:value-type="float">
            <text:p>95</text:p>
          </table:table-cell>
          <table:table-cell table:style-name="ce46" office:value-type="string" calcext:value-type="string">
            <text:p><text:s text:c="7"/>.dup</text:p>
          </table:table-cell>
          <table:table-cell table:style-name="ce55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4" calcext:value-type="float">
            <text:p>94</text:p>
          </table:table-cell>
          <table:table-cell table:style-name="ce46" office:value-type="string" calcext:value-type="string">
            <text:p><text:s text:c="7"/>.indent</text:p>
          </table:table-cell>
          <table:table-cell table:style-name="ce55" office:value-type="string" calcext:value-type="string">
            <text:p>When rendering a tree of semantic IDs, System shall replace components also in the parent req, with indentation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3" calcext:value-type="float">
            <text:p>93</text:p>
          </table:table-cell>
          <table:table-cell table:style-name="ce46" office:value-type="string" calcext:value-type="string">
            <text:p><text:s text:c="7"/>.tree</text:p>
          </table:table-cell>
          <table:table-cell table:style-name="ce55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37" calcext:value-type="float">
            <text:p>137</text:p>
          </table:table-cell>
          <table:table-cell table:style-name="ce37" office:value-type="string" calcext:value-type="string">
            <text:p><text:s text:c="4"/>.sorted</text:p>
          </table:table-cell>
          <table:table-cell table:style-name="ce55" office:value-type="string" calcext:value-type="string">
            <text:p>In the LL-req table, System shall give each criterion in the sort criteria it's own colum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<text:s text:c="2"/>.editor</text:p>
          </table:table-cell>
          <table:table-cell table:style-name="ce68" table:number-columns-repeated="3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2" calcext:value-type="float">
            <text:p>172</text:p>
          </table:table-cell>
          <table:table-cell table:style-name="ce40" office:value-type="string" calcext:value-type="string">
            <text:p><text:s text:c="4"/>.copy</text:p>
          </table:table-cell>
          <table:table-cell table:style-name="ce55" office:value-type="string" calcext:value-type="string">
            <text:p>BA shall be able to create a copy of 1 or more (selected) LL-reqs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3" calcext:value-type="float">
            <text:p>173</text:p>
          </table:table-cell>
          <table:table-cell table:style-name="ce40" office:value-type="string" calcext:value-type="string">
            <text:p><text:s text:c="7"/>.selection</text:p>
          </table:table-cell>
          <table:table-cell table:style-name="ce55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4" calcext:value-type="float">
            <text:p>174</text:p>
          </table:table-cell>
          <table:table-cell table:style-name="ce40" office:value-type="string" calcext:value-type="string">
            <text:p><text:s text:c="7"/>.semid</text:p>
          </table:table-cell>
          <table:table-cell table:style-name="ce55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5" calcext:value-type="float">
            <text:p>85</text:p>
          </table:table-cell>
          <table:table-cell table:style-name="ce37" office:value-type="string" calcext:value-type="string">
            <text:p><text:s text:c="4"/>.cursor</text:p>
          </table:table-cell>
          <table:table-cell table:style-name="ce55" office:value-type="string" calcext:value-type="string">
            <text:p>When editing LL reqs, BA shall be able to move the cursor to a different req in both directions with a single keystroke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6" calcext:value-type="float">
            <text:p>156</text:p>
          </table:table-cell>
          <table:table-cell table:style-name="ce40" office:value-type="string" calcext:value-type="string">
            <text:p><text:s text:c="4"/>.dups</text:p>
          </table:table-cell>
          <table:table-cell table:style-name="ce55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7" calcext:value-type="float">
            <text:p>177</text:p>
          </table:table-cell>
          <table:table-cell table:style-name="ce44" office:value-type="string" calcext:value-type="string">
            <text:p><text:s text:c="2"/>.update</text:p>
          </table:table-cell>
          <table:table-cell table:style-name="ce69" office:value-type="string" calcext:value-type="string">
            <text:p>BA shall be able to update an existing LL-req.</text:p>
          </table:table-cell>
          <table:table-cell table:style-name="ce80" office:value-type="date" office:date-value="2014-05-22" calcext:value-type="date">
            <text:p>41781</text:p>
          </table:table-cell>
          <table:table-cell table:style-name="ce69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8" calcext:value-type="float">
            <text:p>178</text:p>
          </table:table-cell>
          <table:table-cell table:style-name="ce43" office:value-type="string" calcext:value-type="string">
            <text:p><text:s text:c="4"/>.refs</text:p>
          </table:table-cell>
          <table:table-cell table:style-name="ce57" office:value-type="string" calcext:value-type="string">
            <text:p>When an LL-req is updated, System shall appear to rename all references to it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0" calcext:value-type="float">
            <text:p>90</text:p>
          </table:table-cell>
          <table:table-cell table:style-name="ce37" office:value-type="string" calcext:value-type="string">
            <text:p><text:s text:c="4"/>.reqtype</text:p>
          </table:table-cell>
          <table:table-cell table:style-name="ce55" office:value-type="string" calcext:value-type="string">
            <text:p>BA shall be able to change the requirement type of a requirement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1" calcext:value-type="float">
            <text:p>91</text:p>
          </table:table-cell>
          <table:table-cell table:style-name="ce37" office:value-type="string" calcext:value-type="string">
            <text:p><text:s text:c="6"/>.restore</text:p>
          </table:table-cell>
          <table:table-cell table:style-name="ce55" office:value-type="string" calcext:value-type="string">
            <text:p>When a req's type is changed and later changed back to what it was previously, System restore it's original ID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94" calcext:value-type="float">
            <text:p>194</text:p>
          </table:table-cell>
          <table:table-cell table:style-name="ce37" office:value-type="string" calcext:value-type="string">
            <text:p><text:s text:c="6"/>.bulk</text:p>
          </table:table-cell>
          <table:table-cell table:style-name="ce55" office:value-type="string" calcext:value-type="string">
            <text:p>BA shall be able to set the req-type for multiple reqs simultaneously.</text:p>
          </table:table-cell>
          <table:table-cell table:style-name="ce79" office:value-type="date" office:date-value="2014-05-23" calcext:value-type="date">
            <text:p>4178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7" calcext:value-type="float">
            <text:p>97</text:p>
          </table:table-cell>
          <table:table-cell table:style-name="ce46" office:value-type="string" calcext:value-type="string">
            <text:p><text:s text:c="4"/>.semid</text:p>
          </table:table-cell>
          <table:table-cell table:style-name="ce55" office:value-type="string" calcext:value-type="string">
            <text:p>BA shall be able to modify the semantic IDs of existing req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3" calcext:value-type="float">
            <text:p>143</text:p>
          </table:table-cell>
          <table:table-cell table:style-name="ce46" office:value-type="string" calcext:value-type="string">
            <text:p><text:s text:c="7"/>.0-n</text:p>
          </table:table-cell>
          <table:table-cell table:style-name="ce55" office:value-type="string" calcext:value-type="string">
            <text:p>BA shall be able to apply 0-n semantic IDs to LL-req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9" calcext:value-type="float">
            <text:p>219</text:p>
          </table:table-cell>
          <table:table-cell table:style-name="ce46" office:value-type="string" calcext:value-type="string">
            <text:p><text:s text:c="7"/>.prevent.cyclic</text:p>
          </table:table-cell>
          <table:table-cell table:style-name="ce55" office:value-type="string" calcext:value-type="string">
            <text:p>System shall prevent a req's sem-ID transitively having itself as a child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6" calcext:value-type="float">
            <text:p>96</text:p>
          </table:table-cell>
          <table:table-cell table:style-name="ce47" office:value-type="string" calcext:value-type="string">
            <text:p><text:s text:c="7"/>.show-all</text:p>
          </table:table-cell>
          <table:table-cell table:style-name="ce55" office:value-type="string" calcext:value-type="string">
            <text:p>BA shall be able to see all semantic IDs for a req with multiple, when editing a single row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7" calcext:value-type="float">
            <text:p>167</text:p>
          </table:table-cell>
          <table:table-cell table:style-name="ce40" office:value-type="string" calcext:value-type="string">
            <text:p><text:s text:c="6"/>.bulk</text:p>
          </table:table-cell>
          <table:table-cell table:style-name="ce55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8" calcext:value-type="float">
            <text:p>168</text:p>
          </table:table-cell>
          <table:table-cell table:style-name="ce40" office:value-type="string" calcext:value-type="string">
            <text:p><text:s text:c="8"/>.no-common</text:p>
          </table:table-cell>
          <table:table-cell table:style-name="ce55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171" calcext:value-type="float">
            <text:p>171</text:p>
          </table:table-cell>
          <table:table-cell table:style-name="ce40" office:value-type="string" calcext:value-type="string">
            <text:p><text:s text:c="4"/>.uc.title</text:p>
          </table:table-cell>
          <table:table-cell table:style-name="ce55" office:value-type="string" calcext:value-type="string">
            <text:p>BA shall be able to edit a UC title from the req view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9" calcext:value-type="float">
            <text:p>179</text:p>
          </table:table-cell>
          <table:table-cell table:style-name="ce44" office:value-type="string" calcext:value-type="string">
            <text:p><text:s text:c="2"/>.delete</text:p>
          </table:table-cell>
          <table:table-cell table:style-name="ce70" office:value-type="string" calcext:value-type="string">
            <text:p>Able to (soft) delete LL-req.</text:p>
          </table:table-cell>
          <table:table-cell table:style-name="ce80" office:value-type="date" office:date-value="2014-05-22" calcext:value-type="date">
            <text:p>41781</text:p>
          </table:table-cell>
          <table:table-cell table:style-name="ce69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80" calcext:value-type="float">
            <text:p>180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62" office:value-type="string" calcext:value-type="string">
            <text:p>Before LL-req deletion, user shall be able to see a count of incoming references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81" calcext:value-type="float">
            <text:p>181</text:p>
          </table:table-cell>
          <table:table-cell table:style-name="ce37" office:value-type="string" calcext:value-type="string">
            <text:p><text:s text:c="4"/>.usage-inspect</text:p>
          </table:table-cell>
          <table:table-cell table:style-name="ce62" office:value-type="string" calcext:value-type="string">
            <text:p>Before LL-req deletion, user shall be able to see each instance of incoming references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82" calcext:value-type="float">
            <text:p>182</text:p>
          </table:table-cell>
          <table:table-cell table:style-name="ce37" office:value-type="string" calcext:value-type="string">
            <text:p><text:s text:c="4"/>.bin</text:p>
          </table:table-cell>
          <table:table-cell table:style-name="ce57" office:value-type="string" calcext:value-type="string">
            <text:p>After LL-req deletion, System shall move entity to the bin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83" calcext:value-type="float">
            <text:p>183</text:p>
          </table:table-cell>
          <table:table-cell table:style-name="ce40" office:value-type="string" calcext:value-type="string">
            <text:p><text:s text:c="2"/>.restore</text:p>
          </table:table-cell>
          <table:table-cell table:style-name="ce62" office:value-type="string" calcext:value-type="string">
            <text:p>BA shall be able to restore LL-reqs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84" calcext:value-type="float">
            <text:p>184</text:p>
          </table:table-cell>
          <table:table-cell table:style-name="ce40" office:value-type="string" calcext:value-type="string">
            <text:p><text:s text:c="4"/>.data</text:p>
          </table:table-cell>
          <table:table-cell table:style-name="ce62" office:value-type="string" calcext:value-type="string">
            <text:p>Upon LL-req restoration, previous values and associations shall be restored also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<text:s text:c="2"/>.filter</text:p>
          </table:table-cell>
          <table:table-cell table:style-name="ce68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7" calcext:value-type="float">
            <text:p>87</text:p>
          </table:table-cell>
          <table:table-cell table:style-name="ce37" office:value-type="string" calcext:value-type="string">
            <text:p><text:s text:c="4"/>.grouping</text:p>
          </table:table-cell>
          <table:table-cell table:style-name="ce55" office:value-type="string" calcext:value-type="string">
            <text:p>BA shall be able to filter view of reqs by grouping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26" office:value-type="float" office:value="86" calcext:value-type="float">
            <text:p>86</text:p>
          </table:table-cell>
          <table:table-cell table:style-name="ce37" office:value-type="string" calcext:value-type="string">
            <text:p><text:s text:c="4"/>.reqtype</text:p>
          </table:table-cell>
          <table:table-cell table:style-name="ce55" office:value-type="string" calcext:value-type="string">
            <text:p>BA shall be able to filter view of reqs by req-type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88" calcext:value-type="float">
            <text:p>88</text:p>
          </table:table-cell>
          <table:table-cell table:style-name="ce37" office:value-type="string" calcext:value-type="string">
            <text:p><text:s text:c="4"/>.txt</text:p>
          </table:table-cell>
          <table:table-cell table:style-name="ce55" office:value-type="string" calcext:value-type="string">
            <text:p>BA shall be able to filter view of reqs to rows containing a case-insensitive string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<text:s text:c="2"/>.sort</text:p>
          </table:table-cell>
          <table:table-cell table:style-name="ce68" table:number-columns-repeated="3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8" calcext:value-type="float">
            <text:p>98</text:p>
          </table:table-cell>
          <table:table-cell table:style-name="ce37" office:value-type="string" calcext:value-type="string">
            <text:p><text:s text:c="4"/>.default</text:p>
          </table:table-cell>
          <table:table-cell table:style-name="ce55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9" calcext:value-type="float">
            <text:p>109</text:p>
          </table:table-cell>
          <table:table-cell table:style-name="ce37" office:value-type="string" calcext:value-type="string">
            <text:p><text:s text:c="4"/>.on-change</text:p>
          </table:table-cell>
          <table:table-cell table:style-name="ce55" office:value-type="string" calcext:value-type="string">
            <text:p>When a req is modified, System shall automatically resort the view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10" calcext:value-type="float">
            <text:p>110</text:p>
          </table:table-cell>
          <table:table-cell table:style-name="ce37" office:value-type="string" calcext:value-type="string">
            <text:p><text:s text:c="4"/>.post-change</text:p>
          </table:table-cell>
          <table:table-cell table:style-name="ce67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99" calcext:value-type="float">
            <text:p>99</text:p>
          </table:table-cell>
          <table:table-cell table:style-name="ce37" office:value-type="string" calcext:value-type="string">
            <text:p><text:s text:c="4"/>.custom</text:p>
          </table:table-cell>
          <table:table-cell table:style-name="ce55" office:value-type="string" calcext:value-type="string">
            <text:p>BA shall be able to customise sort logic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1" calcext:value-type="float">
            <text:p>141</text:p>
          </table:table-cell>
          <table:table-cell table:style-name="ce37" office:value-type="string" calcext:value-type="string">
            <text:p><text:s text:c="7"/>.fields</text:p>
          </table:table-cell>
          <table:table-cell table:style-name="ce55" office:value-type="string" calcext:value-type="string">
            <text:p>BA shall be able to use custom LL-req fields in the sort criteria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55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MF-07</text:p>
            <text:p>MF-13</text:p>
          </table:table-cell>
          <table:table-cell table:style-name="ce26" office:value-type="float" office:value="203" calcext:value-type="float">
            <text:p>203</text:p>
          </table:table-cell>
          <table:table-cell table:style-name="ce37" office:value-type="string" calcext:value-type="string">
            <text:p><text:s text:c="7"/>.grouping-order</text:p>
          </table:table-cell>
          <table:table-cell table:style-name="ce55" office:value-type="string" calcext:value-type="string">
            <text:p>When sorting by grouping, System shall order sibling groupings according to their index relative to their parent.</text:p>
            <text:p><text:span text:style-name="T2">Eg. If BA orders Pri=High before Pri=Med in the grouping tree, then reqs with Pri=High should be appear before reqs with Pri=Med.</text:span>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0" calcext:value-type="float">
            <text:p>100</text:p>
          </table:table-cell>
          <table:table-cell table:style-name="ce37" office:value-type="string" calcext:value-type="string">
            <text:p><text:s text:c="7"/>.mult</text:p>
          </table:table-cell>
          <table:table-cell table:style-name="ce55" office:value-type="string" calcext:value-type="string">
            <text:p>BA shall be able to sort by multiple, ordered columns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8" calcext:value-type="float">
            <text:p>108</text:p>
          </table:table-cell>
          <table:table-cell table:style-name="ce37" office:value-type="string" calcext:value-type="string">
            <text:p><text:s text:c="7"/>.off</text:p>
          </table:table-cell>
          <table:table-cell table:style-name="ce55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refs</text:p>
          </table:table-cell>
          <table:table-cell table:style-name="ce59" office:value-type="string" calcext:value-type="string">
            <text:p>Refs</text:p>
          </table:table-cell>
          <table:table-cell table:style-name="ce59" table:number-columns-repeated="2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2" calcext:value-type="float">
            <text:p>152</text:p>
          </table:table-cell>
          <table:table-cell table:style-name="ce37" office:value-type="string" calcext:value-type="string">
            <text:p><text:s text:c="2"/>.disp.sem</text:p>
          </table:table-cell>
          <table:table-cell table:style-name="ce55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3" calcext:value-type="float">
            <text:p>153</text:p>
          </table:table-cell>
          <table:table-cell table:style-name="ce37" office:value-type="string" calcext:value-type="string">
            <text:p><text:s text:c="2"/>.disp.sem.short</text:p>
          </table:table-cell>
          <table:table-cell table:style-name="ce55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1" calcext:value-type="float">
            <text:p>151</text:p>
          </table:table-cell>
          <table:table-cell table:style-name="ce37" office:value-type="string" calcext:value-type="string">
            <text:p><text:s text:c="2"/>.disp.uniq</text:p>
          </table:table-cell>
          <table:table-cell table:style-name="ce55" office:value-type="string" calcext:value-type="string">
            <text:p>For LL-req refs made using unique ID, System shall render the ref using unique ID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5" calcext:value-type="float">
            <text:p>155</text:p>
          </table:table-cell>
          <table:table-cell table:style-name="ce37" office:value-type="string" calcext:value-type="string">
            <text:p><text:s text:c="2"/>.parse.sem</text:p>
          </table:table-cell>
          <table:table-cell table:style-name="ce55" office:value-type="string" calcext:value-type="string">
            <text:p>Where BA can specify refs to LL-reqs, BA can specify using a semantic ID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4" calcext:value-type="float">
            <text:p>154</text:p>
          </table:table-cell>
          <table:table-cell table:style-name="ce37" office:value-type="string" calcext:value-type="string">
            <text:p><text:s text:c="2"/>.parse.sem.short</text:p>
          </table:table-cell>
          <table:table-cell table:style-name="ce55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01" calcext:value-type="float">
            <text:p>101</text:p>
          </table:table-cell>
          <table:table-cell table:style-name="ce37" office:value-type="string" calcext:value-type="string">
            <text:p><text:s text:c="2"/>.parse.uniq</text:p>
          </table:table-cell>
          <table:table-cell table:style-name="ce55" office:value-type="string" calcext:value-type="string">
            <text:p>Where BA can specify refs to LL-reqs, BA can specify using a numeric/unique ID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39" office:value-type="string" calcext:value-type="string">
            <text:p>.shr</text:p>
          </table:table-cell>
          <table:table-cell table:style-name="ce59" office:value-type="string" calcext:value-type="string">
            <text:p>SHR (Semantic Header Row)</text:p>
          </table:table-cell>
          <table:table-cell table:style-name="ce84"/>
          <table:table-cell table:style-name="ce59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4" calcext:value-type="float">
            <text:p>144</text:p>
          </table:table-cell>
          <table:table-cell table:style-name="ce37" office:value-type="string" calcext:value-type="string">
            <text:p><text:s text:c="2"/>.create</text:p>
          </table:table-cell>
          <table:table-cell table:style-name="ce55" office:value-type="string" calcext:value-type="string">
            <text:p>BA shall be able to create an SHR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6" calcext:value-type="float">
            <text:p>146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57" office:value-type="string" calcext:value-type="string">
            <text:p>BA shall be able to update only two attributes of an SHR: {sem-ID, desc}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9" calcext:value-type="float">
            <text:p>149</text:p>
          </table:table-cell>
          <table:table-cell table:style-name="ce37" office:value-type="string" calcext:value-type="string">
            <text:p><text:s text:c="4"/>.children</text:p>
          </table:table-cell>
          <table:table-cell table:style-name="ce57" office:value-type="string" calcext:value-type="string">
            <text:p>When the sem-ID of an SHR changes, System shall rename the matching portion of childrens' sem-ID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75" calcext:value-type="float">
            <text:p>175</text:p>
          </table:table-cell>
          <table:table-cell table:style-name="ce43" office:value-type="string" calcext:value-type="string">
            <text:p><text:s text:c="4"/>.refs</text:p>
          </table:table-cell>
          <table:table-cell table:style-name="ce57" office:value-type="string" calcext:value-type="string">
            <text:p>When an SHR's semID is modified, System shall appear to rename all references to it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47" calcext:value-type="float">
            <text:p>147</text:p>
          </table:table-cell>
          <table:table-cell table:style-name="ce40" office:value-type="string" calcext:value-type="string">
            <text:p><text:s text:c="2"/>.delete</text:p>
          </table:table-cell>
          <table:table-cell table:style-name="ce55" office:value-type="string" calcext:value-type="string">
            <text:p>BA shall be able to (hard) delete an SHR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39" office:value-type="string" calcext:value-type="string">
            <text:p>.token</text:p>
          </table:table-cell>
          <table:table-cell table:style-name="ce59" office:value-type="string" calcext:value-type="string">
            <text:p>Text Tokens</text:p>
          </table:table-cell>
          <table:table-cell table:style-name="ce84"/>
          <table:table-cell table:style-name="ce59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7" calcext:value-type="float">
            <text:p>157</text:p>
          </table:table-cell>
          <table:table-cell table:style-name="ce43" office:value-type="string" calcext:value-type="string">
            <text:p><text:s text:c="2"/>.create</text:p>
          </table:table-cell>
          <table:table-cell table:style-name="ce43" office:value-type="string" calcext:value-type="string">
            <text:p>BA shall be able to define text-token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8" calcext:value-type="float">
            <text:p>158</text:p>
          </table:table-cell>
          <table:table-cell table:style-name="ce43" office:value-type="string" calcext:value-type="string">
            <text:p><text:s text:c="2"/>.list</text:p>
          </table:table-cell>
          <table:table-cell table:style-name="ce57" office:value-type="string" calcext:value-type="string">
            <text:p>BA shall be able to list all existing text-token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59" calcext:value-type="float">
            <text:p>159</text:p>
          </table:table-cell>
          <table:table-cell table:style-name="ce43" office:value-type="string" calcext:value-type="string">
            <text:p><text:s text:c="2"/>.update</text:p>
          </table:table-cell>
          <table:table-cell table:style-name="ce57" office:value-type="string" calcext:value-type="string">
            <text:p>BA shall be able to modify text-token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0" calcext:value-type="float">
            <text:p>160</text:p>
          </table:table-cell>
          <table:table-cell table:style-name="ce43" office:value-type="string" calcext:value-type="string">
            <text:p><text:s text:c="4"/>.refs</text:p>
          </table:table-cell>
          <table:table-cell table:style-name="ce57" office:value-type="string" calcext:value-type="string">
            <text:p>System shall appear to rename all references after a text-token key is renamed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1" calcext:value-type="float">
            <text:p>161</text:p>
          </table:table-cell>
          <table:table-cell table:style-name="ce40" office:value-type="string" calcext:value-type="string">
            <text:p><text:s text:c="2"/>.delete</text:p>
          </table:table-cell>
          <table:table-cell table:style-name="ce62" office:value-type="string" calcext:value-type="string">
            <text:p>BA shall be able to (hard) delete text-token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2" calcext:value-type="float">
            <text:p>162</text:p>
          </table:table-cell>
          <table:table-cell table:style-name="ce37" office:value-type="string" calcext:value-type="string">
            <text:p><text:s text:c="4"/>.usage-summary</text:p>
          </table:table-cell>
          <table:table-cell table:style-name="ce62" office:value-type="string" calcext:value-type="string">
            <text:p>Before text-token deletion, BA shall be able to see a summary of usage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3" calcext:value-type="float">
            <text:p>163</text:p>
          </table:table-cell>
          <table:table-cell table:style-name="ce37" office:value-type="string" calcext:value-type="string">
            <text:p><text:s text:c="4"/>.usage-inspect</text:p>
          </table:table-cell>
          <table:table-cell table:style-name="ce62" office:value-type="string" calcext:value-type="string">
            <text:p>Before text-token deletion, BA shall be able to see each datem using the text-token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4" calcext:value-type="float">
            <text:p>164</text:p>
          </table:table-cell>
          <table:table-cell table:style-name="ce40" office:value-type="string" calcext:value-type="string">
            <text:p><text:s text:c="2"/>.use</text:p>
          </table:table-cell>
          <table:table-cell table:style-name="ce43" office:value-type="string" calcext:value-type="string">
            <text:p>BA shall be able to insert text-tokens in req text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5" calcext:value-type="float">
            <text:p>165</text:p>
          </table:table-cell>
          <table:table-cell table:style-name="ce40" office:value-type="string" calcext:value-type="string">
            <text:p><text:s text:c="4"/>.render</text:p>
          </table:table-cell>
          <table:table-cell table:style-name="ce55" office:value-type="string" calcext:value-type="string">
            <text:p>When rendering a req value, System shall replace text-tokens with their token-value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66" calcext:value-type="float">
            <text:p>166</text:p>
          </table:table-cell>
          <table:table-cell table:style-name="ce40" office:value-type="string" calcext:value-type="string">
            <text:p><text:s text:c="4"/>.edit</text:p>
          </table:table-cell>
          <table:table-cell table:style-name="ce55" office:value-type="string" calcext:value-type="string">
            <text:p>When editing a req value, System shall display text-tokens (i.e. not expanded with their token-values)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6"/>
          <table:table-cell table:style-name="ce54" office:value-type="string" calcext:value-type="string">
            <text:p>MF-13: Requirement Relationships</text:p>
          </table:table-cell>
          <table:table-cell table:style-name="ce54" table:number-columns-repeated="2"/>
          <table:table-cell table:number-columns-repeated="1017"/>
        </table:table-row>
        <table:table-row table:style-name="ro1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241" calcext:value-type="float">
            <text:p>241</text:p>
          </table:table-cell>
          <table:table-cell table:style-name="ce37" office:value-type="string" calcext:value-type="string">
            <text:p>.browse-as-grouping</text:p>
          </table:table-cell>
          <table:table-cell table:style-name="ce55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<text:span text:style-name="T5">• Detail subject: grouping ≈ req-type.</text:span></text:p>
            <text:p><text:span text:style-name="T5">• Detail view next level: subject's child grouping ≈ ∅. Detail only has 1 level of detail: req-type.</text:span></text:p>
            <text:p><text:span text:style-name="T5">• User applies/replaces/removes: groupings ≈ implications.</text:span>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26" office:value-type="float" office:value="201" calcext:value-type="float">
            <text:p>201</text:p>
          </table:table-cell>
          <table:table-cell table:style-name="ce37" office:value-type="string" calcext:value-type="string">
            <text:p>filter.by-impl</text:p>
          </table:table-cell>
          <table:table-cell table:style-name="ce55" office:value-type="string" calcext:value-type="string">
            <text:p>Anywhere that reqs are filterable, BA shall be able to filter by implying req(s).</text:p>
            <text:p><text:span text:style-name="T2">eg. filter reqs implied by MF-12 shows FR-4 if MF-12⇒UC-4⇒FR-4.</text:span>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26" office:value-type="float" office:value="206" calcext:value-type="float">
            <text:p>206</text:p>
          </table:table-cell>
          <table:table-cell table:style-name="ce37" office:value-type="string" calcext:value-type="string">
            <text:p>.mandatory-bulkset</text:p>
          </table:table-cell>
          <table:table-cell table:style-name="ce55" office:value-type="string" calcext:value-type="string">
            <text:p>From some kind of incompletion config screen, System shall present a field “Req types requiring justification/implication” from which BA can {,de}select types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data</text:p>
          </table:table-cell>
          <table:table-cell table:style-name="ce59" office:value-type="string" calcext:value-type="string">
            <text:p>Data</text:p>
          </table:table-cell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26" office:value-type="float" office:value="205" calcext:value-type="float">
            <text:p>205</text:p>
          </table:table-cell>
          <table:table-cell table:style-name="ce37" office:value-type="string" calcext:value-type="string">
            <text:p><text:s text:c="2"/>.mandatoryness</text:p>
          </table:table-cell>
          <table:table-cell table:style-name="ce55" office:value-type="string" calcext:value-type="string">
            <text:p>BA shall be able to specify, for each req-type, whether an implication is required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99" calcext:value-type="float">
            <text:p>199</text:p>
          </table:table-cell>
          <table:table-cell table:style-name="ce37" office:value-type="string" calcext:value-type="string">
            <text:p><text:s text:c="2"/>.sym</text:p>
          </table:table-cell>
          <table:table-cell table:style-name="ce55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2">ie. if A⇒B, then B⇐A.</text:span>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00" calcext:value-type="float">
            <text:p>200</text:p>
          </table:table-cell>
          <table:table-cell table:style-name="ce37" office:value-type="string" calcext:value-type="string">
            <text:p><text:s text:c="2"/>.trans</text:p>
          </table:table-cell>
          <table:table-cell table:style-name="ce55" office:value-type="string" calcext:value-type="string">
            <text:p>System shall handle all implications transitively.</text:p>
            <text:p><text:span text:style-name="T2">i.e. if A⇒B ∧ B⇒C then A⇒C.</text:span>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0" calcext:value-type="float">
            <text:p>210</text:p>
          </table:table-cell>
          <table:table-cell table:style-name="ce37" office:value-type="string" calcext:value-type="string">
            <text:p><text:s text:c="2"/>.prevent.refl</text:p>
          </table:table-cell>
          <table:table-cell table:style-name="ce55" office:value-type="string" calcext:value-type="string">
            <text:p>System shall prevent a req implying itself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1" calcext:value-type="float">
            <text:p>211</text:p>
          </table:table-cell>
          <table:table-cell table:style-name="ce37" office:value-type="string" calcext:value-type="string">
            <text:p><text:s text:c="2"/>.prevent.cyclic</text:p>
          </table:table-cell>
          <table:table-cell table:style-name="ce55" office:value-type="string" calcext:value-type="string">
            <text:p>System shall prevent a req transitively implying itself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.req</text:p>
          </table:table-cell>
          <table:table-cell table:style-name="ce59" office:value-type="string" calcext:value-type="string">
            <text:p>Reqs</text:p>
          </table:table-cell>
          <table:table-cell table:style-name="ce59" table:number-columns-repeated="2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26" office:value-type="float" office:value="204" calcext:value-type="float">
            <text:p>204</text:p>
          </table:table-cell>
          <table:table-cell table:style-name="ce37" office:value-type="string" calcext:value-type="string">
            <text:p><text:s text:c="2"/>.new-auto</text:p>
          </table:table-cell>
          <table:table-cell table:style-name="ce55" office:value-type="string" calcext:value-type="string">
            <text:p>BA shall be able to specify an implying req once, and have it apply to subsequently created reqs. [SI-1]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197" calcext:value-type="float">
            <text:p>197</text:p>
          </table:table-cell>
          <table:table-cell table:style-name="ce37" office:value-type="string" calcext:value-type="string">
            <text:p><text:s text:c="2"/>.edit.src</text:p>
          </table:table-cell>
          <table:table-cell table:style-name="ce55" office:value-type="string" calcext:value-type="string">
            <text:p>BA shall be able to indicate that a req implies other req(s)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89" office:value-type="string" calcext:value-type="string">
            <text:p>What about UC fields?</text:p>
          </table:table-cell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198" calcext:value-type="float">
            <text:p>198</text:p>
          </table:table-cell>
          <table:table-cell table:style-name="ce37" office:value-type="string" calcext:value-type="string">
            <text:p><text:s text:c="2"/>.edit.tgt</text:p>
          </table:table-cell>
          <table:table-cell table:style-name="ce55" office:value-type="string" calcext:value-type="string">
            <text:p>BA shall be able to indicate that a req is implied by other req(s)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89" office:value-type="string" calcext:value-type="string">
            <text:p>What about UC fields?</text:p>
          </table:table-cell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209" calcext:value-type="float">
            <text:p>209</text:p>
          </table:table-cell>
          <table:table-cell table:style-name="ce37" office:value-type="string" calcext:value-type="string">
            <text:p><text:s text:c="2"/>.view.src</text:p>
          </table:table-cell>
          <table:table-cell table:style-name="ce55" office:value-type="string" calcext:value-type="string">
            <text:p>When viewing a req, BA shall be able to see reqs that imply it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208" calcext:value-type="float">
            <text:p>208</text:p>
          </table:table-cell>
          <table:table-cell table:style-name="ce37" office:value-type="string" calcext:value-type="string">
            <text:p><text:s text:c="2"/>.view.tgt</text:p>
          </table:table-cell>
          <table:table-cell table:style-name="ce55" office:value-type="string" calcext:value-type="string">
            <text:p>When viewing a req, BA shall be able to see reqs that it implies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213" calcext:value-type="float">
            <text:p>213</text:p>
          </table:table-cell>
          <table:table-cell table:style-name="ce37" office:value-type="string" calcext:value-type="string">
            <text:p><text:s text:c="2"/>.view.del</text:p>
          </table:table-cell>
          <table:table-cell table:style-name="ce55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212" calcext:value-type="float">
            <text:p>212</text:p>
          </table:table-cell>
          <table:table-cell table:style-name="ce37" office:value-type="string" calcext:value-type="string">
            <text:p><text:s text:c="2"/>.deletion</text:p>
          </table:table-cell>
          <table:table-cell table:style-name="ce55" office:value-type="string" calcext:value-type="string">
            <text:p>When a req is deleted, System shall retain its implication relationships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4" calcext:value-type="float">
            <text:p>214</text:p>
          </table:table-cell>
          <table:table-cell table:style-name="ce37" office:value-type="string" calcext:value-type="string">
            <text:p><text:s text:c="5"/>.prompt-implied</text:p>
          </table:table-cell>
          <table:table-cell table:style-name="ce55" office:value-type="string" calcext:value-type="string">
            <text:p>When deleting a req, System shall present BA with a list of reqs that are implied by the deletee and nothing else. They shall be selected by default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5" calcext:value-type="float">
            <text:p>215</text:p>
          </table:table-cell>
          <table:table-cell table:style-name="ce37" office:value-type="string" calcext:value-type="string">
            <text:p><text:s text:c="5"/>.prompt-intersect</text:p>
          </table:table-cell>
          <table:table-cell table:style-name="ce55" office:value-type="string" calcext:value-type="string">
            <text:p>When deleting a req, System shall present BA with a list of reqs that are implied by the deletee and at least one other req. They shall be deselected by default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216" calcext:value-type="float">
            <text:p>216</text:p>
          </table:table-cell>
          <table:table-cell table:style-name="ce37" office:value-type="string" calcext:value-type="string">
            <text:p><text:s text:c="5"/>.select-implied</text:p>
          </table:table-cell>
          <table:table-cell table:style-name="ce55" office:value-type="string" calcext:value-type="string">
            <text:p>When deleting a req, BA shall be able to delete a subset of implied reqs. [FR-214,215]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217" calcext:value-type="float">
            <text:p>217</text:p>
          </table:table-cell>
          <table:table-cell table:style-name="ce37" office:value-type="string" calcext:value-type="string">
            <text:p><text:s text:c="2"/>.restore</text:p>
          </table:table-cell>
          <table:table-cell table:style-name="ce55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6" office:value-type="float" office:value="218" calcext:value-type="float">
            <text:p>218</text:p>
          </table:table-cell>
          <table:table-cell table:style-name="ce37" office:value-type="string" calcext:value-type="string">
            <text:p><text:s text:c="5"/>.cascade</text:p>
          </table:table-cell>
          <table:table-cell table:style-name="ce55" office:value-type="string" calcext:value-type="string">
            <text:p>When restoring a req, BA shall be able to restore a subset of implied reqs. [FR-217]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5"/>
          <table:table-cell table:number-columns-repeated="1017"/>
        </table:table-row>
        <table:table-row table:style-name="ro2">
          <table:table-cell table:style-name="ce8" table:number-columns-repeated="3"/>
          <table:table-cell table:style-name="ce48"/>
          <table:table-cell table:style-name="ce71" office:value-type="string" calcext:value-type="string">
            <text:p>Misc Requirements</text:p>
          </table:table-cell>
          <table:table-cell table:style-name="ce85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6" office:value-type="float" office:value="24" calcext:value-type="float">
            <text:p>24</text:p>
          </table:table-cell>
          <table:table-cell table:style-name="ce37" office:value-type="string" calcext:value-type="string">
            <text:p>readuc.grouping.all</text:p>
          </table:table-cell>
          <table:table-cell table:style-name="ce57" office:value-type="string" calcext:value-type="string">
            <text:p>When reading a UC, the reader shall be able to see all groupings applied to the UC.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shares.read.filter</text:p>
          </table:table-cell>
          <table:table-cell table:style-name="ce72" office:value-type="string" calcext:value-type="string">
            <text:p>When reading shared UCs, AnonReader shall be able to filter UCs by groupings. [Pri=Nice]</text:p>
          </table:table-cell>
          <table:table-cell table:style-name="ce86" office:value-type="date" office:date-value="2014-02-07" calcext:value-type="date">
            <text:p>41677</text:p>
          </table:table-cell>
          <table:table-cell table:style-name="ce74"/>
          <table:table-cell table:number-columns-repeated="1017"/>
        </table:table-row>
        <table:table-row table:style-name="ro2">
          <table:table-cell table:number-columns-repeated="2" table:style-name="ce1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9" office:value-type="string" calcext:value-type="string">
            <text:p>revnum</text:p>
          </table:table-cell>
          <table:table-cell table:style-name="ce59" office:value-type="string" calcext:value-type="string">
            <text:p>Revision numbers</text:p>
          </table:table-cell>
          <table:table-cell table:style-name="ce59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26" calcext:value-type="float">
            <text:p>26</text:p>
          </table:table-cell>
          <table:table-cell table:style-name="ce37" office:value-type="string" calcext:value-type="string">
            <text:p><text:s text:c="2"/>.if</text:p>
          </table:table-cell>
          <table:table-cell table:style-name="ce57" office:value-type="string" calcext:value-type="string">
            <text:p>System shall increment the revision number of a requirement anytime <text:span text:style-name="T3">any</text:span><text:span text:style-name="T6"> user-observable change occurs, including field ordering changes, grouping renames, etc.</text:span>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11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27" calcext:value-type="float">
            <text:p>27</text:p>
          </table:table-cell>
          <table:table-cell table:style-name="ce37" office:value-type="string" calcext:value-type="string">
            <text:p><text:s text:c="2"/>.onlyif</text:p>
          </table:table-cell>
          <table:table-cell table:style-name="ce57" office:value-type="string" calcext:value-type="string">
            <text:p>System should preserve the revision number of a requirement when there is no <text:span text:style-name="T6">user-observable change between revisions.</text:span>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57"/>
          <table:table-cell table:number-columns-repeated="1017"/>
        </table:table-row>
        <table:table-row table:style-name="ro3">
          <table:table-cell table:number-columns-repeated="2" table:style-name="ce11" office:value-type="string" calcext:value-type="string">
            <text:p>-</text:p>
          </table:table-cell>
          <table:table-cell table:style-name="ce26" office:value-type="float" office:value="75" calcext:value-type="float">
            <text:p>75</text:p>
          </table:table-cell>
          <table:table-cell table:style-name="ce37" office:value-type="string" calcext:value-type="string">
            <text:p><text:s text:c="2"/>.major</text:p>
          </table:table-cell>
          <table:table-cell table:style-name="ce57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7"/>
          <table:table-cell table:number-columns-repeated="1017"/>
        </table:table-row>
        <table:table-row table:style-name="ro3">
          <table:table-cell table:number-columns-repeated="2" table:style-name="ce11" office:value-type="string" calcext:value-type="string">
            <text:p>-</text:p>
          </table:table-cell>
          <table:table-cell table:style-name="ce26" office:value-type="float" office:value="76" calcext:value-type="float">
            <text:p>76</text:p>
          </table:table-cell>
          <table:table-cell table:style-name="ce37" office:value-type="string" calcext:value-type="string">
            <text:p><text:s text:c="2"/>.minor</text:p>
          </table:table-cell>
          <table:table-cell table:style-name="ce57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57"/>
          <table:table-cell table:number-columns-repeated="1017"/>
        </table:table-row>
        <table:table-row table:style-name="ro2">
          <table:table-cell table:style-name="ce12"/>
          <table:table-cell table:style-name="ce20" table:number-columns-repeated="2"/>
          <table:table-cell table:style-name="ce49"/>
          <table:table-cell table:style-name="ce73" office:value-type="string" calcext:value-type="string">
            <text:p>Deleted or Deferred Requirements</text:p>
          </table:table-cell>
          <table:table-cell table:style-name="ce87" table:number-columns-repeated="2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1" office:value-type="string" calcext:value-type="string">
            <text:p>-</text:p>
          </table:table-cell>
          <table:table-cell table:style-name="ce34" office:value-type="float" office:value="36" calcext:value-type="float">
            <text:p>36</text:p>
          </table:table-cell>
          <table:table-cell table:style-name="ce50" office:value-type="string" calcext:value-type="string">
            <text:p><text:s text:c="2"/>.count</text:p>
          </table:table-cell>
          <table:table-cell table:style-name="ce74" office:value-type="string" calcext:value-type="string">
            <text:p>System shall display the number of reqs associated with each grouping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1" office:value-type="string" calcext:value-type="string">
            <text:p>-</text:p>
          </table:table-cell>
          <table:table-cell table:style-name="ce34" office:value-type="float" office:value="37" calcext:value-type="float">
            <text:p>37</text:p>
          </table:table-cell>
          <table:table-cell table:style-name="ce50" office:value-type="string" calcext:value-type="string">
            <text:p><text:s text:c="2"/>.missing</text:p>
          </table:table-cell>
          <table:table-cell table:style-name="ce74" office:value-type="string" calcext:value-type="string">
            <text:p>System shall display the number of reqs to which the top-level grouping is not applied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34" office:value-type="float" office:value="38" calcext:value-type="float">
            <text:p>38</text:p>
          </table:table-cell>
          <table:table-cell table:style-name="ce50" office:value-type="string" calcext:value-type="string">
            <text:p><text:s text:c="2"/>.read-ucs</text:p>
          </table:table-cell>
          <table:table-cell table:style-name="ce74" office:value-type="string" calcext:value-type="string">
            <text:p>BA shall be able to read all UCs with a given grouping applied.</text:p>
          </table:table-cell>
          <table:table-cell table:style-name="ce86" office:value-type="date" office:date-value="2014-02-13" calcext:value-type="date">
            <text:p>41683</text:p>
          </table:table-cell>
          <table:table-cell table:style-name="ce74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34" office:value-type="float" office:value="39" calcext:value-type="float">
            <text:p>39</text:p>
          </table:table-cell>
          <table:table-cell table:style-name="ce50" office:value-type="string" calcext:value-type="string">
            <text:p><text:s text:c="2"/>.read-steps</text:p>
          </table:table-cell>
          <table:table-cell table:style-name="ce74" office:value-type="string" calcext:value-type="string">
            <text:p>BA shall be able to read all UC steps with a given grouping applied.</text:p>
          </table:table-cell>
          <table:table-cell table:style-name="ce86" office:value-type="date" office:date-value="2014-02-13" calcext:value-type="date">
            <text:p>41683</text:p>
          </table:table-cell>
          <table:table-cell table:style-name="ce74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float" office:value="11" calcext:value-type="float">
            <text:p>11</text:p>
          </table:table-cell>
          <table:table-cell table:style-name="ce50" office:value-type="string" calcext:value-type="string">
            <text:p><text:s text:c="4"/>.shares</text:p>
          </table:table-cell>
          <table:table-cell table:style-name="ce74" office:value-type="string" calcext:value-type="string">
            <text:p>BA shall be able to filter shares' UC selection criteria by groupings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34" office:value-type="float" office:value="20" calcext:value-type="float">
            <text:p>20</text:p>
          </table:table-cell>
          <table:table-cell table:style-name="ce50" office:value-type="string" calcext:value-type="string">
            <text:p><text:s text:c="4"/>.readown</text:p>
          </table:table-cell>
          <table:table-cell table:style-name="ce74" office:value-type="string" calcext:value-type="string">
            <text:p>When reading own UCs, BA shall be able to filter UCs by groupings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34" office:value-type="float" office:value="12" calcext:value-type="float">
            <text:p>12</text:p>
          </table:table-cell>
          <table:table-cell table:style-name="ce50" office:value-type="string" calcext:value-type="string">
            <text:p><text:s text:c="4"/>.uc-list</text:p>
          </table:table-cell>
          <table:table-cell table:style-name="ce74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50" office:value-type="string" calcext:value-type="string">
            <text:p><text:s text:c="4"/>.add</text:p>
          </table:table-cell>
          <table:table-cell table:style-name="ce75" office:value-type="string" calcext:value-type="string">
            <text:p>BA shall be able to apply groupings to multiple LL/UC reqs simultaneously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50" office:value-type="string" calcext:value-type="string">
            <text:p><text:s text:c="4"/>.remove</text:p>
          </table:table-cell>
          <table:table-cell table:style-name="ce75" office:value-type="string" calcext:value-type="string">
            <text:p>BA shall be able to remove groupings to multiple LL/UC reqs simultaneously.</text:p>
          </table:table-cell>
          <table:table-cell table:style-name="ce86" office:value-type="date" office:date-value="2014-05-23" calcext:value-type="date">
            <text:p>41782</text:p>
          </table:table-cell>
          <table:table-cell table:style-name="ce74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35" office:value-type="float" office:value="190" calcext:value-type="float">
            <text:p>190</text:p>
          </table:table-cell>
          <table:table-cell table:style-name="ce51" office:value-type="string" calcext:value-type="string">
            <text:p><text:s text:c="4"/>.add</text:p>
          </table:table-cell>
          <table:table-cell table:style-name="ce76" office:value-type="string" calcext:value-type="string">
            <text:p>BA shall be able to apply groupings to UCs without using the UCE.</text:p>
          </table:table-cell>
          <table:table-cell table:style-name="ce88" office:value-type="date" office:date-value="2014-05-23" calcext:value-type="date">
            <text:p>41782</text:p>
          </table:table-cell>
          <table:table-cell table:style-name="ce93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35" office:value-type="float" office:value="191" calcext:value-type="float">
            <text:p>191</text:p>
          </table:table-cell>
          <table:table-cell table:style-name="ce51" office:value-type="string" calcext:value-type="string">
            <text:p><text:s text:c="4"/>.remove</text:p>
          </table:table-cell>
          <table:table-cell table:style-name="ce76" office:value-type="string" calcext:value-type="string">
            <text:p>BA shall be able to remove groupings to UC without using the UCE.</text:p>
          </table:table-cell>
          <table:table-cell table:style-name="ce88" office:value-type="date" office:date-value="2014-05-23" calcext:value-type="date">
            <text:p>41782</text:p>
          </table:table-cell>
          <table:table-cell table:style-name="ce93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35" office:value-type="float" office:value="192" calcext:value-type="float">
            <text:p>192</text:p>
          </table:table-cell>
          <table:table-cell table:style-name="ce51" office:value-type="string" calcext:value-type="string">
            <text:p><text:s text:c="4"/>.add</text:p>
          </table:table-cell>
          <table:table-cell table:style-name="ce76" office:value-type="string" calcext:value-type="string">
            <text:p>BA shall be able to apply groupings to LL-reqs.</text:p>
          </table:table-cell>
          <table:table-cell table:style-name="ce88" office:value-type="date" office:date-value="2014-05-23" calcext:value-type="date">
            <text:p>41782</text:p>
          </table:table-cell>
          <table:table-cell table:style-name="ce93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35" office:value-type="float" office:value="193" calcext:value-type="float">
            <text:p>193</text:p>
          </table:table-cell>
          <table:table-cell table:style-name="ce51" office:value-type="string" calcext:value-type="string">
            <text:p><text:s text:c="4"/>.remove</text:p>
          </table:table-cell>
          <table:table-cell table:style-name="ce76" office:value-type="string" calcext:value-type="string">
            <text:p>BA shall be able to remove groupings to LL-reqs.</text:p>
          </table:table-cell>
          <table:table-cell table:style-name="ce88" office:value-type="date" office:date-value="2014-05-23" calcext:value-type="date">
            <text:p>41782</text:p>
          </table:table-cell>
          <table:table-cell table:style-name="ce93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34" office:value-type="float" office:value="142" calcext:value-type="float">
            <text:p>142</text:p>
          </table:table-cell>
          <table:table-cell table:style-name="ce50" office:value-type="string" calcext:value-type="string">
            <text:p><text:s text:c="2"/>.copy</text:p>
          </table:table-cell>
          <table:table-cell table:style-name="ce75" office:value-type="string" calcext:value-type="string">
            <text:p>BA shall be able to copy a field set from another project.</text:p>
          </table:table-cell>
          <table:table-cell table:style-name="ce86" office:value-type="date" office:date-value="2014-05-19" calcext:value-type="date">
            <text:p>41778</text:p>
          </table:table-cell>
          <table:table-cell table:style-name="ce75"/>
          <table:table-cell table:number-columns-repeated="1017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34" office:value-type="float" office:value="42" calcext:value-type="float">
            <text:p>42</text:p>
          </table:table-cell>
          <table:table-cell table:style-name="ce50" office:value-type="string" calcext:value-type="string">
            <text:p><text:s text:c="4"/>.discards</text:p>
          </table:table-cell>
          <table:table-cell table:style-name="ce75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86" office:value-type="date" office:date-value="2014-02-25" calcext:value-type="date">
            <text:p>41695</text:p>
          </table:table-cell>
          <table:table-cell table:style-name="ce75"/>
          <table:table-cell table:style-name="ce95"/>
          <table:table-cell/>
          <table:table-cell table:style-name="ce15"/>
          <table:table-cell table:number-columns-repeated="1014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34" office:value-type="float" office:value="22" calcext:value-type="float">
            <text:p>22</text:p>
          </table:table-cell>
          <table:table-cell table:style-name="ce50" office:value-type="string" calcext:value-type="string">
            <text:p><text:s text:c="2"/>.copy</text:p>
          </table:table-cell>
          <table:table-cell table:style-name="ce74" office:value-type="string" calcext:value-type="string">
            <text:p>BA shall be able to copy a subset of groupings (including child nodes) between projects.</text:p>
          </table:table-cell>
          <table:table-cell table:style-name="ce86" office:value-type="date" office:date-value="2014-02-12" calcext:value-type="date">
            <text:p>41682</text:p>
          </table:table-cell>
          <table:table-cell table:style-name="ce74"/>
          <table:table-cell table:number-columns-repeated="1017"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34" office:value-type="float" office:value="105" calcext:value-type="float">
            <text:p>105</text:p>
          </table:table-cell>
          <table:table-cell table:style-name="ce50" office:value-type="string" calcext:value-type="string">
            <text:p><text:s text:c="2"/>.refs</text:p>
          </table:table-cell>
          <table:table-cell table:style-name="ce74" office:value-type="string" calcext:value-type="string">
            <text:p>[Dup of FR-55]</text:p>
            <text:p>System shall track refs to deleted LL-reqs as incompletions.</text:p>
          </table:table-cell>
          <table:table-cell table:style-name="ce86" office:value-type="date" office:date-value="2014-05-15" calcext:value-type="date">
            <text:p>41774</text:p>
          </table:table-cell>
          <table:table-cell table:style-name="ce75"/>
          <table:table-cell table:number-columns-repeated="1017"/>
        </table:table-row>
        <table:table-row table:style-name="ro6">
          <table:table-cell table:style-name="ce9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4" office:value-type="float" office:value="111" calcext:value-type="float">
            <text:p>111</text:p>
          </table:table-cell>
          <table:table-cell table:style-name="ce50"/>
          <table:table-cell table:style-name="ce74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86" office:value-type="date" office:date-value="2014-05-16" calcext:value-type="date">
            <text:p>41775</text:p>
          </table:table-cell>
          <table:table-cell table:style-name="ce75"/>
          <table:table-cell table:number-columns-repeated="1017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4" office:value-type="float" office:value="89" calcext:value-type="float">
            <text:p>89</text:p>
          </table:table-cell>
          <table:table-cell table:style-name="ce50" office:value-type="string" calcext:value-type="string">
            <text:p><text:s text:c="4"/>.copy</text:p>
          </table:table-cell>
          <table:table-cell table:style-name="ce75" office:value-type="string" calcext:value-type="string">
            <text:p>[Replaced by FR-172]</text:p>
            <text:p>BA shall be able to create a new req by copying another.</text:p>
          </table:table-cell>
          <table:table-cell table:style-name="ce86" office:value-type="date" office:date-value="2014-05-15" calcext:value-type="date">
            <text:p>41774</text:p>
          </table:table-cell>
          <table:table-cell table:style-name="ce75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26" office:value-type="float" office:value="202" calcext:value-type="float">
            <text:p>202</text:p>
          </table:table-cell>
          <table:table-cell table:style-name="ce37"/>
          <table:table-cell table:style-name="ce57" office:value-type="string" calcext:value-type="string">
            <text:p>When viewing incompletion results, BA shall be able to filter by implying req(s).</text:p>
            <text:p><text:span text:style-name="T7">eg. filter reqs implied by MF-12 shows FR-4 if MF-12⇒UC-4⇒FR-4.</text:span>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57" office:value-type="string" calcext:value-type="string">
            <text:p>FR-201 is enough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23" table:number-columns-repeated="2"/>
          <table:table-cell table:style-name="ce52"/>
          <table:table-cell table:style-name="ce77" table:number-columns-repeated="2"/>
          <table:table-cell table:style-name="ce94"/>
          <table:table-cell table:number-columns-repeated="1017"/>
        </table:table-row>
        <table:table-row table:style-name="ro1" table:number-rows-repeated="10482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78"/>
        <table:table-column table:style-name="co20" table:default-cell-style-name="ce15"/>
        <table:table-column table:style-name="co21" table:default-cell-style-name="ce53"/>
        <table:table-column table:style-name="co14" table:number-columns-repeated="1017" table:default-cell-style-name="ce53"/>
        <table:table-row table:style-name="ro2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02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99" table:number-columns-repeated="1017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1" office:value-type="string" calcext:value-type="string">
            <text:p>BR</text:p>
          </table:table-cell>
          <table:table-cell table:style-name="ce11" office:value-type="float" office:value="1" calcext:value-type="float">
            <text:p>1</text:p>
          </table:table-cell>
          <table:table-cell table:style-name="ce57" office:value-type="string" calcext:value-type="string">
            <text:p>All use cases in a project share the same field-set.</text:p>
          </table:table-cell>
          <table:table-cell table:style-name="ce79" office:value-type="date" office:date-value="2014-02-06" calcext:value-type="date">
            <text:p>41676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1" office:value-type="string" calcext:value-type="string">
            <text:p>BR</text:p>
          </table:table-cell>
          <table:table-cell table:style-name="ce11" office:value-type="float" office:value="2" calcext:value-type="float">
            <text:p>2</text:p>
          </table:table-cell>
          <table:table-cell table:style-name="ce57" office:value-type="string" calcext:value-type="string">
            <text:p>A field-set cannot contain more than 30 fields.</text:p>
          </table:table-cell>
          <table:table-cell table:style-name="ce79" office:value-type="date" office:date-value="2014-02-06" calcext:value-type="date">
            <text:p>41676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1" office:value-type="string" calcext:value-type="string">
            <text:p>BR</text:p>
          </table:table-cell>
          <table:table-cell table:style-name="ce11" office:value-type="float" office:value="3" calcext:value-type="float">
            <text:p>3</text:p>
          </table:table-cell>
          <table:table-cell table:style-name="ce57" office:value-type="string" calcext:value-type="string">
            <text:p>Each field name in a field-set must be unique.</text:p>
          </table:table-cell>
          <table:table-cell table:style-name="ce79" office:value-type="date" office:date-value="2014-02-06" calcext:value-type="date">
            <text:p>41676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11" office:value-type="string" calcext:value-type="string">
            <text:p>-</text:p>
          </table:table-cell>
          <table:table-cell table:style-name="ce101" office:value-type="float" office:value="7" calcext:value-type="float">
            <text:p>7</text:p>
          </table:table-cell>
          <table:table-cell table:style-name="ce11" office:value-type="string" calcext:value-type="string">
            <text:p>BR</text:p>
          </table:table-cell>
          <table:table-cell table:style-name="ce11" office:value-type="float" office:value="4" calcext:value-type="float">
            <text:p>4</text:p>
          </table:table-cell>
          <table:table-cell table:style-name="ce57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37"/>
          <table:table-cell table:number-columns-repeated="1017"/>
        </table:table-row>
        <table:table-row table:style-name="ro6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BR</text:p>
          </table:table-cell>
          <table:table-cell table:style-name="ce11" office:value-type="float" office:value="5" calcext:value-type="float">
            <text:p>5</text:p>
          </table:table-cell>
          <table:table-cell table:style-name="ce57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79" office:value-type="date" office:date-value="2014-02-13" calcext:value-type="date">
            <text:p>41683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1" office:value-type="string" calcext:value-type="string">
            <text:p>BR</text:p>
          </table:table-cell>
          <table:table-cell table:style-name="ce11" office:value-type="float" office:value="6" calcext:value-type="float">
            <text:p>6</text:p>
          </table:table-cell>
          <table:table-cell table:style-name="ce57" office:value-type="string" calcext:value-type="string">
            <text:p>BA shall not be able to remove NC/AC/EC fields from a field-set.</text:p>
          </table:table-cell>
          <table:table-cell table:style-name="ce79" office:value-type="date" office:date-value="2014-02-25" calcext:value-type="date">
            <text:p>41695</text:p>
          </table:table-cell>
          <table:table-cell table:style-name="ce37"/>
          <table:table-cell table:number-columns-repeated="1017"/>
        </table:table-row>
        <table:table-row table:style-name="ro1"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" calcext:value-type="float">
            <text:p>1</text:p>
          </table:table-cell>
          <table:table-cell table:style-name="ce11" office:value-type="string" calcext:value-type="string">
            <text:p>BR</text:p>
          </table:table-cell>
          <table:table-cell table:style-name="ce11" office:value-type="float" office:value="7" calcext:value-type="float">
            <text:p>7</text:p>
          </table:table-cell>
          <table:table-cell table:style-name="ce57" office:value-type="string" calcext:value-type="string">
            <text:p>Do not allow copy&amp;paste of UCs. (FR-172)</text:p>
          </table:table-cell>
          <table:table-cell table:style-name="ce79"/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1" office:value-type="string" calcext:value-type="string">
            <text:p>CO</text:p>
          </table:table-cell>
          <table:table-cell table:style-name="ce11" office:value-type="float" office:value="1" calcext:value-type="float">
            <text:p>1</text:p>
          </table:table-cell>
          <table:table-cell table:style-name="ce57" office:value-type="string" calcext:value-type="string">
            <text:p>A field-set cannot be empty.</text:p>
          </table:table-cell>
          <table:table-cell table:style-name="ce79" office:value-type="date" office:date-value="2014-02-06" calcext:value-type="date">
            <text:p>41676</text:p>
          </table:table-cell>
          <table:table-cell table:style-name="ce37"/>
          <table:table-cell table:number-columns-repeated="1017"/>
        </table:table-row>
        <table:table-row table:style-name="ro1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CO</text:p>
          </table:table-cell>
          <table:table-cell table:style-name="ce11" office:value-type="float" office:value="2" calcext:value-type="float">
            <text:p>2</text:p>
          </table:table-cell>
          <table:table-cell table:style-name="ce57" office:value-type="string" calcext:value-type="string">
            <text:p>Grouping names may be unique per project.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CO</text:p>
          </table:table-cell>
          <table:table-cell table:style-name="ce11" office:value-type="float" office:value="3" calcext:value-type="float">
            <text:p>3</text:p>
          </table:table-cell>
          <table:table-cell table:style-name="ce55" office:value-type="string" calcext:value-type="string">
            <text:p>Grouping names must not exceed 60 characters.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101" office:value-type="float" office:value="6" calcext:value-type="float">
            <text:p>6</text:p>
          </table:table-cell>
          <table:table-cell table:style-name="ce101"/>
          <table:table-cell table:style-name="ce11" office:value-type="string" calcext:value-type="string">
            <text:p>CO</text:p>
          </table:table-cell>
          <table:table-cell table:style-name="ce11" office:value-type="float" office:value="4" calcext:value-type="float">
            <text:p>4</text:p>
          </table:table-cell>
          <table:table-cell table:style-name="ce55" office:value-type="string" calcext:value-type="string">
            <text:p>When viewing multiple incompletions, the user shall be able to comprehend each item without leaving the page.</text:p>
          </table:table-cell>
          <table:table-cell table:style-name="ce79" office:value-type="date" office:date-value="2014-05-12" calcext:value-type="date">
            <text:p>41771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CO</text:p>
          </table:table-cell>
          <table:table-cell table:style-name="ce11" office:value-type="float" office:value="5" calcext:value-type="float">
            <text:p>5</text:p>
          </table:table-cell>
          <table:table-cell table:style-name="ce6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79" office:value-type="date" office:date-value="2014-05-15" calcext:value-type="date">
            <text:p>41774</text:p>
          </table:table-cell>
          <table:table-cell table:style-name="ce37"/>
          <table:table-cell table:number-columns-repeated="1017"/>
        </table:table-row>
        <table:table-row table:style-name="ro7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CO</text:p>
          </table:table-cell>
          <table:table-cell table:style-name="ce11" office:value-type="float" office:value="6" calcext:value-type="float">
            <text:p>6</text:p>
          </table:table-cell>
          <table:table-cell table:style-name="ce103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1" calcext:value-type="float">
            <text:p>1</text:p>
          </table:table-cell>
          <table:table-cell table:style-name="ce55" office:value-type="string" calcext:value-type="string">
            <text:p>Groupings have a name.</text:p>
          </table:table-cell>
          <table:table-cell table:style-name="ce79" office:value-type="date" office:date-value="2014-02-11" calcext:value-type="date">
            <text:p>41681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2" calcext:value-type="float">
            <text:p>2</text:p>
          </table:table-cell>
          <table:table-cell table:style-name="ce55" office:value-type="string" calcext:value-type="string">
            <text:p>Groupings have a description.</text:p>
          </table:table-cell>
          <table:table-cell table:style-name="ce79" office:value-type="date" office:date-value="2014-02-11" calcext:value-type="date">
            <text:p>41681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3" calcext:value-type="float">
            <text:p>3</text:p>
          </table:table-cell>
          <table:table-cell table:style-name="ce57" office:value-type="string" calcext:value-type="string">
            <text:p>Groupings can have 0:<text:span text:style-name="T6">n children.</text:span>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4" calcext:value-type="float">
            <text:p>4</text:p>
          </table:table-cell>
          <table:table-cell table:style-name="ce57" office:value-type="string" calcext:value-type="string">
            <text:p>Groupings can have 0:<text:span text:style-name="T6">n parents.</text:span></text:p>
          </table:table-cell>
          <table:table-cell table:style-name="ce79" office:value-type="date" office:date-value="2014-02-12" calcext:value-type="date">
            <text:p>41682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5" calcext:value-type="float">
            <text:p>5</text:p>
          </table:table-cell>
          <table:table-cell table:style-name="ce57" office:value-type="string" calcext:value-type="string">
            <text:p>Requirement type has a unique name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6" calcext:value-type="float">
            <text:p>6</text:p>
          </table:table-cell>
          <table:table-cell table:style-name="ce57" office:value-type="string" calcext:value-type="string">
            <text:p>Requirement type has a unique mnemonic matching /^[A-Z]{1,4}$/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7" calcext:value-type="float">
            <text:p>7</text:p>
          </table:table-cell>
          <table:table-cell table:style-name="ce57" office:value-type="string" calcext:value-type="string">
            <text:p>Semantic Header Rows shall have exactly one semantic ID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8" calcext:value-type="float">
            <text:p>8</text:p>
          </table:table-cell>
          <table:table-cell table:style-name="ce57" office:value-type="string" calcext:value-type="string">
            <text:p>Semantic Header Rows shall not have a numeric ID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9" calcext:value-type="float">
            <text:p>9</text:p>
          </table:table-cell>
          <table:table-cell table:style-name="ce57" office:value-type="string" calcext:value-type="string">
            <text:p>Semantic Header Rows shall not have a user-defined req-type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5" calcext:value-type="float">
            <text:p>5</text:p>
          </table:table-cell>
          <table:table-cell table:style-name="ce11" office:value-type="string" calcext:value-type="string">
            <text:p>DD</text:p>
          </table:table-cell>
          <table:table-cell table:style-name="ce11" office:value-type="float" office:value="10" calcext:value-type="float">
            <text:p>10</text:p>
          </table:table-cell>
          <table:table-cell table:style-name="ce57" office:value-type="string" calcext:value-type="string">
            <text:p>Semantic Header Rows shall not have values for custom field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7" calcext:value-type="float">
            <text:p>7</text:p>
          </table:table-cell>
          <table:table-cell table:style-name="ce11" office:value-type="string" calcext:value-type="string">
            <text:p>DD</text:p>
          </table:table-cell>
          <table:table-cell table:style-name="ce11" office:value-type="float" office:value="11" calcext:value-type="float">
            <text:p>11</text:p>
          </table:table-cell>
          <table:table-cell table:style-name="ce57" office:value-type="string" calcext:value-type="string">
            <text:p>Semantic Header Rows shall not have groupings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12" calcext:value-type="float">
            <text:p>12</text:p>
          </table:table-cell>
          <table:table-cell table:style-name="ce57" office:value-type="string" calcext:value-type="string">
            <text:p>Text token keys conform to /^[a-z]+(\.[a-z]+)*$/i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13" calcext:value-type="float">
            <text:p>13</text:p>
          </table:table-cell>
          <table:table-cell table:style-name="ce57" office:value-type="string" calcext:value-type="string">
            <text:p>Text token keys are unique per project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DD</text:p>
          </table:table-cell>
          <table:table-cell table:style-name="ce11" office:value-type="float" office:value="14" calcext:value-type="float">
            <text:p>14</text:p>
          </table:table-cell>
          <table:table-cell table:style-name="ce57" office:value-type="string" calcext:value-type="string">
            <text:p>Text token values are text.</text:p>
          </table:table-cell>
          <table:table-cell table:style-name="ce79" office:value-type="date" office:date-value="2014-05-20" calcext:value-type="date">
            <text:p>41779</text:p>
          </table:table-cell>
          <table:table-cell table:style-name="ce37"/>
          <table:table-cell table:number-columns-repeated="1017"/>
        </table:table-row>
        <table:table-row table:style-name="ro1"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" calcext:value-type="float">
            <text:p>1</text:p>
          </table:table-cell>
          <table:table-cell table:style-name="ce11" office:value-type="string" calcext:value-type="string">
            <text:p>DD</text:p>
          </table:table-cell>
          <table:table-cell table:style-name="ce11" office:value-type="float" office:value="15" calcext:value-type="float">
            <text:p>15</text:p>
          </table:table-cell>
          <table:table-cell table:style-name="ce57" office:value-type="string" calcext:value-type="string">
            <text:p>Semantic-IDs are unique per project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101" office:value-type="float" office:value="13" calcext:value-type="float">
            <text:p>13</text:p>
          </table:table-cell>
          <table:table-cell table:style-name="ce101"/>
          <table:table-cell table:style-name="ce11" office:value-type="string" calcext:value-type="string">
            <text:p>SI</text:p>
          </table:table-cell>
          <table:table-cell table:style-name="ce11" office:value-type="float" office:value="1" calcext:value-type="float">
            <text:p>1</text:p>
          </table:table-cell>
          <table:table-cell table:style-name="ce57" office:value-type="string" calcext:value-type="string">
            <text:p>[FR-204] BA shall be able to specify a (transitive) template from which all newly created reqs inherit.</text:p>
          </table:table-cell>
          <table:table-cell table:style-name="ce79" office:value-type="date" office:date-value="2014-06-02" calcext:value-type="date">
            <text:p>41792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QR</text:p>
          </table:table-cell>
          <table:table-cell table:style-name="ce11" office:value-type="float" office:value="1" calcext:value-type="float">
            <text:p>1</text:p>
          </table:table-cell>
          <table:table-cell table:style-name="ce55" office:value-type="string" calcext:value-type="string">
            <text:p>User must be able to organise 100 flat reqs of same type into 5 versions in under 5 minutes.</text:p>
          </table:table-cell>
          <table:table-cell table:style-name="ce79" office:value-type="date" office:date-value="2014-02-11" calcext:value-type="date">
            <text:p>41681</text:p>
          </table:table-cell>
          <table:table-cell table:style-name="ce37"/>
          <table:table-cell table:number-columns-repeated="1017"/>
        </table:table-row>
        <table:table-row table:style-name="ro6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QR</text:p>
          </table:table-cell>
          <table:table-cell table:style-name="ce11" office:value-type="float" office:value="2" calcext:value-type="float">
            <text:p>2</text:p>
          </table:table-cell>
          <table:table-cell table:style-name="ce55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79" office:value-type="date" office:date-value="2014-02-11" calcext:value-type="date">
            <text:p>41681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QR</text:p>
          </table:table-cell>
          <table:table-cell table:style-name="ce11" office:value-type="float" office:value="3" calcext:value-type="float">
            <text:p>3</text:p>
          </table:table-cell>
          <table:table-cell table:style-name="ce104" office:value-type="string" calcext:value-type="string">
            <text:p>BA shall be able to go from LL-req editor to a view of all LL-req incompletions in a single actio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37"/>
          <table:table-cell table:number-columns-repeated="1017"/>
        </table:table-row>
        <table:table-row table:style-name="ro3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QR</text:p>
          </table:table-cell>
          <table:table-cell table:style-name="ce11" office:value-type="float" office:value="4" calcext:value-type="float">
            <text:p>4</text:p>
          </table:table-cell>
          <table:table-cell table:style-name="ce104" office:value-type="string" calcext:value-type="string">
            <text:p>BA shall be able to go from a view of all LL-req incompletions to LL-req editor in a single action.</text:p>
          </table:table-cell>
          <table:table-cell table:style-name="ce79" office:value-type="date" office:date-value="2014-05-16" calcext:value-type="date">
            <text:p>41775</text:p>
          </table:table-cell>
          <table:table-cell table:style-name="ce37"/>
          <table:table-cell table:number-columns-repeated="1017"/>
        </table:table-row>
        <table:table-row table:style-name="ro12"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" office:value-type="string" calcext:value-type="string">
            <text:p>QR</text:p>
          </table:table-cell>
          <table:table-cell table:style-name="ce11" office:value-type="float" office:value="5" calcext:value-type="float">
            <text:p>5</text:p>
          </table:table-cell>
          <table:table-cell table:style-name="ce104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79" office:value-type="date" office:date-value="2014-05-22" calcext:value-type="date">
            <text:p>41781</text:p>
          </table:table-cell>
          <table:table-cell table:style-name="ce37"/>
          <table:table-cell table:number-columns-repeated="1017"/>
        </table:table-row>
        <table:table-row table:style-name="ro13"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1" office:value-type="string" calcext:value-type="string">
            <text:p>UC</text:p>
          </table:table-cell>
          <table:table-cell table:style-name="ce11" office:value-type="float" office:value="9" calcext:value-type="float">
            <text:p>9</text:p>
          </table:table-cell>
          <table:table-cell table:style-name="ce57" office:value-type="string" calcext:value-type="string">
            <text:p>Modify a Project's Fields</text:p>
          </table:table-cell>
          <table:table-cell table:style-name="ce79" office:value-type="date" office:date-value="2014-02-06" calcext:value-type="date">
            <text:p>41676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" office:value-type="string" calcext:value-type="string">
            <text:p>UC</text:p>
          </table:table-cell>
          <table:table-cell table:style-name="ce11" office:value-type="float" office:value="10" calcext:value-type="float">
            <text:p>10</text:p>
          </table:table-cell>
          <table:table-cell table:style-name="ce57" office:value-type="string" calcext:value-type="string">
            <text:p>Ensure Groupings are well distributed</text:p>
          </table:table-cell>
          <table:table-cell table:style-name="ce79" office:value-type="date" office:date-value="2014-06-03" calcext:value-type="date">
            <text:p>41793</text:p>
          </table:table-cell>
          <table:table-cell table:style-name="ce37"/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106"/>
        <table:table-column table:style-name="co24" table:default-cell-style-name="ce106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4">
          <table:table-cell table:number-columns-repeated="2"/>
          <table:table-cell table:style-name="ce108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09"/>
          <table:table-cell table:style-name="ce117" office:value-type="string" calcext:value-type="string" table:number-columns-spanned="2" table:number-rows-spanned="1">
            <text:p>Fields</text:p>
          </table:table-cell>
          <table:covered-table-cell table:style-name="ce109"/>
          <table:table-cell table:number-columns-repeated="1015"/>
        </table:table-row>
        <table:table-row table:style-name="ro15">
          <table:table-cell table:number-columns-repeated="2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12" calcext:value-type="float">
            <text:p>12</text:p>
          </table:table-cell>
          <table:table-cell table:number-columns-repeated="2" table:style-name="ce109" office:value-type="float" office:value="5" calcext:value-type="float">
            <text:p>5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105" office:value-type="string" calcext:value-type="string">
            <text:p>CRUDL</text:p>
          </table:table-cell>
          <table:table-cell table:style-name="ce107"/>
          <table:table-cell table:style-name="ce110" office:value-type="string" calcext:value-type="string">
            <text:p>UC</text:p>
          </table:table-cell>
          <table:table-cell table:style-name="ce110" office:value-type="string" calcext:value-type="string">
            <text:p>LL Req</text:p>
          </table:table-cell>
          <table:table-cell table:style-name="ce110" office:value-type="string" calcext:value-type="string">
            <text:p>SHR</text:p>
          </table:table-cell>
          <table:table-cell table:style-name="ce113" office:value-type="string" calcext:value-type="string">
            <text:p>LL-Req</text:p>
            <text:p>Field</text:p>
          </table:table-cell>
          <table:table-cell table:style-name="ce113" office:value-type="string" calcext:value-type="string">
            <text:p>UC Field</text:p>
          </table:table-cell>
          <table:table-cell table:style-name="ce113" office:value-type="string" calcext:value-type="string">
            <text:p>Req Type</text:p>
          </table:table-cell>
          <table:table-cell table:style-name="ce113" office:value-type="string" calcext:value-type="string">
            <text:p>Grouping</text:p>
          </table:table-cell>
          <table:table-cell table:style-name="ce113" office:value-type="string" calcext:value-type="string">
            <text:p>Incompletion</text:p>
            <text:p>Type</text:p>
          </table:table-cell>
          <table:table-cell table:style-name="ce113" office:value-type="string" calcext:value-type="string">
            <text:p>Text</text:p>
            <text:p>tokens</text:p>
          </table:table-cell>
          <table:table-cell table:style-name="ce120" table:number-columns-repeated="1011"/>
        </table:table-row>
        <table:table-row table:style-name="ro15">
          <table:table-cell table:style-name="ce43" office:value-type="string" calcext:value-type="string">
            <text:p><text:s text:c="2"/>.list</text:p>
          </table:table-cell>
          <table:table-cell table:style-name="ce57" office:value-type="string" calcext:value-type="string">
            <text:p>User shall be able to list entities.</text:p>
          </table:table-cell>
          <table:table-cell table:style-name="ce111"/>
          <table:table-cell table:style-name="ce26" office:value-type="float" office:value="83" calcext:value-type="float">
            <text:p>83</text:p>
          </table:table-cell>
          <table:table-cell table:style-name="ce114" office:value-type="float" office:value="84" calcext:value-type="float">
            <text:p>84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58" calcext:value-type="float">
            <text:p>158</text:p>
          </table:table-cell>
          <table:table-cell table:number-columns-repeated="1011"/>
        </table:table-row>
        <table:table-row table:style-name="ro15">
          <table:table-cell table:style-name="ce43" office:value-type="string" calcext:value-type="string">
            <text:p><text:s text:c="2"/>.create</text:p>
          </table:table-cell>
          <table:table-cell table:style-name="ce57" office:value-type="string" calcext:value-type="string">
            <text:p>User shall be able to create entities.</text:p>
          </table:table-cell>
          <table:table-cell table:style-name="ce111"/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57" calcext:value-type="float">
            <text:p>157</text:p>
          </table:table-cell>
          <table:table-cell table:number-columns-repeated="1011"/>
        </table:table-row>
        <table:table-row table:style-name="ro15">
          <table:table-cell table:style-name="ce43" office:value-type="string" calcext:value-type="string">
            <text:p><text:s text:c="2"/>.update</text:p>
          </table:table-cell>
          <table:table-cell table:style-name="ce57" office:value-type="string" calcext:value-type="string">
            <text:p>User shall be able to modify entities.</text:p>
          </table:table-cell>
          <table:table-cell table:style-name="ce111"/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159" calcext:value-type="float">
            <text:p>159</text:p>
          </table:table-cell>
          <table:table-cell table:number-columns-repeated="1011"/>
        </table:table-row>
        <table:table-row table:style-name="ro15">
          <table:table-cell table:style-name="ce43" office:value-type="string" calcext:value-type="string">
            <text:p><text:s text:c="4"/>.order</text:p>
          </table:table-cell>
          <table:table-cell table:style-name="ce57" office:value-type="string" calcext:value-type="string">
            <text:p>User shall be able to reorder entities.</text:p>
          </table:table-cell>
          <table:table-cell table:style-name="ce111"/>
          <table:table-cell table:number-columns-repeated="2" table:style-name="ce26" office:value-type="string" calcext:value-type="string">
            <text:p>via sem-ID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4" calcext:value-type="float">
            <text:p>4</text:p>
          </table:table-cell>
          <table:table-cell table:style-name="ce118" office:value-type="string" calcext:value-type="string">
            <text:p>N/A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2" table:style-name="ce118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43" office:value-type="string" calcext:value-type="string">
            <text:p><text:s text:c="4"/>.refs</text:p>
          </table:table-cell>
          <table:table-cell table:style-name="ce57" office:value-type="string" calcext:value-type="string">
            <text:p>System shall appear to rename all references of entity after it is renamed.</text:p>
          </table:table-cell>
          <table:table-cell table:style-name="ce111"/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75" calcext:value-type="float">
            <text:p>175</text:p>
          </table:table-cell>
          <table:table-cell table:style-name="ce111" table:number-columns-repeated="2"/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160" calcext:value-type="float">
            <text:p>160</text:p>
          </table:table-cell>
          <table:table-cell table:number-columns-repeated="1011"/>
        </table:table-row>
        <table:table-row table:style-name="ro2">
          <table:table-cell table:style-name="ce40" office:value-type="string" calcext:value-type="string">
            <text:p><text:s text:c="2"/>.delete</text:p>
          </table:table-cell>
          <table:table-cell table:style-name="ce62" office:value-type="string" calcext:value-type="string">
            <text:p>User shall be able to (soft) delete entity.</text:p>
          </table:table-cell>
          <table:table-cell table:style-name="ce111"/>
          <table:table-cell table:style-name="ce26" office:value-type="float" office:value="179" calcext:value-type="float">
            <text:p>179</text:p>
          </table:table-cell>
          <table:table-cell table:style-name="ce115" office:value-type="string" calcext:value-type="string">
            <text:p>Hard only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2" table:style-name="ce115" office:value-type="string" calcext:value-type="string">
            <text:p>Hard only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<text:s text:c="4"/>.usage-summary</text:p>
          </table:table-cell>
          <table:table-cell table:style-name="ce62" office:value-type="string" calcext:value-type="string">
            <text:p>Before entity deletion, user shall be able to see a summary of usage.</text:p>
          </table:table-cell>
          <table:table-cell table:style-name="ce111"/>
          <table:table-cell table:style-name="ce26" office:value-type="float" office:value="180" calcext:value-type="float">
            <text:p>180</text:p>
          </table:table-cell>
          <table:table-cell table:style-name="ce111"/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162" calcext:value-type="float">
            <text:p>16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<text:s text:c="4"/>.usage-inspect</text:p>
          </table:table-cell>
          <table:table-cell table:style-name="ce62" office:value-type="string" calcext:value-type="string">
            <text:p>Before entity deletion, user shall be able to see each instance of entity's values and associations.</text:p>
          </table:table-cell>
          <table:table-cell table:style-name="ce111"/>
          <table:table-cell table:style-name="ce26" office:value-type="float" office:value="181" calcext:value-type="float">
            <text:p>181</text:p>
          </table:table-cell>
          <table:table-cell table:style-name="ce111"/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6" calcext:value-type="float">
            <text:p>6</text:p>
          </table:table-cell>
          <table:table-cell table:style-name="ce112" office:value-type="string" calcext:value-type="string">
            <text:p>No.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163" calcext:value-type="float">
            <text:p>163</text:p>
          </table:table-cell>
          <table:table-cell table:number-columns-repeated="1011"/>
        </table:table-row>
        <table:table-row table:style-name="ro6">
          <table:table-cell table:style-name="ce37" office:value-type="string" calcext:value-type="string">
            <text:p><text:s text:c="4"/>.hard</text:p>
          </table:table-cell>
          <table:table-cell table:style-name="ce6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12" office:value-type="string" calcext:value-type="string">
            <text:p>No.</text:p>
          </table:table-cell>
          <table:table-cell table:style-name="ce26" office:value-type="float" office:value="147" calcext:value-type="float">
            <text:p>147</text:p>
          </table:table-cell>
          <table:table-cell table:style-name="ce111" table:number-columns-repeated="2"/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161" calcext:value-type="float">
            <text:p>16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<text:s text:c="4"/>.bin</text:p>
          </table:table-cell>
          <table:table-cell table:style-name="ce57" office:value-type="string" calcext:value-type="string">
            <text:p>Upon entity deletion, System shall move it to the bin.</text:p>
          </table:table-cell>
          <table:table-cell table:style-name="ce111"/>
          <table:table-cell table:style-name="ce26" office:value-type="float" office:value="182" calcext:value-type="float">
            <text:p>182</text:p>
          </table:table-cell>
          <table:table-cell table:style-name="ce116" office:value-type="string" calcext:value-type="string">
            <text:p>No.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89" calcext:value-type="float">
            <text:p>189</text:p>
          </table:table-cell>
          <table:table-cell table:number-columns-repeated="2" table:style-name="ce116" office:value-type="string" calcext:value-type="string">
            <text:p>No.</text:p>
          </table:table-cell>
          <table:table-cell table:number-columns-repeated="1011"/>
        </table:table-row>
        <table:table-row table:style-name="ro2">
          <table:table-cell table:style-name="ce40" office:value-type="string" calcext:value-type="string">
            <text:p><text:s text:c="2"/>.restore</text:p>
          </table:table-cell>
          <table:table-cell table:style-name="ce62" office:value-type="string" calcext:value-type="string">
            <text:p>User shall be able to restore soft-deleted entities.</text:p>
          </table:table-cell>
          <table:table-cell table:style-name="ce111"/>
          <table:table-cell table:style-name="ce26" office:value-type="float" office:value="183" calcext:value-type="float">
            <text:p>183</text:p>
          </table:table-cell>
          <table:table-cell table:style-name="ce116" office:value-type="string" calcext:value-type="string">
            <text:p>No.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2" table:style-name="ce116" office:value-type="string" calcext:value-type="string">
            <text:p>No.</text:p>
          </table:table-cell>
          <table:table-cell table:number-columns-repeated="1011"/>
        </table:table-row>
        <table:table-row table:style-name="ro3">
          <table:table-cell table:style-name="ce40" office:value-type="string" calcext:value-type="string">
            <text:p><text:s text:c="4"/>.data</text:p>
          </table:table-cell>
          <table:table-cell table:style-name="ce62" office:value-type="string" calcext:value-type="string">
            <text:p>Upon entity restoration, previous values and associations shall be restored also.</text:p>
          </table:table-cell>
          <table:table-cell table:style-name="ce111"/>
          <table:table-cell table:style-name="ce26" office:value-type="float" office:value="184" calcext:value-type="float">
            <text:p>184</text:p>
          </table:table-cell>
          <table:table-cell table:style-name="ce116" office:value-type="string" calcext:value-type="string">
            <text:p>No.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41" calcext:value-type="float">
            <text:p>41</text:p>
          </table:table-cell>
          <table:table-cell table:style-name="ce119" office:value-type="string" calcext:value-type="string">
            <text:p>N/A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2" table:style-name="ce116" office:value-type="string" calcext:value-type="string">
            <text:p>No.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05" office:value-type="string" calcext:value-type="string">
            <text:p>Filters</text:p>
          </table:table-cell>
          <table:table-cell/>
          <table:table-cell table:style-name="ce113" office:value-type="string" calcext:value-type="string">
            <text:p>Incompletion</text:p>
            <text:p>Results</text:p>
          </table:table-cell>
          <table:table-cell table:style-name="ce113" office:value-type="string" calcext:value-type="string">
            <text:p>Groupings</text:p>
          </table:table-cell>
          <table:table-cell table:style-name="ce113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4" table:default-cell-style-name="Default"/>
        <table:table-column table:style-name="co25" table:default-cell-style-name="ce123"/>
        <table:table-column table:style-name="co14" table:number-columns-repeated="4" table:default-cell-style-name="Default"/>
        <table:table-row table:style-name="ro1">
          <table:table-cell table:style-name="ce121" office:value-type="string" calcext:value-type="string">
            <text:p>ID</text:p>
          </table:table-cell>
          <table:table-cell table:style-name="ce121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2" table:formula="of:=1-COUNTIF([FRs.$C$2:.$C$979]; &quot;=&quot;&amp;[.A2])" office:value-type="float" office:value="0" calcext:value-type="float">
            <text:p/>
          </table:table-cell>
          <table:table-cell/>
          <table:table-cell table:style-name="ce124" office:value-type="string" calcext:value-type="string">
            <text:p>FRs</text:p>
          </table:table-cell>
          <table:table-cell table:style-name="ce124" office:value-type="string" calcext:value-type="string">
            <text:p>Flat</text:p>
          </table:table-cell>
          <table:table-cell table:style-name="ce124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/>
          </table:table-cell>
          <table:table-cell table:style-name="ce122" table:formula="of:=1-COUNTIF([FRs.$C$2:.$C$979]; &quot;=&quot;&amp;[.A3])" office:value-type="float" office:value="0" calcext:value-type="float">
            <text:p/>
          </table:table-cell>
          <table:table-cell/>
          <table:table-cell table:style-name="ce43" table:formula="of:=COUNTIF([FRs.$C$2:.$C$999];&quot;&gt;0&quot;)" office:value-type="float" office:value="241" calcext:value-type="float">
            <text:p/>
          </table:table-cell>
          <table:table-cell table:style-name="ce43" table:formula="of:=COUNTIF([flat.$D$2:.$D$1000];&quot;&gt;0&quot;)" office:value-type="float" office:value="36" calcext:value-type="float">
            <text:p/>
          </table:table-cell>
          <table:table-cell table:style-name="ce43" table:formula="of:=[.E3]+[.D3]" office:value-type="float" office:value="277" calcext:value-type="float">
            <text:p/>
          </table:table-cell>
        </table:table-row>
        <table:table-row table:style-name="ro1">
          <table:table-cell table:formula="of:=[.A3]+1" office:value-type="float" office:value="3" calcext:value-type="float">
            <text:p/>
          </table:table-cell>
          <table:table-cell table:style-name="ce122" table:formula="of:=1-COUNTIF([FRs.$C$2:.$C$979]; &quot;=&quot;&amp;[.A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/>
          </table:table-cell>
          <table:table-cell table:style-name="ce122" table:formula="of:=1-COUNTIF([FRs.$C$2:.$C$979]; &quot;=&quot;&amp;[.A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/>
          </table:table-cell>
          <table:table-cell table:style-name="ce122" table:formula="of:=1-COUNTIF([FRs.$C$2:.$C$979]; &quot;=&quot;&amp;[.A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/>
          </table:table-cell>
          <table:table-cell table:style-name="ce122" table:formula="of:=1-COUNTIF([FRs.$C$2:.$C$979]; &quot;=&quot;&amp;[.A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/>
          </table:table-cell>
          <table:table-cell table:style-name="ce122" table:formula="of:=1-COUNTIF([FRs.$C$2:.$C$979]; &quot;=&quot;&amp;[.A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/>
          </table:table-cell>
          <table:table-cell table:style-name="ce122" table:formula="of:=1-COUNTIF([FRs.$C$2:.$C$979]; &quot;=&quot;&amp;[.A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/>
          </table:table-cell>
          <table:table-cell table:style-name="ce122" table:formula="of:=1-COUNTIF([FRs.$C$2:.$C$979]; &quot;=&quot;&amp;[.A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/>
          </table:table-cell>
          <table:table-cell table:style-name="ce122" table:formula="of:=1-COUNTIF([FRs.$C$2:.$C$979]; &quot;=&quot;&amp;[.A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/>
          </table:table-cell>
          <table:table-cell table:style-name="ce122" table:formula="of:=1-COUNTIF([FRs.$C$2:.$C$979]; &quot;=&quot;&amp;[.A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/>
          </table:table-cell>
          <table:table-cell table:style-name="ce122" table:formula="of:=1-COUNTIF([FRs.$C$2:.$C$979]; &quot;=&quot;&amp;[.A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/>
          </table:table-cell>
          <table:table-cell table:style-name="ce122" table:formula="of:=1-COUNTIF([FRs.$C$2:.$C$979]; &quot;=&quot;&amp;[.A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/>
          </table:table-cell>
          <table:table-cell table:style-name="ce122" table:formula="of:=1-COUNTIF([FRs.$C$2:.$C$979]; &quot;=&quot;&amp;[.A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/>
          </table:table-cell>
          <table:table-cell table:style-name="ce122" table:formula="of:=1-COUNTIF([FRs.$C$2:.$C$979]; &quot;=&quot;&amp;[.A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/>
          </table:table-cell>
          <table:table-cell table:style-name="ce122" table:formula="of:=1-COUNTIF([FRs.$C$2:.$C$979]; &quot;=&quot;&amp;[.A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/>
          </table:table-cell>
          <table:table-cell table:style-name="ce122" table:formula="of:=1-COUNTIF([FRs.$C$2:.$C$979]; &quot;=&quot;&amp;[.A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/>
          </table:table-cell>
          <table:table-cell table:style-name="ce122" table:formula="of:=1-COUNTIF([FRs.$C$2:.$C$979]; &quot;=&quot;&amp;[.A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/>
          </table:table-cell>
          <table:table-cell table:style-name="ce122" table:formula="of:=1-COUNTIF([FRs.$C$2:.$C$979]; &quot;=&quot;&amp;[.A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/>
          </table:table-cell>
          <table:table-cell table:style-name="ce122" table:formula="of:=1-COUNTIF([FRs.$C$2:.$C$979]; &quot;=&quot;&amp;[.A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/>
          </table:table-cell>
          <table:table-cell table:style-name="ce122" table:formula="of:=1-COUNTIF([FRs.$C$2:.$C$979]; &quot;=&quot;&amp;[.A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/>
          </table:table-cell>
          <table:table-cell table:style-name="ce122" table:formula="of:=1-COUNTIF([FRs.$C$2:.$C$979]; &quot;=&quot;&amp;[.A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/>
          </table:table-cell>
          <table:table-cell table:style-name="ce122" table:formula="of:=1-COUNTIF([FRs.$C$2:.$C$979]; &quot;=&quot;&amp;[.A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/>
          </table:table-cell>
          <table:table-cell table:style-name="ce122" table:formula="of:=1-COUNTIF([FRs.$C$2:.$C$979]; &quot;=&quot;&amp;[.A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/>
          </table:table-cell>
          <table:table-cell table:style-name="ce122" table:formula="of:=1-COUNTIF([FRs.$C$2:.$C$979]; &quot;=&quot;&amp;[.A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/>
          </table:table-cell>
          <table:table-cell table:style-name="ce122" table:formula="of:=1-COUNTIF([FRs.$C$2:.$C$979]; &quot;=&quot;&amp;[.A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/>
          </table:table-cell>
          <table:table-cell table:style-name="ce122" table:formula="of:=1-COUNTIF([FRs.$C$2:.$C$979]; &quot;=&quot;&amp;[.A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/>
          </table:table-cell>
          <table:table-cell table:style-name="ce122" table:formula="of:=1-COUNTIF([FRs.$C$2:.$C$979]; &quot;=&quot;&amp;[.A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/>
          </table:table-cell>
          <table:table-cell table:style-name="ce122" table:formula="of:=1-COUNTIF([FRs.$C$2:.$C$979]; &quot;=&quot;&amp;[.A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/>
          </table:table-cell>
          <table:table-cell table:style-name="ce122" table:formula="of:=1-COUNTIF([FRs.$C$2:.$C$979]; &quot;=&quot;&amp;[.A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/>
          </table:table-cell>
          <table:table-cell table:style-name="ce122" table:formula="of:=1-COUNTIF([FRs.$C$2:.$C$979]; &quot;=&quot;&amp;[.A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/>
          </table:table-cell>
          <table:table-cell table:style-name="ce122" table:formula="of:=1-COUNTIF([FRs.$C$2:.$C$979]; &quot;=&quot;&amp;[.A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/>
          </table:table-cell>
          <table:table-cell table:style-name="ce122" table:formula="of:=1-COUNTIF([FRs.$C$2:.$C$979]; &quot;=&quot;&amp;[.A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/>
          </table:table-cell>
          <table:table-cell table:style-name="ce122" table:formula="of:=1-COUNTIF([FRs.$C$2:.$C$979]; &quot;=&quot;&amp;[.A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/>
          </table:table-cell>
          <table:table-cell table:style-name="ce122" table:formula="of:=1-COUNTIF([FRs.$C$2:.$C$979]; &quot;=&quot;&amp;[.A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/>
          </table:table-cell>
          <table:table-cell table:style-name="ce122" table:formula="of:=1-COUNTIF([FRs.$C$2:.$C$979]; &quot;=&quot;&amp;[.A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/>
          </table:table-cell>
          <table:table-cell table:style-name="ce122" table:formula="of:=1-COUNTIF([FRs.$C$2:.$C$979]; &quot;=&quot;&amp;[.A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/>
          </table:table-cell>
          <table:table-cell table:style-name="ce122" table:formula="of:=1-COUNTIF([FRs.$C$2:.$C$979]; &quot;=&quot;&amp;[.A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/>
          </table:table-cell>
          <table:table-cell table:style-name="ce122" table:formula="of:=1-COUNTIF([FRs.$C$2:.$C$979]; &quot;=&quot;&amp;[.A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/>
          </table:table-cell>
          <table:table-cell table:style-name="ce122" table:formula="of:=1-COUNTIF([FRs.$C$2:.$C$979]; &quot;=&quot;&amp;[.A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/>
          </table:table-cell>
          <table:table-cell table:style-name="ce122" table:formula="of:=1-COUNTIF([FRs.$C$2:.$C$979]; &quot;=&quot;&amp;[.A4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/>
          </table:table-cell>
          <table:table-cell table:style-name="ce122" table:formula="of:=1-COUNTIF([FRs.$C$2:.$C$979]; &quot;=&quot;&amp;[.A4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/>
          </table:table-cell>
          <table:table-cell table:style-name="ce122" table:formula="of:=1-COUNTIF([FRs.$C$2:.$C$979]; &quot;=&quot;&amp;[.A4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/>
          </table:table-cell>
          <table:table-cell table:style-name="ce122" table:formula="of:=1-COUNTIF([FRs.$C$2:.$C$979]; &quot;=&quot;&amp;[.A4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/>
          </table:table-cell>
          <table:table-cell table:style-name="ce122" table:formula="of:=1-COUNTIF([FRs.$C$2:.$C$979]; &quot;=&quot;&amp;[.A4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/>
          </table:table-cell>
          <table:table-cell table:style-name="ce122" table:formula="of:=1-COUNTIF([FRs.$C$2:.$C$979]; &quot;=&quot;&amp;[.A4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/>
          </table:table-cell>
          <table:table-cell table:style-name="ce122" table:formula="of:=1-COUNTIF([FRs.$C$2:.$C$979]; &quot;=&quot;&amp;[.A4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/>
          </table:table-cell>
          <table:table-cell table:style-name="ce122" table:formula="of:=1-COUNTIF([FRs.$C$2:.$C$979]; &quot;=&quot;&amp;[.A4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/>
          </table:table-cell>
          <table:table-cell table:style-name="ce122" table:formula="of:=1-COUNTIF([FRs.$C$2:.$C$979]; &quot;=&quot;&amp;[.A5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/>
          </table:table-cell>
          <table:table-cell table:style-name="ce122" table:formula="of:=1-COUNTIF([FRs.$C$2:.$C$979]; &quot;=&quot;&amp;[.A5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/>
          </table:table-cell>
          <table:table-cell table:style-name="ce122" table:formula="of:=1-COUNTIF([FRs.$C$2:.$C$979]; &quot;=&quot;&amp;[.A5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/>
          </table:table-cell>
          <table:table-cell table:style-name="ce122" table:formula="of:=1-COUNTIF([FRs.$C$2:.$C$979]; &quot;=&quot;&amp;[.A5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/>
          </table:table-cell>
          <table:table-cell table:style-name="ce122" table:formula="of:=1-COUNTIF([FRs.$C$2:.$C$979]; &quot;=&quot;&amp;[.A5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/>
          </table:table-cell>
          <table:table-cell table:style-name="ce122" table:formula="of:=1-COUNTIF([FRs.$C$2:.$C$979]; &quot;=&quot;&amp;[.A5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/>
          </table:table-cell>
          <table:table-cell table:style-name="ce122" table:formula="of:=1-COUNTIF([FRs.$C$2:.$C$979]; &quot;=&quot;&amp;[.A5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/>
          </table:table-cell>
          <table:table-cell table:style-name="ce122" table:formula="of:=1-COUNTIF([FRs.$C$2:.$C$979]; &quot;=&quot;&amp;[.A5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/>
          </table:table-cell>
          <table:table-cell table:style-name="ce122" table:formula="of:=1-COUNTIF([FRs.$C$2:.$C$979]; &quot;=&quot;&amp;[.A5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/>
          </table:table-cell>
          <table:table-cell table:style-name="ce122" table:formula="of:=1-COUNTIF([FRs.$C$2:.$C$979]; &quot;=&quot;&amp;[.A5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/>
          </table:table-cell>
          <table:table-cell table:style-name="ce122" table:formula="of:=1-COUNTIF([FRs.$C$2:.$C$979]; &quot;=&quot;&amp;[.A6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/>
          </table:table-cell>
          <table:table-cell table:style-name="ce122" table:formula="of:=1-COUNTIF([FRs.$C$2:.$C$979]; &quot;=&quot;&amp;[.A6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/>
          </table:table-cell>
          <table:table-cell table:style-name="ce122" table:formula="of:=1-COUNTIF([FRs.$C$2:.$C$979]; &quot;=&quot;&amp;[.A6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/>
          </table:table-cell>
          <table:table-cell table:style-name="ce122" table:formula="of:=1-COUNTIF([FRs.$C$2:.$C$979]; &quot;=&quot;&amp;[.A6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/>
          </table:table-cell>
          <table:table-cell table:style-name="ce122" table:formula="of:=1-COUNTIF([FRs.$C$2:.$C$979]; &quot;=&quot;&amp;[.A6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/>
          </table:table-cell>
          <table:table-cell table:style-name="ce122" table:formula="of:=1-COUNTIF([FRs.$C$2:.$C$979]; &quot;=&quot;&amp;[.A6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/>
          </table:table-cell>
          <table:table-cell table:style-name="ce122" table:formula="of:=1-COUNTIF([FRs.$C$2:.$C$979]; &quot;=&quot;&amp;[.A6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/>
          </table:table-cell>
          <table:table-cell table:style-name="ce122" table:formula="of:=1-COUNTIF([FRs.$C$2:.$C$979]; &quot;=&quot;&amp;[.A6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/>
          </table:table-cell>
          <table:table-cell table:style-name="ce122" table:formula="of:=1-COUNTIF([FRs.$C$2:.$C$979]; &quot;=&quot;&amp;[.A6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/>
          </table:table-cell>
          <table:table-cell table:style-name="ce122" table:formula="of:=1-COUNTIF([FRs.$C$2:.$C$979]; &quot;=&quot;&amp;[.A6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/>
          </table:table-cell>
          <table:table-cell table:style-name="ce122" table:formula="of:=1-COUNTIF([FRs.$C$2:.$C$979]; &quot;=&quot;&amp;[.A7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/>
          </table:table-cell>
          <table:table-cell table:style-name="ce122" table:formula="of:=1-COUNTIF([FRs.$C$2:.$C$979]; &quot;=&quot;&amp;[.A7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/>
          </table:table-cell>
          <table:table-cell table:style-name="ce122" table:formula="of:=1-COUNTIF([FRs.$C$2:.$C$979]; &quot;=&quot;&amp;[.A7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/>
          </table:table-cell>
          <table:table-cell table:style-name="ce122" table:formula="of:=1-COUNTIF([FRs.$C$2:.$C$979]; &quot;=&quot;&amp;[.A7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/>
          </table:table-cell>
          <table:table-cell table:style-name="ce122" table:formula="of:=1-COUNTIF([FRs.$C$2:.$C$979]; &quot;=&quot;&amp;[.A7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/>
          </table:table-cell>
          <table:table-cell table:style-name="ce122" table:formula="of:=1-COUNTIF([FRs.$C$2:.$C$979]; &quot;=&quot;&amp;[.A7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/>
          </table:table-cell>
          <table:table-cell table:style-name="ce122" table:formula="of:=1-COUNTIF([FRs.$C$2:.$C$979]; &quot;=&quot;&amp;[.A7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/>
          </table:table-cell>
          <table:table-cell table:style-name="ce122" table:formula="of:=1-COUNTIF([FRs.$C$2:.$C$979]; &quot;=&quot;&amp;[.A7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/>
          </table:table-cell>
          <table:table-cell table:style-name="ce122" table:formula="of:=1-COUNTIF([FRs.$C$2:.$C$979]; &quot;=&quot;&amp;[.A7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/>
          </table:table-cell>
          <table:table-cell table:style-name="ce122" table:formula="of:=1-COUNTIF([FRs.$C$2:.$C$979]; &quot;=&quot;&amp;[.A7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/>
          </table:table-cell>
          <table:table-cell table:style-name="ce122" table:formula="of:=1-COUNTIF([FRs.$C$2:.$C$979]; &quot;=&quot;&amp;[.A8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/>
          </table:table-cell>
          <table:table-cell table:style-name="ce122" table:formula="of:=1-COUNTIF([FRs.$C$2:.$C$979]; &quot;=&quot;&amp;[.A8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/>
          </table:table-cell>
          <table:table-cell table:style-name="ce122" table:formula="of:=1-COUNTIF([FRs.$C$2:.$C$979]; &quot;=&quot;&amp;[.A8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/>
          </table:table-cell>
          <table:table-cell table:style-name="ce122" table:formula="of:=1-COUNTIF([FRs.$C$2:.$C$979]; &quot;=&quot;&amp;[.A8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/>
          </table:table-cell>
          <table:table-cell table:style-name="ce122" table:formula="of:=1-COUNTIF([FRs.$C$2:.$C$979]; &quot;=&quot;&amp;[.A8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/>
          </table:table-cell>
          <table:table-cell table:style-name="ce122" table:formula="of:=1-COUNTIF([FRs.$C$2:.$C$979]; &quot;=&quot;&amp;[.A8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/>
          </table:table-cell>
          <table:table-cell table:style-name="ce122" table:formula="of:=1-COUNTIF([FRs.$C$2:.$C$979]; &quot;=&quot;&amp;[.A8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/>
          </table:table-cell>
          <table:table-cell table:style-name="ce122" table:formula="of:=1-COUNTIF([FRs.$C$2:.$C$979]; &quot;=&quot;&amp;[.A8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/>
          </table:table-cell>
          <table:table-cell table:style-name="ce122" table:formula="of:=1-COUNTIF([FRs.$C$2:.$C$979]; &quot;=&quot;&amp;[.A8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/>
          </table:table-cell>
          <table:table-cell table:style-name="ce122" table:formula="of:=1-COUNTIF([FRs.$C$2:.$C$979]; &quot;=&quot;&amp;[.A8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/>
          </table:table-cell>
          <table:table-cell table:style-name="ce122" table:formula="of:=1-COUNTIF([FRs.$C$2:.$C$979]; &quot;=&quot;&amp;[.A9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/>
          </table:table-cell>
          <table:table-cell table:style-name="ce122" table:formula="of:=1-COUNTIF([FRs.$C$2:.$C$979]; &quot;=&quot;&amp;[.A9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/>
          </table:table-cell>
          <table:table-cell table:style-name="ce122" table:formula="of:=1-COUNTIF([FRs.$C$2:.$C$979]; &quot;=&quot;&amp;[.A9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/>
          </table:table-cell>
          <table:table-cell table:style-name="ce122" table:formula="of:=1-COUNTIF([FRs.$C$2:.$C$979]; &quot;=&quot;&amp;[.A9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/>
          </table:table-cell>
          <table:table-cell table:style-name="ce122" table:formula="of:=1-COUNTIF([FRs.$C$2:.$C$979]; &quot;=&quot;&amp;[.A9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/>
          </table:table-cell>
          <table:table-cell table:style-name="ce122" table:formula="of:=1-COUNTIF([FRs.$C$2:.$C$979]; &quot;=&quot;&amp;[.A9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/>
          </table:table-cell>
          <table:table-cell table:style-name="ce122" table:formula="of:=1-COUNTIF([FRs.$C$2:.$C$979]; &quot;=&quot;&amp;[.A9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/>
          </table:table-cell>
          <table:table-cell table:style-name="ce122" table:formula="of:=1-COUNTIF([FRs.$C$2:.$C$979]; &quot;=&quot;&amp;[.A9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/>
          </table:table-cell>
          <table:table-cell table:style-name="ce122" table:formula="of:=1-COUNTIF([FRs.$C$2:.$C$979]; &quot;=&quot;&amp;[.A9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/>
          </table:table-cell>
          <table:table-cell table:style-name="ce122" table:formula="of:=1-COUNTIF([FRs.$C$2:.$C$979]; &quot;=&quot;&amp;[.A9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/>
          </table:table-cell>
          <table:table-cell table:style-name="ce122" table:formula="of:=1-COUNTIF([FRs.$C$2:.$C$979]; &quot;=&quot;&amp;[.A10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/>
          </table:table-cell>
          <table:table-cell table:style-name="ce122" table:formula="of:=1-COUNTIF([FRs.$C$2:.$C$979]; &quot;=&quot;&amp;[.A10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/>
          </table:table-cell>
          <table:table-cell table:style-name="ce122" table:formula="of:=1-COUNTIF([FRs.$C$2:.$C$979]; &quot;=&quot;&amp;[.A10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/>
          </table:table-cell>
          <table:table-cell table:style-name="ce122" table:formula="of:=1-COUNTIF([FRs.$C$2:.$C$979]; &quot;=&quot;&amp;[.A10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/>
          </table:table-cell>
          <table:table-cell table:style-name="ce122" table:formula="of:=1-COUNTIF([FRs.$C$2:.$C$979]; &quot;=&quot;&amp;[.A10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/>
          </table:table-cell>
          <table:table-cell table:style-name="ce122" table:formula="of:=1-COUNTIF([FRs.$C$2:.$C$979]; &quot;=&quot;&amp;[.A10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/>
          </table:table-cell>
          <table:table-cell table:style-name="ce122" table:formula="of:=1-COUNTIF([FRs.$C$2:.$C$979]; &quot;=&quot;&amp;[.A10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/>
          </table:table-cell>
          <table:table-cell table:style-name="ce122" table:formula="of:=1-COUNTIF([FRs.$C$2:.$C$979]; &quot;=&quot;&amp;[.A10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/>
          </table:table-cell>
          <table:table-cell table:style-name="ce122" table:formula="of:=1-COUNTIF([FRs.$C$2:.$C$979]; &quot;=&quot;&amp;[.A10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/>
          </table:table-cell>
          <table:table-cell table:style-name="ce122" table:formula="of:=1-COUNTIF([FRs.$C$2:.$C$979]; &quot;=&quot;&amp;[.A10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/>
          </table:table-cell>
          <table:table-cell table:style-name="ce122" table:formula="of:=1-COUNTIF([FRs.$C$2:.$C$979]; &quot;=&quot;&amp;[.A1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/>
          </table:table-cell>
          <table:table-cell table:style-name="ce122" table:formula="of:=1-COUNTIF([FRs.$C$2:.$C$979]; &quot;=&quot;&amp;[.A1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/>
          </table:table-cell>
          <table:table-cell table:style-name="ce122" table:formula="of:=1-COUNTIF([FRs.$C$2:.$C$979]; &quot;=&quot;&amp;[.A1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/>
          </table:table-cell>
          <table:table-cell table:style-name="ce122" table:formula="of:=1-COUNTIF([FRs.$C$2:.$C$979]; &quot;=&quot;&amp;[.A1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/>
          </table:table-cell>
          <table:table-cell table:style-name="ce122" table:formula="of:=1-COUNTIF([FRs.$C$2:.$C$979]; &quot;=&quot;&amp;[.A1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/>
          </table:table-cell>
          <table:table-cell table:style-name="ce122" table:formula="of:=1-COUNTIF([FRs.$C$2:.$C$979]; &quot;=&quot;&amp;[.A1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/>
          </table:table-cell>
          <table:table-cell table:style-name="ce122" table:formula="of:=1-COUNTIF([FRs.$C$2:.$C$979]; &quot;=&quot;&amp;[.A1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/>
          </table:table-cell>
          <table:table-cell table:style-name="ce122" table:formula="of:=1-COUNTIF([FRs.$C$2:.$C$979]; &quot;=&quot;&amp;[.A1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/>
          </table:table-cell>
          <table:table-cell table:style-name="ce122" table:formula="of:=1-COUNTIF([FRs.$C$2:.$C$979]; &quot;=&quot;&amp;[.A1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/>
          </table:table-cell>
          <table:table-cell table:style-name="ce122" table:formula="of:=1-COUNTIF([FRs.$C$2:.$C$979]; &quot;=&quot;&amp;[.A1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/>
          </table:table-cell>
          <table:table-cell table:style-name="ce122" table:formula="of:=1-COUNTIF([FRs.$C$2:.$C$979]; &quot;=&quot;&amp;[.A1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/>
          </table:table-cell>
          <table:table-cell table:style-name="ce122" table:formula="of:=1-COUNTIF([FRs.$C$2:.$C$979]; &quot;=&quot;&amp;[.A1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/>
          </table:table-cell>
          <table:table-cell table:style-name="ce122" table:formula="of:=1-COUNTIF([FRs.$C$2:.$C$979]; &quot;=&quot;&amp;[.A1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/>
          </table:table-cell>
          <table:table-cell table:style-name="ce122" table:formula="of:=1-COUNTIF([FRs.$C$2:.$C$979]; &quot;=&quot;&amp;[.A1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/>
          </table:table-cell>
          <table:table-cell table:style-name="ce122" table:formula="of:=1-COUNTIF([FRs.$C$2:.$C$979]; &quot;=&quot;&amp;[.A1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/>
          </table:table-cell>
          <table:table-cell table:style-name="ce122" table:formula="of:=1-COUNTIF([FRs.$C$2:.$C$979]; &quot;=&quot;&amp;[.A1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/>
          </table:table-cell>
          <table:table-cell table:style-name="ce122" table:formula="of:=1-COUNTIF([FRs.$C$2:.$C$979]; &quot;=&quot;&amp;[.A1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/>
          </table:table-cell>
          <table:table-cell table:style-name="ce122" table:formula="of:=1-COUNTIF([FRs.$C$2:.$C$979]; &quot;=&quot;&amp;[.A1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/>
          </table:table-cell>
          <table:table-cell table:style-name="ce122" table:formula="of:=1-COUNTIF([FRs.$C$2:.$C$979]; &quot;=&quot;&amp;[.A1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/>
          </table:table-cell>
          <table:table-cell table:style-name="ce122" table:formula="of:=1-COUNTIF([FRs.$C$2:.$C$979]; &quot;=&quot;&amp;[.A1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/>
          </table:table-cell>
          <table:table-cell table:style-name="ce122" table:formula="of:=1-COUNTIF([FRs.$C$2:.$C$979]; &quot;=&quot;&amp;[.A1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/>
          </table:table-cell>
          <table:table-cell table:style-name="ce122" table:formula="of:=1-COUNTIF([FRs.$C$2:.$C$979]; &quot;=&quot;&amp;[.A1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/>
          </table:table-cell>
          <table:table-cell table:style-name="ce122" table:formula="of:=1-COUNTIF([FRs.$C$2:.$C$979]; &quot;=&quot;&amp;[.A1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/>
          </table:table-cell>
          <table:table-cell table:style-name="ce122" table:formula="of:=1-COUNTIF([FRs.$C$2:.$C$979]; &quot;=&quot;&amp;[.A1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/>
          </table:table-cell>
          <table:table-cell table:style-name="ce122" table:formula="of:=1-COUNTIF([FRs.$C$2:.$C$979]; &quot;=&quot;&amp;[.A1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/>
          </table:table-cell>
          <table:table-cell table:style-name="ce122" table:formula="of:=1-COUNTIF([FRs.$C$2:.$C$979]; &quot;=&quot;&amp;[.A1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/>
          </table:table-cell>
          <table:table-cell table:style-name="ce122" table:formula="of:=1-COUNTIF([FRs.$C$2:.$C$979]; &quot;=&quot;&amp;[.A1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/>
          </table:table-cell>
          <table:table-cell table:style-name="ce122" table:formula="of:=1-COUNTIF([FRs.$C$2:.$C$979]; &quot;=&quot;&amp;[.A1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/>
          </table:table-cell>
          <table:table-cell table:style-name="ce122" table:formula="of:=1-COUNTIF([FRs.$C$2:.$C$979]; &quot;=&quot;&amp;[.A1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/>
          </table:table-cell>
          <table:table-cell table:style-name="ce122" table:formula="of:=1-COUNTIF([FRs.$C$2:.$C$979]; &quot;=&quot;&amp;[.A1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/>
          </table:table-cell>
          <table:table-cell table:style-name="ce122" table:formula="of:=1-COUNTIF([FRs.$C$2:.$C$979]; &quot;=&quot;&amp;[.A1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/>
          </table:table-cell>
          <table:table-cell table:style-name="ce122" table:formula="of:=1-COUNTIF([FRs.$C$2:.$C$979]; &quot;=&quot;&amp;[.A1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/>
          </table:table-cell>
          <table:table-cell table:style-name="ce122" table:formula="of:=1-COUNTIF([FRs.$C$2:.$C$979]; &quot;=&quot;&amp;[.A14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/>
          </table:table-cell>
          <table:table-cell table:style-name="ce122" table:formula="of:=1-COUNTIF([FRs.$C$2:.$C$979]; &quot;=&quot;&amp;[.A14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/>
          </table:table-cell>
          <table:table-cell table:style-name="ce122" table:formula="of:=1-COUNTIF([FRs.$C$2:.$C$979]; &quot;=&quot;&amp;[.A14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/>
          </table:table-cell>
          <table:table-cell table:style-name="ce122" table:formula="of:=1-COUNTIF([FRs.$C$2:.$C$979]; &quot;=&quot;&amp;[.A14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/>
          </table:table-cell>
          <table:table-cell table:style-name="ce122" table:formula="of:=1-COUNTIF([FRs.$C$2:.$C$979]; &quot;=&quot;&amp;[.A14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/>
          </table:table-cell>
          <table:table-cell table:style-name="ce122" table:formula="of:=1-COUNTIF([FRs.$C$2:.$C$979]; &quot;=&quot;&amp;[.A14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/>
          </table:table-cell>
          <table:table-cell table:style-name="ce122" table:formula="of:=1-COUNTIF([FRs.$C$2:.$C$979]; &quot;=&quot;&amp;[.A14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/>
          </table:table-cell>
          <table:table-cell table:style-name="ce122" table:formula="of:=1-COUNTIF([FRs.$C$2:.$C$979]; &quot;=&quot;&amp;[.A14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/>
          </table:table-cell>
          <table:table-cell table:style-name="ce122" table:formula="of:=1-COUNTIF([FRs.$C$2:.$C$979]; &quot;=&quot;&amp;[.A15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/>
          </table:table-cell>
          <table:table-cell table:style-name="ce122" table:formula="of:=1-COUNTIF([FRs.$C$2:.$C$979]; &quot;=&quot;&amp;[.A15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/>
          </table:table-cell>
          <table:table-cell table:style-name="ce122" table:formula="of:=1-COUNTIF([FRs.$C$2:.$C$979]; &quot;=&quot;&amp;[.A15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/>
          </table:table-cell>
          <table:table-cell table:style-name="ce122" table:formula="of:=1-COUNTIF([FRs.$C$2:.$C$979]; &quot;=&quot;&amp;[.A15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/>
          </table:table-cell>
          <table:table-cell table:style-name="ce122" table:formula="of:=1-COUNTIF([FRs.$C$2:.$C$979]; &quot;=&quot;&amp;[.A15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/>
          </table:table-cell>
          <table:table-cell table:style-name="ce122" table:formula="of:=1-COUNTIF([FRs.$C$2:.$C$979]; &quot;=&quot;&amp;[.A15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/>
          </table:table-cell>
          <table:table-cell table:style-name="ce122" table:formula="of:=1-COUNTIF([FRs.$C$2:.$C$979]; &quot;=&quot;&amp;[.A15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/>
          </table:table-cell>
          <table:table-cell table:style-name="ce122" table:formula="of:=1-COUNTIF([FRs.$C$2:.$C$979]; &quot;=&quot;&amp;[.A15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/>
          </table:table-cell>
          <table:table-cell table:style-name="ce122" table:formula="of:=1-COUNTIF([FRs.$C$2:.$C$979]; &quot;=&quot;&amp;[.A15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/>
          </table:table-cell>
          <table:table-cell table:style-name="ce122" table:formula="of:=1-COUNTIF([FRs.$C$2:.$C$979]; &quot;=&quot;&amp;[.A15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/>
          </table:table-cell>
          <table:table-cell table:style-name="ce122" table:formula="of:=1-COUNTIF([FRs.$C$2:.$C$979]; &quot;=&quot;&amp;[.A16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/>
          </table:table-cell>
          <table:table-cell table:style-name="ce122" table:formula="of:=1-COUNTIF([FRs.$C$2:.$C$979]; &quot;=&quot;&amp;[.A16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/>
          </table:table-cell>
          <table:table-cell table:style-name="ce122" table:formula="of:=1-COUNTIF([FRs.$C$2:.$C$979]; &quot;=&quot;&amp;[.A16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/>
          </table:table-cell>
          <table:table-cell table:style-name="ce122" table:formula="of:=1-COUNTIF([FRs.$C$2:.$C$979]; &quot;=&quot;&amp;[.A16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/>
          </table:table-cell>
          <table:table-cell table:style-name="ce122" table:formula="of:=1-COUNTIF([FRs.$C$2:.$C$979]; &quot;=&quot;&amp;[.A16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/>
          </table:table-cell>
          <table:table-cell table:style-name="ce122" table:formula="of:=1-COUNTIF([FRs.$C$2:.$C$979]; &quot;=&quot;&amp;[.A16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/>
          </table:table-cell>
          <table:table-cell table:style-name="ce122" table:formula="of:=1-COUNTIF([FRs.$C$2:.$C$979]; &quot;=&quot;&amp;[.A16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/>
          </table:table-cell>
          <table:table-cell table:style-name="ce122" table:formula="of:=1-COUNTIF([FRs.$C$2:.$C$979]; &quot;=&quot;&amp;[.A16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/>
          </table:table-cell>
          <table:table-cell table:style-name="ce122" table:formula="of:=1-COUNTIF([FRs.$C$2:.$C$979]; &quot;=&quot;&amp;[.A16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/>
          </table:table-cell>
          <table:table-cell table:style-name="ce122" table:formula="of:=1-COUNTIF([FRs.$C$2:.$C$979]; &quot;=&quot;&amp;[.A16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/>
          </table:table-cell>
          <table:table-cell table:style-name="ce122" table:formula="of:=1-COUNTIF([FRs.$C$2:.$C$979]; &quot;=&quot;&amp;[.A17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/>
          </table:table-cell>
          <table:table-cell table:style-name="ce122" table:formula="of:=1-COUNTIF([FRs.$C$2:.$C$979]; &quot;=&quot;&amp;[.A17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/>
          </table:table-cell>
          <table:table-cell table:style-name="ce122" table:formula="of:=1-COUNTIF([FRs.$C$2:.$C$979]; &quot;=&quot;&amp;[.A17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/>
          </table:table-cell>
          <table:table-cell table:style-name="ce122" table:formula="of:=1-COUNTIF([FRs.$C$2:.$C$979]; &quot;=&quot;&amp;[.A17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/>
          </table:table-cell>
          <table:table-cell table:style-name="ce122" table:formula="of:=1-COUNTIF([FRs.$C$2:.$C$979]; &quot;=&quot;&amp;[.A17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/>
          </table:table-cell>
          <table:table-cell table:style-name="ce122" table:formula="of:=1-COUNTIF([FRs.$C$2:.$C$979]; &quot;=&quot;&amp;[.A17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/>
          </table:table-cell>
          <table:table-cell table:style-name="ce122" table:formula="of:=1-COUNTIF([FRs.$C$2:.$C$979]; &quot;=&quot;&amp;[.A17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/>
          </table:table-cell>
          <table:table-cell table:style-name="ce122" table:formula="of:=1-COUNTIF([FRs.$C$2:.$C$979]; &quot;=&quot;&amp;[.A17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/>
          </table:table-cell>
          <table:table-cell table:style-name="ce122" table:formula="of:=1-COUNTIF([FRs.$C$2:.$C$979]; &quot;=&quot;&amp;[.A17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/>
          </table:table-cell>
          <table:table-cell table:style-name="ce122" table:formula="of:=1-COUNTIF([FRs.$C$2:.$C$979]; &quot;=&quot;&amp;[.A17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/>
          </table:table-cell>
          <table:table-cell table:style-name="ce122" table:formula="of:=1-COUNTIF([FRs.$C$2:.$C$979]; &quot;=&quot;&amp;[.A18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/>
          </table:table-cell>
          <table:table-cell table:style-name="ce122" table:formula="of:=1-COUNTIF([FRs.$C$2:.$C$979]; &quot;=&quot;&amp;[.A18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/>
          </table:table-cell>
          <table:table-cell table:style-name="ce122" table:formula="of:=1-COUNTIF([FRs.$C$2:.$C$979]; &quot;=&quot;&amp;[.A18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/>
          </table:table-cell>
          <table:table-cell table:style-name="ce122" table:formula="of:=1-COUNTIF([FRs.$C$2:.$C$979]; &quot;=&quot;&amp;[.A18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/>
          </table:table-cell>
          <table:table-cell table:style-name="ce122" table:formula="of:=1-COUNTIF([FRs.$C$2:.$C$979]; &quot;=&quot;&amp;[.A18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/>
          </table:table-cell>
          <table:table-cell table:style-name="ce122" table:formula="of:=1-COUNTIF([FRs.$C$2:.$C$979]; &quot;=&quot;&amp;[.A18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/>
          </table:table-cell>
          <table:table-cell table:style-name="ce122" table:formula="of:=1-COUNTIF([FRs.$C$2:.$C$979]; &quot;=&quot;&amp;[.A18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/>
          </table:table-cell>
          <table:table-cell table:style-name="ce122" table:formula="of:=1-COUNTIF([FRs.$C$2:.$C$979]; &quot;=&quot;&amp;[.A18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/>
          </table:table-cell>
          <table:table-cell table:style-name="ce122" table:formula="of:=1-COUNTIF([FRs.$C$2:.$C$979]; &quot;=&quot;&amp;[.A18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/>
          </table:table-cell>
          <table:table-cell table:style-name="ce122" table:formula="of:=1-COUNTIF([FRs.$C$2:.$C$979]; &quot;=&quot;&amp;[.A18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/>
          </table:table-cell>
          <table:table-cell table:style-name="ce122" table:formula="of:=1-COUNTIF([FRs.$C$2:.$C$979]; &quot;=&quot;&amp;[.A19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/>
          </table:table-cell>
          <table:table-cell table:style-name="ce122" table:formula="of:=1-COUNTIF([FRs.$C$2:.$C$979]; &quot;=&quot;&amp;[.A19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/>
          </table:table-cell>
          <table:table-cell table:style-name="ce122" table:formula="of:=1-COUNTIF([FRs.$C$2:.$C$979]; &quot;=&quot;&amp;[.A19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/>
          </table:table-cell>
          <table:table-cell table:style-name="ce122" table:formula="of:=1-COUNTIF([FRs.$C$2:.$C$979]; &quot;=&quot;&amp;[.A19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/>
          </table:table-cell>
          <table:table-cell table:style-name="ce122" table:formula="of:=1-COUNTIF([FRs.$C$2:.$C$979]; &quot;=&quot;&amp;[.A19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/>
          </table:table-cell>
          <table:table-cell table:style-name="ce122" table:formula="of:=1-COUNTIF([FRs.$C$2:.$C$979]; &quot;=&quot;&amp;[.A19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/>
          </table:table-cell>
          <table:table-cell table:style-name="ce122" table:formula="of:=1-COUNTIF([FRs.$C$2:.$C$979]; &quot;=&quot;&amp;[.A19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/>
          </table:table-cell>
          <table:table-cell table:style-name="ce122" table:formula="of:=1-COUNTIF([FRs.$C$2:.$C$979]; &quot;=&quot;&amp;[.A19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/>
          </table:table-cell>
          <table:table-cell table:style-name="ce122" table:formula="of:=1-COUNTIF([FRs.$C$2:.$C$979]; &quot;=&quot;&amp;[.A19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/>
          </table:table-cell>
          <table:table-cell table:style-name="ce122" table:formula="of:=1-COUNTIF([FRs.$C$2:.$C$979]; &quot;=&quot;&amp;[.A19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/>
          </table:table-cell>
          <table:table-cell table:style-name="ce122" table:formula="of:=1-COUNTIF([FRs.$C$2:.$C$979]; &quot;=&quot;&amp;[.A20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/>
          </table:table-cell>
          <table:table-cell table:style-name="ce122" table:formula="of:=1-COUNTIF([FRs.$C$2:.$C$979]; &quot;=&quot;&amp;[.A20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/>
          </table:table-cell>
          <table:table-cell table:style-name="ce122" table:formula="of:=1-COUNTIF([FRs.$C$2:.$C$979]; &quot;=&quot;&amp;[.A20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/>
          </table:table-cell>
          <table:table-cell table:style-name="ce122" table:formula="of:=1-COUNTIF([FRs.$C$2:.$C$979]; &quot;=&quot;&amp;[.A20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/>
          </table:table-cell>
          <table:table-cell table:style-name="ce122" table:formula="of:=1-COUNTIF([FRs.$C$2:.$C$979]; &quot;=&quot;&amp;[.A20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/>
          </table:table-cell>
          <table:table-cell table:style-name="ce122" table:formula="of:=1-COUNTIF([FRs.$C$2:.$C$979]; &quot;=&quot;&amp;[.A20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/>
          </table:table-cell>
          <table:table-cell table:style-name="ce122" table:formula="of:=1-COUNTIF([FRs.$C$2:.$C$979]; &quot;=&quot;&amp;[.A20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/>
          </table:table-cell>
          <table:table-cell table:style-name="ce122" table:formula="of:=1-COUNTIF([FRs.$C$2:.$C$979]; &quot;=&quot;&amp;[.A20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/>
          </table:table-cell>
          <table:table-cell table:style-name="ce122" table:formula="of:=1-COUNTIF([FRs.$C$2:.$C$979]; &quot;=&quot;&amp;[.A20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/>
          </table:table-cell>
          <table:table-cell table:style-name="ce122" table:formula="of:=1-COUNTIF([FRs.$C$2:.$C$979]; &quot;=&quot;&amp;[.A20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/>
          </table:table-cell>
          <table:table-cell table:style-name="ce122" table:formula="of:=1-COUNTIF([FRs.$C$2:.$C$979]; &quot;=&quot;&amp;[.A2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/>
          </table:table-cell>
          <table:table-cell table:style-name="ce122" table:formula="of:=1-COUNTIF([FRs.$C$2:.$C$979]; &quot;=&quot;&amp;[.A2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/>
          </table:table-cell>
          <table:table-cell table:style-name="ce122" table:formula="of:=1-COUNTIF([FRs.$C$2:.$C$979]; &quot;=&quot;&amp;[.A2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/>
          </table:table-cell>
          <table:table-cell table:style-name="ce122" table:formula="of:=1-COUNTIF([FRs.$C$2:.$C$979]; &quot;=&quot;&amp;[.A2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/>
          </table:table-cell>
          <table:table-cell table:style-name="ce122" table:formula="of:=1-COUNTIF([FRs.$C$2:.$C$979]; &quot;=&quot;&amp;[.A2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/>
          </table:table-cell>
          <table:table-cell table:style-name="ce122" table:formula="of:=1-COUNTIF([FRs.$C$2:.$C$979]; &quot;=&quot;&amp;[.A2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/>
          </table:table-cell>
          <table:table-cell table:style-name="ce122" table:formula="of:=1-COUNTIF([FRs.$C$2:.$C$979]; &quot;=&quot;&amp;[.A2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/>
          </table:table-cell>
          <table:table-cell table:style-name="ce122" table:formula="of:=1-COUNTIF([FRs.$C$2:.$C$979]; &quot;=&quot;&amp;[.A2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/>
          </table:table-cell>
          <table:table-cell table:style-name="ce122" table:formula="of:=1-COUNTIF([FRs.$C$2:.$C$979]; &quot;=&quot;&amp;[.A2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/>
          </table:table-cell>
          <table:table-cell table:style-name="ce122" table:formula="of:=1-COUNTIF([FRs.$C$2:.$C$979]; &quot;=&quot;&amp;[.A2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/>
          </table:table-cell>
          <table:table-cell table:style-name="ce122" table:formula="of:=1-COUNTIF([FRs.$C$2:.$C$979]; &quot;=&quot;&amp;[.A2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/>
          </table:table-cell>
          <table:table-cell table:style-name="ce122" table:formula="of:=1-COUNTIF([FRs.$C$2:.$C$979]; &quot;=&quot;&amp;[.A2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/>
          </table:table-cell>
          <table:table-cell table:style-name="ce122" table:formula="of:=1-COUNTIF([FRs.$C$2:.$C$979]; &quot;=&quot;&amp;[.A2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/>
          </table:table-cell>
          <table:table-cell table:style-name="ce122" table:formula="of:=1-COUNTIF([FRs.$C$2:.$C$979]; &quot;=&quot;&amp;[.A2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/>
          </table:table-cell>
          <table:table-cell table:style-name="ce122" table:formula="of:=1-COUNTIF([FRs.$C$2:.$C$979]; &quot;=&quot;&amp;[.A2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/>
          </table:table-cell>
          <table:table-cell table:style-name="ce122" table:formula="of:=1-COUNTIF([FRs.$C$2:.$C$979]; &quot;=&quot;&amp;[.A2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/>
          </table:table-cell>
          <table:table-cell table:style-name="ce122" table:formula="of:=1-COUNTIF([FRs.$C$2:.$C$979]; &quot;=&quot;&amp;[.A2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/>
          </table:table-cell>
          <table:table-cell table:style-name="ce122" table:formula="of:=1-COUNTIF([FRs.$C$2:.$C$979]; &quot;=&quot;&amp;[.A2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/>
          </table:table-cell>
          <table:table-cell table:style-name="ce122" table:formula="of:=1-COUNTIF([FRs.$C$2:.$C$979]; &quot;=&quot;&amp;[.A2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/>
          </table:table-cell>
          <table:table-cell table:style-name="ce122" table:formula="of:=1-COUNTIF([FRs.$C$2:.$C$979]; &quot;=&quot;&amp;[.A2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/>
          </table:table-cell>
          <table:table-cell table:style-name="ce122" table:formula="of:=1-COUNTIF([FRs.$C$2:.$C$979]; &quot;=&quot;&amp;[.A2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/>
          </table:table-cell>
          <table:table-cell table:style-name="ce122" table:formula="of:=1-COUNTIF([FRs.$C$2:.$C$979]; &quot;=&quot;&amp;[.A2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/>
          </table:table-cell>
          <table:table-cell table:style-name="ce122" table:formula="of:=1-COUNTIF([FRs.$C$2:.$C$979]; &quot;=&quot;&amp;[.A2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/>
          </table:table-cell>
          <table:table-cell table:style-name="ce122" table:formula="of:=1-COUNTIF([FRs.$C$2:.$C$979]; &quot;=&quot;&amp;[.A2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/>
          </table:table-cell>
          <table:table-cell table:style-name="ce122" table:formula="of:=1-COUNTIF([FRs.$C$2:.$C$979]; &quot;=&quot;&amp;[.A2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/>
          </table:table-cell>
          <table:table-cell table:style-name="ce122" table:formula="of:=1-COUNTIF([FRs.$C$2:.$C$979]; &quot;=&quot;&amp;[.A2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/>
          </table:table-cell>
          <table:table-cell table:style-name="ce122" table:formula="of:=1-COUNTIF([FRs.$C$2:.$C$979]; &quot;=&quot;&amp;[.A2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/>
          </table:table-cell>
          <table:table-cell table:style-name="ce122" table:formula="of:=1-COUNTIF([FRs.$C$2:.$C$979]; &quot;=&quot;&amp;[.A2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/>
          </table:table-cell>
          <table:table-cell table:style-name="ce122" table:formula="of:=1-COUNTIF([FRs.$C$2:.$C$979]; &quot;=&quot;&amp;[.A2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/>
          </table:table-cell>
          <table:table-cell table:style-name="ce122" table:formula="of:=1-COUNTIF([FRs.$C$2:.$C$979]; &quot;=&quot;&amp;[.A2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/>
          </table:table-cell>
          <table:table-cell table:style-name="ce122" table:formula="of:=1-COUNTIF([FRs.$C$2:.$C$979]; &quot;=&quot;&amp;[.A2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/>
          </table:table-cell>
          <table:table-cell table:style-name="ce122" table:formula="of:=1-COUNTIF([FRs.$C$2:.$C$979]; &quot;=&quot;&amp;[.A2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/>
          </table:table-cell>
          <table:table-cell table:style-name="ce122" table:formula="of:=1-COUNTIF([FRs.$C$2:.$C$979]; &quot;=&quot;&amp;[.A24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/>
          </table:table-cell>
          <table:table-cell table:style-name="ce122" table:formula="of:=1-COUNTIF([FRs.$C$2:.$C$979]; &quot;=&quot;&amp;[.A24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/>
          </table:table-cell>
          <table:table-cell table:style-name="ce122" table:formula="of:=1-COUNTIF([FRs.$C$2:.$C$979]; &quot;=&quot;&amp;[.A24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/>
          </table:table-cell>
          <table:table-cell table:style-name="ce122" table:formula="of:=1-COUNTIF([FRs.$C$2:.$C$979]; &quot;=&quot;&amp;[.A24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/>
          </table:table-cell>
          <table:table-cell table:style-name="ce122" table:formula="of:=1-COUNTIF([FRs.$C$2:.$C$979]; &quot;=&quot;&amp;[.A24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/>
          </table:table-cell>
          <table:table-cell table:style-name="ce122" table:formula="of:=1-COUNTIF([FRs.$C$2:.$C$979]; &quot;=&quot;&amp;[.A24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/>
          </table:table-cell>
          <table:table-cell table:style-name="ce122" table:formula="of:=1-COUNTIF([FRs.$C$2:.$C$979]; &quot;=&quot;&amp;[.A24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/>
          </table:table-cell>
          <table:table-cell table:style-name="ce122" table:formula="of:=1-COUNTIF([FRs.$C$2:.$C$979]; &quot;=&quot;&amp;[.A24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/>
          </table:table-cell>
          <table:table-cell table:style-name="ce122" table:formula="of:=1-COUNTIF([FRs.$C$2:.$C$979]; &quot;=&quot;&amp;[.A25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/>
          </table:table-cell>
          <table:table-cell table:style-name="ce122" table:formula="of:=1-COUNTIF([FRs.$C$2:.$C$979]; &quot;=&quot;&amp;[.A25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/>
          </table:table-cell>
          <table:table-cell table:style-name="ce122" table:formula="of:=1-COUNTIF([FRs.$C$2:.$C$979]; &quot;=&quot;&amp;[.A25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/>
          </table:table-cell>
          <table:table-cell table:style-name="ce122" table:formula="of:=1-COUNTIF([FRs.$C$2:.$C$979]; &quot;=&quot;&amp;[.A25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/>
          </table:table-cell>
          <table:table-cell table:style-name="ce122" table:formula="of:=1-COUNTIF([FRs.$C$2:.$C$979]; &quot;=&quot;&amp;[.A25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/>
          </table:table-cell>
          <table:table-cell table:style-name="ce122" table:formula="of:=1-COUNTIF([FRs.$C$2:.$C$979]; &quot;=&quot;&amp;[.A25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/>
          </table:table-cell>
          <table:table-cell table:style-name="ce122" table:formula="of:=1-COUNTIF([FRs.$C$2:.$C$979]; &quot;=&quot;&amp;[.A25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/>
          </table:table-cell>
          <table:table-cell table:style-name="ce122" table:formula="of:=1-COUNTIF([FRs.$C$2:.$C$979]; &quot;=&quot;&amp;[.A25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/>
          </table:table-cell>
          <table:table-cell table:style-name="ce122" table:formula="of:=1-COUNTIF([FRs.$C$2:.$C$979]; &quot;=&quot;&amp;[.A25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/>
          </table:table-cell>
          <table:table-cell table:style-name="ce122" table:formula="of:=1-COUNTIF([FRs.$C$2:.$C$979]; &quot;=&quot;&amp;[.A25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/>
          </table:table-cell>
          <table:table-cell table:style-name="ce122" table:formula="of:=1-COUNTIF([FRs.$C$2:.$C$979]; &quot;=&quot;&amp;[.A26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/>
          </table:table-cell>
          <table:table-cell table:style-name="ce122" table:formula="of:=1-COUNTIF([FRs.$C$2:.$C$979]; &quot;=&quot;&amp;[.A26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/>
          </table:table-cell>
          <table:table-cell table:style-name="ce122" table:formula="of:=1-COUNTIF([FRs.$C$2:.$C$979]; &quot;=&quot;&amp;[.A26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/>
          </table:table-cell>
          <table:table-cell table:style-name="ce122" table:formula="of:=1-COUNTIF([FRs.$C$2:.$C$979]; &quot;=&quot;&amp;[.A26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/>
          </table:table-cell>
          <table:table-cell table:style-name="ce122" table:formula="of:=1-COUNTIF([FRs.$C$2:.$C$979]; &quot;=&quot;&amp;[.A26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/>
          </table:table-cell>
          <table:table-cell table:style-name="ce122" table:formula="of:=1-COUNTIF([FRs.$C$2:.$C$979]; &quot;=&quot;&amp;[.A26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/>
          </table:table-cell>
          <table:table-cell table:style-name="ce122" table:formula="of:=1-COUNTIF([FRs.$C$2:.$C$979]; &quot;=&quot;&amp;[.A26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/>
          </table:table-cell>
          <table:table-cell table:style-name="ce122" table:formula="of:=1-COUNTIF([FRs.$C$2:.$C$979]; &quot;=&quot;&amp;[.A26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/>
          </table:table-cell>
          <table:table-cell table:style-name="ce122" table:formula="of:=1-COUNTIF([FRs.$C$2:.$C$979]; &quot;=&quot;&amp;[.A26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/>
          </table:table-cell>
          <table:table-cell table:style-name="ce122" table:formula="of:=1-COUNTIF([FRs.$C$2:.$C$979]; &quot;=&quot;&amp;[.A26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/>
          </table:table-cell>
          <table:table-cell table:style-name="ce122" table:formula="of:=1-COUNTIF([FRs.$C$2:.$C$979]; &quot;=&quot;&amp;[.A27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/>
          </table:table-cell>
          <table:table-cell table:style-name="ce122" table:formula="of:=1-COUNTIF([FRs.$C$2:.$C$979]; &quot;=&quot;&amp;[.A27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/>
          </table:table-cell>
          <table:table-cell table:style-name="ce122" table:formula="of:=1-COUNTIF([FRs.$C$2:.$C$979]; &quot;=&quot;&amp;[.A27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/>
          </table:table-cell>
          <table:table-cell table:style-name="ce122" table:formula="of:=1-COUNTIF([FRs.$C$2:.$C$979]; &quot;=&quot;&amp;[.A27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/>
          </table:table-cell>
          <table:table-cell table:style-name="ce122" table:formula="of:=1-COUNTIF([FRs.$C$2:.$C$979]; &quot;=&quot;&amp;[.A27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/>
          </table:table-cell>
          <table:table-cell table:style-name="ce122" table:formula="of:=1-COUNTIF([FRs.$C$2:.$C$979]; &quot;=&quot;&amp;[.A27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/>
          </table:table-cell>
          <table:table-cell table:style-name="ce122" table:formula="of:=1-COUNTIF([FRs.$C$2:.$C$979]; &quot;=&quot;&amp;[.A27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/>
          </table:table-cell>
          <table:table-cell table:style-name="ce122" table:formula="of:=1-COUNTIF([FRs.$C$2:.$C$979]; &quot;=&quot;&amp;[.A27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/>
          </table:table-cell>
          <table:table-cell table:style-name="ce122" table:formula="of:=1-COUNTIF([FRs.$C$2:.$C$979]; &quot;=&quot;&amp;[.A27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/>
          </table:table-cell>
          <table:table-cell table:style-name="ce122" table:formula="of:=1-COUNTIF([FRs.$C$2:.$C$979]; &quot;=&quot;&amp;[.A27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/>
          </table:table-cell>
          <table:table-cell table:style-name="ce122" table:formula="of:=1-COUNTIF([FRs.$C$2:.$C$979]; &quot;=&quot;&amp;[.A28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/>
          </table:table-cell>
          <table:table-cell table:style-name="ce122" table:formula="of:=1-COUNTIF([FRs.$C$2:.$C$979]; &quot;=&quot;&amp;[.A28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/>
          </table:table-cell>
          <table:table-cell table:style-name="ce122" table:formula="of:=1-COUNTIF([FRs.$C$2:.$C$979]; &quot;=&quot;&amp;[.A28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/>
          </table:table-cell>
          <table:table-cell table:style-name="ce122" table:formula="of:=1-COUNTIF([FRs.$C$2:.$C$979]; &quot;=&quot;&amp;[.A28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/>
          </table:table-cell>
          <table:table-cell table:style-name="ce122" table:formula="of:=1-COUNTIF([FRs.$C$2:.$C$979]; &quot;=&quot;&amp;[.A28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/>
          </table:table-cell>
          <table:table-cell table:style-name="ce122" table:formula="of:=1-COUNTIF([FRs.$C$2:.$C$979]; &quot;=&quot;&amp;[.A28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/>
          </table:table-cell>
          <table:table-cell table:style-name="ce122" table:formula="of:=1-COUNTIF([FRs.$C$2:.$C$979]; &quot;=&quot;&amp;[.A28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/>
          </table:table-cell>
          <table:table-cell table:style-name="ce122" table:formula="of:=1-COUNTIF([FRs.$C$2:.$C$979]; &quot;=&quot;&amp;[.A28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/>
          </table:table-cell>
          <table:table-cell table:style-name="ce122" table:formula="of:=1-COUNTIF([FRs.$C$2:.$C$979]; &quot;=&quot;&amp;[.A28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/>
          </table:table-cell>
          <table:table-cell table:style-name="ce122" table:formula="of:=1-COUNTIF([FRs.$C$2:.$C$979]; &quot;=&quot;&amp;[.A28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/>
          </table:table-cell>
          <table:table-cell table:style-name="ce122" table:formula="of:=1-COUNTIF([FRs.$C$2:.$C$979]; &quot;=&quot;&amp;[.A29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/>
          </table:table-cell>
          <table:table-cell table:style-name="ce122" table:formula="of:=1-COUNTIF([FRs.$C$2:.$C$979]; &quot;=&quot;&amp;[.A29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/>
          </table:table-cell>
          <table:table-cell table:style-name="ce122" table:formula="of:=1-COUNTIF([FRs.$C$2:.$C$979]; &quot;=&quot;&amp;[.A29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/>
          </table:table-cell>
          <table:table-cell table:style-name="ce122" table:formula="of:=1-COUNTIF([FRs.$C$2:.$C$979]; &quot;=&quot;&amp;[.A29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/>
          </table:table-cell>
          <table:table-cell table:style-name="ce122" table:formula="of:=1-COUNTIF([FRs.$C$2:.$C$979]; &quot;=&quot;&amp;[.A29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/>
          </table:table-cell>
          <table:table-cell table:style-name="ce122" table:formula="of:=1-COUNTIF([FRs.$C$2:.$C$979]; &quot;=&quot;&amp;[.A29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/>
          </table:table-cell>
          <table:table-cell table:style-name="ce122" table:formula="of:=1-COUNTIF([FRs.$C$2:.$C$979]; &quot;=&quot;&amp;[.A29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/>
          </table:table-cell>
          <table:table-cell table:style-name="ce122" table:formula="of:=1-COUNTIF([FRs.$C$2:.$C$979]; &quot;=&quot;&amp;[.A29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/>
          </table:table-cell>
          <table:table-cell table:style-name="ce122" table:formula="of:=1-COUNTIF([FRs.$C$2:.$C$979]; &quot;=&quot;&amp;[.A29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/>
          </table:table-cell>
          <table:table-cell table:style-name="ce122" table:formula="of:=1-COUNTIF([FRs.$C$2:.$C$979]; &quot;=&quot;&amp;[.A29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/>
          </table:table-cell>
          <table:table-cell table:style-name="ce122" table:formula="of:=1-COUNTIF([FRs.$C$2:.$C$979]; &quot;=&quot;&amp;[.A30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/>
          </table:table-cell>
          <table:table-cell table:style-name="ce122" table:formula="of:=1-COUNTIF([FRs.$C$2:.$C$979]; &quot;=&quot;&amp;[.A301])" office:value-type="float" office:value="1" calcext:value-type="float">
            <text:p/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22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60:FRs.G162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3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15:19:40.592299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6-03T17:44:56.816246943</dc:date>
    <meta:editing-duration>P2DT3H5M56S</meta:editing-duration>
    <meta:editing-cycles>118</meta:editing-cycles>
    <meta:generator>LibreOffice/4.2.3.3$Linux_X86_64 LibreOffice_project/420m0$Build-3</meta:generator>
    <meta:document-statistic meta:table-count="4" meta:cell-count="2568" meta:object-count="0"/>
  </office:meta>
</office:document-meta>
</file>