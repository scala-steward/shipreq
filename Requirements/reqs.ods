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49.15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42.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5.7mm"/>
    </style:style>
    <style:style style:name="co10" style:family="table-column">
      <style:table-column-properties fo:break-before="auto" style:column-width="16.86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25.91mm"/>
    </style:style>
    <style:style style:name="co14" style:family="table-column">
      <style:table-column-properties fo:break-before="auto" style:column-width="18.6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1.87mm"/>
    </style:style>
    <style:style style:name="co19" style:family="table-column">
      <style:table-column-properties fo:break-before="auto" style:column-width="7.41mm"/>
    </style:style>
    <style:style style:name="co20" style:family="table-column">
      <style:table-column-properties fo:break-before="auto" style:column-width="148.17mm"/>
    </style:style>
    <style:style style:name="co21" style:family="table-column">
      <style:table-column-properties fo:break-before="auto" style:column-width="28.03mm"/>
    </style:style>
    <style:style style:name="co22" style:family="table-column">
      <style:table-column-properties fo:break-before="auto" style:column-width="45.31mm"/>
    </style:style>
    <style:style style:name="co23" style:family="table-column">
      <style:table-column-properties fo:break-before="auto" style:column-width="32.35mm"/>
    </style:style>
    <style:style style:name="co24" style:family="table-column">
      <style:table-column-properties fo:break-before="auto" style:column-width="83.77mm"/>
    </style:style>
    <style:style style:name="co25" style:family="table-column">
      <style:table-column-properties fo:break-before="auto" style:column-width="24.52mm"/>
    </style:style>
    <style:style style:name="co26" style:family="table-column">
      <style:table-column-properties fo:break-before="auto" style:column-width="61.24mm"/>
    </style:style>
    <style:style style:name="co27" style:family="table-column">
      <style:table-column-properties fo:break-before="auto" style:column-width="105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8.03mm" fo:break-before="auto" style:use-optimal-row-height="true"/>
    </style:style>
    <style:style style:name="ro6" style:family="table-row">
      <style:table-row-properties style:row-height="11.98mm" fo:break-before="auto" style:use-optimal-row-height="true"/>
    </style:style>
    <style:style style:name="ro7" style:family="table-row">
      <style:table-row-properties style:row-height="11.8mm" fo:break-before="auto" style:use-optimal-row-height="true"/>
    </style:style>
    <style:style style:name="ro8" style:family="table-row">
      <style:table-row-properties style:row-height="8.2mm" fo:break-before="auto" style:use-optimal-row-height="true"/>
    </style:style>
    <style:style style:name="ro9" style:family="table-row">
      <style:table-row-properties style:row-height="27.09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21.41mm" fo:break-before="auto" style:use-optimal-row-height="true"/>
    </style:style>
    <style:style style:name="ro13" style:family="table-row">
      <style:table-row-properties style:row-height="29.88mm" fo:break-before="auto" style:use-optimal-row-height="true"/>
    </style:style>
    <style:style style:name="ro14" style:family="table-row">
      <style:table-row-properties style:row-height="42.35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0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41" style:family="table-cell" style:parent-style-name="Default" style:data-style-name="N112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42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43" style:family="table-cell" style:parent-style-name="Default" style:data-style-name="N112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20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45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53" style:family="table-cell" style:parent-style-name="Default" style:data-style-name="N120">
      <style:table-cell-properties fo:background-color="#cccccc" style:text-align-source="fix" style:repeat-content="false" style:vertical-align="top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55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56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57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9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120">
      <style:table-cell-properties fo:background-color="#cccccc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2b2b2"/>
    </style:style>
    <style:style style:name="ce30" style:family="table-cell" style:parent-style-name="Default" style:data-style-name="N122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6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7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80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82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83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84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 fo:font-weight="bold" style:font-weight-asian="bold" style:font-weight-complex="bold"/>
    </style:style>
    <style:style style:name="ce86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35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87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top"/>
    </style:style>
    <style:style style:name="ce89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background-color="#ffffcc" fo:border="0.06pt solid #000000" style:vertical-align="top"/>
    </style:style>
    <style:style style:name="ce94" style:family="table-cell" style:parent-style-name="Default">
      <style:table-cell-properties fo:border="0.06pt solid #000000" style:vertical-align="top"/>
      <style:text-properties style:use-window-font-color="true"/>
    </style:style>
    <style:style style:name="ce95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06pt solid #000000" style:vertical-align="top"/>
    </style:style>
    <style:style style:name="ce98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99" style:family="table-cell" style:parent-style-name="Default">
      <style:table-cell-properties fo:border="0.06pt solid #000000" style:vertical-align="top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008000" style:vertical-align="top"/>
      <style:text-properties fo:color="#ffffff"/>
    </style:style>
    <style:style style:name="ce101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cccccc" style:vertical-align="top"/>
      <style:text-properties style:use-window-font-color="true"/>
    </style:style>
    <style:style style:name="ce103" style:family="table-cell" style:parent-style-name="Default">
      <style:table-cell-properties fo:border="0.06pt solid #000000" style:vertical-align="top"/>
      <style:text-properties fo:color="#b3b3b3"/>
    </style:style>
    <style:style style:name="ce104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="0.06pt solid #000000" style:vertical-align="top"/>
      <style:text-properties fo:color="#b3b3b3" fo:font-style="italic" style:font-style-asian="italic" style:font-style-complex="italic"/>
    </style:style>
    <style:style style:name="ce112" style:family="table-cell" style:parent-style-name="Default">
      <style:table-cell-properties fo:border="0.06pt solid #000000" style:vertical-align="top"/>
      <style:text-properties fo:color="#b3b3b3" fo:font-weight="normal" style:font-weight-asian="normal" style:font-weight-complex="normal"/>
    </style:style>
    <style:style style:name="ce226" style:family="table-cell" style:parent-style-name="Default">
      <style:table-cell-properties fo:border="0.06pt solid #000000" style:vertical-align="top"/>
      <style:text-properties fo:color="#b2b2b2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transparent" fo:wrap-option="wrap" fo:border="0.06pt solid #000000" style:vertical-align="top"/>
    </style:style>
    <style:style style:name="ce12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4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27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29" style:family="table-cell" style:parent-style-name="Default">
      <style:table-cell-properties fo:background-color="#ffffcc" fo:wrap-option="wrap" fo:border="0.06pt solid #000000"/>
    </style:style>
    <style:style style:name="ce130" style:family="table-cell" style:parent-style-name="Default">
      <style:table-cell-properties fo:wrap-option="wrap" fo:border="0.06pt solid #000000" style:vertical-align="top"/>
      <style:text-properties style:font-name="Arimo" style:font-name-asian="Lucida Sans Unicode" style:font-name-complex="FreeSans"/>
    </style:style>
    <style:style style:name="ce131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13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3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250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252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4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256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65" style:family="table-cell" style:parent-style-name="Default">
      <style:table-cell-properties fo:wrap-option="wrap" fo:border="0.06pt solid #000000" style:vertical-align="top"/>
      <style:text-properties fo:color="#b3b3b3" fo:font-style="italic" style:font-style-asian="italic" style:font-style-complex="italic"/>
    </style:style>
    <style:style style:name="ce166" style:family="table-cell" style:parent-style-name="Default">
      <style:table-cell-properties fo:wrap-option="wrap" fo:border="0.06pt solid #000000"/>
      <style:text-properties fo:color="#b3b3b3"/>
    </style:style>
    <style:style style:name="ce260" style:family="table-cell" style:parent-style-name="Default">
      <style:table-cell-properties fo:wrap-option="wrap" fo:border="0.06pt solid #000000" style:vertical-align="top"/>
      <style:text-properties fo:color="#b2b2b2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m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18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2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277" style:family="table-cell" style:parent-style-name="Default">
      <style:table-cell-properties fo:wrap-option="wrap" fo:border="0.06pt solid #000000" style:vertical-align="top"/>
      <style:text-properties fo:color="#ed1c24"/>
    </style:style>
    <style:style style:name="ce18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3" style:family="table-cell" style:parent-style-name="Default">
      <style:table-cell-properties fo:background-color="#ffffcc" fo:wrap-option="wrap" fo:border="0.06pt solid #000000" style:vertical-align="top"/>
    </style:style>
    <style:style style:name="ce184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6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7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8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90" style:family="table-cell" style:parent-style-name="Default">
      <style:table-cell-properties fo:wrap-option="wrap" fo:border="0.06pt solid #000000" style:vertical-align="top"/>
      <style:text-properties fo:color="#b3b3b3" fo:font-style="normal" fo:font-weight="normal" style:font-style-asian="normal" style:font-weight-asian="normal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3b3b3"/>
    </style:style>
    <style:style style:name="ce2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2b2b2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3b3b3"/>
    </style:style>
    <style:style style:name="ce2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2b2b2"/>
    </style:style>
    <style:style style:name="ce19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0" style:family="table-cell" style:parent-style-name="Default">
      <style:table-cell-properties style:vertical-align="top"/>
      <style:text-properties style:use-window-font-color="true"/>
    </style:style>
    <style:style style:name="ce201" style:family="table-cell" style:parent-style-name="Default">
      <style:table-cell-properties style:vertical-align="top"/>
      <style:text-properties fo:color="#b3b3b3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44" style:family="table-cell" style:parent-style-name="Default">
      <style:table-cell-properties fo:background-color="transparent" fo:wrap-option="wrap" fo:border="0.06pt solid #000000"/>
    </style:style>
    <style:style style:name="ce14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8" style:family="table-cell" style:parent-style-name="Default" style:data-style-name="N112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12">
      <style:table-cell-properties fo:background-color="#9999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1" style:family="table-cell" style:parent-style-name="Default" style:data-style-name="N120">
      <style:table-cell-properties fo:background-color="#c5000b" style:text-align-source="fix" style:repeat-content="false" fo:border="0.06pt solid #000000" style:vertical-align="top"/>
      <style:paragraph-properties fo:text-align="center" fo:margin-left="0mm"/>
    </style:style>
    <style:style style:name="ce152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0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20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7" style:family="table-cell" style:parent-style-name="Default" style:data-style-name="N112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20">
      <style:table-cell-properties fo:background-color="#e6e6e6" style:text-align-source="fix" style:repeat-content="false" fo:border="0.06pt solid #000000" style:vertical-align="top"/>
      <style:paragraph-properties fo:text-align="center" fo:margin-left="0mm"/>
    </style:style>
    <style:style style:name="ce159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25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style:font-name="Arimo" style:font-name-asian="TianZhen" style:font-name-complex="FreeSans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fo:color="#94070a"/>
    </style:style>
    <style:style style:name="T6" style:family="text">
      <style:text-properties fo:color="#999999"/>
    </style:style>
    <style:style style:name="T7" style:family="text">
      <style:text-properties fo:color="#999999" style:font-name="Arimo" style:font-name-asian="TianZhen"/>
    </style:style>
    <style:style style:name="T8" style:family="text">
      <style:text-properties fo:color="#66666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113"/>
        <table:table-column table:style-name="co5" table:default-cell-style-name="ce167"/>
        <table:table-column table:style-name="co6" table:number-columns-repeated="2" table:default-cell-style-name="ce167"/>
        <table:table-column table:style-name="co7" table:default-cell-style-name="ce167"/>
        <table:table-column table:style-name="co8" table:default-cell-style-name="ce58"/>
        <table:table-column table:style-name="co9" table:default-cell-style-name="ce58"/>
        <table:table-column table:style-name="co10" table:default-cell-style-name="ce195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number-columns-repeated="1009" table:default-cell-style-name="ce11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30" table:formula="of:=MAX([.C$2:.C$603])+1" office:value-type="float" office:value="339" calcext:value-type="float">
            <text:p>NEXT: 339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287" office:value-type="string" calcext:value-type="string">
            <text:p>Complete</text:p>
          </table:table-cell>
          <table:table-cell table:style-name="ce287" office:value-type="string" calcext:value-type="string">
            <text:p>Correct</text:p>
          </table:table-cell>
          <table:table-cell table:style-name="ce287" office:value-type="string" calcext:value-type="string">
            <text:p>Feasible</text:p>
          </table:table-cell>
          <table:table-cell table:style-name="ce287" office:value-type="string" calcext:value-type="string">
            <text:p>Necessary</text:p>
          </table:table-cell>
          <table:table-cell table:style-name="ce287" office:value-type="string" calcext:value-type="string">
            <text:p>Prioritised</text:p>
          </table:table-cell>
          <table:table-cell table:style-name="ce287" office:value-type="string" calcext:value-type="string">
            <text:p>Unambiguous</text:p>
          </table:table-cell>
          <table:table-cell table:style-name="ce287" office:value-type="string" calcext:value-type="string">
            <text:p>Verifiable</text:p>
          </table:table-cell>
          <table:table-cell table:style-name="ce199" table:number-columns-repeated="1008"/>
          <table:table-cell/>
        </table:table-row>
        <table:table-row table:style-name="ro1">
          <table:table-cell table:style-name="ce38" office:value-type="float" office:value="1" calcext:value-type="float">
            <text:p>MF-01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uce</text:p>
          </table:table-cell>
          <table:table-cell table:style-name="ce114" office:value-type="string" calcext:value-type="string">
            <text:p>MF-01: Use Case Editor</text:p>
          </table:table-cell>
          <table:table-cell table:style-name="ce114" table:number-columns-repeated="3"/>
          <table:table-cell table:style-name="ce191" table:number-columns-repeated="7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82" calcext:value-type="float">
            <text:p>FR-82</text:p>
          </table:table-cell>
          <table:table-cell table:style-name="ce88" office:value-type="string" calcext:value-type="string">
            <text:p>.ref.reqs</text:p>
          </table:table-cell>
          <table:table-cell table:style-name="ce115" office:value-type="string" calcext:value-type="string">
            <text:p>BA shall be able to reference reqs from UC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50" calcext:value-type="float">
            <text:p>FR-150</text:p>
          </table:table-cell>
          <table:table-cell table:style-name="ce88" office:value-type="string" calcext:value-type="string">
            <text:p>.ref.shr</text:p>
          </table:table-cell>
          <table:table-cell table:style-name="ce115" office:value-type="string" calcext:value-type="string">
            <text:p>BA shall be able to reference SHRs from UC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1" calcext:value-type="float">
            <text:p>FR-261</text:p>
          </table:table-cell>
          <table:table-cell table:style-name="ce88" office:value-type="string" calcext:value-type="string">
            <text:p>.subreq.fields</text:p>
          </table:table-cell>
          <table:table-cell table:style-name="ce115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2" calcext:value-type="float">
            <text:p>FR-262</text:p>
          </table:table-cell>
          <table:table-cell table:style-name="ce88" office:value-type="string" calcext:value-type="string">
            <text:p>.subreq.steps</text:p>
          </table:table-cell>
          <table:table-cell table:style-name="ce115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9" office:value-type="string" calcext:value-type="string">
            <text:p>.tag-ap</text:p>
          </table:table-cell>
          <table:table-cell table:style-name="ce116" office:value-type="string" calcext:value-type="string">
            <text:p>Tags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7" calcext:value-type="float">
            <text:p>FR-07</text:p>
          </table:table-cell>
          <table:table-cell table:style-name="ce88" office:value-type="string" calcext:value-type="string">
            <text:p><text:s text:c="2"/>.add</text:p>
          </table:table-cell>
          <table:table-cell table:style-name="ce115" office:value-type="string" calcext:value-type="string">
            <text:p>BA shall be able to apply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8" calcext:value-type="float">
            <text:p>FR-08</text:p>
          </table:table-cell>
          <table:table-cell table:style-name="ce88" office:value-type="string" calcext:value-type="string">
            <text:p><text:s text:c="2"/>.remove</text:p>
          </table:table-cell>
          <table:table-cell table:style-name="ce115" office:value-type="string" calcext:value-type="string">
            <text:p>BA shall be able to remove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3" calcext:value-type="float">
            <text:p>FR-23</text:p>
          </table:table-cell>
          <table:table-cell table:style-name="ce88" office:value-type="string" calcext:value-type="string">
            <text:p><text:s text:c="2"/>.fields</text:p>
          </table:table-cell>
          <table:table-cell table:style-name="ce117" office:value-type="string" calcext:value-type="string">
            <text:p>BA shall be able to apply ta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5" calcext:value-type="float">
            <text:p>MF-05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fieldset</text:p>
          </table:table-cell>
          <table:table-cell table:style-name="ce114" office:value-type="string" calcext:value-type="string">
            <text:p>MF-05: Field Customisation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1</text:p>
          </table:table-cell>
          <table:table-cell table:style-name="ce69" office:value-type="float" office:value="65" calcext:value-type="float">
            <text:p>FR-65</text:p>
          </table:table-cell>
          <table:table-cell table:style-name="ce90" office:value-type="string" calcext:value-type="string">
            <text:p><text:s text:c="2"/>.mandatory</text:p>
          </table:table-cell>
          <table:table-cell table:style-name="ce117" office:value-type="string" calcext:value-type="string">
            <text:p>BA shall be able to specify mandatory-ness of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5" calcext:value-type="float">
            <text:p>FR-255</text:p>
          </table:table-cell>
          <table:table-cell table:style-name="ce88" office:value-type="string" calcext:value-type="string">
            <text:p><text:s text:c="2"/>.reqtype</text:p>
          </table:table-cell>
          <table:table-cell table:style-name="ce117" office:value-type="string" calcext:value-type="string">
            <text:p>BA shall be able to specify which req-types each custom field applies to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6" calcext:value-type="float">
            <text:p>FR-256</text:p>
          </table:table-cell>
          <table:table-cell table:style-name="ce88" office:value-type="string" calcext:value-type="string">
            <text:p><text:s text:c="4"/>.all</text:p>
          </table:table-cell>
          <table:table-cell table:style-name="ce117" office:value-type="string" calcext:value-type="string">
            <text:p>BA shall be able to specify that a field applies to all req-typ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7" calcext:value-type="float">
            <text:p>FR-257</text:p>
          </table:table-cell>
          <table:table-cell table:style-name="ce88" office:value-type="string" calcext:value-type="string">
            <text:p><text:s text:c="4"/>.whitelist</text:p>
          </table:table-cell>
          <table:table-cell table:style-name="ce117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8" calcext:value-type="float">
            <text:p>FR-258</text:p>
          </table:table-cell>
          <table:table-cell table:style-name="ce88" office:value-type="string" calcext:value-type="string">
            <text:p><text:s text:c="4"/>.blacklist</text:p>
          </table:table-cell>
          <table:table-cell table:style-name="ce117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66" calcext:value-type="float">
            <text:p>FR-66</text:p>
          </table:table-cell>
          <table:table-cell table:style-name="ce90" office:value-type="string" calcext:value-type="string">
            <text:p><text:s text:c="2"/>.zero</text:p>
          </table:table-cell>
          <table:table-cell table:style-name="ce117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mod</text:p>
          </table:table-cell>
          <table:table-cell table:style-name="ce118" office:value-type="string" calcext:value-type="string">
            <text:p>Modifying a field set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14" calcext:value-type="float">
            <text:p>FR-114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see a list of all existing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" calcext:value-type="float">
            <text:p>FR-02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3" calcext:value-type="float">
            <text:p>FR-03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3" calcext:value-type="float">
            <text:p>FR-263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to a field after it is renamed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" calcext:value-type="float">
            <text:p>FR-0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7" office:value-type="string" calcext:value-type="string">
            <text:p>BA shall be able to reorder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" calcext:value-type="float">
            <text:p>FR-0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fields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5" calcext:value-type="float">
            <text:p>FR-05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System shall indicate how many reqs have content for each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6" calcext:value-type="float">
            <text:p>FR-06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5" office:value-type="string" calcext:value-type="string">
            <text:p>BA shall be able to see each instance of content for a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4" calcext:value-type="float">
            <text:p>FR-264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7" calcext:value-type="float">
            <text:p>FR-47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7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0" calcext:value-type="float">
            <text:p>FR-40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1" calcext:value-type="float">
            <text:p>FR-41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7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Field types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3" calcext:value-type="float">
            <text:p>FR-43</text:p>
          </table:table-cell>
          <table:table-cell table:style-name="ce90" office:value-type="string" calcext:value-type="string">
            <text:p><text:s text:c="2"/>.text</text:p>
          </table:table-cell>
          <table:table-cell table:style-name="ce117" office:value-type="string" calcext:value-type="string">
            <text:p>System shall provide a field type: Text field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4" calcext:value-type="float">
            <text:p>FR-44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BA shall be able to configure text fields' nam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46" calcext:value-type="float">
            <text:p>FR-46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define a field type based on a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2" calcext:value-type="float">
            <text:p>FR-252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17" office:value-type="string" calcext:value-type="string">
            <text:p>System shall prevent the existence of more than one field based on the same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7</text:p>
          </table:table-cell>
          <table:table-cell table:style-name="ce69" office:value-type="float" office:value="251" calcext:value-type="float">
            <text:p>FR-251</text:p>
          </table:table-cell>
          <table:table-cell table:style-name="ce90" office:value-type="string" calcext:value-type="string">
            <text:p><text:s text:c="4"/>.mandatory</text:p>
          </table:table-cell>
          <table:table-cell table:style-name="ce117" office:value-type="string" calcext:value-type="string">
            <text:p>BA shall be able to specify whether a ta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0" calcext:value-type="float">
            <text:p>FR-250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System shall automatically name tag fields according to the names of underlying ta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9" calcext:value-type="float">
            <text:p>FR-249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17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3" calcext:value-type="float">
            <text:p>FR-283</text:p>
          </table:table-cell>
          <table:table-cell table:style-name="ce90" office:value-type="string" calcext:value-type="string">
            <text:p><text:s text:c="2"/>.implication</text:p>
          </table:table-cell>
          <table:table-cell table:style-name="ce120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4" calcext:value-type="float">
            <text:p>FR-284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20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5" calcext:value-type="float">
            <text:p>FR-285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20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2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6" calcext:value-type="float">
            <text:p>FR-286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20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59" calcext:value-type="float">
            <text:p>FR-259</text:p>
          </table:table-cell>
          <table:table-cell table:style-name="ce90" office:value-type="string" calcext:value-type="string">
            <text:p><text:s text:c="2"/>.uc.courses</text:p>
          </table:table-cell>
          <table:table-cell table:style-name="ce117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60" calcext:value-type="float">
            <text:p>FR-260</text:p>
          </table:table-cell>
          <table:table-cell table:style-name="ce90" office:value-type="string" calcext:value-type="string">
            <text:p><text:s text:c="4"/>.forced</text:p>
          </table:table-cell>
          <table:table-cell table:style-name="ce117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45" calcext:value-type="float">
            <text:p>FR-45</text:p>
          </table:table-cell>
          <table:table-cell table:style-name="ce90" office:value-type="string" calcext:value-type="string">
            <text:p><text:s text:c="2"/>.uc.flowgraph</text:p>
          </table:table-cell>
          <table:table-cell table:style-name="ce117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4">
          <table:table-cell table:style-name="ce38" office:value-type="float" office:value="6" calcext:value-type="float">
            <text:p>MF-06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issues</text:p>
          </table:table-cell>
          <table:table-cell table:style-name="ce114" office:value-type="string" calcext:value-type="string">
            <text:p>MF-06: Issues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rack</text:p>
          </table:table-cell>
          <table:table-cell table:style-name="ce121" office:value-type="string" calcext:value-type="string">
            <text:p>Tracking (see also system-wide.ods#Issues)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3" calcext:value-type="float">
            <text:p>FR-53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17" office:value-type="string" calcext:value-type="string">
            <text:p>System shall track emptiness of mandatory fields as issues.</text:p>
            <text:p>(Note: affects all kinds of fields, not just text fields.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74" calcext:value-type="float">
            <text:p>FR-274</text:p>
          </table:table-cell>
          <table:table-cell table:style-name="ce88" office:value-type="string" calcext:value-type="string">
            <text:p><text:s text:c="4"/>.empty.step</text:p>
          </table:table-cell>
          <table:table-cell table:style-name="ce117" office:value-type="string" calcext:value-type="string">
            <text:p>System shall track emptiness of UC steps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277" office:value-type="string" calcext:value-type="string">
            <text:p>What about empty text with non-empty flow?</text:p>
          </table:table-cell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6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07" calcext:value-type="float">
            <text:p>FR-207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17" office:value-type="string" calcext:value-type="string">
            <text:p>Where the req-type is marked for such behaviour [FR-205,206], BA shall be able to track live reqs without live implying reqs (MF-13) as issues.</text:p>
            <text:p>This doesn't apply to subreqs (fields,  UC steps).</text:p>
          </table:table-cell>
          <table:table-cell table:style-name="ce168" office:value-type="date" office:date-value="2014-06-18" calcext:value-type="date">
            <text:p>18/06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7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5</text:p>
            <text:p>MF-13</text:p>
          </table:table-cell>
          <table:table-cell table:style-name="ce69" office:value-type="float" office:value="332" calcext:value-type="float">
            <text:p>FR-332</text:p>
          </table:table-cell>
          <table:table-cell table:style-name="ce88" office:value-type="string" calcext:value-type="string">
            <text:p><text:s text:c="6"/>.overlap</text:p>
          </table:table-cell>
          <table:table-cell table:style-name="ce117" office:value-type="string" calcext:value-type="string">
            <text:p>When a field is invalid due to missing implication, [FR-53] should take precedence over [FR-207]. In other words, [FR-207] should only apply when there are no live, mandatory implication field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45" calcext:value-type="float">
            <text:p>FR-145</text:p>
          </table:table-cell>
          <table:table-cell table:style-name="ce88" office:value-type="string" calcext:value-type="string">
            <text:p><text:s text:c="4"/>.rcg</text:p>
          </table:table-cell>
          <table:table-cell table:style-name="ce117" office:value-type="string" calcext:value-type="string">
            <text:p>System shall track Semantic Header Rows (Req Code Groups) without children as iss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8" calcext:value-type="float">
            <text:p>FR-328</text:p>
          </table:table-cell>
          <table:table-cell table:style-name="ce88" office:value-type="string" calcext:value-type="string">
            <text:p><text:s text:c="4"/>.ref.dead-issue</text:p>
          </table:table-cell>
          <table:table-cell table:style-name="ce117" office:value-type="string" calcext:value-type="string">
            <text:p>System shall track when a dead issue tag is used in a text field of a live req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6" calcext:value-type="float">
            <text:p>FR-316</text:p>
          </table:table-cell>
          <table:table-cell table:style-name="ce88" office:value-type="string" calcext:value-type="string">
            <text:p><text:s text:c="4"/>.ref.dead-req</text:p>
          </table:table-cell>
          <table:table-cell table:style-name="ce117" office:value-type="string" calcext:value-type="string">
            <text:p>System shall track live refs to dead reqs/sub-reqs as issue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08" calcext:value-type="float">
            <text:p>FR-308</text:p>
          </table:table-cell>
          <table:table-cell table:style-name="ce88" office:value-type="string" calcext:value-type="string">
            <text:p><text:s text:c="4"/>.ref.dead-tag</text:p>
          </table:table-cell>
          <table:table-cell table:style-name="ce117" office:value-type="string" calcext:value-type="string">
            <text:p>System shall track when a dead tag is used in a text field of a live req.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37" calcext:value-type="float">
            <text:p>FR-337</text:p>
          </table:table-cell>
          <table:table-cell table:style-name="ce88" office:value-type="string" calcext:value-type="string">
            <text:p><text:s text:c="4"/>.ref.issue</text:p>
          </table:table-cell>
          <table:table-cell table:style-name="ce117" office:value-type="string" calcext:value-type="string">
            <text:p>System shall track when a live issue tag is used in a text field of a live req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4" calcext:value-type="float">
            <text:p>FR-254</text:p>
          </table:table-cell>
          <table:table-cell table:style-name="ce88" office:value-type="string" calcext:value-type="string">
            <text:p><text:s text:c="4"/>.tag.enum</text:p>
          </table:table-cell>
          <table:table-cell table:style-name="ce117" office:value-type="string" calcext:value-type="string">
            <text:p>BA shall be able to track when two or more enum-ta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5" calcext:value-type="float">
            <text:p>FR-275</text:p>
          </table:table-cell>
          <table:table-cell table:style-name="ce88" office:value-type="string" calcext:value-type="string">
            <text:p><text:s text:c="4"/>.tag.nokids</text:p>
          </table:table-cell>
          <table:table-cell table:style-name="ce117" office:value-type="string" calcext:value-type="string">
            <text:p>System shall track non-applicable tags without children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highlight</text:p>
          </table:table-cell>
          <table:table-cell table:style-name="ce121" office:value-type="string" calcext:value-type="string">
            <text:p>Highlighting issues in ReqTable &amp; ReqDetail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92" calcext:value-type="float">
            <text:p>FR-92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20" office:value-type="string" calcext:value-type="string">
            <text:p>System shall render with a red background, empty &amp; mandatory fields.</text:p>
            <text:p><text:span text:style-name="T1">(Note: affects all kinds of fields, not just text fields.)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329" calcext:value-type="float">
            <text:p>FR-329</text:p>
          </table:table-cell>
          <table:table-cell table:style-name="ce88" office:value-type="string" calcext:value-type="string">
            <text:p><text:s text:c="4"/>.empty.step</text:p>
          </table:table-cell>
          <table:table-cell table:style-name="ce120" office:value-type="string" calcext:value-type="string">
            <text:p>System shall render with a red background, empty UC step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333" calcext:value-type="float">
            <text:p>FR-333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20" office:value-type="string" calcext:value-type="string">
            <text:p>System shall render with a red background, the implied-by column in reqs where [FR-207] is active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36" calcext:value-type="float">
            <text:p>FR-336</text:p>
          </table:table-cell>
          <table:table-cell table:style-name="ce88" office:value-type="string" calcext:value-type="string">
            <text:p><text:s text:c="4"/>.rcg</text:p>
          </table:table-cell>
          <table:table-cell table:style-name="ce120" office:value-type="string" calcext:value-type="string">
            <text:p>System shall render with a red background, RCGs with no live children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34" calcext:value-type="float">
            <text:p>FR-334</text:p>
          </table:table-cell>
          <table:table-cell table:style-name="ce88" office:value-type="string" calcext:value-type="string">
            <text:p><text:s text:c="4"/>.ref.dead-req</text:p>
          </table:table-cell>
          <table:table-cell table:style-name="ce117" office:value-type="string" calcext:value-type="string">
            <text:p>System shall render red, live refs to dead reqs/sub-req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5" calcext:value-type="float">
            <text:p>FR-335</text:p>
          </table:table-cell>
          <table:table-cell table:style-name="ce88" office:value-type="string" calcext:value-type="string">
            <text:p><text:s text:c="4"/>.ref.dead-tag</text:p>
          </table:table-cell>
          <table:table-cell table:style-name="ce117" office:value-type="string" calcext:value-type="string">
            <text:p>System shall render red, live refs to dead tag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1" calcext:value-type="float">
            <text:p>FR-331</text:p>
          </table:table-cell>
          <table:table-cell table:style-name="ce88" office:value-type="string" calcext:value-type="string">
            <text:p><text:s text:c="4"/>.tag.enum.gen</text:p>
          </table:table-cell>
          <table:table-cell table:style-name="ce120" office:value-type="string" calcext:value-type="string">
            <text:p>In generic ‘Tags’ fields, System shall render red, instances of conflicting tags (as per [FR-254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0" calcext:value-type="float">
            <text:p>FR-330</text:p>
          </table:table-cell>
          <table:table-cell table:style-name="ce88" office:value-type="string" calcext:value-type="string">
            <text:p><text:s text:c="4"/>.tag.enum.spec</text:p>
          </table:table-cell>
          <table:table-cell table:style-name="ce120" office:value-type="string" calcext:value-type="string">
            <text:p>In tag-group based fields, System shall render with a red background, fields in which tags conflict (as per [FR-254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7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<text:span text:style-name="T1">MF-06</text:span></text:p>
            <text:p>MF-12</text:p>
          </table:table-cell>
          <table:table-cell table:style-name="ce69" office:value-type="float" office:value="307" calcext:value-type="float">
            <text:p>FR-307</text:p>
          </table:table-cell>
          <table:table-cell table:style-name="ce88" office:value-type="string" calcext:value-type="string">
            <text:p><text:s text:c="4"/>.ref.dead-tag-in-txt</text:p>
          </table:table-cell>
          <table:table-cell table:style-name="ce117" office:value-type="string" calcext:value-type="string">
            <text:p>System shall render red and with strikethrough, deleted tags in text-based columns of live reqs ([FR-306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82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52" calcext:value-type="float">
            <text:p>FR-52</text:p>
          </table:table-cell>
          <table:table-cell table:style-name="ce88" office:value-type="string" calcext:value-type="string">
            <text:p><text:s text:c="4"/>.tag.issue</text:p>
          </table:table-cell>
          <table:table-cell table:style-name="ce117" office:value-type="string" calcext:value-type="string">
            <text:p>System shall render red, issue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338" calcext:value-type="float">
            <text:p>FR-338</text:p>
          </table:table-cell>
          <table:table-cell table:style-name="ce88" office:value-type="string" calcext:value-type="string">
            <text:p><text:s text:c="4"/>.tag.issue.dead</text:p>
          </table:table-cell>
          <table:table-cell table:style-name="ce117" office:value-type="string" calcext:value-type="string">
            <text:p>System shall render with strikethrough, dead issue tag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inspect</text:p>
          </table:table-cell>
          <table:table-cell table:style-name="ce121" office:value-type="string" calcext:value-type="string">
            <text:p>Inspection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8" calcext:value-type="float">
            <text:p>FR-48</text:p>
          </table:table-cell>
          <table:table-cell table:style-name="ce88" office:value-type="string" calcext:value-type="string">
            <text:p><text:s text:c="4"/>.total</text:p>
          </table:table-cell>
          <table:table-cell table:style-name="ce117" office:value-type="string" calcext:value-type="string">
            <text:p>BA shall be able to see the sum total of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9" calcext:value-type="float">
            <text:p>FR-49</text:p>
          </table:table-cell>
          <table:table-cell table:style-name="ce88" office:value-type="string" calcext:value-type="string">
            <text:p><text:s text:c="4"/>.breakdown.uc</text:p>
          </table:table-cell>
          <table:table-cell table:style-name="ce117" office:value-type="string" calcext:value-type="string">
            <text:p>BA shall be able to see a list of UCs and the number of issue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95" calcext:value-type="float">
            <text:p>FR-195</text:p>
          </table:table-cell>
          <table:table-cell table:style-name="ce88" office:value-type="string" calcext:value-type="string">
            <text:p><text:s text:c="4"/>.breakdown.llreq</text:p>
          </table:table-cell>
          <table:table-cell table:style-name="ce117" office:value-type="string" calcext:value-type="string">
            <text:p>BA shall be able to see a list of reqs and the number of issue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7" calcext:value-type="float">
            <text:p>FR-267</text:p>
          </table:table-cell>
          <table:table-cell table:style-name="ce88" office:value-type="string" calcext:value-type="string">
            <text:p><text:s text:c="4"/>.filter</text:p>
          </table:table-cell>
          <table:table-cell table:style-name="ce117" office:value-type="string" calcext:value-type="string">
            <text:p>BA shall be able to filter issue inspection view. (See <text:span text:style-name="T3">Filtering</text:span> section.)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3">
          <table:table-cell table:style-name="ce40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2" office:value-type="float" office:value="67" calcext:value-type="float">
            <text:p>FR-67</text:p>
          </table:table-cell>
          <table:table-cell table:style-name="ce89" office:value-type="string" calcext:value-type="string">
            <text:p><text:s text:c="4"/>.list</text:p>
          </table:table-cell>
          <table:table-cell table:style-name="ce116" office:value-type="string" calcext:value-type="string">
            <text:p>BA shall be able to see a list of issues.</text:p>
            <text:p><text:span text:style-name="T4">When viewing a list of issues...</text:span>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3" calcext:value-type="float">
            <text:p>FR-113</text:p>
          </table:table-cell>
          <table:table-cell table:style-name="ce88" office:value-type="string" calcext:value-type="string">
            <text:p><text:s text:c="6"/>.id</text:p>
          </table:table-cell>
          <table:table-cell table:style-name="ce117" office:value-type="string" calcext:value-type="string">
            <text:p>System shall display the ID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1" calcext:value-type="float">
            <text:p>FR-61</text:p>
          </table:table-cell>
          <table:table-cell table:style-name="ce88" office:value-type="string" calcext:value-type="string">
            <text:p><text:s text:c="6"/>.title</text:p>
          </table:table-cell>
          <table:table-cell table:style-name="ce117" office:value-type="string" calcext:value-type="string">
            <text:p>System shall display the title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2" calcext:value-type="float">
            <text:p>FR-62</text:p>
          </table:table-cell>
          <table:table-cell table:style-name="ce88" office:value-type="string" calcext:value-type="string">
            <text:p><text:s text:c="6"/>.field</text:p>
          </table:table-cell>
          <table:table-cell table:style-name="ce117" office:value-type="string" calcext:value-type="string">
            <text:p>System shall display the name of the field in which the issues exists.</text:p>
          </table:table-cell>
          <table:table-cell table:number-columns-repeated="2"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3" calcext:value-type="float">
            <text:p>FR-63</text:p>
          </table:table-cell>
          <table:table-cell table:style-name="ce88" office:value-type="string" calcext:value-type="string">
            <text:p><text:s text:c="6"/>.reason</text:p>
          </table:table-cell>
          <table:table-cell table:style-name="ce117" office:value-type="string" calcext:value-type="string">
            <text:p>System shall display issues' additional info if specified (as per [FR-57]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4" calcext:value-type="float">
            <text:p>FR-64</text:p>
          </table:table-cell>
          <table:table-cell table:style-name="ce88" office:value-type="string" calcext:value-type="string">
            <text:p><text:s text:c="6"/>.context</text:p>
          </table:table-cell>
          <table:table-cell table:style-name="ce117" office:value-type="string" calcext:value-type="string">
            <text:p>System shall display an except of any text surrounding an issue.</text:p>
            <text:p/>
            <text:p>Something along the lines of first 100 chars before and after with an elipsis if needed.</text:p>
            <text:p/>
            <text:p><text:span text:style-name="T5">Update: Why? I think the primary motivation here is that issue tags can need context to be comprehensible. This might not be necessary if the entirity of the parent field is being displayed.</text:span></text:p>
          </table:table-cell>
          <table:table-cell table:number-columns-repeated="2" table:style-name="ce168" office:value-type="date" office:date-value="2017-10-08" calcext:value-type="date">
            <text:p>08/10/17</text:p>
          </table:table-cell>
          <table:table-cell table:style-name="ce124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ags</text:p>
          </table:table-cell>
          <table:table-cell table:style-name="ce121" office:value-type="string" calcext:value-type="string">
            <text:p>Issue tags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6" calcext:value-type="float">
            <text:p>FR-56</text:p>
          </table:table-cell>
          <table:table-cell table:style-name="ce88" office:value-type="string" calcext:value-type="string">
            <text:p><text:s text:c="4"/>.ap</text:p>
          </table:table-cell>
          <table:table-cell table:style-name="ce117" office:value-type="string" calcext:value-type="string">
            <text:p>BA shall be able to specify issues in req text.</text:p>
            <text:p><text:span text:style-name="T6">Example: “#TODO”</text:span>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7" calcext:value-type="float">
            <text:p>FR-57</text:p>
          </table:table-cell>
          <table:table-cell table:style-name="ce88" office:value-type="string" calcext:value-type="string">
            <text:p><text:s text:c="4"/>.supp</text:p>
          </table:table-cell>
          <table:table-cell table:style-name="ce117" office:value-type="string" calcext:value-type="string">
            <text:p>BA shall be able to specify an issue with additional information as free text.</text:p>
            <text:p><text:span text:style-name="T6">Example “#TODO{ Waiting for Bob's report }”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8" calcext:value-type="float">
            <text:p>FR-58</text:p>
          </table:table-cell>
          <table:table-cell table:style-name="ce88" office:value-type="string" calcext:value-type="string">
            <text:p><text:s text:c="4"/>.loose</text:p>
          </table:table-cell>
          <table:table-cell table:style-name="ce117" office:value-type="string" calcext:value-type="string">
            <text:p>BA shall be able to specify issue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9" calcext:value-type="float">
            <text:p>FR-5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22" office:value-type="string" calcext:value-type="string">
            <text:p>BA shall be able to specify req refs when providing additional info to an issues.</text:p>
            <text:p><text:span text:style-name="T6">Example: “#TODO{ [3.4.5] blocks this.}”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3" office:value-type="string" calcext:value-type="string">
            <text:p><text:s text:c="4"/>.type</text:p>
          </table:table-cell>
          <table:table-cell table:style-name="ce116" office:value-type="string" calcext:value-type="string">
            <text:p>Custom issue types</text:p>
          </table:table-cell>
          <table:table-cell table:style-name="ce169" table:number-columns-repeated="2"/>
          <table:table-cell table:style-name="ce183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5" calcext:value-type="float">
            <text:p>FR-115</text:p>
          </table:table-cell>
          <table:table-cell table:style-name="ce88" office:value-type="string" calcext:value-type="string">
            <text:p><text:s text:c="6"/>.list</text:p>
          </table:table-cell>
          <table:table-cell table:style-name="ce117" office:value-type="string" calcext:value-type="string">
            <text:p>BA shall be able to see a list of all custom issue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8" calcext:value-type="float">
            <text:p>FR-68</text:p>
          </table:table-cell>
          <table:table-cell table:style-name="ce88" office:value-type="string" calcext:value-type="string">
            <text:p><text:s text:c="6"/>.create</text:p>
          </table:table-cell>
          <table:table-cell table:style-name="ce117" office:value-type="string" calcext:value-type="string">
            <text:p>BA shall be able to create new types of custom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9" calcext:value-type="float">
            <text:p>FR-69</text:p>
          </table:table-cell>
          <table:table-cell table:style-name="ce88" office:value-type="string" calcext:value-type="string">
            <text:p><text:s text:c="6"/>.update</text:p>
          </table:table-cell>
          <table:table-cell table:style-name="ce117" office:value-type="string" calcext:value-type="string">
            <text:p>BA shall be able to rename custom issue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0" calcext:value-type="float">
            <text:p>FR-70</text:p>
          </table:table-cell>
          <table:table-cell table:style-name="ce88" office:value-type="string" calcext:value-type="string">
            <text:p><text:s text:c="8"/>.refs</text:p>
          </table:table-cell>
          <table:table-cell table:style-name="ce117" office:value-type="string" calcext:value-type="string">
            <text:p>System shall appear to rename all instances of a custom issue when it'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1" calcext:value-type="float">
            <text:p>FR-7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custom issue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2" calcext:value-type="float">
            <text:p>FR-7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custom issue type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3" calcext:value-type="float">
            <text:p>FR-7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custom issue type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7" calcext:value-type="float">
            <text:p>FR-327</text:p>
          </table:table-cell>
          <table:table-cell table:style-name="ce88" office:value-type="string" calcext:value-type="string">
            <text:p><text:s text:c="4"/>.restore</text:p>
          </table:table-cell>
          <table:table-cell table:style-name="ce117" office:value-type="string" calcext:value-type="string">
            <text:p>BA shall be able to restore a deleted custom issue type.</text:p>
          </table:table-cell>
          <table:table-cell table:number-columns-repeated="2" table:style-name="ce168" office:value-type="date" office:date-value="2015-09-14" calcext:value-type="date">
            <text:p>14/09/15</text:p>
          </table:table-cell>
          <table:table-cell table:style-name="ce182"/>
          <table:table-cell table:style-name="ce113" table:number-columns-repeated="7"/>
          <table:table-cell table:number-columns-repeated="1009"/>
        </table:table-row>
        <table:table-row table:style-name="ro4">
          <table:table-cell table:style-name="ce38" office:value-type="float" office:value="7" calcext:value-type="float">
            <text:p>MF-0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tags</text:p>
          </table:table-cell>
          <table:table-cell table:style-name="ce114" office:value-type="string" calcext:value-type="string">
            <text:p>MF-07: Tags</text:p>
          </table:table-cell>
          <table:table-cell table:style-name="ce114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" calcext:value-type="float">
            <text:p>FR-25</text:p>
          </table:table-cell>
          <table:table-cell table:style-name="ce88" office:value-type="string" calcext:value-type="string">
            <text:p>.contra</text:p>
          </table:table-cell>
          <table:table-cell table:style-name="ce117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9" calcext:value-type="float">
            <text:p>FR-269</text:p>
          </table:table-cell>
          <table:table-cell table:style-name="ce88" office:value-type="string" calcext:value-type="string">
            <text:p>.trans.subreq</text:p>
          </table:table-cell>
          <table:table-cell table:style-name="ce117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0" calcext:value-type="float">
            <text:p>FR-290</text:p>
          </table:table-cell>
          <table:table-cell table:style-name="ce88" office:value-type="string" calcext:value-type="string">
            <text:p>.col.display</text:p>
          </table:table-cell>
          <table:table-cell table:style-name="ce117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1" calcext:value-type="float">
            <text:p>FR-291</text:p>
          </table:table-cell>
          <table:table-cell table:style-name="ce88" office:value-type="string" calcext:value-type="string">
            <text:p>.col.edit</text:p>
          </table:table-cell>
          <table:table-cell table:style-name="ce117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5" calcext:value-type="float">
            <text:p>FR-305</text:p>
          </table:table-cell>
          <table:table-cell table:style-name="ce88" office:value-type="string" calcext:value-type="string">
            <text:p>.col.deleted</text:p>
          </table:table-cell>
          <table:table-cell table:style-name="ce117" office:value-type="string" calcext:value-type="string">
            <text:p>Deleted tags should be hidden in tag-based columns (unless viewing deleted content)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76" calcext:value-type="float">
            <text:p>FR-276</text:p>
          </table:table-cell>
          <table:table-cell table:style-name="ce88" office:value-type="string" calcext:value-type="string">
            <text:p>.txt.specify</text:p>
          </table:table-cell>
          <table:table-cell table:style-name="ce117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6">Example: #pri=low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89" calcext:value-type="float">
            <text:p>FR-289</text:p>
          </table:table-cell>
          <table:table-cell table:style-name="ce88" office:value-type="string" calcext:value-type="string">
            <text:p>.txt.retain</text:p>
          </table:table-cell>
          <table:table-cell table:style-name="ce117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6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6" calcext:value-type="float">
            <text:p>FR-306</text:p>
          </table:table-cell>
          <table:table-cell table:style-name="ce88" office:value-type="string" calcext:value-type="string">
            <text:p>.txt.deleted.always</text:p>
          </table:table-cell>
          <table:table-cell table:style-name="ce117" office:value-type="string" calcext:value-type="string">
            <text:p>Deleted tags should always be shown in text-based columns.</text:p>
            <text:p>In other words, when HideDead, System shall not hide refs (because they affect the textual content).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Tag types</text:p>
          </table:table-cell>
          <table:table-cell table:style-name="ce118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6" calcext:value-type="float">
            <text:p>FR-246</text:p>
          </table:table-cell>
          <table:table-cell table:style-name="ce88" office:value-type="string" calcext:value-type="string">
            <text:p><text:s text:c="2"/>.unapplicable</text:p>
          </table:table-cell>
          <table:table-cell table:style-name="ce120" office:value-type="string" calcext:value-type="string">
            <text:p>BA shall be able to specify that a tag cannot be applied.</text:p>
            <text:p><text:span text:style-name="T6">e.g. “Priority” shouldn't be applicable but its children should.</text:span>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3" calcext:value-type="float">
            <text:p>FR-253</text:p>
          </table:table-cell>
          <table:table-cell table:style-name="ce88" office:value-type="string" calcext:value-type="string">
            <text:p><text:s text:c="2"/>.enum</text:p>
          </table:table-cell>
          <table:table-cell table:style-name="ce120" office:value-type="string" calcext:value-type="string">
            <text:p>BA shall be able to specify that a ta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3" calcext:value-type="float">
            <text:p>FR-13</text:p>
          </table:table-cell>
          <table:table-cell table:style-name="ce88" office:value-type="string" calcext:value-type="string">
            <text:p><text:s text:c="2"/>.tree</text:p>
          </table:table-cell>
          <table:table-cell table:style-name="ce117" office:value-type="string" calcext:value-type="string">
            <text:p>BA shall be able to create a tree of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4" calcext:value-type="float">
            <text:p>FR-14</text:p>
          </table:table-cell>
          <table:table-cell table:style-name="ce88" office:value-type="string" calcext:value-type="string">
            <text:p><text:s text:c="4"/>.order</text:p>
          </table:table-cell>
          <table:table-cell table:style-name="ce117" office:value-type="string" calcext:value-type="string">
            <text:p>When modifying ta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5" calcext:value-type="float">
            <text:p>FR-15</text:p>
          </table:table-cell>
          <table:table-cell table:style-name="ce94" office:value-type="string" calcext:value-type="string">
            <text:p><text:s text:c="4"/>.many2many</text:p>
          </table:table-cell>
          <table:table-cell table:style-name="ce117" office:value-type="string" calcext:value-type="string">
            <text:p>When modifying ta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9" calcext:value-type="float">
            <text:p>FR-19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6" calcext:value-type="float">
            <text:p>FR-1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create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7" calcext:value-type="float">
            <text:p>FR-17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7" calcext:value-type="float">
            <text:p>FR-247</text:p>
          </table:table-cell>
          <table:table-cell table:style-name="ce88" office:value-type="string" calcext:value-type="string">
            <text:p><text:s text:c="4"/>.unapplicable</text:p>
          </table:table-cell>
          <table:table-cell table:style-name="ce117" office:value-type="string" calcext:value-type="string">
            <text:p>BA shall not be able to change the unapplicability (FR-246) of a ta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5" calcext:value-type="float">
            <text:p>FR-18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a ta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" calcext:value-type="float">
            <text:p>FR-18</text:p>
          </table:table-cell>
          <table:table-cell table:style-name="ce88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ta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6" calcext:value-type="float">
            <text:p>FR-186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a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7" calcext:value-type="float">
            <text:p>FR-187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ag deletion, user shall be able to see each instance of ta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2" calcext:value-type="float">
            <text:p>FR-302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deleted, System should also delete its tags to which it is the sole live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304" calcext:value-type="float">
            <text:p>FR-304</text:p>
          </table:table-cell>
          <table:table-cell table:style-name="ce88" office:value-type="string" calcext:value-type="string">
            <text:p><text:s text:c="4"/>.fields</text:p>
          </table:table-cell>
          <table:table-cell table:style-name="ce119" office:value-type="string" calcext:value-type="string">
            <text:p>When tags are deleted, System should also delete affected tag field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" calcext:value-type="float">
            <text:p>FR-31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ta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" calcext:value-type="float">
            <text:p>FR-32</text:p>
          </table:table-cell>
          <table:table-cell table:style-name="ce88" office:value-type="string" calcext:value-type="string">
            <text:p><text:s text:c="4"/>.aps</text:p>
          </table:table-cell>
          <table:table-cell table:style-name="ce117" office:value-type="string" calcext:value-type="string">
            <text:p>When a ta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3" calcext:value-type="float">
            <text:p>FR-303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restored, System should also delete its tags to which it is the sole dead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41"/>
          <table:table-cell table:style-name="ce74" office:value-type="float" office:value="34" calcext:value-type="float">
            <text:p>FR-34</text:p>
          </table:table-cell>
          <table:table-cell table:style-name="ce91" office:value-type="string" calcext:value-type="string">
            <text:p>.browse</text:p>
          </table:table-cell>
          <table:table-cell table:style-name="ce118" office:value-type="string" calcext:value-type="string">
            <text:p>BA shall be able to browse tags.</text:p>
          </table:table-cell>
          <table:table-cell table:number-columns-repeated="2" table:style-name="ce170" office:value-type="date" office:date-value="2014-02-13" calcext:value-type="date">
            <text:p>13/02/14</text:p>
          </table:table-cell>
          <table:table-cell table:style-name="ce118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5" calcext:value-type="float">
            <text:p>FR-225</text:p>
          </table:table-cell>
          <table:table-cell table:style-name="ce88" office:value-type="string" calcext:value-type="string">
            <text:p><text:s text:c="2"/>.req-filter</text:p>
          </table:table-cell>
          <table:table-cell table:style-name="ce120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bars</text:p>
          </table:table-cell>
          <table:table-cell table:style-name="ce123" office:value-type="string" calcext:value-type="string">
            <text:p>Tag allocation graph</text:p>
          </table:table-cell>
          <table:table-cell table:style-name="ce127" table:number-columns-repeated="3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2" calcext:value-type="float">
            <text:p>FR-222</text:p>
          </table:table-cell>
          <table:table-cell table:style-name="ce88" office:value-type="string" calcext:value-type="string">
            <text:p><text:s text:c="4"/>.seg-not</text:p>
          </table:table-cell>
          <table:table-cell table:style-name="ce117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3" calcext:value-type="float">
            <text:p>FR-223</text:p>
          </table:table-cell>
          <table:table-cell table:style-name="ce88" office:value-type="string" calcext:value-type="string">
            <text:p><text:s text:c="4"/>.seg-parent</text:p>
          </table:table-cell>
          <table:table-cell table:style-name="ce117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4" calcext:value-type="float">
            <text:p>FR-224</text:p>
          </table:table-cell>
          <table:table-cell table:style-name="ce88" office:value-type="string" calcext:value-type="string">
            <text:p><text:s text:c="4"/>.seq-child</text:p>
          </table:table-cell>
          <table:table-cell table:style-name="ce117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8" calcext:value-type="float">
            <text:p>FR-238</text:p>
          </table:table-cell>
          <table:table-cell table:style-name="ce88" office:value-type="string" calcext:value-type="string">
            <text:p><text:s text:c="4"/>.seq-inspect</text:p>
          </table:table-cell>
          <table:table-cell table:style-name="ce117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0" calcext:value-type="float">
            <text:p>FR-220</text:p>
          </table:table-cell>
          <table:table-cell table:style-name="ce88" office:value-type="string" calcext:value-type="string">
            <text:p><text:s text:c="2"/>.top</text:p>
          </table:table-cell>
          <table:table-cell table:style-name="ce117" office:value-type="string" calcext:value-type="string">
            <text:p>When first browsing tags, System presents top-level ta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1" calcext:value-type="float">
            <text:p>FR-221</text:p>
          </table:table-cell>
          <table:table-cell table:style-name="ce88" office:value-type="string" calcext:value-type="string">
            <text:p><text:s text:c="2"/>.top-bars</text:p>
          </table:table-cell>
          <table:table-cell table:style-name="ce117" office:value-type="string" calcext:value-type="string">
            <text:p>When browsing top-level tags, System shall present a (stacked-bar) tag allocation graph for each top-level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5" office:value-type="string" calcext:value-type="string">
            <text:p><text:s text:c="2"/>.detail</text:p>
          </table:table-cell>
          <table:table-cell table:style-name="ce123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71" office:value-type="date" office:date-value="2015-04-23" calcext:value-type="date">
            <text:p>23/04/15</text:p>
          </table:table-cell>
          <table:table-cell table:style-name="ce12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7" calcext:value-type="float">
            <text:p>FR-227</text:p>
          </table:table-cell>
          <table:table-cell table:style-name="ce88" office:value-type="string" calcext:value-type="string">
            <text:p><text:s text:c="4"/>.bar</text:p>
          </table:table-cell>
          <table:table-cell table:style-name="ce117" office:value-type="string" calcext:value-type="string">
            <text:p>System shall present a (stacked-bar) tag allocation graph for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4" office:value-type="string" calcext:value-type="string">
            <text:p><text:s text:c="4"/>.rescope-down</text:p>
          </table:table-cell>
          <table:table-cell table:style-name="ce124" office:value-type="string" calcext:value-type="string">
            <text:p>BA shall be able to change the tag scope to a child of the subject ta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4" office:value-type="string" calcext:value-type="string">
            <text:p><text:s text:c="4"/>.rescope-up</text:p>
          </table:table-cell>
          <table:table-cell table:style-name="ce124" office:value-type="string" calcext:value-type="string">
            <text:p>BA shall be able to change the tag scope to the subject ta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4" office:value-type="string" calcext:value-type="string">
            <text:p><text:s text:c="4"/>.rescope-root</text:p>
          </table:table-cell>
          <table:table-cell table:style-name="ce124" office:value-type="string" calcext:value-type="string">
            <text:p>BA shall be able to change the ta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8" calcext:value-type="float">
            <text:p>FR-228</text:p>
          </table:table-cell>
          <table:table-cell table:style-name="ce96" office:value-type="string" calcext:value-type="string">
            <text:p><text:s text:c="4"/>.reqs</text:p>
          </table:table-cell>
          <table:table-cell table:style-name="ce117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4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9" calcext:value-type="float">
            <text:p>FR-229</text:p>
          </table:table-cell>
          <table:table-cell table:style-name="ce88" office:value-type="string" calcext:value-type="string">
            <text:p><text:s text:c="6"/>.ord-seg</text:p>
          </table:table-cell>
          <table:table-cell table:style-name="ce117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0" calcext:value-type="float">
            <text:p>FR-230</text:p>
          </table:table-cell>
          <table:table-cell table:style-name="ce88" office:value-type="string" calcext:value-type="string">
            <text:p><text:s text:c="6"/>.select</text:p>
          </table:table-cell>
          <table:table-cell table:style-name="ce117" office:value-type="string" calcext:value-type="string">
            <text:p>BA shall be able to select and deselect requirement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1" calcext:value-type="float">
            <text:p>FR-231</text:p>
          </table:table-cell>
          <table:table-cell table:style-name="ce88" office:value-type="string" calcext:value-type="string">
            <text:p><text:s text:c="8"/>.apply</text:p>
          </table:table-cell>
          <table:table-cell table:style-name="ce117" office:value-type="string" calcext:value-type="string">
            <text:p>BA shall be able to apply the subject ta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2" calcext:value-type="float">
            <text:p>FR-232</text:p>
          </table:table-cell>
          <table:table-cell table:style-name="ce88" office:value-type="string" calcext:value-type="string">
            <text:p><text:s text:c="8"/>.remove</text:p>
          </table:table-cell>
          <table:table-cell table:style-name="ce117" office:value-type="string" calcext:value-type="string">
            <text:p>BA shall be able to remove the subject ta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3" calcext:value-type="float">
            <text:p>FR-233</text:p>
          </table:table-cell>
          <table:table-cell table:style-name="ce88" office:value-type="string" calcext:value-type="string">
            <text:p><text:s text:c="8"/>.replace</text:p>
          </table:table-cell>
          <table:table-cell table:style-name="ce117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4"/>.tags</text:p>
          </table:table-cell>
          <table:table-cell table:style-name="ce125" office:value-type="string" calcext:value-type="string">
            <text:p>Edit tags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4" calcext:value-type="float">
            <text:p>FR-234</text:p>
          </table:table-cell>
          <table:table-cell table:style-name="ce88" office:value-type="string" calcext:value-type="string">
            <text:p><text:s text:c="6"/>.add</text:p>
          </table:table-cell>
          <table:table-cell table:style-name="ce117" office:value-type="string" calcext:value-type="string">
            <text:p>BA shall be able to add a new tag as a child of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5" calcext:value-type="float">
            <text:p>FR-235</text:p>
          </table:table-cell>
          <table:table-cell table:style-name="ce88" office:value-type="string" calcext:value-type="string">
            <text:p><text:s text:c="6"/>.edit</text:p>
          </table:table-cell>
          <table:table-cell table:style-name="ce117" office:value-type="string" calcext:value-type="string">
            <text:p>BA shall be able to edit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6" calcext:value-type="float">
            <text:p>FR-236</text:p>
          </table:table-cell>
          <table:table-cell table:style-name="ce88" office:value-type="string" calcext:value-type="string">
            <text:p><text:s text:c="6"/>.delete</text:p>
          </table:table-cell>
          <table:table-cell table:style-name="ce117" office:value-type="string" calcext:value-type="string">
            <text:p>BA shall be able to delete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7" calcext:value-type="float">
            <text:p>FR-237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7" office:value-type="string" calcext:value-type="string">
            <text:p>BA shall be able to restore a deleted child tag of <text:s/>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12" calcext:value-type="float">
            <text:p>MF-12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llreq</text:p>
          </table:table-cell>
          <table:table-cell table:style-name="ce114" office:value-type="string" calcext:value-type="string">
            <text:p>MF-12: Low-level Requirements</text:p>
          </table:table-cell>
          <table:table-cell table:style-name="ce114" table:number-columns-repeated="3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Req 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8" calcext:value-type="float">
            <text:p>FR-78</text:p>
          </table:table-cell>
          <table:table-cell table:style-name="ce88" office:value-type="string" calcext:value-type="string">
            <text:p><text:s text:c="2"/>.id.auto</text:p>
          </table:table-cell>
          <table:table-cell table:style-name="ce115" office:value-type="string" calcext:value-type="string">
            <text:p>System shall allocate reqs a unique ID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9" calcext:value-type="float">
            <text:p>FR-79</text:p>
          </table:table-cell>
          <table:table-cell table:style-name="ce88" office:value-type="string" calcext:value-type="string">
            <text:p><text:s text:c="2"/>.id.fmt</text:p>
          </table:table-cell>
          <table:table-cell table:style-name="ce115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7" calcext:value-type="float">
            <text:p>FR-77</text:p>
          </table:table-cell>
          <table:table-cell table:style-name="ce88" office:value-type="string" calcext:value-type="string">
            <text:p><text:s text:c="2"/>.last-updated</text:p>
          </table:table-cell>
          <table:table-cell table:style-name="ce115" office:value-type="string" calcext:value-type="string">
            <text:p>System shall maintain the last-updated timestamp of reqs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0" calcext:value-type="float">
            <text:p>FR-80</text:p>
          </table:table-cell>
          <table:table-cell table:style-name="ce88" office:value-type="string" calcext:value-type="string">
            <text:p><text:s text:c="2"/>.ref.reqs</text:p>
          </table:table-cell>
          <table:table-cell table:style-name="ce115" office:value-type="string" calcext:value-type="string">
            <text:p>BA shall be able to reference req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8" calcext:value-type="float">
            <text:p>FR-148</text:p>
          </table:table-cell>
          <table:table-cell table:style-name="ce88" office:value-type="string" calcext:value-type="string">
            <text:p><text:s text:c="2"/>.ref.shr</text:p>
          </table:table-cell>
          <table:table-cell table:style-name="ce115" office:value-type="string" calcext:value-type="string">
            <text:p>BA shall be able to reference SHRs from 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1" calcext:value-type="float">
            <text:p>FR-81</text:p>
          </table:table-cell>
          <table:table-cell table:style-name="ce88" office:value-type="string" calcext:value-type="string">
            <text:p><text:s text:c="2"/>.ref.ucs</text:p>
          </table:table-cell>
          <table:table-cell table:style-name="ce115" office:value-type="string" calcext:value-type="string">
            <text:p>BA shall be able to reference UC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1" office:value-type="string" calcext:value-type="string">
            <text:p>.delete</text:p>
          </table:table-cell>
          <table:table-cell table:style-name="ce121" office:value-type="string" calcext:value-type="string">
            <text:p>BA shall be able to (soft) delete reqs.</text:p>
          </table:table-cell>
          <table:table-cell table:number-columns-repeated="2" table:style-name="ce170" office:value-type="date" office:date-value="2014-05-15" calcext:value-type="date">
            <text:p>15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4" calcext:value-type="float">
            <text:p>FR-104</text:p>
          </table:table-cell>
          <table:table-cell table:style-name="ce88" office:value-type="string" calcext:value-type="string">
            <text:p><text:s text:c="2"/>.hide</text:p>
          </table:table-cell>
          <table:table-cell table:style-name="ce115" office:value-type="string" calcext:value-type="string">
            <text:p>BA shall be able to hide deleted reqs from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3" calcext:value-type="float">
            <text:p>FR-103</text:p>
          </table:table-cell>
          <table:table-cell table:style-name="ce88" office:value-type="string" calcext:value-type="string">
            <text:p><text:s text:c="2"/>.read</text:p>
          </table:table-cell>
          <table:table-cell table:style-name="ce115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6" calcext:value-type="float">
            <text:p>FR-106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107" calcext:value-type="float">
            <text:p>FR-107</text:p>
          </table:table-cell>
          <table:table-cell table:style-name="ce88" office:value-type="string" calcext:value-type="string">
            <text:p><text:s text:c="5"/>.refs</text:p>
          </table:table-cell>
          <table:table-cell table:style-name="ce126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74"/>
          <table:table-cell table:style-name="ce91" office:value-type="string" calcext:value-type="string">
            <text:p>.reqtypes</text:p>
          </table:table-cell>
          <table:table-cell table:style-name="ce121" office:value-type="string" calcext:value-type="string">
            <text:p>Requirement Types</text:p>
          </table:table-cell>
          <table:table-cell table:number-columns-repeated="2" table:style-name="ce170" office:value-type="date" office:date-value="2014-05-16" calcext:value-type="date">
            <text:p>16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6" calcext:value-type="float">
            <text:p>FR-116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req typ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7" calcext:value-type="float">
            <text:p>FR-117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a new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8" calcext:value-type="float">
            <text:p>FR-118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a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9" calcext:value-type="float">
            <text:p>FR-11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7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2" calcext:value-type="float">
            <text:p>FR-122</text:p>
          </table:table-cell>
          <table:table-cell table:style-name="ce88" office:value-type="string" calcext:value-type="string">
            <text:p><text:s text:c="4"/>.mnemonic</text:p>
          </table:table-cell>
          <table:table-cell table:style-name="ce11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0" calcext:value-type="float">
            <text:p>FR-120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a req typ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1" calcext:value-type="float">
            <text:p>FR-121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09" calcext:value-type="float">
            <text:p>FR-309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deleted, all associated reqs shall be considered delet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5" calcext:value-type="float">
            <text:p>FR-1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24" office:value-type="string" calcext:value-type="string">
            <text:p>BA shall be able to restore deleted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0" calcext:value-type="float">
            <text:p>FR-310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restored, all reqs that were considered deleted due to the req-type deletion, shall be considered restor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view</text:p>
          </table:table-cell>
          <table:table-cell table:style-name="ce121" office:value-type="string" calcext:value-type="string">
            <text:p>Req Table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4" calcext:value-type="float">
            <text:p>FR-84</text:p>
          </table:table-cell>
          <table:table-cell table:style-name="ce88" office:value-type="string" calcext:value-type="string">
            <text:p><text:s text:c="2"/>.rows</text:p>
          </table:table-cell>
          <table:table-cell table:style-name="ce115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3" calcext:value-type="float">
            <text:p>FR-83</text:p>
          </table:table-cell>
          <table:table-cell table:style-name="ce88" office:value-type="string" calcext:value-type="string">
            <text:p><text:s text:c="2"/>.table</text:p>
          </table:table-cell>
          <table:table-cell table:style-name="ce115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8" calcext:value-type="float">
            <text:p>FR-268</text:p>
          </table:table-cell>
          <table:table-cell table:style-name="ce88" office:value-type="string" calcext:value-type="string">
            <text:p><text:s text:c="2"/>.filters</text:p>
          </table:table-cell>
          <table:table-cell table:style-name="ce117" office:value-type="string" calcext:value-type="string">
            <text:p>BA shall be able to filter req table contents. (See <text:span text:style-name="T3">Filtering</text:span> section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6" calcext:value-type="float">
            <text:p>FR-17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6" calcext:value-type="float">
            <text:p>FR-266</text:p>
          </table:table-cell>
          <table:table-cell table:style-name="ce90" office:value-type="string" calcext:value-type="string">
            <text:p><text:s text:c="4"/>.child</text:p>
          </table:table-cell>
          <table:table-cell table:style-name="ce115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3"/>
          <table:table-cell table:style-name="ce198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0" calcext:value-type="float">
            <text:p>FR-170</text:p>
          </table:table-cell>
          <table:table-cell table:style-name="ce90" office:value-type="string" calcext:value-type="string">
            <text:p><text:s text:c="2"/>.uc.semid</text:p>
          </table:table-cell>
          <table:table-cell table:style-name="ce115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columns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0" calcext:value-type="float">
            <text:p>FR-140</text:p>
          </table:table-cell>
          <table:table-cell table:style-name="ce88" office:value-type="string" calcext:value-type="string">
            <text:p><text:s text:c="4"/>.desc</text:p>
          </table:table-cell>
          <table:table-cell table:style-name="ce115" office:value-type="string" calcext:value-type="string">
            <text:p>In the LL-req table, System shall always display a column of req des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8" calcext:value-type="float">
            <text:p>FR-138</text:p>
          </table:table-cell>
          <table:table-cell table:style-name="ce88" office:value-type="string" calcext:value-type="string">
            <text:p><text:s text:c="4"/>.ids</text:p>
          </table:table-cell>
          <table:table-cell table:style-name="ce115" office:value-type="string" calcext:value-type="string">
            <text:p>In the LL-req table, System shall always display a column of req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string" calcext:value-type="string">
            <text:p>MF-12</text:p>
            <text:p>MF-13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287" calcext:value-type="float">
            <text:p>FR-287</text:p>
          </table:table-cell>
          <table:table-cell table:style-name="ce88" office:value-type="string" calcext:value-type="string">
            <text:p><text:s text:c="4"/>.impcol-dup</text:p>
          </table:table-cell>
          <table:table-cell table:style-name="ce115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2" calcext:value-type="float">
            <text:p>FR-312</text:p>
          </table:table-cell>
          <table:table-cell table:style-name="ce88" office:value-type="string" calcext:value-type="string">
            <text:p><text:s text:c="4"/>.deletion-reason</text:p>
          </table:table-cell>
          <table:table-cell table:style-name="ce115" office:value-type="string" calcext:value-type="string">
            <text:p>BA shall be able to view reasons for deletion in the ReqTable when showing deleted cont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9" calcext:value-type="float">
            <text:p>FR-139</text:p>
          </table:table-cell>
          <table:table-cell table:style-name="ce88" office:value-type="string" calcext:value-type="string">
            <text:p><text:s text:c="4"/>.semid</text:p>
          </table:table-cell>
          <table:table-cell table:style-name="ce115" office:value-type="string" calcext:value-type="string">
            <text:p>In the LL-req table, System shall always display a column of semantic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5" calcext:value-type="float">
            <text:p>FR-95</text:p>
          </table:table-cell>
          <table:table-cell table:style-name="ce97" office:value-type="string" calcext:value-type="string">
            <text:p><text:s text:c="7"/>.dup</text:p>
          </table:table-cell>
          <table:table-cell table:style-name="ce11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4" calcext:value-type="float">
            <text:p>FR-94</text:p>
          </table:table-cell>
          <table:table-cell table:style-name="ce97" office:value-type="string" calcext:value-type="string">
            <text:p><text:s text:c="7"/>.indent</text:p>
          </table:table-cell>
          <table:table-cell table:style-name="ce115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3" calcext:value-type="float">
            <text:p>FR-93</text:p>
          </table:table-cell>
          <table:table-cell table:style-name="ce97" office:value-type="string" calcext:value-type="string">
            <text:p><text:s text:c="7"/>.tree</text:p>
          </table:table-cell>
          <table:table-cell table:style-name="ce115" office:value-type="string" calcext:value-type="string">
            <text:p>When sorting by semantic IDs, System shall display reqs as a tree using sem-ID components (separated by dots) as nodes.</text:p>
            <text:p><text:span text:style-name="T6">Example: A.B.C is a child of A.B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7" calcext:value-type="float">
            <text:p>FR-137</text:p>
          </table:table-cell>
          <table:table-cell table:style-name="ce88" office:value-type="string" calcext:value-type="string">
            <text:p><text:s text:c="4"/>.sorted</text:p>
          </table:table-cell>
          <table:table-cell table:style-name="ce115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editor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2" calcext:value-type="float">
            <text:p>FR-172</text:p>
          </table:table-cell>
          <table:table-cell table:style-name="ce90" office:value-type="string" calcext:value-type="string">
            <text:p><text:s text:c="4"/>.copy</text:p>
          </table:table-cell>
          <table:table-cell table:style-name="ce115" office:value-type="string" calcext:value-type="string">
            <text:p>BA shall be able to create a copy of 1 or more (selected)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3" calcext:value-type="float">
            <text:p>FR-173</text:p>
          </table:table-cell>
          <table:table-cell table:style-name="ce90" office:value-type="string" calcext:value-type="string">
            <text:p><text:s text:c="7"/>.selection</text:p>
          </table:table-cell>
          <table:table-cell table:style-name="ce115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4" calcext:value-type="float">
            <text:p>FR-174</text:p>
          </table:table-cell>
          <table:table-cell table:style-name="ce90" office:value-type="string" calcext:value-type="string">
            <text:p><text:s text:c="7"/>.semid</text:p>
          </table:table-cell>
          <table:table-cell table:style-name="ce11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5" calcext:value-type="float">
            <text:p>FR-85</text:p>
          </table:table-cell>
          <table:table-cell table:style-name="ce88" office:value-type="string" calcext:value-type="string">
            <text:p><text:s text:c="4"/>.cursor</text:p>
          </table:table-cell>
          <table:table-cell table:style-name="ce115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6" calcext:value-type="float">
            <text:p>FR-156</text:p>
          </table:table-cell>
          <table:table-cell table:style-name="ce90" office:value-type="string" calcext:value-type="string">
            <text:p><text:s text:c="4"/>.dups</text:p>
          </table:table-cell>
          <table:table-cell table:style-name="ce115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7" calcext:value-type="float">
            <text:p>FR-177</text:p>
          </table:table-cell>
          <table:table-cell table:style-name="ce95" office:value-type="string" calcext:value-type="string">
            <text:p><text:s text:c="2"/>.update</text:p>
          </table:table-cell>
          <table:table-cell table:style-name="ce128" office:value-type="string" calcext:value-type="string">
            <text:p>BA shall be able to update an existing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8" calcext:value-type="float">
            <text:p>FR-178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LL-req is updat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0" calcext:value-type="float">
            <text:p>FR-90</text:p>
          </table:table-cell>
          <table:table-cell table:style-name="ce88" office:value-type="string" calcext:value-type="string">
            <text:p><text:s text:c="4"/>.reqtype</text:p>
          </table:table-cell>
          <table:table-cell table:style-name="ce115" office:value-type="string" calcext:value-type="string">
            <text:p>BA shall be able to change the requirement type of a requirement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1" calcext:value-type="float">
            <text:p>FR-91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5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4" calcext:value-type="float">
            <text:p>FR-194</text:p>
          </table:table-cell>
          <table:table-cell table:style-name="ce88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set the req-type for multiple reqs simultaneously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7" calcext:value-type="float">
            <text:p>FR-97</text:p>
          </table:table-cell>
          <table:table-cell table:style-name="ce97" office:value-type="string" calcext:value-type="string">
            <text:p><text:s text:c="4"/>.semid</text:p>
          </table:table-cell>
          <table:table-cell table:style-name="ce115" office:value-type="string" calcext:value-type="string">
            <text:p>BA shall be able to modify the semantic IDs of existing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3" calcext:value-type="float">
            <text:p>FR-143</text:p>
          </table:table-cell>
          <table:table-cell table:style-name="ce97" office:value-type="string" calcext:value-type="string">
            <text:p><text:s text:c="7"/>.0-n</text:p>
          </table:table-cell>
          <table:table-cell table:style-name="ce115" office:value-type="string" calcext:value-type="string">
            <text:p>BA shall be able to apply 0-n semantic IDs to LL-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9" calcext:value-type="float">
            <text:p>FR-219</text:p>
          </table:table-cell>
          <table:table-cell table:style-name="ce97" office:value-type="string" calcext:value-type="string">
            <text:p><text:s text:c="7"/>.prevent.cyclic</text:p>
          </table:table-cell>
          <table:table-cell table:style-name="ce115" office:value-type="string" calcext:value-type="string">
            <text:p>System shall prevent a req's sem-ID transitively having itself as a chil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6" calcext:value-type="float">
            <text:p>FR-96</text:p>
          </table:table-cell>
          <table:table-cell table:style-name="ce98" office:value-type="string" calcext:value-type="string">
            <text:p><text:s text:c="7"/>.show-all</text:p>
          </table:table-cell>
          <table:table-cell table:style-name="ce115" office:value-type="string" calcext:value-type="string">
            <text:p>BA shall be able to see all semantic IDs for a req with multiple, when editing a single row.</text:p>
            <text:p><text:span text:style-name="T7">Idea is that each duplicate row displays all semIDs but the first is the one that reflects its place in the tree, then the rest follow a-z in light grey.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7" calcext:value-type="float">
            <text:p>FR-167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modify the common leading semantic ID component(s) of a set of reqs.</text:p>
            <text:p><text:span text:style-name="T6">Example: a.b.c &amp; a.b.d allows modification of “a.b” which BA can turn into “”, “x.b”, “a.b.x”, etc.</text:span>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8" calcext:value-type="float">
            <text:p>FR-168</text:p>
          </table:table-cell>
          <table:table-cell table:style-name="ce90" office:value-type="string" calcext:value-type="string">
            <text:p><text:s text:c="8"/>.no-common</text:p>
          </table:table-cell>
          <table:table-cell table:style-name="ce115" office:value-type="string" calcext:value-type="string">
            <text:p>Further clarifying [FR-167], if when requesting to bulk-modify semantic IDs there is no common prefix, BA shall be able to specify one.</text:p>
            <text:p><text:span text:style-name="T6">Example: a.b &amp; f.g allows modification of common prefix “”, which BA can turn into “x” to result in x.a.b &amp; x.f.g.</text:span>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1" calcext:value-type="float">
            <text:p>FR-171</text:p>
          </table:table-cell>
          <table:table-cell table:style-name="ce90" office:value-type="string" calcext:value-type="string">
            <text:p><text:s text:c="4"/>.uc.title</text:p>
          </table:table-cell>
          <table:table-cell table:style-name="ce115" office:value-type="string" calcext:value-type="string">
            <text:p>BA shall be able to edit a UC title from the req view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9" calcext:value-type="float">
            <text:p>FR-179</text:p>
          </table:table-cell>
          <table:table-cell table:style-name="ce95" office:value-type="string" calcext:value-type="string">
            <text:p><text:s text:c="2"/>.delete</text:p>
          </table:table-cell>
          <table:table-cell table:style-name="ce129" office:value-type="string" calcext:value-type="string">
            <text:p>Able to (soft) delete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3" calcext:value-type="float">
            <text:p>FR-313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deleting, BA shall be able to select a subset of solely implied reqs (transitively) to cascade the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4" calcext:value-type="float">
            <text:p>FR-314</text:p>
          </table:table-cell>
          <table:table-cell table:style-name="ce90" office:value-type="string" calcext:value-type="string">
            <text:p><text:s text:c="4"/>.reason</text:p>
          </table:table-cell>
          <table:table-cell table:style-name="ce115" office:value-type="string" calcext:value-type="string">
            <text:p>When deleting, BA shall be able to enter a reason fo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7" calcext:value-type="float">
            <text:p>FR-317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deleting, System shall also delete RCGs that would no longer have live children afte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3" calcext:value-type="float">
            <text:p>FR-183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BA shall be able to restore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4" calcext:value-type="float">
            <text:p>FR-184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5" calcext:value-type="float">
            <text:p>FR-315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restoring, BA shall be able to select a subset of implied reqs (transitively, needn't be soley implied) to cascade the restora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6" calcext:value-type="float">
            <text:p>FR-326</text:p>
          </table:table-cell>
          <table:table-cell table:style-name="ce90" office:value-type="string" calcext:value-type="string">
            <text:p><text:s text:c="6"/>.show-reason</text:p>
          </table:table-cell>
          <table:table-cell table:style-name="ce115" office:value-type="string" calcext:value-type="string">
            <text:p>When selecting implied reqs for restoring, BA shall be able to see the reason each was deleted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8" calcext:value-type="float">
            <text:p>FR-318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restoring, System shall also restore RCGs deleted as a result of req deletion [FR-317]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9" calcext:value-type="float">
            <text:p>FR-319</text:p>
          </table:table-cell>
          <table:table-cell table:style-name="ce90" office:value-type="string" calcext:value-type="string">
            <text:p><text:s text:c="4"/>.rc-conflict</text:p>
          </table:table-cell>
          <table:table-cell table:style-name="ce130" office:value-type="string" calcext:value-type="string">
            <text:p>If restoration would introduce a req code conflict, BA shall be able to have System do one of:</text:p>
            <text:p>* cancel</text:p>
            <text:p>* have System add an arbitrary prefix to req code trees</text:p>
            <text:p>* auto-rename conflicting nodes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0" calcext:value-type="float">
            <text:p>FR-320</text:p>
          </table:table-cell>
          <table:table-cell table:style-name="ce90" office:value-type="string" calcext:value-type="string">
            <text:p><text:s text:c="6"/>.rcg-merge</text:p>
          </table:table-cell>
          <table:table-cell table:style-name="ce130" office:value-type="string" calcext:value-type="string">
            <text:p>When determining req code conflict during restoration, System shall merge RCGs with matching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1" calcext:value-type="float">
            <text:p>FR-311</text:p>
          </table:table-cell>
          <table:table-cell table:style-name="ce90" office:value-type="string" calcext:value-type="string">
            <text:p><text:s text:c="4"/>.req-type</text:p>
          </table:table-cell>
          <table:table-cell table:style-name="ce119" office:value-type="string" calcext:value-type="string">
            <text:p>BA shall not be able to restore reqs associated with deleted req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sort</text:p>
          </table:table-cell>
          <table:table-cell table:style-name="ce127" table:number-columns-repeated="4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8" calcext:value-type="float">
            <text:p>FR-98</text:p>
          </table:table-cell>
          <table:table-cell table:style-name="ce88" office:value-type="string" calcext:value-type="string">
            <text:p><text:s text:c="4"/>.default</text:p>
          </table:table-cell>
          <table:table-cell table:style-name="ce11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9" calcext:value-type="float">
            <text:p>FR-109</text:p>
          </table:table-cell>
          <table:table-cell table:style-name="ce88" office:value-type="string" calcext:value-type="string">
            <text:p><text:s text:c="4"/>.on-change</text:p>
          </table:table-cell>
          <table:table-cell table:style-name="ce115" office:value-type="string" calcext:value-type="string">
            <text:p>When a req is modified, System shall automatically resort the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0" calcext:value-type="float">
            <text:p>FR-110</text:p>
          </table:table-cell>
          <table:table-cell table:style-name="ce88" office:value-type="string" calcext:value-type="string">
            <text:p><text:s text:c="4"/>.post-change</text:p>
          </table:table-cell>
          <table:table-cell table:style-name="ce126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9" calcext:value-type="float">
            <text:p>FR-99</text:p>
          </table:table-cell>
          <table:table-cell table:style-name="ce88" office:value-type="string" calcext:value-type="string">
            <text:p><text:s text:c="4"/>.custom</text:p>
          </table:table-cell>
          <table:table-cell table:style-name="ce115" office:value-type="string" calcext:value-type="string">
            <text:p>BA shall be able to customise sort logic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141" calcext:value-type="float">
            <text:p>FR-141</text:p>
          </table:table-cell>
          <table:table-cell table:style-name="ce88" office:value-type="string" calcext:value-type="string">
            <text:p><text:s text:c="7"/>.fields</text:p>
          </table:table-cell>
          <table:table-cell table:style-name="ce115" office:value-type="string" calcext:value-type="string">
            <text:p>BA shall be able to use custom fields in the sort criteria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MF-07</text:p>
            <text:p>MF-13</text:p>
          </table:table-cell>
          <table:table-cell table:style-name="ce69" office:value-type="float" office:value="203" calcext:value-type="float">
            <text:p>FR-203</text:p>
          </table:table-cell>
          <table:table-cell table:style-name="ce88" office:value-type="string" calcext:value-type="string">
            <text:p><text:s text:c="7"/>.grouping-order</text:p>
          </table:table-cell>
          <table:table-cell table:style-name="ce115" office:value-type="string" calcext:value-type="string">
            <text:p>When sorting by grouping, System shall order sibling groupings according to their index relative to their parent.</text:p>
            <text:p><text:span text:style-name="T8">Eg. If BA orders Pri=High before Pri=Med in the grouping tree, then reqs with Pri=High should be appear before reqs with Pri=Med.</text:span>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0" calcext:value-type="float">
            <text:p>FR-100</text:p>
          </table:table-cell>
          <table:table-cell table:style-name="ce88" office:value-type="string" calcext:value-type="string">
            <text:p><text:s text:c="7"/>.mult</text:p>
          </table:table-cell>
          <table:table-cell table:style-name="ce115" office:value-type="string" calcext:value-type="string">
            <text:p>BA shall be able to sort by multiple, ordered colum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8" calcext:value-type="float">
            <text:p>FR-108</text:p>
          </table:table-cell>
          <table:table-cell table:style-name="ce88" office:value-type="string" calcext:value-type="string">
            <text:p><text:s text:c="7"/>.off</text:p>
          </table:table-cell>
          <table:table-cell table:style-name="ce115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fs</text:p>
          </table:table-cell>
          <table:table-cell table:style-name="ce121" office:value-type="string" calcext:value-type="string">
            <text:p>Ref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5" calcext:value-type="float">
            <text:p>FR-155</text:p>
          </table:table-cell>
          <table:table-cell table:style-name="ce88" office:value-type="string" calcext:value-type="string">
            <text:p>.code.req.parse</text:p>
          </table:table-cell>
          <table:table-cell table:style-name="ce115" office:value-type="string" calcext:value-type="string">
            <text:p>Where BA can specify refs to reqs, BA can specify using a semantic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2" calcext:value-type="float">
            <text:p>FR-152</text:p>
          </table:table-cell>
          <table:table-cell table:style-name="ce88" office:value-type="string" calcext:value-type="string">
            <text:p>.code.req.disp</text:p>
          </table:table-cell>
          <table:table-cell table:style-name="ce115" office:value-type="string" calcext:value-type="string">
            <text:p>For refs to reqs made using semantic ID, System shall render the ref accordingly...</text:p>
            <text:p/>
            <text:p><text:span text:style-name="T1">If target req has no semIDs anymore, display the pubid.</text:span></text:p>
            <text:p>If target req has the semID entered on ref creation, display the semID.</text:p>
            <text:p><text:span text:style-name="T1">If target req doesn't have the semID entered on ref creation, display the closest semID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3" calcext:value-type="float">
            <text:p>FR-293</text:p>
          </table:table-cell>
          <table:table-cell table:style-name="ce88" office:value-type="string" calcext:value-type="string">
            <text:p>.code.shr.parse</text:p>
          </table:table-cell>
          <table:table-cell table:style-name="ce115" office:value-type="string" calcext:value-type="string">
            <text:p>BA shall be able to specify a ref to a SHR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2" calcext:value-type="float">
            <text:p>FR-292</text:p>
          </table:table-cell>
          <table:table-cell table:style-name="ce88" office:value-type="string" calcext:value-type="string">
            <text:p>.code.shr.disp</text:p>
          </table:table-cell>
          <table:table-cell table:style-name="ce115" office:value-type="string" calcext:value-type="string">
            <text:p>For refs to SHRs, System shall render the ref accordingly...</text:p>
            <text:p/>
            <text:p><text:span text:style-name="T1">If target exists, </text:span>display the semID.</text:p>
            <text:p><text:span text:style-name="T1">If target doesn't exist, display the semID and mark it as an issue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4" calcext:value-type="float">
            <text:p>FR-154</text:p>
          </table:table-cell>
          <table:table-cell table:style-name="ce88" office:value-type="string" calcext:value-type="string">
            <text:p>.code.short.parse</text:p>
          </table:table-cell>
          <table:table-cell table:style-name="ce11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6">Eg. In [A.B.C] a ref to [.X] should look for [A.B.C.**.X] → [A.B.**.X] → [A.**.X] → [**.X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3" calcext:value-type="float">
            <text:p>FR-153</text:p>
          </table:table-cell>
          <table:table-cell table:style-name="ce88" office:value-type="string" calcext:value-type="string">
            <text:p>.code.short.disp</text:p>
          </table:table-cell>
          <table:table-cell table:style-name="ce115" office:value-type="string" calcext:value-type="string">
            <text:p>When displaying a ref using a sem-ID, System shall omit leading sem-ID components that are the same in both the referer and referee.</text:p>
            <text:p><text:span text:style-name="T6">Example: A.B.C.F has ref [A.B.X.F] should just display [.X.F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4" calcext:value-type="float">
            <text:p>FR-294</text:p>
          </table:table-cell>
          <table:table-cell table:style-name="ce88" office:value-type="string" calcext:value-type="string">
            <text:p>.code.change.restore</text:p>
          </table:table-cell>
          <table:table-cell table:style-name="ce115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5" calcext:value-type="float">
            <text:p>FR-295</text:p>
          </table:table-cell>
          <table:table-cell table:style-name="ce88" office:value-type="string" calcext:value-type="string">
            <text:p>.code.change.update</text:p>
          </table:table-cell>
          <table:table-cell table:style-name="ce115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6" calcext:value-type="float">
            <text:p>FR-296</text:p>
          </table:table-cell>
          <table:table-cell table:style-name="ce88" office:value-type="string" calcext:value-type="string">
            <text:p>.code.change.warn</text:p>
          </table:table-cell>
          <table:table-cell table:style-name="ce115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1" calcext:value-type="float">
            <text:p>FR-151</text:p>
          </table:table-cell>
          <table:table-cell table:style-name="ce88" office:value-type="string" calcext:value-type="string">
            <text:p>.pubid.disp</text:p>
          </table:table-cell>
          <table:table-cell table:style-name="ce115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1" calcext:value-type="float">
            <text:p>FR-101</text:p>
          </table:table-cell>
          <table:table-cell table:style-name="ce88" office:value-type="string" calcext:value-type="string">
            <text:p>.pubid.parse</text:p>
          </table:table-cell>
          <table:table-cell table:style-name="ce115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rcg</text:p>
          </table:table-cell>
          <table:table-cell table:style-name="ce121" office:value-type="string" calcext:value-type="string">
            <text:p>RCG (ReqCode Group) <text:span text:style-name="T9">(previously SHR: Semantic Header Row)</text:span></text:p>
          </table:table-cell>
          <table:table-cell table:style-name="ce173" table:number-columns-repeated="2"/>
          <table:table-cell table:style-name="ce121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4" calcext:value-type="float">
            <text:p>FR-144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an RCG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1" calcext:value-type="float">
            <text:p>FR-321</text:p>
          </table:table-cell>
          <table:table-cell table:style-name="ce90" office:value-type="string" calcext:value-type="string">
            <text:p><text:s text:c="4"/>.suggest</text:p>
          </table:table-cell>
          <table:table-cell table:style-name="ce115" office:value-type="string" calcext:value-type="string">
            <text:p>When BA is creating a new RCG, System shall allow BA to use the last-used value associated with the req cod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6" calcext:value-type="float">
            <text:p>FR-146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update only two attributes of an SHR: {sem-ID, title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9" calcext:value-type="float">
            <text:p>FR-149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7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5" calcext:value-type="float">
            <text:p>FR-17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7" calcext:value-type="float">
            <text:p>FR-147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5" calcext:value-type="float">
            <text:p>FR-3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2" calcext:value-type="float">
            <text:p>FR-322</text:p>
          </table:table-cell>
          <table:table-cell table:style-name="ce90" office:value-type="string" calcext:value-type="string">
            <text:p><text:s text:c="2"/>.display.title-blank</text:p>
          </table:table-cell>
          <table:table-cell table:style-name="ce115" office:value-type="string" calcext:value-type="string">
            <text:p>When viewing deleted content, System shall not display deleted RCGs with 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3" calcext:value-type="float">
            <text:p>FR-323</text:p>
          </table:table-cell>
          <table:table-cell table:style-name="ce90" office:value-type="string" calcext:value-type="string">
            <text:p><text:s text:c="2"/>.display.title-has</text:p>
          </table:table-cell>
          <table:table-cell table:style-name="ce115" office:value-type="string" calcext:value-type="string">
            <text:p>When viewing deleted content, System shall display deleted RCGs with non-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4" calcext:value-type="float">
            <text:p>FR-324</text:p>
          </table:table-cell>
          <table:table-cell table:style-name="ce90" office:value-type="string" calcext:value-type="string">
            <text:p><text:s text:c="2"/>.display.used</text:p>
          </table:table-cell>
          <table:table-cell table:style-name="ce115" office:value-type="string" calcext:value-type="string">
            <text:p>When viewing deleted content, System shall not display deleted RCGs that have an RC in us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7" calcext:value-type="float">
            <text:p>FR-297</text:p>
          </table:table-cell>
          <table:table-cell table:style-name="ce90" office:value-type="string" calcext:value-type="string">
            <text:p><text:s text:c="2"/>.attr.implications</text:p>
          </table:table-cell>
          <table:table-cell table:style-name="ce115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2" office:value-type="float" office:value="12" calcext:value-type="float">
            <text:p>MF-12</text:p>
          </table:table-cell>
          <table:table-cell table:style-name="ce42" office:value-type="float" office:value="7" calcext:value-type="float">
            <text:p>MF-07</text:p>
          </table:table-cell>
          <table:table-cell table:style-name="ce79" office:value-type="float" office:value="298" calcext:value-type="float">
            <text:p>FR-298</text:p>
          </table:table-cell>
          <table:table-cell table:style-name="ce99" office:value-type="string" calcext:value-type="string">
            <text:p><text:s text:c="2"/>.attr.tags</text:p>
          </table:table-cell>
          <table:table-cell table:style-name="ce131" office:value-type="string" calcext:value-type="string">
            <text:p>BA shall not be able to input tags in the SHR desc.</text:p>
            <text:p>(We don't want the Tags &amp; custom-tag columns populated for RCGs)</text:p>
          </table:table-cell>
          <table:table-cell table:number-columns-repeated="2" table:style-name="ce172" office:value-type="date" office:date-value="2015-06-11" calcext:value-type="date">
            <text:p>11/06/15</text:p>
          </table:table-cell>
          <table:table-cell table:style-name="ce131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99" calcext:value-type="float">
            <text:p>FR-299</text:p>
          </table:table-cell>
          <table:table-cell table:style-name="ce90" office:value-type="string" calcext:value-type="string">
            <text:p><text:s text:c="2"/>.attr.issues</text:p>
          </table:table-cell>
          <table:table-cell table:style-name="ce115" office:value-type="string" calcext:value-type="string">
            <text:p>BA shall be able to input issues in the SHR desc.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token</text:p>
          </table:table-cell>
          <table:table-cell table:style-name="ce121" office:value-type="string" calcext:value-type="string">
            <text:p>Text Tokens</text:p>
          </table:table-cell>
          <table:table-cell table:style-name="ce173" table:number-columns-repeated="2"/>
          <table:table-cell table:style-name="ce186" office:value-type="string" calcext:value-type="string">
            <text:p>Is this really the best idea? [POSTPONED]</text:p>
          </table:table-cell>
          <table:table-cell table:style-name="ce193"/>
          <table:table-cell table:number-columns-repeated="2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7" calcext:value-type="float">
            <text:p>FR-157</text:p>
          </table:table-cell>
          <table:table-cell table:style-name="ce92" office:value-type="string" calcext:value-type="string">
            <text:p><text:s text:c="2"/>.create</text:p>
          </table:table-cell>
          <table:table-cell table:style-name="ce92" office:value-type="string" calcext:value-type="string">
            <text:p>BA shall be able to defin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3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8" calcext:value-type="float">
            <text:p>FR-158</text:p>
          </table:table-cell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9" calcext:value-type="float">
            <text:p>FR-159</text:p>
          </table:table-cell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0" calcext:value-type="float">
            <text:p>FR-160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1" calcext:value-type="float">
            <text:p>FR-16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BA shall be able to (hard) delet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2" calcext:value-type="float">
            <text:p>FR-16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ext-token deletion, BA shall be able to see a summary of usage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3" calcext:value-type="float">
            <text:p>FR-16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4" calcext:value-type="float">
            <text:p>FR-164</text:p>
          </table:table-cell>
          <table:table-cell table:style-name="ce90" office:value-type="string" calcext:value-type="string">
            <text:p><text:s text:c="2"/>.use</text:p>
          </table:table-cell>
          <table:table-cell table:style-name="ce92" office:value-type="string" calcext:value-type="string">
            <text:p>BA shall be able to insert text-tokens in req text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5" calcext:value-type="float">
            <text:p>FR-165</text:p>
          </table:table-cell>
          <table:table-cell table:style-name="ce90" office:value-type="string" calcext:value-type="string">
            <text:p><text:s text:c="4"/>.render</text:p>
          </table:table-cell>
          <table:table-cell table:style-name="ce115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6" calcext:value-type="float">
            <text:p>FR-166</text:p>
          </table:table-cell>
          <table:table-cell table:style-name="ce90" office:value-type="string" calcext:value-type="string">
            <text:p><text:s text:c="4"/>.edit</text:p>
          </table:table-cell>
          <table:table-cell table:style-name="ce115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8" office:value-type="float" office:value="13" calcext:value-type="float">
            <text:p>MF-13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3: Requirement Relationships</text:p>
          </table:table-cell>
          <table:table-cell table:style-name="ce114" table:number-columns-repeated="3"/>
          <table:table-cell table:number-columns-repeated="1016"/>
        </table:table-row>
        <table:table-row table:style-name="ro1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1" calcext:value-type="float">
            <text:p>FR-241</text:p>
          </table:table-cell>
          <table:table-cell table:style-name="ce88" office:value-type="string" calcext:value-type="string">
            <text:p>.browse-as-grouping</text:p>
          </table:table-cell>
          <table:table-cell table:style-name="ce11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6" calcext:value-type="float">
            <text:p>FR-206</text:p>
          </table:table-cell>
          <table:table-cell table:style-name="ce88" office:value-type="string" calcext:value-type="string">
            <text:p>.mandatory-bulkset</text:p>
          </table:table-cell>
          <table:table-cell table:style-name="ce115" office:value-type="string" calcext:value-type="string">
            <text:p>BA shall be able to specify all req-types requiring implication in a single action.</text:p>
            <text:p><text:span text:style-name="T8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68" office:value-type="date" office:date-value="2014-06-22" calcext:value-type="date">
            <text:p>2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5" calcext:value-type="float">
            <text:p>FR-205</text:p>
          </table:table-cell>
          <table:table-cell table:style-name="ce88" office:value-type="string" calcext:value-type="string">
            <text:p><text:s text:c="2"/>.mandatoryness</text:p>
          </table:table-cell>
          <table:table-cell table:style-name="ce115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9" calcext:value-type="float">
            <text:p>FR-199</text:p>
          </table:table-cell>
          <table:table-cell table:style-name="ce88" office:value-type="string" calcext:value-type="string">
            <text:p><text:s text:c="2"/>.sym</text:p>
          </table:table-cell>
          <table:table-cell table:style-name="ce131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00" calcext:value-type="float">
            <text:p>FR-200</text:p>
          </table:table-cell>
          <table:table-cell table:style-name="ce88" office:value-type="string" calcext:value-type="string">
            <text:p><text:s text:c="2"/>.trans</text:p>
          </table:table-cell>
          <table:table-cell table:style-name="ce131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72" calcext:value-type="float">
            <text:p>FR-272</text:p>
          </table:table-cell>
          <table:table-cell table:style-name="ce88" office:value-type="string" calcext:value-type="string">
            <text:p><text:s text:c="2"/>.subreq-trans</text:p>
          </table:table-cell>
          <table:table-cell table:style-name="ce117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0" calcext:value-type="float">
            <text:p>FR-210</text:p>
          </table:table-cell>
          <table:table-cell table:style-name="ce88" office:value-type="string" calcext:value-type="string">
            <text:p><text:s text:c="2"/>.prevent.refl</text:p>
          </table:table-cell>
          <table:table-cell table:style-name="ce115" office:value-type="string" calcext:value-type="string">
            <text:p>System shall prevent a req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1" calcext:value-type="float">
            <text:p>FR-211</text:p>
          </table:table-cell>
          <table:table-cell table:style-name="ce88" office:value-type="string" calcext:value-type="string">
            <text:p><text:s text:c="2"/>.prevent.cyclic</text:p>
          </table:table-cell>
          <table:table-cell table:style-name="ce115" office:value-type="string" calcext:value-type="string">
            <text:p>System shall prevent a req transitively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/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q</text:p>
          </table:table-cell>
          <table:table-cell table:style-name="ce121" office:value-type="string" calcext:value-type="string">
            <text:p>Req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04" calcext:value-type="float">
            <text:p>FR-204</text:p>
          </table:table-cell>
          <table:table-cell table:style-name="ce88" office:value-type="string" calcext:value-type="string">
            <text:p><text:s text:c="2"/>.new-auto</text:p>
          </table:table-cell>
          <table:table-cell table:style-name="ce115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7" calcext:value-type="float">
            <text:p>FR-197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8" calcext:value-type="float">
            <text:p>FR-198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9" calcext:value-type="float">
            <text:p>FR-209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req, BA shall be able to see reqs that imply i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8" calcext:value-type="float">
            <text:p>FR-208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req, BA shall be able to see reqs that it implie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3" calcext:value-type="float">
            <text:p>FR-213</text:p>
          </table:table-cell>
          <table:table-cell table:style-name="ce88" office:value-type="string" calcext:value-type="string">
            <text:p><text:s text:c="2"/>.view.del</text:p>
          </table:table-cell>
          <table:table-cell table:style-name="ce115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2" calcext:value-type="float">
            <text:p>FR-212</text:p>
          </table:table-cell>
          <table:table-cell table:style-name="ce88" office:value-type="string" calcext:value-type="string">
            <text:p><text:s text:c="2"/>.deletion</text:p>
          </table:table-cell>
          <table:table-cell table:style-name="ce115" office:value-type="string" calcext:value-type="string">
            <text:p>When a req is deleted, System shall retain its implication relationship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4" calcext:value-type="float">
            <text:p>FR-214</text:p>
          </table:table-cell>
          <table:table-cell table:style-name="ce88" office:value-type="string" calcext:value-type="string">
            <text:p><text:s text:c="5"/>.prompt-implied</text:p>
          </table:table-cell>
          <table:table-cell table:style-name="ce115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5" calcext:value-type="float">
            <text:p>FR-215</text:p>
          </table:table-cell>
          <table:table-cell table:style-name="ce88" office:value-type="string" calcext:value-type="string">
            <text:p><text:s text:c="5"/>.prompt-intersect</text:p>
          </table:table-cell>
          <table:table-cell table:style-name="ce115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82" calcext:value-type="float">
            <text:p>FR-282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6" calcext:value-type="float">
            <text:p>FR-216</text:p>
          </table:table-cell>
          <table:table-cell table:style-name="ce88" office:value-type="string" calcext:value-type="string">
            <text:p><text:s text:c="5"/>.select-implied</text:p>
          </table:table-cell>
          <table:table-cell table:style-name="ce115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7" calcext:value-type="float">
            <text:p>FR-217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81" calcext:value-type="float">
            <text:p>FR-28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8" calcext:value-type="float">
            <text:p>FR-218</text:p>
          </table:table-cell>
          <table:table-cell table:style-name="ce88" office:value-type="string" calcext:value-type="string">
            <text:p><text:s text:c="5"/>.cascade</text:p>
          </table:table-cell>
          <table:table-cell table:style-name="ce115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 office:value-type="float" office:value="1" calcext:value-type="float">
            <text:p>MF-01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uc-steps</text:p>
          </table:table-cell>
          <table:table-cell table:style-name="ce121" office:value-type="string" calcext:value-type="string">
            <text:p>UC Step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2" calcext:value-type="float">
            <text:p>FR-242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UC-step implies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3" calcext:value-type="float">
            <text:p>FR-243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UC-step is implied by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4" calcext:value-type="float">
            <text:p>FR-244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UC-step, BA shall be able to see reqs that imply it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5" calcext:value-type="float">
            <text:p>FR-245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UC-step, BA shall be able to see reqs that it implie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8" office:value-type="float" office:value="17" calcext:value-type="float">
            <text:p>MF-1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7: Auto-Save &amp; Undo</text:p>
          </table:table-cell>
          <table:table-cell table:style-name="ce114" table:number-columns-repeated="2"/>
          <table:table-cell table:style-name="ce187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8" calcext:value-type="float">
            <text:p>FR-278</text:p>
          </table:table-cell>
          <table:table-cell table:style-name="ce88" office:value-type="string" calcext:value-type="string">
            <text:p>.autosave</text:p>
          </table:table-cell>
          <table:table-cell table:style-name="ce115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9" calcext:value-type="float">
            <text:p>FR-279</text:p>
          </table:table-cell>
          <table:table-cell table:style-name="ce88" office:value-type="string" calcext:value-type="string">
            <text:p>.undo-reqs</text:p>
          </table:table-cell>
          <table:table-cell table:style-name="ce115" office:value-type="string" calcext:value-type="string">
            <text:p>User shall be able to undo any req-content change they mak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80" calcext:value-type="float">
            <text:p>FR-280</text:p>
          </table:table-cell>
          <table:table-cell table:style-name="ce88" office:value-type="string" calcext:value-type="string">
            <text:p>.redo</text:p>
          </table:table-cell>
          <table:table-cell table:style-name="ce115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4" table:number-columns-repeated="3"/>
          <table:table-cell table:style-name="ce100"/>
          <table:table-cell table:style-name="ce132" office:value-type="string" calcext:value-type="string">
            <text:p>Misc Requirements</text:p>
          </table:table-cell>
          <table:table-cell table:style-name="ce174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/>
          <table:table-cell table:style-name="ce69" office:value-type="float" office:value="24" calcext:value-type="float">
            <text:p>FR-24</text:p>
          </table:table-cell>
          <table:table-cell table:style-name="ce88" office:value-type="string" calcext:value-type="string">
            <text:p>readuc.tag.all</text:p>
          </table:table-cell>
          <table:table-cell table:style-name="ce117" office:value-type="string" calcext:value-type="string">
            <text:p>When reading a UC, the reader shall be able to see all ta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8" office:value-type="string" calcext:value-type="string">
            <text:p>shares.read.filter</text:p>
          </table:table-cell>
          <table:table-cell table:style-name="ce133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75" office:value-type="date" office:date-value="2014-02-07" calcext:value-type="date">
            <text:p>07/02/14</text:p>
          </table:table-cell>
          <table:table-cell table:style-name="ce249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248" calcext:value-type="float">
            <text:p>FR-248</text:p>
          </table:table-cell>
          <table:table-cell table:style-name="ce88" office:value-type="string" calcext:value-type="string">
            <text:p>changelog</text:p>
          </table:table-cell>
          <table:table-cell table:style-name="ce117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68" office:value-type="date" office:date-value="2014-06-06" calcext:value-type="date">
            <text:p>06/06/14</text:p>
          </table:table-cell>
          <table:table-cell table:style-name="ce249"/>
          <table:table-cell table:number-columns-repeated="1016"/>
        </table:table-row>
        <table:table-row table:style-name="ro3">
          <table:table-cell table:number-columns-repeated="3" table:style-name="ce48" office:value-type="string" calcext:value-type="string">
            <text:p>-</text:p>
          </table:table-cell>
          <table:table-cell table:style-name="ce101" office:value-type="string" calcext:value-type="string">
            <text:p>.filter</text:p>
          </table:table-cell>
          <table:table-cell table:style-name="ce118" office:value-type="string" calcext:value-type="string">
            <text:p>Filtering</text:p>
            <text:p><text:span text:style-name="T4">Where filters are applicable...</text:span></text:p>
          </table:table-cell>
          <table:table-cell table:style-name="ce118" table:number-columns-repeated="3"/>
          <table:table-cell table:number-columns-repeated="1016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39"/>
          <table:table-cell table:style-name="ce69" office:value-type="float" office:value="51" calcext:value-type="float">
            <text:p>FR-51</text:p>
          </table:table-cell>
          <table:table-cell table:style-name="ce88" office:value-type="string" calcext:value-type="string">
            <text:p><text:s text:c="2"/>.inc-type</text:p>
          </table:table-cell>
          <table:table-cell table:style-name="ce117" office:value-type="string" calcext:value-type="string">
            <text:p>BA shall be able to filter by issue type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112" calcext:value-type="float">
            <text:p>FR-112</text:p>
          </table:table-cell>
          <table:table-cell table:style-name="ce88" office:value-type="string" calcext:value-type="string">
            <text:p><text:s text:c="2"/>.req-type</text:p>
          </table:table-cell>
          <table:table-cell table:style-name="ce117" office:value-type="string" calcext:value-type="string">
            <text:p>BA shall be able to filter by requirement type(s). (Excludes subreq-types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271" calcext:value-type="float">
            <text:p>FR-27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01" calcext:value-type="float">
            <text:p>FR-201</text:p>
          </table:table-cell>
          <table:table-cell table:style-name="ce88" office:value-type="string" calcext:value-type="string">
            <text:p><text:s text:c="2"/>.implied</text:p>
          </table:table-cell>
          <table:table-cell table:style-name="ce115" office:value-type="string" calcext:value-type="string">
            <text:p>BA shall be able to filter by implying req(s)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73" calcext:value-type="float">
            <text:p>FR-273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50" calcext:value-type="float">
            <text:p>FR-50</text:p>
          </table:table-cell>
          <table:table-cell table:style-name="ce88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filter by tag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70" calcext:value-type="float">
            <text:p>FR-270</text:p>
          </table:table-cell>
          <table:table-cell table:style-name="ce88" office:value-type="string" calcext:value-type="string">
            <text:p><text:s text:c="4"/>.trans</text:p>
          </table:table-cell>
          <table:table-cell table:style-name="ce117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8" calcext:value-type="float">
            <text:p>FR-28</text:p>
          </table:table-cell>
          <table:table-cell table:style-name="ce88" office:value-type="string" calcext:value-type="string">
            <text:p><text:s text:c="4"/>.not</text:p>
          </table:table-cell>
          <table:table-cell table:style-name="ce117" office:value-type="string" calcext:value-type="string">
            <text:p>When specifying a grouping filter, User shall be able to specify NOT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9" calcext:value-type="float">
            <text:p>FR-29</text:p>
          </table:table-cell>
          <table:table-cell table:style-name="ce88" office:value-type="string" calcext:value-type="string">
            <text:p><text:s text:c="4"/>.and</text:p>
          </table:table-cell>
          <table:table-cell table:style-name="ce117" office:value-type="string" calcext:value-type="string">
            <text:p>When specifying a grouping filter, User shall be able to specify AND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0" calcext:value-type="float">
            <text:p>FR-30</text:p>
          </table:table-cell>
          <table:table-cell table:style-name="ce88" office:value-type="string" calcext:value-type="string">
            <text:p><text:s text:c="4"/>.or</text:p>
          </table:table-cell>
          <table:table-cell table:style-name="ce117" office:value-type="string" calcext:value-type="string">
            <text:p>When specifying a grouping filter, User shall be able to specify OR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8" calcext:value-type="float">
            <text:p>FR-88</text:p>
          </table:table-cell>
          <table:table-cell table:style-name="ce88" office:value-type="string" calcext:value-type="string">
            <text:p><text:s text:c="2"/>.txt</text:p>
          </table:table-cell>
          <table:table-cell table:style-name="ce115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number-columns-repeated="2"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revnum</text:p>
          </table:table-cell>
          <table:table-cell table:style-name="ce121" office:value-type="string" calcext:value-type="string">
            <text:p>Revision number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6" calcext:value-type="float">
            <text:p>FR-26</text:p>
          </table:table-cell>
          <table:table-cell table:style-name="ce88" office:value-type="string" calcext:value-type="string">
            <text:p><text:s text:c="2"/>.if</text:p>
          </table:table-cell>
          <table:table-cell table:style-name="ce117" office:value-type="string" calcext:value-type="string">
            <text:p>System shall increment the revision number of a requirement anytime <text:span text:style-name="T3">any</text:span><text:span text:style-name="T10"> user-observable change occurs, including field ordering changes, grouping renames, etc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" calcext:value-type="float">
            <text:p>FR-27</text:p>
          </table:table-cell>
          <table:table-cell table:style-name="ce88" office:value-type="string" calcext:value-type="string">
            <text:p><text:s text:c="2"/>.onlyif</text:p>
          </table:table-cell>
          <table:table-cell table:style-name="ce117" office:value-type="string" calcext:value-type="string">
            <text:p>System should preserve the revision number of a requirement when there is no <text:span text:style-name="T10">user-observable change between revisions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5" calcext:value-type="float">
            <text:p>FR-75</text:p>
          </table:table-cell>
          <table:table-cell table:style-name="ce88" office:value-type="string" calcext:value-type="string">
            <text:p><text:s text:c="2"/>.major</text:p>
          </table:table-cell>
          <table:table-cell table:style-name="ce117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6" calcext:value-type="float">
            <text:p>FR-76</text:p>
          </table:table-cell>
          <table:table-cell table:style-name="ce88" office:value-type="string" calcext:value-type="string">
            <text:p><text:s text:c="2"/>.minor</text:p>
          </table:table-cell>
          <table:table-cell table:style-name="ce11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3"/>
          <table:table-cell table:style-name="ce62" table:number-columns-repeated="2"/>
          <table:table-cell table:style-name="ce102"/>
          <table:table-cell table:style-name="ce134" office:value-type="string" calcext:value-type="string">
            <text:p>Deleted or Deferred Requirements</text:p>
          </table:table-cell>
          <table:table-cell table:style-name="ce176" table:number-columns-repeated="3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3" office:value-type="string" calcext:value-type="string">
            <text:p><text:s text:c="2"/>.count</text:p>
          </table:table-cell>
          <table:table-cell table:style-name="ce249" office:value-type="string" calcext:value-type="string">
            <text:p>System shall display the number of reqs associated with each grouping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3" office:value-type="string" calcext:value-type="string">
            <text:p><text:s text:c="2"/>.missing</text:p>
          </table:table-cell>
          <table:table-cell table:style-name="ce249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3" office:value-type="string" calcext:value-type="string">
            <text:p><text:s text:c="2"/>.read-ucs</text:p>
          </table:table-cell>
          <table:table-cell table:style-name="ce249" office:value-type="string" calcext:value-type="string">
            <text:p>BA shall be able to read all UC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3" office:value-type="string" calcext:value-type="string">
            <text:p><text:s text:c="2"/>.read-steps</text:p>
          </table:table-cell>
          <table:table-cell table:style-name="ce249" office:value-type="string" calcext:value-type="string">
            <text:p>BA shall be able to read all UC step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3" office:value-type="string" calcext:value-type="string">
            <text:p><text:s text:c="4"/>.shares</text:p>
          </table:table-cell>
          <table:table-cell table:style-name="ce249" office:value-type="string" calcext:value-type="string">
            <text:p>BA shall be able to filter shares' UC selection criteria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20" calcext:value-type="float">
            <text:p>FR-20</text:p>
          </table:table-cell>
          <table:table-cell table:style-name="ce103" office:value-type="string" calcext:value-type="string">
            <text:p><text:s text:c="4"/>.readown</text:p>
          </table:table-cell>
          <table:table-cell table:style-name="ce249" office:value-type="string" calcext:value-type="string">
            <text:p>When reading own UCs, BA shall be able to filter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12" calcext:value-type="float">
            <text:p>FR-12</text:p>
          </table:table-cell>
          <table:table-cell table:style-name="ce103" office:value-type="string" calcext:value-type="string">
            <text:p><text:s text:c="4"/>.uc-list</text:p>
          </table:table-cell>
          <table:table-cell table:style-name="ce249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3" office:value-type="string" calcext:value-type="string">
            <text:p><text:s text:c="4"/>.add</text:p>
          </table:table-cell>
          <table:table-cell table:style-name="ce250" office:value-type="string" calcext:value-type="string">
            <text:p>BA shall be able to apply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250" office:value-type="string" calcext:value-type="string">
            <text:p>BA shall be able to remove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UCs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UC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250" office:value-type="string" calcext:value-type="string">
            <text:p>BA shall be able to copy a field set from another project.</text:p>
          </table:table-cell>
          <table:table-cell table:number-columns-repeated="2" table:style-name="ce175" office:value-type="date" office:date-value="2014-05-19" calcext:value-type="date">
            <text:p>19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3" office:value-type="string" calcext:value-type="string">
            <text:p><text:s text:c="4"/>.discards</text:p>
          </table:table-cell>
          <table:table-cell table:style-name="ce25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75" office:value-type="date" office:date-value="2014-02-25" calcext:value-type="date">
            <text:p>25/02/14</text:p>
          </table:table-cell>
          <table:table-cell table:style-name="ce250"/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249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75" office:value-type="date" office:date-value="2014-02-12" calcext:value-type="date">
            <text:p>12/02/14</text:p>
          </table:table-cell>
          <table:table-cell table:style-name="ce249"/>
          <table:table-cell table:number-columns-repeated="1016"/>
        </table:table-row>
        <table:table-row table:style-name="ro8">
          <table:table-cell table:style-name="ce45" office:value-type="float" office:value="6" calcext:value-type="float">
            <text:p>MF-06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3" office:value-type="string" calcext:value-type="string">
            <text:p><text:s text:c="2"/>.refs</text:p>
          </table:table-cell>
          <table:table-cell table:style-name="ce249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250"/>
          <table:table-cell table:number-columns-repeated="1016"/>
        </table:table-row>
        <table:table-row table:style-name="ro10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3"/>
          <table:table-cell table:style-name="ce24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3" office:value-type="string" calcext:value-type="string">
            <text:p><text:s text:c="4"/>.copy</text:p>
          </table:table-cell>
          <table:table-cell table:style-name="ce250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55" office:value-type="float" office:value="13" calcext:value-type="float">
            <text:p>MF-13</text:p>
          </table:table-cell>
          <table:table-cell table:style-name="ce55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7"/>
          <table:table-cell table:style-name="ce252" office:value-type="string" calcext:value-type="string">
            <text:p>When viewing incompletion results, BA shall be able to filter by implying req(s).</text:p>
            <text:p><text:span text:style-name="T8">eg. filter reqs implied by MF-12 shows FR-4 if MF-12⇒UC-4⇒FR-4.</text:span></text:p>
          </table:table-cell>
          <table:table-cell table:number-columns-repeated="2" table:style-name="ce178" office:value-type="date" office:date-value="2014-06-02" calcext:value-type="date">
            <text:p>02/06/14</text:p>
          </table:table-cell>
          <table:table-cell table:style-name="ce252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40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number-columns-repeated="2" table:style-name="ce179" office:value-type="date" office:date-value="2014-05-12" calcext:value-type="date">
            <text:p>12/05/14</text:p>
          </table:table-cell>
          <table:table-cell table:style-name="ce164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1" office:value-type="string" calcext:value-type="string">
            <text:p>System shall display UCs as rows in the req view.</text:p>
          </table:table-cell>
          <table:table-cell table:number-columns-repeated="2" table:style-name="ce179" office:value-type="date" office:date-value="2014-05-22" calcext:value-type="date">
            <text:p>22/05/14</text:p>
          </table:table-cell>
          <table:table-cell table:style-name="ce161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2" office:value-type="string" calcext:value-type="string">
            <text:p>Modifying an LL-req field set</text:p>
          </table:table-cell>
          <table:table-cell table:style-name="ce162" table:number-columns-repeated="2"/>
          <table:table-cell table:style-name="ce189" office:value-type="string" calcext:value-type="string" table:number-columns-spanned="1" table:number-rows-spanned="12">
            <text:p><text:span text:style-name="T11">analysis-intersections.ods:</text:span></text:p>
            <text:p><text:span text:style-name="T11">Why should custom fields be separated by (UC ∨ ¬UC)? How about just ordered list of fields, each has “Applies to req-types” attr.</text:span></text:p>
            <text:p><text:span text:style-name="T11">Field : Grouping ⇔ ReqType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252" office:value-type="string" calcext:value-type="string">
            <text:p>BA shall be able to see a list of all existing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252" office:value-type="string" calcext:value-type="string">
            <text:p>BA shall be able to ad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252" office:value-type="string" calcext:value-type="string">
            <text:p>BA shall be able to modify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252" office:value-type="string" calcext:value-type="string">
            <text:p>BA shall be able to reorder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252" office:value-type="string" calcext:value-type="string">
            <text:p>BA shall be able to (soft) delete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256" office:value-type="string" calcext:value-type="string">
            <text:p>System shall indicate how many LL-reqs have content for each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256" office:value-type="string" calcext:value-type="string">
            <text:p>BA shall be able to see each instance of content for an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252" office:value-type="string" calcext:value-type="string">
            <text:p>When (soft) deleting an LL-req field, System shall move it to the bin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252" office:value-type="string" calcext:value-type="string">
            <text:p>BA shall be able to restore delete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252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252" office:value-type="string" calcext:value-type="string">
            <text:p>BA shall be able to specify mandatory-ness of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8" office:value-type="string" calcext:value-type="string">
            <text:p><text:s text:c="4"/>.grouping</text:p>
          </table:table-cell>
          <table:table-cell table:style-name="ce161" office:value-type="string" calcext:value-type="string">
            <text:p>BA shall be able to filter view of reqs by grouping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8" office:value-type="string" calcext:value-type="string">
            <text:p><text:s text:c="4"/>.reqtype</text:p>
          </table:table-cell>
          <table:table-cell table:style-name="ce161" office:value-type="string" calcext:value-type="string">
            <text:p>BA shall be able to filter view of reqs by req-type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196" calcext:value-type="float">
            <text:p>FR-196</text:p>
          </table:table-cell>
          <table:table-cell table:style-name="ce108" office:value-type="string" calcext:value-type="string">
            <text:p><text:s text:c="4"/>.warn</text:p>
          </table:table-cell>
          <table:table-cell table:style-name="ce164" office:value-type="string" calcext:value-type="string">
            <text:p>If there are associations, System shall warn the user that they will be <text:span text:style-name="T3">permanently</text:span> deleted.</text:p>
          </table:table-cell>
          <table:table-cell table:number-columns-repeated="2" table:style-name="ce179" office:value-type="date" office:date-value="2014-06-10" calcext:value-type="date">
            <text:p>10/06/14</text:p>
          </table:table-cell>
          <table:table-cell table:style-name="ce164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56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84" office:value-type="float" office:value="277" calcext:value-type="float">
            <text:p>FR-277</text:p>
          </table:table-cell>
          <table:table-cell table:style-name="ce108" office:value-type="string" calcext:value-type="string">
            <text:p><text:s text:c="2"/>.extract</text:p>
          </table:table-cell>
          <table:table-cell table:style-name="ce164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79" office:value-type="date" office:date-value="2014-07-03" calcext:value-type="date">
            <text:p>03/07/14</text:p>
          </table:table-cell>
          <table:table-cell table:style-name="ce179" office:value-type="date" office:date-value="2015-04-23" calcext:value-type="date">
            <text:p>23/04/15</text:p>
          </table:table-cell>
          <table:table-cell table:style-name="ce164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4">
          <table:table-cell table:style-name="ce57" office:value-type="float" office:value="7" calcext:value-type="float">
            <text:p>MF-07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300" calcext:value-type="float">
            <text:p>FR-300</text:p>
          </table:table-cell>
          <table:table-cell table:style-name="ce111" office:value-type="string" calcext:value-type="string">
            <text:p>tags.trans.shr</text:p>
          </table:table-cell>
          <table:table-cell table:style-name="ce165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80" office:value-type="date" office:date-value="2015-06-11" calcext:value-type="date">
            <text:p>11/06/15</text:p>
          </table:table-cell>
          <table:table-cell table:style-name="ce190" office:value-type="string" calcext:value-type="string">
            <text:p>Rejected due to FR-298</text:p>
            <text:p/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65" calcext:value-type="float">
            <text:p>FR-265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249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table-cell table:style-name="ce249" office:value-type="string" calcext:value-type="string" table:number-columns-spanned="1" table:number-rows-spanned="10">
            <text:p>Rejected after analysis-deletion</text:p>
          </table:table-cell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88" calcext:value-type="float">
            <text:p>FR-2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8" calcext:value-type="float">
            <text:p>FR-1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9" calcext:value-type="float">
            <text:p>FR-189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249" office:value-type="string" calcext:value-type="string">
            <text:p>Upon tag deletion, System shall move it to the bin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45" office:value-type="string" calcext:value-type="string">
            <text:p>MF-05</text:p>
            <text:p>MF-07</text:p>
          </table:table-cell>
          <table:table-cell table:style-name="ce81" office:value-type="float" office:value="33" calcext:value-type="float">
            <text:p>FR-33</text:p>
          </table:table-cell>
          <table:table-cell table:style-name="ce103" office:value-type="string" calcext:value-type="string">
            <text:p><text:s text:c="4"/>.field.no-tag</text:p>
          </table:table-cell>
          <table:table-cell table:style-name="ce249" office:value-type="string" calcext:value-type="string">
            <text:p>When a tag is deleted, a field based on it should be flagged as an issue.</text:p>
          </table:table-cell>
          <table:table-cell table:style-name="ce175" office:value-type="date" office:date-value="2014-06-09" calcext:value-type="date">
            <text:p>09/06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3" calcext:value-type="float">
            <text:p>FR-123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249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4" calcext:value-type="float">
            <text:p>FR-124</text:p>
          </table:table-cell>
          <table:table-cell table:style-name="ce112" office:value-type="string" calcext:value-type="string">
            <text:p><text:s text:c="4"/>.after</text:p>
          </table:table-cell>
          <table:table-cell table:style-name="ce249" office:value-type="string" calcext:value-type="string">
            <text:p>After soft-deletion, req types should move to the bi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0" calcext:value-type="float">
            <text:p>FR-180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66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1" calcext:value-type="float">
            <text:p>FR-181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66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2" calcext:value-type="float">
            <text:p>FR-182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249" office:value-type="string" calcext:value-type="string">
            <text:p>After LL-req deletion, System shall move entity to the bin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4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01" calcext:value-type="float">
            <text:p>FR-301</text:p>
          </table:table-cell>
          <table:table-cell table:style-name="ce103" office:value-type="string" calcext:value-type="string">
            <text:p><text:s text:c="4"/>.prevent</text:p>
          </table:table-cell>
          <table:table-cell table:style-name="ce249" office:value-type="string" calcext:value-type="string">
            <text:p>BA shall be unable to delete a custom issue type that is in use.</text:p>
          </table:table-cell>
          <table:table-cell table:number-columns-repeated="2" table:style-name="ce175" office:value-type="date" office:date-value="2015-09-10" calcext:value-type="date">
            <text:p>10/09/15</text:p>
          </table:table-cell>
          <table:table-cell table:style-name="ce249" office:value-type="string" calcext:value-type="string">
            <text:p>Soft deletion required.</text:p>
          </table:table-cell>
          <table:table-cell table:style-name="ce113" table:number-columns-repeated="7"/>
          <table:table-cell table:number-columns-repeated="1009"/>
        </table:table-row>
        <table:table-row table:style-name="ro6">
          <table:table-cell table:style-name="ce19" office:value-type="float" office:value="6" calcext:value-type="float">
            <text:p>MF-06</text:p>
          </table:table-cell>
          <table:table-cell table:style-name="ce29" office:value-type="string" calcext:value-type="string">
            <text:p>-</text:p>
          </table:table-cell>
          <table:table-cell table:style-name="ce135" office:value-type="float" office:value="54" calcext:value-type="float">
            <text:p>FR-54</text:p>
          </table:table-cell>
          <table:table-cell table:style-name="ce226" office:value-type="string" calcext:value-type="string">
            <text:p><text:s text:c="4"/>.ref.invalid</text:p>
          </table:table-cell>
          <table:table-cell table:style-name="ce260" office:value-type="string" calcext:value-type="string">
            <text:p>System shall track invalid refs as issues.</text:p>
          </table:table-cell>
          <table:table-cell table:style-name="ce275" office:value-type="date" office:date-value="2014-05-16" calcext:value-type="date">
            <text:p>16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There’s no such thing as invalid refs. Parser doesn’t allow.</text:p>
          </table:table-cell>
          <table:table-cell table:style-name="ce292" table:number-columns-repeated="2"/>
          <table:table-cell table:style-name="ce296"/>
          <table:table-cell table:style-name="ce292" table:number-columns-repeated="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MF-06</text:p>
          </table:table-cell>
          <table:table-cell table:style-name="ce29" office:value-type="string" calcext:value-type="string">
            <text:p>-</text:p>
          </table:table-cell>
          <table:table-cell table:style-name="ce135" office:value-type="float" office:value="55" calcext:value-type="float">
            <text:p>FR-55</text:p>
          </table:table-cell>
          <table:table-cell table:style-name="ce226" office:value-type="string" calcext:value-type="string">
            <text:p><text:s text:c="4"/>.ref.deleted</text:p>
          </table:table-cell>
          <table:table-cell table:style-name="ce260" office:value-type="string" calcext:value-type="string">
            <text:p>System shall track [DELETED] refs as issues.</text:p>
          </table:table-cell>
          <table:table-cell table:style-name="ce275" office:value-type="date" office:date-value="2014-05-16" calcext:value-type="date">
            <text:p>16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Superseded by FR-316</text:p>
          </table:table-cell>
          <table:table-cell table:number-columns-repeated="1016"/>
        </table:table-row>
        <table:table-row table:style-name="ro8">
          <table:table-cell table:style-name="ce19" office:value-type="float" office:value="6" calcext:value-type="float">
            <text:p>MF-06</text:p>
          </table:table-cell>
          <table:table-cell table:style-name="ce19" office:value-type="float" office:value="7" calcext:value-type="float">
            <text:p>MF-07</text:p>
          </table:table-cell>
          <table:table-cell table:style-name="ce135" office:value-type="float" office:value="74" calcext:value-type="float">
            <text:p>FR-74</text:p>
          </table:table-cell>
          <table:table-cell table:style-name="ce226" office:value-type="string" calcext:value-type="string">
            <text:p><text:s text:c="4"/>.tag.missing</text:p>
          </table:table-cell>
          <table:table-cell table:style-name="ce260" office:value-type="string" calcext:value-type="string">
            <text:p>BA shall be able to track missing tag (MF-07) by making a tag field (FR-46) mandatory.</text:p>
            <text:p>Example: UC missing priority should be an issue.</text:p>
          </table:table-cell>
          <table:table-cell table:style-name="ce275" office:value-type="date" office:date-value="2014-05-12" calcext:value-type="date">
            <text:p>12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Covered by FR-53</text:p>
          </table:table-cell>
          <table:table-cell table:number-columns-repeated="1016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167"/>
        <table:table-column table:style-name="co21" table:default-cell-style-name="ce58"/>
        <table:table-column table:style-name="co22" table:default-cell-style-name="ce113"/>
        <table:table-column table:style-name="co15" table:number-columns-repeated="1017" table:default-cell-style-name="ce113"/>
        <table:table-row table:style-name="ro1">
          <table:table-cell table:style-name="ce37" office:value-type="string" calcext:value-type="string">
            <text:p>MF</text:p>
          </table:table-cell>
          <table:table-cell table:style-name="ce37" office:value-type="string" calcext:value-type="string">
            <text:p>MF-β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#</text:p>
          </table:table-cell>
          <table:table-cell table:style-name="ce142" office:value-type="string" calcext:value-type="string">
            <text:p>REQUIREMENT</text:p>
          </table:table-cell>
          <table:table-cell table:style-name="ce37" office:value-type="string" calcext:value-type="string">
            <text:p>LAST UPDATED</text:p>
          </table:table-cell>
          <table:table-cell table:style-name="ce37" office:value-type="string" calcext:value-type="string">
            <text:p>TODO</text:p>
          </table:table-cell>
          <table:table-cell table:style-name="ce199"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All use cases in a project share the same field-set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2" calcext:value-type="float">
            <text:p>2</text:p>
          </table:table-cell>
          <table:table-cell table:style-name="ce117" office:value-type="string" calcext:value-type="string">
            <text:p>A field-set cannot contain more than 30 fields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3" calcext:value-type="float">
            <text:p>3</text:p>
          </table:table-cell>
          <table:table-cell table:style-name="ce117" office:value-type="string" calcext:value-type="string">
            <text:p>Each field name in a field-set must be unique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46" office:value-type="string" calcext:value-type="string">
            <text:p>-</text:p>
          </table:table-cell>
          <table:table-cell table:style-name="ce141" office:value-type="float" office:value="7" calcext:value-type="float">
            <text:p>MF-07</text:p>
          </table:table-cell>
          <table:table-cell table:style-name="ce46" office:value-type="string" calcext:value-type="string">
            <text:p>BR</text:p>
          </table:table-cell>
          <table:table-cell table:style-name="ce46" office:value-type="float" office:value="4" calcext:value-type="float">
            <text:p>4</text:p>
          </table:table-cell>
          <table:table-cell table:style-name="ce11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5" calcext:value-type="float">
            <text:p>5</text:p>
          </table:table-cell>
          <table:table-cell table:style-name="ce11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6" calcext:value-type="float">
            <text:p>6</text:p>
          </table:table-cell>
          <table:table-cell table:style-name="ce117" office:value-type="string" calcext:value-type="string">
            <text:p>BA shall not be able to remove NC/AC/EC fields from a field-set.</text:p>
          </table:table-cell>
          <table:table-cell table:style-name="ce168" office:value-type="date" office:date-value="2014-02-25" calcext:value-type="date">
            <text:p>25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46" office:value-type="string" calcext:value-type="string">
            <text:p>BR</text:p>
          </table:table-cell>
          <table:table-cell table:style-name="ce46" office:value-type="float" office:value="7" calcext:value-type="float">
            <text:p>7</text:p>
          </table:table-cell>
          <table:table-cell table:style-name="ce117" office:value-type="string" calcext:value-type="string">
            <text:p>Do not allow copy&amp;paste of UCs. (FR-172)</text:p>
          </table:table-cell>
          <table:table-cell table:style-name="ce168"/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H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Groupings may later be split into types: {key,value} instead of unityped with an unapplicability flag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88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A field-set cannot be empty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2" calcext:value-type="float">
            <text:p>2</text:p>
          </table:table-cell>
          <table:table-cell table:style-name="ce117" office:value-type="string" calcext:value-type="string">
            <text:p>Grouping names may be unique per project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3" calcext:value-type="float">
            <text:p>3</text:p>
          </table:table-cell>
          <table:table-cell table:style-name="ce115" office:value-type="string" calcext:value-type="string">
            <text:p>Grouping names must not exceed 60 characters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6" calcext:value-type="float">
            <text:p>MF-06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4" calcext:value-type="float">
            <text:p>4</text:p>
          </table:table-cell>
          <table:table-cell table:style-name="ce115" office:value-type="string" calcext:value-type="string">
            <text:p>When viewing multiple incompletions, the user shall be able to comprehend each item without leaving the p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5" calcext:value-type="float">
            <text:p>5</text:p>
          </table:table-cell>
          <table:table-cell table:style-name="ce11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88"/>
          <table:table-cell table:number-columns-repeated="1017"/>
        </table:table-row>
        <table:table-row table:style-name="ro17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6" calcext:value-type="float">
            <text:p>6</text:p>
          </table:table-cell>
          <table:table-cell table:style-name="ce14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Groupings have a name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" calcext:value-type="float">
            <text:p>2</text:p>
          </table:table-cell>
          <table:table-cell table:style-name="ce115" office:value-type="string" calcext:value-type="string">
            <text:p>Groupings have a description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3" calcext:value-type="float">
            <text:p>3</text:p>
          </table:table-cell>
          <table:table-cell table:style-name="ce117" office:value-type="string" calcext:value-type="string">
            <text:p>Groupings can have 0:<text:span text:style-name="T10">n children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4" calcext:value-type="float">
            <text:p>4</text:p>
          </table:table-cell>
          <table:table-cell table:style-name="ce117" office:value-type="string" calcext:value-type="string">
            <text:p>Groupings can have 0:<text:span text:style-name="T10">n parents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5" calcext:value-type="float">
            <text:p>5</text:p>
          </table:table-cell>
          <table:table-cell table:style-name="ce117" office:value-type="string" calcext:value-type="string">
            <text:p>Requirement type has a unique nam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6" calcext:value-type="float">
            <text:p>6</text:p>
          </table:table-cell>
          <table:table-cell table:style-name="ce117" office:value-type="string" calcext:value-type="string">
            <text:p>Requirement type has a unique mnemonic matching /^[A-Z]{1,4}$/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7" calcext:value-type="float">
            <text:p>7</text:p>
          </table:table-cell>
          <table:table-cell table:style-name="ce117" office:value-type="string" calcext:value-type="string">
            <text:p>Semantic Header Rows shall have exactly one semant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8" calcext:value-type="float">
            <text:p>8</text:p>
          </table:table-cell>
          <table:table-cell table:style-name="ce117" office:value-type="string" calcext:value-type="string">
            <text:p>Semantic Header Rows shall not have a numer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9" calcext:value-type="float">
            <text:p>9</text:p>
          </table:table-cell>
          <table:table-cell table:style-name="ce117" office:value-type="string" calcext:value-type="string">
            <text:p>Semantic Header Rows shall not have a user-defined req-type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5" calcext:value-type="float">
            <text:p>MF-05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0" calcext:value-type="float">
            <text:p>10</text:p>
          </table:table-cell>
          <table:table-cell table:style-name="ce117" office:value-type="string" calcext:value-type="string">
            <text:p>Semantic Header Rows shall not have values for custom field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7" calcext:value-type="float">
            <text:p>MF-07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1" calcext:value-type="float">
            <text:p>11</text:p>
          </table:table-cell>
          <table:table-cell table:style-name="ce117" office:value-type="string" calcext:value-type="string">
            <text:p>Semantic Header Rows shall not have grouping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2" calcext:value-type="float">
            <text:p>12</text:p>
          </table:table-cell>
          <table:table-cell table:style-name="ce117" office:value-type="string" calcext:value-type="string">
            <text:p>Text token keys conform to /^[a-z]+(\.[a-z]+)*$/i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3" calcext:value-type="float">
            <text:p>13</text:p>
          </table:table-cell>
          <table:table-cell table:style-name="ce117" office:value-type="string" calcext:value-type="string">
            <text:p>Text token keys are unique per projec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4" calcext:value-type="float">
            <text:p>14</text:p>
          </table:table-cell>
          <table:table-cell table:style-name="ce117" office:value-type="string" calcext:value-type="string">
            <text:p>Text token values are tex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5" calcext:value-type="float">
            <text:p>15</text:p>
          </table:table-cell>
          <table:table-cell table:style-name="ce117" office:value-type="string" calcext:value-type="string">
            <text:p>Semantic-IDs are unique per projec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6" calcext:value-type="float">
            <text:p>16</text:p>
          </table:table-cell>
          <table:table-cell table:style-name="ce117" office:value-type="string" calcext:value-type="string">
            <text:p>Applicable groupings have a refkey, a string that can be used with a hashtag to apply the grouping in text.</text:p>
          </table:table-cell>
          <table:table-cell table:style-name="ce168" office:value-type="date" office:date-value="2014-07-03" calcext:value-type="date">
            <text:p>03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7" calcext:value-type="float">
            <text:p>17</text:p>
          </table:table-cell>
          <table:table-cell table:style-name="ce117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8" calcext:value-type="float">
            <text:p>18</text:p>
          </table:table-cell>
          <table:table-cell table:style-name="ce117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9" calcext:value-type="float">
            <text:p>19</text:p>
          </table:table-cell>
          <table:table-cell table:style-name="ce117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0" calcext:value-type="float">
            <text:p>20</text:p>
          </table:table-cell>
          <table:table-cell table:style-name="ce117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0">
          <table:table-cell table:style-name="ce141" office:value-type="string" calcext:value-type="string">
            <text:p>MF-05</text:p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1" calcext:value-type="float">
            <text:p>21</text:p>
          </table:table-cell>
          <table:table-cell table:style-name="ce117" office:value-type="string" calcext:value-type="string">
            <text:p>Refkeys must be case-insensitive.</text:p>
            <text:p>eg. #HELLO should match #Hello</text:p>
          </table:table-cell>
          <table:table-cell table:style-name="ce168" office:value-type="date" office:date-value="2015-01-03" calcext:value-type="date">
            <text:p>03/01/15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User must be able to organise 100 flat reqs of same type into 5 versions in under 5 minutes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2" calcext:value-type="float">
            <text:p>2</text:p>
          </table:table-cell>
          <table:table-cell table:style-name="ce11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3" calcext:value-type="float">
            <text:p>3</text:p>
          </table:table-cell>
          <table:table-cell table:style-name="ce144" office:value-type="string" calcext:value-type="string">
            <text:p>BA shall be able to go from LL-req editor to a view of all LL-req incompletions in a single actio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4" calcext:value-type="float">
            <text:p>4</text:p>
          </table:table-cell>
          <table:table-cell table:style-name="ce144" office:value-type="string" calcext:value-type="string">
            <text:p>BA shall be able to go from a view of all LL-req incompletions to LL-req editor in a single actio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5" calcext:value-type="float">
            <text:p>5</text:p>
          </table:table-cell>
          <table:table-cell table:style-name="ce14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MF-1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6" calcext:value-type="float">
            <text:p>6</text:p>
          </table:table-cell>
          <table:table-cell table:style-name="ce144" office:value-type="string" calcext:value-type="string">
            <text:p>In the event of server or client failure, a user shouldn't lose more than 2 minutes of work.</text:p>
          </table:table-cell>
          <table:table-cell table:style-name="ce168" office:value-type="date" office:date-value="2014-07-03" calcext:value-type="date">
            <text:p>03/07/14</text:p>
          </table:table-cell>
          <table:table-cell table:style-name="ce88" office:value-type="string" calcext:value-type="string">
            <text:p>2min = arbitrary.</text:p>
          </table:table-cell>
          <table:table-cell table:number-columns-repeated="1017"/>
        </table:table-row>
        <table:table-row table:style-name="ro15">
          <table:table-cell table:style-name="ce141" office:value-type="float" office:value="13" calcext:value-type="float">
            <text:p>MF-13</text:p>
          </table:table-cell>
          <table:table-cell table:style-name="ce141"/>
          <table:table-cell table:style-name="ce46" office:value-type="string" calcext:value-type="string">
            <text:p>SI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[FR-204] BA shall be able to specify a (transitive) template from which all newly created reqs inheri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UC</text:p>
          </table:table-cell>
          <table:table-cell table:style-name="ce46" office:value-type="float" office:value="9" calcext:value-type="float">
            <text:p>9</text:p>
          </table:table-cell>
          <table:table-cell table:style-name="ce117" office:value-type="string" calcext:value-type="string">
            <text:p>Modify a Project's Fields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UC</text:p>
          </table:table-cell>
          <table:table-cell table:style-name="ce46" office:value-type="float" office:value="10" calcext:value-type="float">
            <text:p>10</text:p>
          </table:table-cell>
          <table:table-cell table:style-name="ce117" office:value-type="string" calcext:value-type="string">
            <text:p>Ensure Groupings are well distributed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88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46"/>
        <table:table-column table:style-name="co25" table:default-cell-style-name="ce146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8">
          <table:table-cell table:number-columns-repeated="2"/>
          <table:table-cell table:style-name="ce14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9"/>
          <table:table-cell table:style-name="ce157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49" office:value-type="float" office:value="1" calcext:value-type="float">
            <text:p>MF-01</text:p>
          </table:table-cell>
          <table:table-cell table:number-columns-repeated="2" table:style-name="ce149" office:value-type="float" office:value="12" calcext:value-type="float">
            <text:p>MF-12</text:p>
          </table:table-cell>
          <table:table-cell table:style-name="ce149" office:value-type="float" office:value="5" calcext:value-type="float">
            <text:p>MF-05</text:p>
          </table:table-cell>
          <table:table-cell table:style-name="ce149" office:value-type="float" office:value="12" calcext:value-type="float">
            <text:p>MF-12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45" office:value-type="string" calcext:value-type="string">
            <text:p>CRUDL</text:p>
          </table:table-cell>
          <table:table-cell table:style-name="ce147"/>
          <table:table-cell table:style-name="ce150" office:value-type="string" calcext:value-type="string">
            <text:p>UC</text:p>
          </table:table-cell>
          <table:table-cell table:style-name="ce150" office:value-type="string" calcext:value-type="string">
            <text:p>LL Req</text:p>
          </table:table-cell>
          <table:table-cell table:style-name="ce150" office:value-type="string" calcext:value-type="string">
            <text:p>RCG</text:p>
          </table:table-cell>
          <table:table-cell table:style-name="ce153" office:value-type="string" calcext:value-type="string">
            <text:p>Field</text:p>
          </table:table-cell>
          <table:table-cell table:style-name="ce153" office:value-type="string" calcext:value-type="string">
            <text:p>Req Type</text:p>
          </table:table-cell>
          <table:table-cell table:style-name="ce153" office:value-type="string" calcext:value-type="string">
            <text:p>Tag</text:p>
          </table:table-cell>
          <table:table-cell table:style-name="ce153" office:value-type="string" calcext:value-type="string">
            <text:p>Incompletion</text:p>
            <text:p>Type</text:p>
          </table:table-cell>
          <table:table-cell table:style-name="ce153" office:value-type="string" calcext:value-type="string">
            <text:p>Text</text:p>
            <text:p>tokens</text:p>
          </table:table-cell>
          <table:table-cell/>
          <table:table-cell table:style-name="ce160" table:number-columns-repeated="1011"/>
        </table:table-row>
        <table:table-row table:style-name="ro19"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User shall be able to list entities.</text:p>
          </table:table-cell>
          <table:table-cell table:style-name="ce151"/>
          <table:table-cell table:style-name="ce69" office:value-type="float" office:value="83" calcext:value-type="float">
            <text:p>FR-83</text:p>
          </table:table-cell>
          <table:table-cell table:style-name="ce154" office:value-type="float" office:value="84" calcext:value-type="float">
            <text:p>FR-84</text:p>
          </table:table-cell>
          <table:table-cell table:style-name="ce69" office:value-type="float" office:value="114" calcext:value-type="float">
            <text:p>FR-114</text:p>
          </table:table-cell>
          <table:table-cell table:style-name="ce69" office:value-type="float" office:value="116" calcext:value-type="float">
            <text:p>FR-116</text:p>
          </table:table-cell>
          <table:table-cell table:style-name="ce69" office:value-type="float" office:value="19" calcext:value-type="float">
            <text:p>FR-19</text:p>
          </table:table-cell>
          <table:table-cell table:style-name="ce69" office:value-type="float" office:value="115" calcext:value-type="float">
            <text:p>FR-115</text:p>
          </table:table-cell>
          <table:table-cell table:style-name="ce6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2"/>.create</text:p>
          </table:table-cell>
          <table:table-cell table:style-name="ce117" office:value-type="string" calcext:value-type="string">
            <text:p>User shall be able to create entities.</text:p>
          </table:table-cell>
          <table:table-cell table:style-name="ce151"/>
          <table:table-cell table:style-name="ce69" office:value-type="float" office:value="176" calcext:value-type="float">
            <text:p>FR-176</text:p>
          </table:table-cell>
          <table:table-cell table:style-name="ce69" office:value-type="float" office:value="144" calcext:value-type="float">
            <text:p>FR-144</text:p>
          </table:table-cell>
          <table:table-cell table:style-name="ce69" office:value-type="float" office:value="2" calcext:value-type="float">
            <text:p>FR-02</text:p>
          </table:table-cell>
          <table:table-cell table:style-name="ce69" office:value-type="float" office:value="117" calcext:value-type="float">
            <text:p>FR-117</text:p>
          </table:table-cell>
          <table:table-cell table:style-name="ce69" office:value-type="float" office:value="16" calcext:value-type="float">
            <text:p>FR-16</text:p>
          </table:table-cell>
          <table:table-cell table:style-name="ce69" office:value-type="float" office:value="68" calcext:value-type="float">
            <text:p>FR-68</text:p>
          </table:table-cell>
          <table:table-cell table:style-name="ce6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User shall be able to modify entities.</text:p>
          </table:table-cell>
          <table:table-cell table:style-name="ce151"/>
          <table:table-cell table:style-name="ce69" office:value-type="float" office:value="177" calcext:value-type="float">
            <text:p>FR-177</text:p>
          </table:table-cell>
          <table:table-cell table:style-name="ce69" office:value-type="float" office:value="146" calcext:value-type="float">
            <text:p>FR-146</text:p>
          </table:table-cell>
          <table:table-cell table:style-name="ce69" office:value-type="float" office:value="3" calcext:value-type="float">
            <text:p>FR-03</text:p>
          </table:table-cell>
          <table:table-cell table:style-name="ce69" office:value-type="float" office:value="118" calcext:value-type="float">
            <text:p>FR-118</text:p>
          </table:table-cell>
          <table:table-cell table:style-name="ce69" office:value-type="float" office:value="17" calcext:value-type="float">
            <text:p>FR-17</text:p>
          </table:table-cell>
          <table:table-cell table:style-name="ce69" office:value-type="float" office:value="69" calcext:value-type="float">
            <text:p>FR-69</text:p>
          </table:table-cell>
          <table:table-cell table:style-name="ce6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4"/>.order</text:p>
          </table:table-cell>
          <table:table-cell table:style-name="ce117" office:value-type="string" calcext:value-type="string">
            <text:p>User shall be able to reorder entities.</text:p>
          </table:table-cell>
          <table:table-cell table:style-name="ce151"/>
          <table:table-cell table:number-columns-repeated="2" table:style-name="ce69" office:value-type="string" calcext:value-type="string">
            <text:p>via sem-ID</text:p>
          </table:table-cell>
          <table:table-cell table:style-name="ce69" office:value-type="float" office:value="4" calcext:value-type="float">
            <text:p>FR-04</text:p>
          </table:table-cell>
          <table:table-cell table:style-name="ce158" office:value-type="string" calcext:value-type="string">
            <text:p>N/A</text:p>
          </table:table-cell>
          <table:table-cell table:style-name="ce69" office:value-type="float" office:value="14" calcext:value-type="float">
            <text:p>FR-14</text:p>
          </table:table-cell>
          <table:table-cell table:number-columns-repeated="2" table:style-name="ce158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entity after it is renamed.</text:p>
          </table:table-cell>
          <table:table-cell table:style-name="ce151"/>
          <table:table-cell table:style-name="ce69" office:value-type="float" office:value="178" calcext:value-type="float">
            <text:p>FR-178</text:p>
          </table:table-cell>
          <table:table-cell table:style-name="ce69" office:value-type="float" office:value="175" calcext:value-type="float">
            <text:p>FR-175</text:p>
          </table:table-cell>
          <table:table-cell table:style-name="ce69" office:value-type="float" office:value="263" calcext:value-type="float">
            <text:p>FR-263</text:p>
          </table:table-cell>
          <table:table-cell table:style-name="ce69" office:value-type="float" office:value="119" calcext:value-type="float">
            <text:p>FR-119</text:p>
          </table:table-cell>
          <table:table-cell table:style-name="ce69" office:value-type="float" office:value="185" calcext:value-type="float">
            <text:p>FR-185</text:p>
          </table:table-cell>
          <table:table-cell table:style-name="ce69" office:value-type="float" office:value="70" calcext:value-type="float">
            <text:p>FR-70</text:p>
          </table:table-cell>
          <table:table-cell table:style-name="ce6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User shall be able to (soft) delete entity.</text:p>
          </table:table-cell>
          <table:table-cell table:style-name="ce151"/>
          <table:table-cell table:style-name="ce69" office:value-type="float" office:value="179" calcext:value-type="float">
            <text:p>FR-179</text:p>
          </table:table-cell>
          <table:table-cell table:style-name="ce155" office:value-type="string" calcext:value-type="string">
            <text:p>Hard only</text:p>
          </table:table-cell>
          <table:table-cell table:style-name="ce69" office:value-type="float" office:value="1" calcext:value-type="float">
            <text:p>FR-01</text:p>
          </table:table-cell>
          <table:table-cell table:style-name="ce69" office:value-type="float" office:value="120" calcext:value-type="float">
            <text:p>FR-120</text:p>
          </table:table-cell>
          <table:table-cell table:style-name="ce69" office:value-type="float" office:value="18" calcext:value-type="float">
            <text:p>FR-18</text:p>
          </table:table-cell>
          <table:table-cell table:number-columns-repeated="2" table:style-name="ce155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entity deletion, user shall be able to see a summary of usage.</text:p>
          </table:table-cell>
          <table:table-cell table:style-name="ce151"/>
          <table:table-cell table:style-name="ce69" office:value-type="float" office:value="180" calcext:value-type="float">
            <text:p>FR-180</text:p>
          </table:table-cell>
          <table:table-cell table:style-name="ce151"/>
          <table:table-cell table:style-name="ce69" office:value-type="float" office:value="5" calcext:value-type="float">
            <text:p>FR-05</text:p>
          </table:table-cell>
          <table:table-cell table:style-name="ce69" office:value-type="float" office:value="121" calcext:value-type="float">
            <text:p>FR-121</text:p>
          </table:table-cell>
          <table:table-cell table:style-name="ce69" office:value-type="float" office:value="186" calcext:value-type="float">
            <text:p>FR-186</text:p>
          </table:table-cell>
          <table:table-cell table:style-name="ce69" office:value-type="float" office:value="72" calcext:value-type="float">
            <text:p>FR-72</text:p>
          </table:table-cell>
          <table:table-cell table:style-name="ce6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entity deletion, user shall be able to see each instance of entity's values and associations.</text:p>
          </table:table-cell>
          <table:table-cell table:style-name="ce151"/>
          <table:table-cell table:style-name="ce69" office:value-type="float" office:value="181" calcext:value-type="float">
            <text:p>FR-181</text:p>
          </table:table-cell>
          <table:table-cell table:style-name="ce151"/>
          <table:table-cell table:style-name="ce69" office:value-type="float" office:value="6" calcext:value-type="float">
            <text:p>FR-06</text:p>
          </table:table-cell>
          <table:table-cell table:style-name="ce152" office:value-type="string" calcext:value-type="string">
            <text:p>No.</text:p>
          </table:table-cell>
          <table:table-cell table:style-name="ce69" office:value-type="float" office:value="187" calcext:value-type="float">
            <text:p>FR-187</text:p>
          </table:table-cell>
          <table:table-cell table:style-name="ce69" office:value-type="float" office:value="73" calcext:value-type="float">
            <text:p>FR-73</text:p>
          </table:table-cell>
          <table:table-cell table:style-name="ce6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6"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52" office:value-type="string" calcext:value-type="string">
            <text:p>No.</text:p>
          </table:table-cell>
          <table:table-cell table:style-name="ce69" office:value-type="float" office:value="147" calcext:value-type="float">
            <text:p>FR-147</text:p>
          </table:table-cell>
          <table:table-cell table:style-name="ce69" office:value-type="float" office:value="264" calcext:value-type="float">
            <text:p>FR-264</text:p>
          </table:table-cell>
          <table:table-cell table:style-name="ce69" office:value-type="float" office:value="123" calcext:value-type="float">
            <text:p>FR-123</text:p>
          </table:table-cell>
          <table:table-cell table:style-name="ce69" office:value-type="float" office:value="188" calcext:value-type="float">
            <text:p>FR-188</text:p>
          </table:table-cell>
          <table:table-cell table:style-name="ce69" office:value-type="float" office:value="71" calcext:value-type="float">
            <text:p>FR-71</text:p>
          </table:table-cell>
          <table:table-cell table:style-name="ce6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bin</text:p>
          </table:table-cell>
          <table:table-cell table:style-name="ce117" office:value-type="string" calcext:value-type="string">
            <text:p>Upon entity deletion, System shall move it to the bin.</text:p>
          </table:table-cell>
          <table:table-cell table:style-name="ce151"/>
          <table:table-cell table:style-name="ce69" office:value-type="float" office:value="182" calcext:value-type="float">
            <text:p>FR-182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7" calcext:value-type="float">
            <text:p>FR-47</text:p>
          </table:table-cell>
          <table:table-cell table:style-name="ce69" office:value-type="float" office:value="124" calcext:value-type="float">
            <text:p>FR-124</text:p>
          </table:table-cell>
          <table:table-cell table:style-name="ce69" office:value-type="float" office:value="189" calcext:value-type="float">
            <text:p>FR-189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User shall be able to restore soft-deleted entities.</text:p>
          </table:table-cell>
          <table:table-cell table:style-name="ce151"/>
          <table:table-cell table:style-name="ce69" office:value-type="float" office:value="183" calcext:value-type="float">
            <text:p>FR-183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0" calcext:value-type="float">
            <text:p>FR-40</text:p>
          </table:table-cell>
          <table:table-cell table:style-name="ce69" office:value-type="float" office:value="125" calcext:value-type="float">
            <text:p>FR-125</text:p>
          </table:table-cell>
          <table:table-cell table:style-name="ce69" office:value-type="float" office:value="31" calcext:value-type="float">
            <text:p>FR-31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entity restoration, previous values and associations shall be restored also.</text:p>
          </table:table-cell>
          <table:table-cell table:style-name="ce151"/>
          <table:table-cell table:style-name="ce69" office:value-type="float" office:value="184" calcext:value-type="float">
            <text:p>FR-184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1" calcext:value-type="float">
            <text:p>FR-41</text:p>
          </table:table-cell>
          <table:table-cell table:style-name="ce159" office:value-type="string" calcext:value-type="string">
            <text:p>N/A</text:p>
          </table:table-cell>
          <table:table-cell table:style-name="ce69" office:value-type="float" office:value="32" calcext:value-type="float">
            <text:p>FR-32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7"/>
        </table:table-row>
        <table:table-row table:style-name="ro5">
          <table:table-cell table:style-name="ce145" office:value-type="string" calcext:value-type="string">
            <text:p>Filters</text:p>
          </table:table-cell>
          <table:table-cell/>
          <table:table-cell table:style-name="ce153" office:value-type="string" calcext:value-type="string">
            <text:p>Incompletion</text:p>
            <text:p>Results</text:p>
          </table:table-cell>
          <table:table-cell table:style-name="ce153" office:value-type="string" calcext:value-type="string">
            <text:p>Tags</text:p>
          </table:table-cell>
          <table:table-cell table:style-name="ce15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26" table:default-cell-style-name="ce224"/>
        <table:table-column table:style-name="co15" table:number-columns-repeated="4" table:default-cell-style-name="Default"/>
        <table:table-row table:style-name="ro1">
          <table:table-cell table:style-name="ce222" office:value-type="string" calcext:value-type="string">
            <text:p>ID</text:p>
          </table:table-cell>
          <table:table-cell table:style-name="ce222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3" table:formula="of:=1-COUNTIF([FRs.$C$2:.$C$1002]; &quot;=&quot;&amp;[.A2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FRs</text:p>
          </table:table-cell>
          <table:table-cell table:style-name="ce225" office:value-type="string" calcext:value-type="string">
            <text:p>Flat</text:p>
          </table:table-cell>
          <table:table-cell table:style-name="ce225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23" table:formula="of:=1-COUNTIF([FRs.$C$2:.$C$1002]; &quot;=&quot;&amp;[.A3])" office:value-type="float" office:value="0" calcext:value-type="float">
            <text:p>0</text:p>
          </table:table-cell>
          <table:table-cell table:style-name="ce325" office:value-type="string" calcext:value-type="string">
            <text:p>next avail →</text:p>
          </table:table-cell>
          <table:table-cell table:style-name="ce92" table:formula="of:=COUNTIF([FRs.$C$2:.$C$1022];&quot;&gt;0&quot;)" office:value-type="float" office:value="338" calcext:value-type="float">
            <text:p>338</text:p>
          </table:table-cell>
          <table:table-cell table:style-name="ce92" table:formula="of:=COUNTIF([flat.$D$2:.$D$1004];&quot;&gt;0&quot;)" office:value-type="float" office:value="44" calcext:value-type="float">
            <text:p>44</text:p>
          </table:table-cell>
          <table:table-cell table:style-name="ce92" table:formula="of:=[.E3]+[.D3]" office:value-type="float" office:value="382" calcext:value-type="float">
            <text:p>38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23" table:formula="of:=1-COUNTIF([FRs.$C$2:.$C$1002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23" table:formula="of:=1-COUNTIF([FRs.$C$2:.$C$1002]; &quot;=&quot;&amp;[.A5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Dup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23" table:formula="of:=1-COUNTIF([FRs.$C$2:.$C$1002]; &quot;=&quot;&amp;[.A6])" office:value-type="float" office:value="0" calcext:value-type="float">
            <text:p>0</text:p>
          </table:table-cell>
          <table:table-cell/>
          <table:table-cell table:style-name="ce92" table:formula="of:=COUNTIF([.$B$1:.$B$999];&quot;&lt;0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23" table:formula="of:=1-COUNTIF([FRs.$C$2:.$C$1002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23" table:formula="of:=1-COUNTIF([FRs.$C$2:.$C$1002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23" table:formula="of:=1-COUNTIF([FRs.$C$2:.$C$1002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23" table:formula="of:=1-COUNTIF([FRs.$C$2:.$C$1002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23" table:formula="of:=1-COUNTIF([FRs.$C$2:.$C$1002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23" table:formula="of:=1-COUNTIF([FRs.$C$2:.$C$1002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23" table:formula="of:=1-COUNTIF([FRs.$C$2:.$C$1002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23" table:formula="of:=1-COUNTIF([FRs.$C$2:.$C$1002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23" table:formula="of:=1-COUNTIF([FRs.$C$2:.$C$1002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23" table:formula="of:=1-COUNTIF([FRs.$C$2:.$C$1002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23" table:formula="of:=1-COUNTIF([FRs.$C$2:.$C$1002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23" table:formula="of:=1-COUNTIF([FRs.$C$2:.$C$1002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23" table:formula="of:=1-COUNTIF([FRs.$C$2:.$C$1002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23" table:formula="of:=1-COUNTIF([FRs.$C$2:.$C$1002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23" table:formula="of:=1-COUNTIF([FRs.$C$2:.$C$1002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23" table:formula="of:=1-COUNTIF([FRs.$C$2:.$C$1002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23" table:formula="of:=1-COUNTIF([FRs.$C$2:.$C$1002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23" table:formula="of:=1-COUNTIF([FRs.$C$2:.$C$1002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23" table:formula="of:=1-COUNTIF([FRs.$C$2:.$C$1002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23" table:formula="of:=1-COUNTIF([FRs.$C$2:.$C$1002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23" table:formula="of:=1-COUNTIF([FRs.$C$2:.$C$1002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23" table:formula="of:=1-COUNTIF([FRs.$C$2:.$C$1002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23" table:formula="of:=1-COUNTIF([FRs.$C$2:.$C$1002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23" table:formula="of:=1-COUNTIF([FRs.$C$2:.$C$1002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23" table:formula="of:=1-COUNTIF([FRs.$C$2:.$C$1002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23" table:formula="of:=1-COUNTIF([FRs.$C$2:.$C$1002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23" table:formula="of:=1-COUNTIF([FRs.$C$2:.$C$1002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23" table:formula="of:=1-COUNTIF([FRs.$C$2:.$C$1002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23" table:formula="of:=1-COUNTIF([FRs.$C$2:.$C$1002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23" table:formula="of:=1-COUNTIF([FRs.$C$2:.$C$1002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23" table:formula="of:=1-COUNTIF([FRs.$C$2:.$C$1002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23" table:formula="of:=1-COUNTIF([FRs.$C$2:.$C$1002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23" table:formula="of:=1-COUNTIF([FRs.$C$2:.$C$1002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23" table:formula="of:=1-COUNTIF([FRs.$C$2:.$C$1002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23" table:formula="of:=1-COUNTIF([FRs.$C$2:.$C$1002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23" table:formula="of:=1-COUNTIF([FRs.$C$2:.$C$1002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23" table:formula="of:=1-COUNTIF([FRs.$C$2:.$C$1002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23" table:formula="of:=1-COUNTIF([FRs.$C$2:.$C$1002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23" table:formula="of:=1-COUNTIF([FRs.$C$2:.$C$1002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23" table:formula="of:=1-COUNTIF([FRs.$C$2:.$C$1002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23" table:formula="of:=1-COUNTIF([FRs.$C$2:.$C$1002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23" table:formula="of:=1-COUNTIF([FRs.$C$2:.$C$1002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23" table:formula="of:=1-COUNTIF([FRs.$C$2:.$C$1002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23" table:formula="of:=1-COUNTIF([FRs.$C$2:.$C$1002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23" table:formula="of:=1-COUNTIF([FRs.$C$2:.$C$1002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23" table:formula="of:=1-COUNTIF([FRs.$C$2:.$C$1002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23" table:formula="of:=1-COUNTIF([FRs.$C$2:.$C$1002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23" table:formula="of:=1-COUNTIF([FRs.$C$2:.$C$1002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23" table:formula="of:=1-COUNTIF([FRs.$C$2:.$C$1002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23" table:formula="of:=1-COUNTIF([FRs.$C$2:.$C$1002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23" table:formula="of:=1-COUNTIF([FRs.$C$2:.$C$1002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23" table:formula="of:=1-COUNTIF([FRs.$C$2:.$C$1002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23" table:formula="of:=1-COUNTIF([FRs.$C$2:.$C$1002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23" table:formula="of:=1-COUNTIF([FRs.$C$2:.$C$1002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23" table:formula="of:=1-COUNTIF([FRs.$C$2:.$C$1002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23" table:formula="of:=1-COUNTIF([FRs.$C$2:.$C$1002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23" table:formula="of:=1-COUNTIF([FRs.$C$2:.$C$1002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23" table:formula="of:=1-COUNTIF([FRs.$C$2:.$C$1002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23" table:formula="of:=1-COUNTIF([FRs.$C$2:.$C$1002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23" table:formula="of:=1-COUNTIF([FRs.$C$2:.$C$1002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23" table:formula="of:=1-COUNTIF([FRs.$C$2:.$C$1002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23" table:formula="of:=1-COUNTIF([FRs.$C$2:.$C$1002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23" table:formula="of:=1-COUNTIF([FRs.$C$2:.$C$1002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23" table:formula="of:=1-COUNTIF([FRs.$C$2:.$C$1002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23" table:formula="of:=1-COUNTIF([FRs.$C$2:.$C$1002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23" table:formula="of:=1-COUNTIF([FRs.$C$2:.$C$1002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23" table:formula="of:=1-COUNTIF([FRs.$C$2:.$C$1002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23" table:formula="of:=1-COUNTIF([FRs.$C$2:.$C$1002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23" table:formula="of:=1-COUNTIF([FRs.$C$2:.$C$1002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23" table:formula="of:=1-COUNTIF([FRs.$C$2:.$C$1002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23" table:formula="of:=1-COUNTIF([FRs.$C$2:.$C$1002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23" table:formula="of:=1-COUNTIF([FRs.$C$2:.$C$1002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23" table:formula="of:=1-COUNTIF([FRs.$C$2:.$C$1002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23" table:formula="of:=1-COUNTIF([FRs.$C$2:.$C$1002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23" table:formula="of:=1-COUNTIF([FRs.$C$2:.$C$1002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23" table:formula="of:=1-COUNTIF([FRs.$C$2:.$C$1002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23" table:formula="of:=1-COUNTIF([FRs.$C$2:.$C$1002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23" table:formula="of:=1-COUNTIF([FRs.$C$2:.$C$1002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23" table:formula="of:=1-COUNTIF([FRs.$C$2:.$C$1002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23" table:formula="of:=1-COUNTIF([FRs.$C$2:.$C$1002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23" table:formula="of:=1-COUNTIF([FRs.$C$2:.$C$1002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23" table:formula="of:=1-COUNTIF([FRs.$C$2:.$C$1002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23" table:formula="of:=1-COUNTIF([FRs.$C$2:.$C$1002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23" table:formula="of:=1-COUNTIF([FRs.$C$2:.$C$1002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23" table:formula="of:=1-COUNTIF([FRs.$C$2:.$C$1002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23" table:formula="of:=1-COUNTIF([FRs.$C$2:.$C$1002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23" table:formula="of:=1-COUNTIF([FRs.$C$2:.$C$1002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23" table:formula="of:=1-COUNTIF([FRs.$C$2:.$C$1002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23" table:formula="of:=1-COUNTIF([FRs.$C$2:.$C$1002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23" table:formula="of:=1-COUNTIF([FRs.$C$2:.$C$1002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23" table:formula="of:=1-COUNTIF([FRs.$C$2:.$C$1002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23" table:formula="of:=1-COUNTIF([FRs.$C$2:.$C$1002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23" table:formula="of:=1-COUNTIF([FRs.$C$2:.$C$1002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23" table:formula="of:=1-COUNTIF([FRs.$C$2:.$C$1002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23" table:formula="of:=1-COUNTIF([FRs.$C$2:.$C$1002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23" table:formula="of:=1-COUNTIF([FRs.$C$2:.$C$1002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23" table:formula="of:=1-COUNTIF([FRs.$C$2:.$C$1002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23" table:formula="of:=1-COUNTIF([FRs.$C$2:.$C$1002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23" table:formula="of:=1-COUNTIF([FRs.$C$2:.$C$1002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23" table:formula="of:=1-COUNTIF([FRs.$C$2:.$C$1002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23" table:formula="of:=1-COUNTIF([FRs.$C$2:.$C$1002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23" table:formula="of:=1-COUNTIF([FRs.$C$2:.$C$1002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23" table:formula="of:=1-COUNTIF([FRs.$C$2:.$C$1002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23" table:formula="of:=1-COUNTIF([FRs.$C$2:.$C$1002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23" table:formula="of:=1-COUNTIF([FRs.$C$2:.$C$1002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23" table:formula="of:=1-COUNTIF([FRs.$C$2:.$C$1002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23" table:formula="of:=1-COUNTIF([FRs.$C$2:.$C$1002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23" table:formula="of:=1-COUNTIF([FRs.$C$2:.$C$1002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23" table:formula="of:=1-COUNTIF([FRs.$C$2:.$C$1002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23" table:formula="of:=1-COUNTIF([FRs.$C$2:.$C$1002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23" table:formula="of:=1-COUNTIF([FRs.$C$2:.$C$1002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23" table:formula="of:=1-COUNTIF([FRs.$C$2:.$C$1002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23" table:formula="of:=1-COUNTIF([FRs.$C$2:.$C$1002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23" table:formula="of:=1-COUNTIF([FRs.$C$2:.$C$1002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23" table:formula="of:=1-COUNTIF([FRs.$C$2:.$C$1002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23" table:formula="of:=1-COUNTIF([FRs.$C$2:.$C$1002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23" table:formula="of:=1-COUNTIF([FRs.$C$2:.$C$1002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23" table:formula="of:=1-COUNTIF([FRs.$C$2:.$C$1002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23" table:formula="of:=1-COUNTIF([FRs.$C$2:.$C$1002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23" table:formula="of:=1-COUNTIF([FRs.$C$2:.$C$1002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23" table:formula="of:=1-COUNTIF([FRs.$C$2:.$C$1002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23" table:formula="of:=1-COUNTIF([FRs.$C$2:.$C$1002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23" table:formula="of:=1-COUNTIF([FRs.$C$2:.$C$1002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23" table:formula="of:=1-COUNTIF([FRs.$C$2:.$C$1002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23" table:formula="of:=1-COUNTIF([FRs.$C$2:.$C$1002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23" table:formula="of:=1-COUNTIF([FRs.$C$2:.$C$1002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23" table:formula="of:=1-COUNTIF([FRs.$C$2:.$C$1002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23" table:formula="of:=1-COUNTIF([FRs.$C$2:.$C$1002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23" table:formula="of:=1-COUNTIF([FRs.$C$2:.$C$1002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23" table:formula="of:=1-COUNTIF([FRs.$C$2:.$C$1002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23" table:formula="of:=1-COUNTIF([FRs.$C$2:.$C$1002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23" table:formula="of:=1-COUNTIF([FRs.$C$2:.$C$1002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23" table:formula="of:=1-COUNTIF([FRs.$C$2:.$C$1002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23" table:formula="of:=1-COUNTIF([FRs.$C$2:.$C$1002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23" table:formula="of:=1-COUNTIF([FRs.$C$2:.$C$1002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23" table:formula="of:=1-COUNTIF([FRs.$C$2:.$C$1002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23" table:formula="of:=1-COUNTIF([FRs.$C$2:.$C$1002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23" table:formula="of:=1-COUNTIF([FRs.$C$2:.$C$1002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23" table:formula="of:=1-COUNTIF([FRs.$C$2:.$C$1002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23" table:formula="of:=1-COUNTIF([FRs.$C$2:.$C$1002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23" table:formula="of:=1-COUNTIF([FRs.$C$2:.$C$1002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23" table:formula="of:=1-COUNTIF([FRs.$C$2:.$C$1002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23" table:formula="of:=1-COUNTIF([FRs.$C$2:.$C$1002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23" table:formula="of:=1-COUNTIF([FRs.$C$2:.$C$1002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23" table:formula="of:=1-COUNTIF([FRs.$C$2:.$C$1002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23" table:formula="of:=1-COUNTIF([FRs.$C$2:.$C$1002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23" table:formula="of:=1-COUNTIF([FRs.$C$2:.$C$1002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23" table:formula="of:=1-COUNTIF([FRs.$C$2:.$C$1002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23" table:formula="of:=1-COUNTIF([FRs.$C$2:.$C$1002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23" table:formula="of:=1-COUNTIF([FRs.$C$2:.$C$1002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23" table:formula="of:=1-COUNTIF([FRs.$C$2:.$C$1002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23" table:formula="of:=1-COUNTIF([FRs.$C$2:.$C$1002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23" table:formula="of:=1-COUNTIF([FRs.$C$2:.$C$1002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23" table:formula="of:=1-COUNTIF([FRs.$C$2:.$C$1002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23" table:formula="of:=1-COUNTIF([FRs.$C$2:.$C$1002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23" table:formula="of:=1-COUNTIF([FRs.$C$2:.$C$1002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23" table:formula="of:=1-COUNTIF([FRs.$C$2:.$C$1002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23" table:formula="of:=1-COUNTIF([FRs.$C$2:.$C$1002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23" table:formula="of:=1-COUNTIF([FRs.$C$2:.$C$1002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23" table:formula="of:=1-COUNTIF([FRs.$C$2:.$C$1002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23" table:formula="of:=1-COUNTIF([FRs.$C$2:.$C$1002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23" table:formula="of:=1-COUNTIF([FRs.$C$2:.$C$1002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23" table:formula="of:=1-COUNTIF([FRs.$C$2:.$C$1002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23" table:formula="of:=1-COUNTIF([FRs.$C$2:.$C$1002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23" table:formula="of:=1-COUNTIF([FRs.$C$2:.$C$1002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23" table:formula="of:=1-COUNTIF([FRs.$C$2:.$C$1002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23" table:formula="of:=1-COUNTIF([FRs.$C$2:.$C$1002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23" table:formula="of:=1-COUNTIF([FRs.$C$2:.$C$1002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23" table:formula="of:=1-COUNTIF([FRs.$C$2:.$C$1002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23" table:formula="of:=1-COUNTIF([FRs.$C$2:.$C$1002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23" table:formula="of:=1-COUNTIF([FRs.$C$2:.$C$1002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23" table:formula="of:=1-COUNTIF([FRs.$C$2:.$C$1002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23" table:formula="of:=1-COUNTIF([FRs.$C$2:.$C$1002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23" table:formula="of:=1-COUNTIF([FRs.$C$2:.$C$1002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23" table:formula="of:=1-COUNTIF([FRs.$C$2:.$C$1002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23" table:formula="of:=1-COUNTIF([FRs.$C$2:.$C$1002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23" table:formula="of:=1-COUNTIF([FRs.$C$2:.$C$1002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23" table:formula="of:=1-COUNTIF([FRs.$C$2:.$C$1002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23" table:formula="of:=1-COUNTIF([FRs.$C$2:.$C$1002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23" table:formula="of:=1-COUNTIF([FRs.$C$2:.$C$1002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23" table:formula="of:=1-COUNTIF([FRs.$C$2:.$C$1002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23" table:formula="of:=1-COUNTIF([FRs.$C$2:.$C$1002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23" table:formula="of:=1-COUNTIF([FRs.$C$2:.$C$1002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23" table:formula="of:=1-COUNTIF([FRs.$C$2:.$C$1002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23" table:formula="of:=1-COUNTIF([FRs.$C$2:.$C$1002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23" table:formula="of:=1-COUNTIF([FRs.$C$2:.$C$1002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23" table:formula="of:=1-COUNTIF([FRs.$C$2:.$C$1002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23" table:formula="of:=1-COUNTIF([FRs.$C$2:.$C$1002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23" table:formula="of:=1-COUNTIF([FRs.$C$2:.$C$1002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23" table:formula="of:=1-COUNTIF([FRs.$C$2:.$C$1002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23" table:formula="of:=1-COUNTIF([FRs.$C$2:.$C$1002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23" table:formula="of:=1-COUNTIF([FRs.$C$2:.$C$1002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23" table:formula="of:=1-COUNTIF([FRs.$C$2:.$C$1002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23" table:formula="of:=1-COUNTIF([FRs.$C$2:.$C$1002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23" table:formula="of:=1-COUNTIF([FRs.$C$2:.$C$1002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23" table:formula="of:=1-COUNTIF([FRs.$C$2:.$C$1002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23" table:formula="of:=1-COUNTIF([FRs.$C$2:.$C$1002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23" table:formula="of:=1-COUNTIF([FRs.$C$2:.$C$1002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23" table:formula="of:=1-COUNTIF([FRs.$C$2:.$C$1002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23" table:formula="of:=1-COUNTIF([FRs.$C$2:.$C$1002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23" table:formula="of:=1-COUNTIF([FRs.$C$2:.$C$1002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23" table:formula="of:=1-COUNTIF([FRs.$C$2:.$C$1002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23" table:formula="of:=1-COUNTIF([FRs.$C$2:.$C$1002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23" table:formula="of:=1-COUNTIF([FRs.$C$2:.$C$1002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23" table:formula="of:=1-COUNTIF([FRs.$C$2:.$C$1002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23" table:formula="of:=1-COUNTIF([FRs.$C$2:.$C$1002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23" table:formula="of:=1-COUNTIF([FRs.$C$2:.$C$1002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23" table:formula="of:=1-COUNTIF([FRs.$C$2:.$C$1002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23" table:formula="of:=1-COUNTIF([FRs.$C$2:.$C$1002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23" table:formula="of:=1-COUNTIF([FRs.$C$2:.$C$1002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23" table:formula="of:=1-COUNTIF([FRs.$C$2:.$C$1002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23" table:formula="of:=1-COUNTIF([FRs.$C$2:.$C$1002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23" table:formula="of:=1-COUNTIF([FRs.$C$2:.$C$1002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23" table:formula="of:=1-COUNTIF([FRs.$C$2:.$C$1002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23" table:formula="of:=1-COUNTIF([FRs.$C$2:.$C$1002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23" table:formula="of:=1-COUNTIF([FRs.$C$2:.$C$1002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23" table:formula="of:=1-COUNTIF([FRs.$C$2:.$C$1002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23" table:formula="of:=1-COUNTIF([FRs.$C$2:.$C$1002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23" table:formula="of:=1-COUNTIF([FRs.$C$2:.$C$1002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23" table:formula="of:=1-COUNTIF([FRs.$C$2:.$C$1002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23" table:formula="of:=1-COUNTIF([FRs.$C$2:.$C$1002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23" table:formula="of:=1-COUNTIF([FRs.$C$2:.$C$1002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23" table:formula="of:=1-COUNTIF([FRs.$C$2:.$C$1002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23" table:formula="of:=1-COUNTIF([FRs.$C$2:.$C$1002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23" table:formula="of:=1-COUNTIF([FRs.$C$2:.$C$1002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23" table:formula="of:=1-COUNTIF([FRs.$C$2:.$C$1002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23" table:formula="of:=1-COUNTIF([FRs.$C$2:.$C$1002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23" table:formula="of:=1-COUNTIF([FRs.$C$2:.$C$1002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23" table:formula="of:=1-COUNTIF([FRs.$C$2:.$C$1002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23" table:formula="of:=1-COUNTIF([FRs.$C$2:.$C$1002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23" table:formula="of:=1-COUNTIF([FRs.$C$2:.$C$1002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23" table:formula="of:=1-COUNTIF([FRs.$C$2:.$C$1002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23" table:formula="of:=1-COUNTIF([FRs.$C$2:.$C$1002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23" table:formula="of:=1-COUNTIF([FRs.$C$2:.$C$1002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23" table:formula="of:=1-COUNTIF([FRs.$C$2:.$C$1002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23" table:formula="of:=1-COUNTIF([FRs.$C$2:.$C$1002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23" table:formula="of:=1-COUNTIF([FRs.$C$2:.$C$1002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23" table:formula="of:=1-COUNTIF([FRs.$C$2:.$C$1002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23" table:formula="of:=1-COUNTIF([FRs.$C$2:.$C$1002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23" table:formula="of:=1-COUNTIF([FRs.$C$2:.$C$1002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23" table:formula="of:=1-COUNTIF([FRs.$C$2:.$C$1002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23" table:formula="of:=1-COUNTIF([FRs.$C$2:.$C$1002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23" table:formula="of:=1-COUNTIF([FRs.$C$2:.$C$1002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23" table:formula="of:=1-COUNTIF([FRs.$C$2:.$C$1002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23" table:formula="of:=1-COUNTIF([FRs.$C$2:.$C$1002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23" table:formula="of:=1-COUNTIF([FRs.$C$2:.$C$1002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23" table:formula="of:=1-COUNTIF([FRs.$C$2:.$C$1002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23" table:formula="of:=1-COUNTIF([FRs.$C$2:.$C$1002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23" table:formula="of:=1-COUNTIF([FRs.$C$2:.$C$1002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23" table:formula="of:=1-COUNTIF([FRs.$C$2:.$C$1002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23" table:formula="of:=1-COUNTIF([FRs.$C$2:.$C$1002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23" table:formula="of:=1-COUNTIF([FRs.$C$2:.$C$1002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23" table:formula="of:=1-COUNTIF([FRs.$C$2:.$C$1002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23" table:formula="of:=1-COUNTIF([FRs.$C$2:.$C$1002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23" table:formula="of:=1-COUNTIF([FRs.$C$2:.$C$1002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23" table:formula="of:=1-COUNTIF([FRs.$C$2:.$C$1002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23" table:formula="of:=1-COUNTIF([FRs.$C$2:.$C$1002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23" table:formula="of:=1-COUNTIF([FRs.$C$2:.$C$1002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23" table:formula="of:=1-COUNTIF([FRs.$C$2:.$C$1002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23" table:formula="of:=1-COUNTIF([FRs.$C$2:.$C$1002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23" table:formula="of:=1-COUNTIF([FRs.$C$2:.$C$1002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23" table:formula="of:=1-COUNTIF([FRs.$C$2:.$C$1002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23" table:formula="of:=1-COUNTIF([FRs.$C$2:.$C$1002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23" table:formula="of:=1-COUNTIF([FRs.$C$2:.$C$1002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23" table:formula="of:=1-COUNTIF([FRs.$C$2:.$C$1002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23" table:formula="of:=1-COUNTIF([FRs.$C$2:.$C$1002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23" table:formula="of:=1-COUNTIF([FRs.$C$2:.$C$1002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23" table:formula="of:=1-COUNTIF([FRs.$C$2:.$C$1002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23" table:formula="of:=1-COUNTIF([FRs.$C$2:.$C$1002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23" table:formula="of:=1-COUNTIF([FRs.$C$2:.$C$1002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23" table:formula="of:=1-COUNTIF([FRs.$C$2:.$C$1002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23" table:formula="of:=1-COUNTIF([FRs.$C$2:.$C$1002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23" table:formula="of:=1-COUNTIF([FRs.$C$2:.$C$1002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23" table:formula="of:=1-COUNTIF([FRs.$C$2:.$C$1002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23" table:formula="of:=1-COUNTIF([FRs.$C$2:.$C$1002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23" table:formula="of:=1-COUNTIF([FRs.$C$2:.$C$1002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23" table:formula="of:=1-COUNTIF([FRs.$C$2:.$C$1002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23" table:formula="of:=1-COUNTIF([FRs.$C$2:.$C$1002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23" table:formula="of:=1-COUNTIF([FRs.$C$2:.$C$1002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23" table:formula="of:=1-COUNTIF([FRs.$C$2:.$C$1002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23" table:formula="of:=1-COUNTIF([FRs.$C$2:.$C$1002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23" table:formula="of:=1-COUNTIF([FRs.$C$2:.$C$1002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23" table:formula="of:=1-COUNTIF([FRs.$C$2:.$C$1002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23" table:formula="of:=1-COUNTIF([FRs.$C$2:.$C$1002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23" table:formula="of:=1-COUNTIF([FRs.$C$2:.$C$1002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23" table:formula="of:=1-COUNTIF([FRs.$C$2:.$C$1002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23" table:formula="of:=1-COUNTIF([FRs.$C$2:.$C$1002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23" table:formula="of:=1-COUNTIF([FRs.$C$2:.$C$1002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23" table:formula="of:=1-COUNTIF([FRs.$C$2:.$C$1002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23" table:formula="of:=1-COUNTIF([FRs.$C$2:.$C$1002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23" table:formula="of:=1-COUNTIF([FRs.$C$2:.$C$1002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23" table:formula="of:=1-COUNTIF([FRs.$C$2:.$C$1002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23" table:formula="of:=1-COUNTIF([FRs.$C$2:.$C$1002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23" table:formula="of:=1-COUNTIF([FRs.$C$2:.$C$1002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23" table:formula="of:=1-COUNTIF([FRs.$C$2:.$C$1002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style-name="ce223" table:formula="of:=1-COUNTIF([FRs.$C$2:.$C$1002]; &quot;=&quot;&amp;[.A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style-name="ce223" table:formula="of:=1-COUNTIF([FRs.$C$2:.$C$1002]; &quot;=&quot;&amp;[.A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style-name="ce223" table:formula="of:=1-COUNTIF([FRs.$C$2:.$C$1002]; &quot;=&quot;&amp;[.A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style-name="ce223" table:formula="of:=1-COUNTIF([FRs.$C$2:.$C$1002]; &quot;=&quot;&amp;[.A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style-name="ce223" table:formula="of:=1-COUNTIF([FRs.$C$2:.$C$1002]; &quot;=&quot;&amp;[.A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style-name="ce223" table:formula="of:=1-COUNTIF([FRs.$C$2:.$C$1002]; &quot;=&quot;&amp;[.A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style-name="ce223" table:formula="of:=1-COUNTIF([FRs.$C$2:.$C$1002]; &quot;=&quot;&amp;[.A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style-name="ce223" table:formula="of:=1-COUNTIF([FRs.$C$2:.$C$1002]; &quot;=&quot;&amp;[.A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style-name="ce223" table:formula="of:=1-COUNTIF([FRs.$C$2:.$C$1002]; &quot;=&quot;&amp;[.A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style-name="ce223" table:formula="of:=1-COUNTIF([FRs.$C$2:.$C$1002]; &quot;=&quot;&amp;[.A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style-name="ce223" table:formula="of:=1-COUNTIF([FRs.$C$2:.$C$1002]; &quot;=&quot;&amp;[.A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style-name="ce223" table:formula="of:=1-COUNTIF([FRs.$C$2:.$C$1002]; &quot;=&quot;&amp;[.A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style-name="ce223" table:formula="of:=1-COUNTIF([FRs.$C$2:.$C$1002]; &quot;=&quot;&amp;[.A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style-name="ce223" table:formula="of:=1-COUNTIF([FRs.$C$2:.$C$1002]; &quot;=&quot;&amp;[.A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style-name="ce223" table:formula="of:=1-COUNTIF([FRs.$C$2:.$C$1002]; &quot;=&quot;&amp;[.A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style-name="ce223" table:formula="of:=1-COUNTIF([FRs.$C$2:.$C$1002]; &quot;=&quot;&amp;[.A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style-name="ce223" table:formula="of:=1-COUNTIF([FRs.$C$2:.$C$1002]; &quot;=&quot;&amp;[.A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style-name="ce223" table:formula="of:=1-COUNTIF([FRs.$C$2:.$C$1002]; &quot;=&quot;&amp;[.A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style-name="ce223" table:formula="of:=1-COUNTIF([FRs.$C$2:.$C$1002]; &quot;=&quot;&amp;[.A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style-name="ce223" table:formula="of:=1-COUNTIF([FRs.$C$2:.$C$1002]; &quot;=&quot;&amp;[.A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style-name="ce223" table:formula="of:=1-COUNTIF([FRs.$C$2:.$C$1002]; &quot;=&quot;&amp;[.A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style-name="ce223" table:formula="of:=1-COUNTIF([FRs.$C$2:.$C$1002]; &quot;=&quot;&amp;[.A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style-name="ce223" table:formula="of:=1-COUNTIF([FRs.$C$2:.$C$1002]; &quot;=&quot;&amp;[.A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style-name="ce223" table:formula="of:=1-COUNTIF([FRs.$C$2:.$C$1002]; &quot;=&quot;&amp;[.A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style-name="ce223" table:formula="of:=1-COUNTIF([FRs.$C$2:.$C$1002]; &quot;=&quot;&amp;[.A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style-name="ce223" table:formula="of:=1-COUNTIF([FRs.$C$2:.$C$1002]; &quot;=&quot;&amp;[.A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style-name="ce223" table:formula="of:=1-COUNTIF([FRs.$C$2:.$C$1002]; &quot;=&quot;&amp;[.A3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style-name="ce223" table:formula="of:=1-COUNTIF([FRs.$C$2:.$C$1002]; &quot;=&quot;&amp;[.A3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style-name="ce223" table:formula="of:=1-COUNTIF([FRs.$C$2:.$C$1002]; &quot;=&quot;&amp;[.A3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style-name="ce223" table:formula="of:=1-COUNTIF([FRs.$C$2:.$C$1002]; &quot;=&quot;&amp;[.A3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style-name="ce223" table:formula="of:=1-COUNTIF([FRs.$C$2:.$C$1002]; &quot;=&quot;&amp;[.A3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style-name="ce223" table:formula="of:=1-COUNTIF([FRs.$C$2:.$C$1002]; &quot;=&quot;&amp;[.A3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style-name="ce223" table:formula="of:=1-COUNTIF([FRs.$C$2:.$C$1002]; &quot;=&quot;&amp;[.A3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style-name="ce223" table:formula="of:=1-COUNTIF([FRs.$C$2:.$C$1002]; &quot;=&quot;&amp;[.A3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style-name="ce223" table:formula="of:=1-COUNTIF([FRs.$C$2:.$C$1002]; &quot;=&quot;&amp;[.A3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style-name="ce223" table:formula="of:=1-COUNTIF([FRs.$C$2:.$C$1002]; &quot;=&quot;&amp;[.A3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style-name="ce223" table:formula="of:=1-COUNTIF([FRs.$C$2:.$C$1002]; &quot;=&quot;&amp;[.A3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style-name="ce223" table:formula="of:=1-COUNTIF([FRs.$C$2:.$C$1002]; &quot;=&quot;&amp;[.A3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style-name="ce223" table:formula="of:=1-COUNTIF([FRs.$C$2:.$C$1002]; &quot;=&quot;&amp;[.A3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style-name="ce223" table:formula="of:=1-COUNTIF([FRs.$C$2:.$C$1002]; &quot;=&quot;&amp;[.A3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style-name="ce223" table:formula="of:=1-COUNTIF([FRs.$C$2:.$C$1002]; &quot;=&quot;&amp;[.A3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style-name="ce223" table:formula="of:=1-COUNTIF([FRs.$C$2:.$C$1002]; &quot;=&quot;&amp;[.A3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style-name="ce223" table:formula="of:=1-COUNTIF([FRs.$C$2:.$C$1002]; &quot;=&quot;&amp;[.A3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style-name="ce223" table:formula="of:=1-COUNTIF([FRs.$C$2:.$C$1002]; &quot;=&quot;&amp;[.A3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style-name="ce223" table:formula="of:=1-COUNTIF([FRs.$C$2:.$C$1002]; &quot;=&quot;&amp;[.A3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style-name="ce223" table:formula="of:=1-COUNTIF([FRs.$C$2:.$C$1002]; &quot;=&quot;&amp;[.A3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style-name="ce223" table:formula="of:=1-COUNTIF([FRs.$C$2:.$C$1002]; &quot;=&quot;&amp;[.A3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style-name="ce223" table:formula="of:=1-COUNTIF([FRs.$C$2:.$C$1002]; &quot;=&quot;&amp;[.A3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style-name="ce223" table:formula="of:=1-COUNTIF([FRs.$C$2:.$C$1002]; &quot;=&quot;&amp;[.A3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style-name="ce223" table:formula="of:=1-COUNTIF([FRs.$C$2:.$C$1002]; &quot;=&quot;&amp;[.A3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style-name="ce223" table:formula="of:=1-COUNTIF([FRs.$C$2:.$C$1002]; &quot;=&quot;&amp;[.A3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style-name="ce223" table:formula="of:=1-COUNTIF([FRs.$C$2:.$C$1002]; &quot;=&quot;&amp;[.A3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style-name="ce223" table:formula="of:=1-COUNTIF([FRs.$C$2:.$C$1002]; &quot;=&quot;&amp;[.A3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style-name="ce223" table:formula="of:=1-COUNTIF([FRs.$C$2:.$C$1002]; &quot;=&quot;&amp;[.A3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style-name="ce223" table:formula="of:=1-COUNTIF([FRs.$C$2:.$C$1002]; &quot;=&quot;&amp;[.A3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style-name="ce223" table:formula="of:=1-COUNTIF([FRs.$C$2:.$C$1002]; &quot;=&quot;&amp;[.A3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style-name="ce223" table:formula="of:=1-COUNTIF([FRs.$C$2:.$C$1002]; &quot;=&quot;&amp;[.A3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style-name="ce223" table:formula="of:=1-COUNTIF([FRs.$C$2:.$C$1002]; &quot;=&quot;&amp;[.A3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style-name="ce223" table:formula="of:=1-COUNTIF([FRs.$C$2:.$C$1002]; &quot;=&quot;&amp;[.A3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style-name="ce223" table:formula="of:=1-COUNTIF([FRs.$C$2:.$C$1002]; &quot;=&quot;&amp;[.A3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style-name="ce223" table:formula="of:=1-COUNTIF([FRs.$C$2:.$C$1002]; &quot;=&quot;&amp;[.A3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style-name="ce223" table:formula="of:=1-COUNTIF([FRs.$C$2:.$C$1002]; &quot;=&quot;&amp;[.A3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style-name="ce223" table:formula="of:=1-COUNTIF([FRs.$C$2:.$C$1002]; &quot;=&quot;&amp;[.A3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style-name="ce223" table:formula="of:=1-COUNTIF([FRs.$C$2:.$C$1002]; &quot;=&quot;&amp;[.A3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style-name="ce223" table:formula="of:=1-COUNTIF([FRs.$C$2:.$C$1002]; &quot;=&quot;&amp;[.A3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style-name="ce223" table:formula="of:=1-COUNTIF([FRs.$C$2:.$C$1002]; &quot;=&quot;&amp;[.A3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style-name="ce223" table:formula="of:=1-COUNTIF([FRs.$C$2:.$C$1002]; &quot;=&quot;&amp;[.A3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style-name="ce223" table:formula="of:=1-COUNTIF([FRs.$C$2:.$C$1002]; &quot;=&quot;&amp;[.A3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style-name="ce223" table:formula="of:=1-COUNTIF([FRs.$C$2:.$C$1002]; &quot;=&quot;&amp;[.A3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style-name="ce223" table:formula="of:=1-COUNTIF([FRs.$C$2:.$C$1002]; &quot;=&quot;&amp;[.A3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style-name="ce223" table:formula="of:=1-COUNTIF([FRs.$C$2:.$C$1002]; &quot;=&quot;&amp;[.A3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style-name="ce223" table:formula="of:=1-COUNTIF([FRs.$C$2:.$C$1002]; &quot;=&quot;&amp;[.A3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style-name="ce223" table:formula="of:=1-COUNTIF([FRs.$C$2:.$C$1002]; &quot;=&quot;&amp;[.A3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style-name="ce223" table:formula="of:=1-COUNTIF([FRs.$C$2:.$C$1002]; &quot;=&quot;&amp;[.A3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style-name="ce223" table:formula="of:=1-COUNTIF([FRs.$C$2:.$C$1002]; &quot;=&quot;&amp;[.A3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style-name="ce223" table:formula="of:=1-COUNTIF([FRs.$C$2:.$C$1002]; &quot;=&quot;&amp;[.A3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style-name="ce223" table:formula="of:=1-COUNTIF([FRs.$C$2:.$C$1002]; &quot;=&quot;&amp;[.A3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style-name="ce223" table:formula="of:=1-COUNTIF([FRs.$C$2:.$C$1002]; &quot;=&quot;&amp;[.A3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style-name="ce223" table:formula="of:=1-COUNTIF([FRs.$C$2:.$C$1002]; &quot;=&quot;&amp;[.A3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style-name="ce223" table:formula="of:=1-COUNTIF([FRs.$C$2:.$C$1002]; &quot;=&quot;&amp;[.A3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style-name="ce223" table:formula="of:=1-COUNTIF([FRs.$C$2:.$C$1002]; &quot;=&quot;&amp;[.A3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style-name="ce223" table:formula="of:=1-COUNTIF([FRs.$C$2:.$C$1002]; &quot;=&quot;&amp;[.A3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style-name="ce223" table:formula="of:=1-COUNTIF([FRs.$C$2:.$C$1002]; &quot;=&quot;&amp;[.A3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style-name="ce223" table:formula="of:=1-COUNTIF([FRs.$C$2:.$C$1002]; &quot;=&quot;&amp;[.A3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style-name="ce223" table:formula="of:=1-COUNTIF([FRs.$C$2:.$C$1002]; &quot;=&quot;&amp;[.A3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style-name="ce223" table:formula="of:=1-COUNTIF([FRs.$C$2:.$C$1002]; &quot;=&quot;&amp;[.A3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style-name="ce223" table:formula="of:=1-COUNTIF([FRs.$C$2:.$C$1002]; &quot;=&quot;&amp;[.A3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style-name="ce223" table:formula="of:=1-COUNTIF([FRs.$C$2:.$C$1002]; &quot;=&quot;&amp;[.A3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style-name="ce223" table:formula="of:=1-COUNTIF([FRs.$C$2:.$C$1002]; &quot;=&quot;&amp;[.A3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style-name="ce223" table:formula="of:=1-COUNTIF([FRs.$C$2:.$C$1002]; &quot;=&quot;&amp;[.A3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style-name="ce223" table:formula="of:=1-COUNTIF([FRs.$C$2:.$C$1002]; &quot;=&quot;&amp;[.A3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style-name="ce223" table:formula="of:=1-COUNTIF([FRs.$C$2:.$C$1002]; &quot;=&quot;&amp;[.A3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style-name="ce223" table:formula="of:=1-COUNTIF([FRs.$C$2:.$C$1002]; &quot;=&quot;&amp;[.A3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style-name="ce223" table:formula="of:=1-COUNTIF([FRs.$C$2:.$C$1002]; &quot;=&quot;&amp;[.A3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style-name="ce223" table:formula="of:=1-COUNTIF([FRs.$C$2:.$C$1002]; &quot;=&quot;&amp;[.A3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style-name="ce223" table:formula="of:=1-COUNTIF([FRs.$C$2:.$C$1002]; &quot;=&quot;&amp;[.A3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style-name="ce223" table:formula="of:=1-COUNTIF([FRs.$C$2:.$C$1002]; &quot;=&quot;&amp;[.A3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style-name="ce223" table:formula="of:=1-COUNTIF([FRs.$C$2:.$C$1002]; &quot;=&quot;&amp;[.A3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style-name="ce223" table:formula="of:=1-COUNTIF([FRs.$C$2:.$C$1002]; &quot;=&quot;&amp;[.A4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style-name="ce223" table:formula="of:=1-COUNTIF([FRs.$C$2:.$C$1002]; &quot;=&quot;&amp;[.A4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style-name="ce223" table:formula="of:=1-COUNTIF([FRs.$C$2:.$C$1002]; &quot;=&quot;&amp;[.A4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style-name="ce223" table:formula="of:=1-COUNTIF([FRs.$C$2:.$C$1002]; &quot;=&quot;&amp;[.A4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style-name="ce223" table:formula="of:=1-COUNTIF([FRs.$C$2:.$C$1002]; &quot;=&quot;&amp;[.A40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style-name="ce223" table:formula="of:=1-COUNTIF([FRs.$C$2:.$C$1002]; &quot;=&quot;&amp;[.A4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style-name="ce223" table:formula="of:=1-COUNTIF([FRs.$C$2:.$C$1002]; &quot;=&quot;&amp;[.A40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style-name="ce223" table:formula="of:=1-COUNTIF([FRs.$C$2:.$C$1002]; &quot;=&quot;&amp;[.A4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style-name="ce223" table:formula="of:=1-COUNTIF([FRs.$C$2:.$C$1002]; &quot;=&quot;&amp;[.A40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style-name="ce223" table:formula="of:=1-COUNTIF([FRs.$C$2:.$C$1002]; &quot;=&quot;&amp;[.A4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style-name="ce223" table:formula="of:=1-COUNTIF([FRs.$C$2:.$C$1002]; &quot;=&quot;&amp;[.A4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style-name="ce223" table:formula="of:=1-COUNTIF([FRs.$C$2:.$C$1002]; &quot;=&quot;&amp;[.A4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style-name="ce223" table:formula="of:=1-COUNTIF([FRs.$C$2:.$C$1002]; &quot;=&quot;&amp;[.A4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style-name="ce223" table:formula="of:=1-COUNTIF([FRs.$C$2:.$C$1002]; &quot;=&quot;&amp;[.A4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style-name="ce223" table:formula="of:=1-COUNTIF([FRs.$C$2:.$C$1002]; &quot;=&quot;&amp;[.A4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style-name="ce223" table:formula="of:=1-COUNTIF([FRs.$C$2:.$C$1002]; &quot;=&quot;&amp;[.A4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style-name="ce223" table:formula="of:=1-COUNTIF([FRs.$C$2:.$C$1002]; &quot;=&quot;&amp;[.A4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style-name="ce223" table:formula="of:=1-COUNTIF([FRs.$C$2:.$C$1002]; &quot;=&quot;&amp;[.A4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style-name="ce223" table:formula="of:=1-COUNTIF([FRs.$C$2:.$C$1002]; &quot;=&quot;&amp;[.A4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style-name="ce223" table:formula="of:=1-COUNTIF([FRs.$C$2:.$C$1002]; &quot;=&quot;&amp;[.A4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style-name="ce223" table:formula="of:=1-COUNTIF([FRs.$C$2:.$C$1002]; &quot;=&quot;&amp;[.A4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style-name="ce223" table:formula="of:=1-COUNTIF([FRs.$C$2:.$C$1002]; &quot;=&quot;&amp;[.A4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style-name="ce223" table:formula="of:=1-COUNTIF([FRs.$C$2:.$C$1002]; &quot;=&quot;&amp;[.A4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style-name="ce223" table:formula="of:=1-COUNTIF([FRs.$C$2:.$C$1002]; &quot;=&quot;&amp;[.A4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style-name="ce223" table:formula="of:=1-COUNTIF([FRs.$C$2:.$C$1002]; &quot;=&quot;&amp;[.A4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style-name="ce223" table:formula="of:=1-COUNTIF([FRs.$C$2:.$C$1002]; &quot;=&quot;&amp;[.A4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style-name="ce223" table:formula="of:=1-COUNTIF([FRs.$C$2:.$C$1002]; &quot;=&quot;&amp;[.A4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style-name="ce223" table:formula="of:=1-COUNTIF([FRs.$C$2:.$C$1002]; &quot;=&quot;&amp;[.A4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style-name="ce223" table:formula="of:=1-COUNTIF([FRs.$C$2:.$C$1002]; &quot;=&quot;&amp;[.A4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style-name="ce223" table:formula="of:=1-COUNTIF([FRs.$C$2:.$C$1002]; &quot;=&quot;&amp;[.A4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style-name="ce223" table:formula="of:=1-COUNTIF([FRs.$C$2:.$C$1002]; &quot;=&quot;&amp;[.A4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style-name="ce223" table:formula="of:=1-COUNTIF([FRs.$C$2:.$C$1002]; &quot;=&quot;&amp;[.A4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style-name="ce223" table:formula="of:=1-COUNTIF([FRs.$C$2:.$C$1002]; &quot;=&quot;&amp;[.A4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style-name="ce223" table:formula="of:=1-COUNTIF([FRs.$C$2:.$C$1002]; &quot;=&quot;&amp;[.A4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style-name="ce223" table:formula="of:=1-COUNTIF([FRs.$C$2:.$C$1002]; &quot;=&quot;&amp;[.A4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style-name="ce223" table:formula="of:=1-COUNTIF([FRs.$C$2:.$C$1002]; &quot;=&quot;&amp;[.A4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style-name="ce223" table:formula="of:=1-COUNTIF([FRs.$C$2:.$C$1002]; &quot;=&quot;&amp;[.A4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style-name="ce223" table:formula="of:=1-COUNTIF([FRs.$C$2:.$C$1002]; &quot;=&quot;&amp;[.A4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style-name="ce223" table:formula="of:=1-COUNTIF([FRs.$C$2:.$C$1002]; &quot;=&quot;&amp;[.A4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style-name="ce223" table:formula="of:=1-COUNTIF([FRs.$C$2:.$C$1002]; &quot;=&quot;&amp;[.A4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style-name="ce223" table:formula="of:=1-COUNTIF([FRs.$C$2:.$C$1002]; &quot;=&quot;&amp;[.A4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style-name="ce223" table:formula="of:=1-COUNTIF([FRs.$C$2:.$C$1002]; &quot;=&quot;&amp;[.A4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style-name="ce223" table:formula="of:=1-COUNTIF([FRs.$C$2:.$C$1002]; &quot;=&quot;&amp;[.A4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style-name="ce223" table:formula="of:=1-COUNTIF([FRs.$C$2:.$C$1002]; &quot;=&quot;&amp;[.A4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style-name="ce223" table:formula="of:=1-COUNTIF([FRs.$C$2:.$C$1002]; &quot;=&quot;&amp;[.A4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style-name="ce223" table:formula="of:=1-COUNTIF([FRs.$C$2:.$C$1002]; &quot;=&quot;&amp;[.A4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style-name="ce223" table:formula="of:=1-COUNTIF([FRs.$C$2:.$C$1002]; &quot;=&quot;&amp;[.A4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style-name="ce223" table:formula="of:=1-COUNTIF([FRs.$C$2:.$C$1002]; &quot;=&quot;&amp;[.A4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style-name="ce223" table:formula="of:=1-COUNTIF([FRs.$C$2:.$C$1002]; &quot;=&quot;&amp;[.A4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style-name="ce223" table:formula="of:=1-COUNTIF([FRs.$C$2:.$C$1002]; &quot;=&quot;&amp;[.A4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style-name="ce223" table:formula="of:=1-COUNTIF([FRs.$C$2:.$C$1002]; &quot;=&quot;&amp;[.A4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style-name="ce223" table:formula="of:=1-COUNTIF([FRs.$C$2:.$C$1002]; &quot;=&quot;&amp;[.A4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style-name="ce223" table:formula="of:=1-COUNTIF([FRs.$C$2:.$C$1002]; &quot;=&quot;&amp;[.A4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style-name="ce223" table:formula="of:=1-COUNTIF([FRs.$C$2:.$C$1002]; &quot;=&quot;&amp;[.A4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style-name="ce223" table:formula="of:=1-COUNTIF([FRs.$C$2:.$C$1002]; &quot;=&quot;&amp;[.A4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style-name="ce223" table:formula="of:=1-COUNTIF([FRs.$C$2:.$C$1002]; &quot;=&quot;&amp;[.A4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style-name="ce223" table:formula="of:=1-COUNTIF([FRs.$C$2:.$C$1002]; &quot;=&quot;&amp;[.A4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style-name="ce223" table:formula="of:=1-COUNTIF([FRs.$C$2:.$C$1002]; &quot;=&quot;&amp;[.A4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style-name="ce223" table:formula="of:=1-COUNTIF([FRs.$C$2:.$C$1002]; &quot;=&quot;&amp;[.A4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style-name="ce223" table:formula="of:=1-COUNTIF([FRs.$C$2:.$C$1002]; &quot;=&quot;&amp;[.A4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style-name="ce223" table:formula="of:=1-COUNTIF([FRs.$C$2:.$C$1002]; &quot;=&quot;&amp;[.A4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style-name="ce223" table:formula="of:=1-COUNTIF([FRs.$C$2:.$C$1002]; &quot;=&quot;&amp;[.A4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style-name="ce223" table:formula="of:=1-COUNTIF([FRs.$C$2:.$C$1002]; &quot;=&quot;&amp;[.A4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style-name="ce223" table:formula="of:=1-COUNTIF([FRs.$C$2:.$C$1002]; &quot;=&quot;&amp;[.A4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style-name="ce223" table:formula="of:=1-COUNTIF([FRs.$C$2:.$C$1002]; &quot;=&quot;&amp;[.A4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style-name="ce223" table:formula="of:=1-COUNTIF([FRs.$C$2:.$C$1002]; &quot;=&quot;&amp;[.A4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style-name="ce223" table:formula="of:=1-COUNTIF([FRs.$C$2:.$C$1002]; &quot;=&quot;&amp;[.A4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style-name="ce223" table:formula="of:=1-COUNTIF([FRs.$C$2:.$C$1002]; &quot;=&quot;&amp;[.A4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style-name="ce223" table:formula="of:=1-COUNTIF([FRs.$C$2:.$C$1002]; &quot;=&quot;&amp;[.A4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style-name="ce223" table:formula="of:=1-COUNTIF([FRs.$C$2:.$C$1002]; &quot;=&quot;&amp;[.A4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style-name="ce223" table:formula="of:=1-COUNTIF([FRs.$C$2:.$C$1002]; &quot;=&quot;&amp;[.A4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style-name="ce223" table:formula="of:=1-COUNTIF([FRs.$C$2:.$C$1002]; &quot;=&quot;&amp;[.A4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style-name="ce223" table:formula="of:=1-COUNTIF([FRs.$C$2:.$C$1002]; &quot;=&quot;&amp;[.A4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style-name="ce223" table:formula="of:=1-COUNTIF([FRs.$C$2:.$C$1002]; &quot;=&quot;&amp;[.A4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style-name="ce223" table:formula="of:=1-COUNTIF([FRs.$C$2:.$C$1002]; &quot;=&quot;&amp;[.A4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style-name="ce223" table:formula="of:=1-COUNTIF([FRs.$C$2:.$C$1002]; &quot;=&quot;&amp;[.A4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style-name="ce223" table:formula="of:=1-COUNTIF([FRs.$C$2:.$C$1002]; &quot;=&quot;&amp;[.A4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style-name="ce223" table:formula="of:=1-COUNTIF([FRs.$C$2:.$C$1002]; &quot;=&quot;&amp;[.A4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style-name="ce223" table:formula="of:=1-COUNTIF([FRs.$C$2:.$C$1002]; &quot;=&quot;&amp;[.A4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style-name="ce223" table:formula="of:=1-COUNTIF([FRs.$C$2:.$C$1002]; &quot;=&quot;&amp;[.A4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style-name="ce223" table:formula="of:=1-COUNTIF([FRs.$C$2:.$C$1002]; &quot;=&quot;&amp;[.A4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style-name="ce223" table:formula="of:=1-COUNTIF([FRs.$C$2:.$C$1002]; &quot;=&quot;&amp;[.A4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style-name="ce223" table:formula="of:=1-COUNTIF([FRs.$C$2:.$C$1002]; &quot;=&quot;&amp;[.A4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style-name="ce223" table:formula="of:=1-COUNTIF([FRs.$C$2:.$C$1002]; &quot;=&quot;&amp;[.A4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style-name="ce223" table:formula="of:=1-COUNTIF([FRs.$C$2:.$C$1002]; &quot;=&quot;&amp;[.A4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style-name="ce223" table:formula="of:=1-COUNTIF([FRs.$C$2:.$C$1002]; &quot;=&quot;&amp;[.A4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style-name="ce223" table:formula="of:=1-COUNTIF([FRs.$C$2:.$C$1002]; &quot;=&quot;&amp;[.A4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style-name="ce223" table:formula="of:=1-COUNTIF([FRs.$C$2:.$C$1002]; &quot;=&quot;&amp;[.A4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style-name="ce223" table:formula="of:=1-COUNTIF([FRs.$C$2:.$C$1002]; &quot;=&quot;&amp;[.A4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style-name="ce223" table:formula="of:=1-COUNTIF([FRs.$C$2:.$C$1002]; &quot;=&quot;&amp;[.A4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style-name="ce223" table:formula="of:=1-COUNTIF([FRs.$C$2:.$C$1002]; &quot;=&quot;&amp;[.A4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style-name="ce223" table:formula="of:=1-COUNTIF([FRs.$C$2:.$C$1002]; &quot;=&quot;&amp;[.A4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style-name="ce223" table:formula="of:=1-COUNTIF([FRs.$C$2:.$C$1002]; &quot;=&quot;&amp;[.A4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style-name="ce223" table:formula="of:=1-COUNTIF([FRs.$C$2:.$C$1002]; &quot;=&quot;&amp;[.A4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style-name="ce223" table:formula="of:=1-COUNTIF([FRs.$C$2:.$C$1002]; &quot;=&quot;&amp;[.A4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style-name="ce223" table:formula="of:=1-COUNTIF([FRs.$C$2:.$C$1002]; &quot;=&quot;&amp;[.A4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style-name="ce223" table:formula="of:=1-COUNTIF([FRs.$C$2:.$C$1002]; &quot;=&quot;&amp;[.A4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style-name="ce223" table:formula="of:=1-COUNTIF([FRs.$C$2:.$C$1002]; &quot;=&quot;&amp;[.A4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style-name="ce223" table:formula="of:=1-COUNTIF([FRs.$C$2:.$C$1002]; &quot;=&quot;&amp;[.A4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style-name="ce223" table:formula="of:=1-COUNTIF([FRs.$C$2:.$C$1002]; &quot;=&quot;&amp;[.A4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style-name="ce223" table:formula="of:=1-COUNTIF([FRs.$C$2:.$C$1002]; &quot;=&quot;&amp;[.A5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style-name="ce223" table:formula="of:=1-COUNTIF([FRs.$C$2:.$C$1002]; &quot;=&quot;&amp;[.A5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62:FRs.H69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number:number-style style:name="N123">
      <number:text>MF-</number:text>
      <number:number number:decimal-places="0" loext:min-decimal-places="0" number:min-integer-digits="0"/>
    </number:number-style>
    <number:number-style style:name="N125P0" style:volatile="true">
      <style:text-properties fo:color="#ff0000"/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6:15:58.73498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7-10-09T16:39:22.507604171</dc:date>
    <meta:editing-duration>P3DT9H42M41S</meta:editing-duration>
    <meta:editing-cycles>210</meta:editing-cycles>
    <meta:generator>LibreOffice/5.4.1.2.0$Linux_X86_64 LibreOffice_project/40m0$Build-2</meta:generator>
    <meta:document-statistic meta:table-count="5" meta:cell-count="3945" meta:object-count="0"/>
  </office:meta>
</office:document-meta>
</file>