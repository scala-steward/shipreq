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4.91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2.803cm"/>
    </style:style>
    <style:style style:name="co21" style:family="table-column">
      <style:table-column-properties fo:break-before="auto" style:column-width="4.531cm"/>
    </style:style>
    <style:style style:name="co22" style:family="table-column">
      <style:table-column-properties fo:break-before="auto" style:column-width="3.235cm"/>
    </style:style>
    <style:style style:name="co23" style:family="table-column">
      <style:table-column-properties fo:break-before="auto" style:column-width="8.377cm"/>
    </style:style>
    <style:style style:name="co24" style:family="table-column">
      <style:table-column-properties fo:break-before="auto" style:column-width="2.452cm"/>
    </style:style>
    <style:style style:name="co25" style:family="table-column">
      <style:table-column-properties fo:break-before="auto" style:column-width="6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2.57cm" fo:break-before="auto" style:use-optimal-row-height="true"/>
    </style:style>
    <style:style style:name="ro6" style:family="table-row">
      <style:table-row-properties style:row-height="1.314cm" fo:break-before="auto" style:use-optimal-row-height="true"/>
    </style:style>
    <style:style style:name="ro7" style:family="table-row">
      <style:table-row-properties style:row-height="1.73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4.244cm" fo:break-before="auto" style:use-optimal-row-height="true"/>
    </style:style>
    <style:style style:name="ro11" style:family="table-row">
      <style:table-row-properties style:row-height="2.152cm" fo:break-before="auto" style:use-optimal-row-height="tru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111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008000" style:text-align-source="fix" style:repeat-content="false" style:vertical-align="top"/>
      <style:paragraph-properties fo:text-align="center" fo:margin-left="0cm"/>
      <style:text-properties fo:color="#ffffff"/>
    </style:style>
    <style:style style:name="ce8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1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13" style:family="table-cell" style:parent-style-name="Default" style:data-style-name="N119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to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cccccc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20" style:family="table-cell" style:parent-style-name="Default" style:data-style-name="N119">
      <style:table-cell-properties fo:border-bottom="0.06pt solid #000000" fo:background-color="#800000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21" style:family="table-cell" style:parent-style-name="Default" style:data-style-name="N121">
      <style:table-cell-properties fo:background-color="#e6e6e6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8000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7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30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31" style:family="table-cell" style:parent-style-name="Default">
      <style:table-cell-properties fo:background-color="#008000" fo:border="0.06pt solid #000000" style:vertical-align="top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="0.06pt solid #000000" style:vertical-align="top"/>
    </style:style>
    <style:style style:name="ce33" style:family="table-cell" style:parent-style-name="Default">
      <style:table-cell-properties fo:background-color="#ffff99" fo:border="0.06pt solid #000000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cc" fo:border="0.06pt solid #000000" style:vertical-align="top"/>
    </style:style>
    <style:style style:name="ce36" style:family="table-cell" style:parent-style-name="Default">
      <style:table-cell-properties fo:background-color="#ffffcc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cc" fo:border="0.06pt solid #000000" style:vertical-align="top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="0.06pt solid #000000" style:vertical-align="top"/>
      <style:text-properties style:use-window-font-color="true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transparent" fo:border="0.06pt solid #000000" style:vertical-align="top"/>
    </style:style>
    <style:style style:name="ce41" style:family="table-cell" style:parent-style-name="Default">
      <style:table-cell-properties fo:background-color="transparent" fo:border="0.06pt solid #000000" style:vertical-align="top"/>
      <style:text-properties style:font-name="Arimo" style:font-name-asian="TianZhen" style:font-name-complex="FreeSans"/>
    </style:style>
    <style:style style:name="ce42" style:family="table-cell" style:parent-style-name="Default">
      <style:table-cell-properties fo:background-color="#008000" style:vertical-align="top"/>
      <style:text-properties fo:color="#ffffff"/>
    </style:style>
    <style:style style:name="ce43" style:family="table-cell" style:parent-style-name="Default">
      <style:table-cell-properties fo:background-color="#cccccc" style:vertical-align="top"/>
      <style:text-properties style:use-window-font-color="true"/>
    </style:style>
    <style:style style:name="ce44" style:family="table-cell" style:parent-style-name="Default">
      <style:table-cell-properties fo:border="0.06pt solid #000000" style:vertical-align="top"/>
      <style:text-properties fo:color="#999999"/>
    </style:style>
    <style:style style:name="ce45" style:family="table-cell" style:parent-style-name="Default">
      <style:table-cell-properties fo:border-bottom="0.06pt solid #000000" fo:background-color="#800000" fo:border-left="none" fo:border-right="none" fo:border-top="0.06pt solid #000000" style:vertical-align="top"/>
    </style:style>
    <style:style style:name="ce46" style:family="table-cell" style:parent-style-name="Default">
      <style:table-cell-properties style:vertical-align="top"/>
    </style:style>
    <style:style style:name="ce47" style:family="table-cell" style:parent-style-name="Default">
      <style:table-cell-properties fo:background-color="#008000" fo:wrap-option="wrap" fo:border="0.06pt solid #000000" style:vertical-align="top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wrap-option="wrap" fo:border="0.06pt solid #000000" style:vertical-align="top"/>
      <style:text-properties style:font-name="Arimo" style:font-name-asian="TianZhen" style:font-name-complex="FreeSans"/>
    </style:style>
    <style:style style:name="ce49" style:family="table-cell" style:parent-style-name="Default">
      <style:table-cell-properties fo:background-color="#ffff99" fo:wrap-option="wrap" fo:border="0.06pt solid #000000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wrap-option="wrap" fo:border="0.06pt solid #000000" style:vertical-align="top"/>
    </style:style>
    <style:style style:name="ce51" style:family="table-cell" style:parent-style-name="Default">
      <style:table-cell-properties fo:background-color="#ffff99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2" style:family="table-cell" style:parent-style-name="Default">
      <style:table-cell-properties fo:background-color="#ffffcc" fo:wrap-option="wrap" fo:border="0.06pt solid #000000" style:vertical-align="top"/>
    </style:style>
    <style:style style:name="ce53" style:family="table-cell" style:parent-style-name="Default">
      <style:table-cell-properties fo:background-color="#ffffcc" fo:wrap-option="wrap" fo:border="0.06pt solid #000000" style:vertical-align="top"/>
      <style:text-properties style:font-name="Arimo" fo:font-weight="bold" style:font-name-asian="TianZhen" style:font-weight-asian="bold" style:font-name-complex="FreeSans" style:font-weight-complex="bold"/>
    </style:style>
    <style:style style:name="ce54" style:family="table-cell" style:parent-style-name="Default">
      <style:table-cell-properties fo:wrap-option="wrap" fo:border="0.06pt solid #000000" style:vertical-align="top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ffffcc" fo:wrap-option="wrap" fo:border="0.06pt solid #000000" style:vertical-align="top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58" style:family="table-cell" style:parent-style-name="Default">
      <style:table-cell-properties fo:wrap-option="wrap" fo:border="0.06pt solid #000000" style:vertical-align="top"/>
      <style:text-properties style:use-window-font-color="true"/>
    </style:style>
    <style:style style:name="ce59" style:family="table-cell" style:parent-style-name="Default">
      <style:table-cell-properties fo:background-color="#ffffcc" fo:wrap-option="wrap" fo:border="0.06pt solid #000000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cc" fo:wrap-option="wrap" fo:border="0.06pt solid #000000" style:vertical-align="top"/>
      <style:text-properties style:font-name="Arimo" style:font-name-asian="TianZhen" style:font-name-complex="FreeSans"/>
    </style:style>
    <style:style style:name="ce61" style:family="table-cell" style:parent-style-name="Default">
      <style:table-cell-properties fo:background-color="#ffffcc" fo:wrap-option="wrap" fo:border="0.06pt solid #000000"/>
    </style:style>
    <style:style style:name="ce62" style:family="table-cell" style:parent-style-name="Default">
      <style:table-cell-properties fo:background-color="#008000" fo:wrap-option="wrap" style:vertical-align="top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wrap-option="wrap" fo:border="0.06pt solid #000000" style:vertical-align="top"/>
      <style:text-properties fo:color="#b3b3b3" fo:font-style="normal" style:font-style-asian="normal" style:font-style-complex="normal"/>
    </style:style>
    <style:style style:name="ce64" style:family="table-cell" style:parent-style-name="Default">
      <style:table-cell-properties fo:background-color="#cccccc" fo:wrap-option="wrap" style:vertical-align="top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wrap-option="wrap" fo:border="0.06pt solid #000000" style:vertical-align="top"/>
      <style:text-properties fo:color="#999999"/>
    </style:style>
    <style:style style:name="ce66" style:family="table-cell" style:parent-style-name="Default">
      <style:table-cell-properties fo:wrap-option="wrap" fo:border="0.06pt solid #000000" style:vertical-align="top"/>
      <style:text-properties fo:color="#999999" style:font-name="Arimo" style:font-name-asian="TianZhen" style:font-name-complex="FreeSans"/>
    </style:style>
    <style:style style:name="ce67" style:family="table-cell" style:parent-style-name="Default">
      <style:table-cell-properties fo:border-bottom="0.06pt solid #000000" fo:background-color="#800000" fo:wrap-option="wrap" fo:border-left="none" fo:border-right="none" fo:border-top="0.06pt solid #000000" style:vertical-align="top"/>
    </style:style>
    <style:style style:name="ce68" style:family="table-cell" style:parent-style-name="Default">
      <style:table-cell-properties fo:wrap-option="wrap" style:vertical-align="top"/>
    </style:style>
    <style:style style:name="ce69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0" style:family="table-cell" style:parent-style-name="Default" style:data-style-name="N37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71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72" style:family="table-cell" style:parent-style-name="Default" style:data-style-name="N37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8000" fo:wrap-option="wrap" style:vertical-align="top"/>
      <style:text-properties fo:color="#ffffff"/>
    </style:style>
    <style:style style:name="ce7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b3b3b3"/>
    </style:style>
    <style:style style:name="ce75" style:family="table-cell" style:parent-style-name="Default">
      <style:table-cell-properties fo:background-color="#cccccc" fo:wrap-option="wrap" style:vertical-align="top"/>
      <style:text-properties style:use-window-font-color="true"/>
    </style:style>
    <style:style style:name="ce76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fo:color="#999999"/>
    </style:style>
    <style:style style:name="ce77" style:family="table-cell" style:parent-style-name="Default">
      <style:table-cell-properties fo:wrap-option="wrap" fo:border="0.06pt solid #000000" style:vertical-align="top"/>
      <style:text-properties fo:color="#ff0000" style:font-name="Arimo" style:font-name-asian="TianZhen" style:font-name-complex="FreeSans"/>
    </style:style>
    <style:style style:name="ce78" style:family="table-cell" style:parent-style-name="Default">
      <style:table-cell-properties fo:wrap-option="wrap" fo:border="0.06pt solid #000000" style:vertical-align="top"/>
      <style:text-properties fo:color="#ff0000"/>
    </style:style>
    <style:style style:name="ce79" style:family="table-cell" style:parent-style-name="Default">
      <style:table-cell-properties fo:background-color="#ffff99" fo:wrap-option="wrap" fo:border="0.06pt solid #000000" style:vertical-align="top"/>
      <style:text-properties style:font-name="Arimo" style:font-name-asian="TianZhen" style:font-name-complex="FreeSans"/>
    </style:style>
    <style:style style:name="ce80" style:family="table-cell" style:parent-style-name="Default">
      <style:table-cell-properties fo:wrap-option="wrap" fo:border="0.06pt solid #000000" style:vertical-align="top"/>
      <style:text-properties fo:color="#b3b3b3"/>
    </style:style>
    <style:style style:name="ce81" style:family="table-cell" style:parent-style-name="Default">
      <style:table-cell-properties fo:border-bottom="0.06pt solid #000000" fo:background-color="#800000" fo:wrap-option="wrap" fo:border-left="none" fo:border-right="0.06pt solid #000000" fo:border-top="0.06pt solid #000000" style:vertical-align="top"/>
    </style:style>
    <style:style style:name="ce8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8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6" style:family="table-cell" style:parent-style-name="Default">
      <style:table-cell-properties fo:background-color="#e6e6e6" fo:wrap-option="wrap" fo:border="0.06pt solid #000000" style:vertical-align="top"/>
      <style:text-properties fo:font-weight="bold" style:font-weight-asian="bold" style:font-weight-complex="bold"/>
    </style:style>
    <style:style style:name="ce87" style:family="table-cell" style:parent-style-name="Default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88" style:family="table-cell" style:parent-style-name="Default">
      <style:table-cell-properties fo:background-color="transparent" fo:wrap-option="wrap" fo:border="0.06pt solid #000000"/>
    </style:style>
    <style:style style:name="ce89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2" style:family="table-cell" style:parent-style-name="Default" style:data-style-name="N111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11">
      <style:table-cell-properties fo:background-color="#9999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19">
      <style:table-cell-properties fo:background-color="#c5000b" style:text-align-source="fix" style:repeat-content="false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19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97" style:family="table-cell" style:parent-style-name="Default" style:data-style-name="N119">
      <style:table-cell-properties style:text-align-source="fix" style:repeat-content="false" fo:border="0.06pt solid #000000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98" style:family="table-cell" style:parent-style-name="Default" style:data-style-name="N119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9" style:family="table-cell" style:parent-style-name="Default" style:data-style-name="N119">
      <style:table-cell-properties fo:background-color="#cfe7f5" style:text-align-source="fix" style:repeat-content="false" fo:border="0.06pt solid #000000" style:vertical-align="top"/>
      <style:paragraph-properties fo:text-align="center" fo:margin-left="0cm"/>
      <style:text-properties fo:color="#000080" fo:font-weight="bold" style:font-weight-asian="bold" style:font-weight-complex="bold"/>
    </style:style>
    <style:style style:name="ce100" style:family="table-cell" style:parent-style-name="Default" style:data-style-name="N111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19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103" style:family="table-cell" style:parent-style-name="Default" style:data-style-name="N119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FRs" table:style-name="ta1">
        <office:forms form:automatic-focus="false" form:apply-design-mode="false"/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46"/>
        <table:table-column table:style-name="co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14"/>
        <table:table-column table:style-name="co8" table:default-cell-style-name="ce14"/>
        <table:table-column table:style-name="co9" table:default-cell-style-name="ce83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1010" table:default-cell-style-name="ce46"/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21" table:formula="of:=MAX([.C$2:.C$593])+1" office:value-type="float" office:value="197" calcext:value-type="float">
            <text:p/>
          </table:table-cell>
          <table:table-cell table:style-name="ce1" office:value-type="string" calcext:value-type="string">
            <text:p>SEMANTIC I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TODO</text:p>
          </table:table-cell>
          <table:table-cell table:style-name="ce82" office:value-type="string" calcext:value-type="string">
            <text:p>Complete</text:p>
          </table:table-cell>
          <table:table-cell table:style-name="ce82" office:value-type="string" calcext:value-type="string">
            <text:p>Correct</text:p>
          </table:table-cell>
          <table:table-cell table:style-name="ce82" office:value-type="string" calcext:value-type="string">
            <text:p>Feasible</text:p>
          </table:table-cell>
          <table:table-cell table:style-name="ce82" office:value-type="string" calcext:value-type="string">
            <text:p>Necessary</text:p>
          </table:table-cell>
          <table:table-cell table:style-name="ce82" office:value-type="string" calcext:value-type="string">
            <text:p>Prioritised</text:p>
          </table:table-cell>
          <table:table-cell table:style-name="ce82" office:value-type="string" calcext:value-type="string">
            <text:p>Unambiguous</text:p>
          </table:table-cell>
          <table:table-cell table:style-name="ce82" office:value-type="string" calcext:value-type="string">
            <text:p>Verifiable</text:p>
          </table:table-cell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uce</text:p>
          </table:table-cell>
          <table:table-cell table:style-name="ce47" office:value-type="string" calcext:value-type="string">
            <text:p>MF-01: Use Case Editor</text:p>
          </table:table-cell>
          <table:table-cell table:style-name="ce47" table:number-columns-repeated="2"/>
          <table:table-cell table:style-name="ce82" table:number-columns-repeated="7"/>
          <table:table-cell table:style-name="ce84" table:number-columns-repeated="1008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82" calcext:value-type="float">
            <text:p>82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reqs from UC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50" calcext:value-type="float">
            <text:p>150</text:p>
          </table:table-cell>
          <table:table-cell table:style-name="ce32" office:value-type="string" calcext:value-type="string">
            <text:p>-</text:p>
          </table:table-cell>
          <table:table-cell table:style-name="ce48" office:value-type="string" calcext:value-type="string">
            <text:p>BA shall be able to reference SHRs from UC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fieldset</text:p>
          </table:table-cell>
          <table:table-cell table:style-name="ce47" office:value-type="string" calcext:value-type="string">
            <text:p>MF-05: Field Customisation</text:p>
          </table:table-cell>
          <table:table-cell table:style-name="ce47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uc.mod</text:p>
          </table:table-cell>
          <table:table-cell table:style-name="ce49" office:value-type="string" calcext:value-type="string">
            <text:p>Modifying a UC field set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14" calcext:value-type="float">
            <text:p>114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UCs have content for each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7" calcext:value-type="float">
            <text:p>47</text:p>
          </table:table-cell>
          <table:table-cell table:style-name="ce34" office:value-type="string" calcext:value-type="string">
            <text:p><text:s text:c="4"/>.bin</text:p>
          </table:table-cell>
          <table:table-cell table:style-name="ce50" office:value-type="string" calcext:value-type="string">
            <text:p>When (soft) deleting a UC field, System shall move it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0" calcext:value-type="float">
            <text:p>40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UC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1" calcext:value-type="float">
            <text:p>41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 UC field is restored, System shall restore corresponding field values for each U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01</text:p>
          </table:table-cell>
          <table:table-cell table:style-name="ce23" office:value-type="float" office:value="65" calcext:value-type="float">
            <text:p>65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UC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llreq.mod</text:p>
          </table:table-cell>
          <table:table-cell table:style-name="ce49" office:value-type="string" calcext:value-type="string">
            <text:p>Modifying an LL-req field set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6" calcext:value-type="float">
            <text:p>12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see a list of all existing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7" calcext:value-type="float">
            <text:p>12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8" calcext:value-type="float">
            <text:p>12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29" calcext:value-type="float">
            <text:p>129</text:p>
          </table:table-cell>
          <table:table-cell table:style-name="ce34" office:value-type="string" calcext:value-type="string">
            <text:p><text:s text:c="4"/>.order</text:p>
          </table:table-cell>
          <table:table-cell table:style-name="ce50" office:value-type="string" calcext:value-type="string">
            <text:p>BA shall be able to reorder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0" calcext:value-type="float">
            <text:p>13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4" calcext:value-type="float">
            <text:p>134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48" office:value-type="string" calcext:value-type="string">
            <text:p>System shall indicate how many LL-reqs have content for each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5" calcext:value-type="float">
            <text:p>135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48" office:value-type="string" calcext:value-type="string">
            <text:p>BA shall be able to see each instance of content for an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1" calcext:value-type="float">
            <text:p>131</text:p>
          </table:table-cell>
          <table:table-cell table:style-name="ce34" office:value-type="string" calcext:value-type="string">
            <text:p><text:s text:c="4"/>.bin</text:p>
          </table:table-cell>
          <table:table-cell table:style-name="ce50" office:value-type="string" calcext:value-type="string">
            <text:p>When (soft) deleting an LL-req field, System shall move it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2" calcext:value-type="float">
            <text:p>132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LL-req fiel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33" calcext:value-type="float">
            <text:p>133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0" office:value-type="string" calcext:value-type="string">
            <text:p>When an LL-req field is restored, System shall restore corresponding field values for each LL-req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6</text:p>
            <text:p>MF-12</text:p>
          </table:table-cell>
          <table:table-cell table:style-name="ce23" office:value-type="float" office:value="136" calcext:value-type="float">
            <text:p>136</text:p>
          </table:table-cell>
          <table:table-cell table:style-name="ce34" office:value-type="string" calcext:value-type="string">
            <text:p><text:s text:c="2"/>.mandatory</text:p>
          </table:table-cell>
          <table:table-cell table:style-name="ce50" office:value-type="string" calcext:value-type="string">
            <text:p>BA shall be able to specify mandatory-ness of LL-req field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9" office:value-type="string" calcext:value-type="string">
            <text:p>Field types</text:p>
          </table:table-cell>
          <table:table-cell table:style-name="ce49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43" calcext:value-type="float">
            <text:p>43</text:p>
          </table:table-cell>
          <table:table-cell table:style-name="ce34" office:value-type="string" calcext:value-type="string">
            <text:p><text:s text:c="2"/>.text</text:p>
          </table:table-cell>
          <table:table-cell table:style-name="ce50" office:value-type="string" calcext:value-type="string">
            <text:p>System shall provide a field type: Text field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44" calcext:value-type="float">
            <text:p>44</text:p>
          </table:table-cell>
          <table:table-cell table:style-name="ce34" office:value-type="string" calcext:value-type="string">
            <text:p><text:s text:c="4"/>.name</text:p>
          </table:table-cell>
          <table:table-cell table:style-name="ce50" office:value-type="string" calcext:value-type="string">
            <text:p>BA shall be able to configure text fields' nam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46" calcext:value-type="float">
            <text:p>46</text:p>
          </table:table-cell>
          <table:table-cell table:style-name="ce34" office:value-type="string" calcext:value-type="string">
            <text:p><text:s text:c="2"/>.grouping</text:p>
          </table:table-cell>
          <table:table-cell table:style-name="ce50" office:value-type="string" calcext:value-type="string">
            <text:p>System shall provide a field type derived from a grouping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 office:value-type="string" calcext:value-type="string">
            <text:p>Work out config details</text:p>
          </table:table-cell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66" calcext:value-type="float">
            <text:p>66</text:p>
          </table:table-cell>
          <table:table-cell table:style-name="ce34" office:value-type="string" calcext:value-type="string">
            <text:p><text:s text:c="2"/>.zero</text:p>
          </table:table-cell>
          <table:table-cell table:style-name="ce50" office:value-type="string" calcext:value-type="string">
            <text:p>All field types that have a concept of mandatory-ness must also provide an emptyness test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7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45" calcext:value-type="float">
            <text:p>45</text:p>
          </table:table-cell>
          <table:table-cell table:style-name="ce34" office:value-type="string" calcext:value-type="string">
            <text:p><text:s text:c="2"/>.uc.flowgraph</text:p>
          </table:table-cell>
          <table:table-cell table:style-name="ce50" office:value-type="string" calcext:value-type="string">
            <text:p>System shall provide a UC field type: Flow graph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incompletions</text:p>
          </table:table-cell>
          <table:table-cell table:style-name="ce47" office:value-type="string" calcext:value-type="string">
            <text:p>MF-06: Incompletions</text:p>
          </table:table-cell>
          <table:table-cell table:style-name="ce47" table:number-columns-repeated="2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52" calcext:value-type="float">
            <text:p>52</text:p>
          </table:table-cell>
          <table:table-cell table:style-name="ce32" office:value-type="string" calcext:value-type="string">
            <text:p><text:s text:c="2"/>.render.txt</text:p>
          </table:table-cell>
          <table:table-cell table:style-name="ce50" office:value-type="string" calcext:value-type="string">
            <text:p>System shall render incompletions in reqs, r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F-01</text:p>
            <text:p>MF-12</text:p>
          </table:table-cell>
          <table:table-cell table:style-name="ce23" office:value-type="float" office:value="92" calcext:value-type="float">
            <text:p>92</text:p>
          </table:table-cell>
          <table:table-cell table:style-name="ce32" office:value-type="string" calcext:value-type="string">
            <text:p><text:s text:c="2"/>.render.empty</text:p>
          </table:table-cell>
          <table:table-cell table:style-name="ce50" office:value-type="string" calcext:value-type="string">
            <text:p>System shall render blank, mandatory fields with a red backgroun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style-name="ce82"/>
          <table:table-cell/>
          <table:table-cell table:style-name="ce14"/>
          <table:table-cell table:style-name="ce82" table:number-columns-repeated="4"/>
          <table:table-cell table:style-name="ce84" table:number-columns-repeated="1008"/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inspect</text:p>
          </table:table-cell>
          <table:table-cell table:style-name="ce51" office:value-type="string" calcext:value-type="string">
            <text:p>Inspection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48" calcext:value-type="float">
            <text:p>48</text:p>
          </table:table-cell>
          <table:table-cell table:style-name="ce32" office:value-type="string" calcext:value-type="string">
            <text:p><text:s text:c="4"/>.total</text:p>
          </table:table-cell>
          <table:table-cell table:style-name="ce50" office:value-type="string" calcext:value-type="string">
            <text:p>BA shall be able to see the sum total of incompletion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82"/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49" calcext:value-type="float">
            <text:p>49</text:p>
          </table:table-cell>
          <table:table-cell table:style-name="ce32" office:value-type="string" calcext:value-type="string">
            <text:p><text:s text:c="4"/>.breakdown.uc</text:p>
          </table:table-cell>
          <table:table-cell table:style-name="ce50" office:value-type="string" calcext:value-type="string">
            <text:p>BA shall be able to see a list of UCs and the number of incompletions in each. [Pri=?]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5" calcext:value-type="float">
            <text:p>195</text:p>
          </table:table-cell>
          <table:table-cell table:style-name="ce32" office:value-type="string" calcext:value-type="string">
            <text:p><text:s text:c="4"/>.breakdown.llreq</text:p>
          </table:table-cell>
          <table:table-cell table:style-name="ce50" office:value-type="string" calcext:value-type="string">
            <text:p>BA shall be able to see a list of LL-reqs and the number of incompletions in each. [Pri=?]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35" office:value-type="string" calcext:value-type="string">
            <text:p><text:s text:c="4"/>.filter</text:p>
          </table:table-cell>
          <table:table-cell table:style-name="ce52"/>
          <table:table-cell table:style-name="ce70"/>
          <table:table-cell table:style-name="ce5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50" calcext:value-type="float">
            <text:p>50</text:p>
          </table:table-cell>
          <table:table-cell table:style-name="ce32" office:value-type="string" calcext:value-type="string">
            <text:p><text:s text:c="8"/>.org</text:p>
          </table:table-cell>
          <table:table-cell table:style-name="ce50" office:value-type="string" calcext:value-type="string">
            <text:p>When viewing incompletion results, BA shall be able to filter by grouping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3" office:value-type="float" office:value="51" calcext:value-type="float">
            <text:p>51</text:p>
          </table:table-cell>
          <table:table-cell table:style-name="ce32" office:value-type="string" calcext:value-type="string">
            <text:p><text:s text:c="8"/>.inc-type</text:p>
          </table:table-cell>
          <table:table-cell table:style-name="ce50" office:value-type="string" calcext:value-type="string">
            <text:p>When viewing incompletion results, BA shall be able to filter by incompletion type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12" calcext:value-type="float">
            <text:p>112</text:p>
          </table:table-cell>
          <table:table-cell table:style-name="ce32" office:value-type="string" calcext:value-type="string">
            <text:p><text:s text:c="8"/>.req-type</text:p>
          </table:table-cell>
          <table:table-cell table:style-name="ce50" office:value-type="string" calcext:value-type="string">
            <text:p>When viewing incompletion results, BA shall be able to filter by requirement type(s)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4" office:value-type="float" office:value="67" calcext:value-type="float">
            <text:p>67</text:p>
          </table:table-cell>
          <table:table-cell table:style-name="ce36" office:value-type="string" calcext:value-type="string">
            <text:p><text:s text:c="4"/>.list</text:p>
          </table:table-cell>
          <table:table-cell table:style-name="ce53" office:value-type="string" calcext:value-type="string">
            <text:p>BA shall be able to see a list of incompletions.</text:p>
            <text:p><text:span text:style-name="T1">When viewing a list of incompletions...</text:span></text:p>
          </table:table-cell>
          <table:table-cell table:style-name="ce53" table:number-columns-repeated="2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13" calcext:value-type="float">
            <text:p>113</text:p>
          </table:table-cell>
          <table:table-cell table:style-name="ce32" office:value-type="string" calcext:value-type="string">
            <text:p><text:s text:c="6"/>.req-id</text:p>
          </table:table-cell>
          <table:table-cell table:style-name="ce50" office:value-type="string" calcext:value-type="string">
            <text:p>System shall display the ID of the requirement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1" calcext:value-type="float">
            <text:p>61</text:p>
          </table:table-cell>
          <table:table-cell table:style-name="ce32" office:value-type="string" calcext:value-type="string">
            <text:p><text:s text:c="6"/>.req-name</text:p>
          </table:table-cell>
          <table:table-cell table:style-name="ce50" office:value-type="string" calcext:value-type="string">
            <text:p>System shall display the name of the requirement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2" calcext:value-type="float">
            <text:p>62</text:p>
          </table:table-cell>
          <table:table-cell table:style-name="ce32" office:value-type="string" calcext:value-type="string">
            <text:p><text:s text:c="6"/>.ucf</text:p>
          </table:table-cell>
          <table:table-cell table:style-name="ce50" office:value-type="string" calcext:value-type="string">
            <text:p>System shall display the name of the UC field in which the incompletion exist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3" calcext:value-type="float">
            <text:p>63</text:p>
          </table:table-cell>
          <table:table-cell table:style-name="ce32" office:value-type="string" calcext:value-type="string">
            <text:p><text:s text:c="6"/>.supp</text:p>
          </table:table-cell>
          <table:table-cell table:style-name="ce50" office:value-type="string" calcext:value-type="string">
            <text:p>System shall display the incompletion tag's additional info (if specified)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4" calcext:value-type="float">
            <text:p>64</text:p>
          </table:table-cell>
          <table:table-cell table:style-name="ce32" office:value-type="string" calcext:value-type="string">
            <text:p><text:s text:c="6"/>.surrounds</text:p>
          </table:table-cell>
          <table:table-cell table:style-name="ce50" office:value-type="string" calcext:value-type="string">
            <text:p>System shall display an except of any text surrounding an incompletion. Something along the lines of first 100 chars before and after with an elipsis if need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78" office:value-type="string" calcext:value-type="string">
            <text:p>What about when the surrounds contain other incompletions? Render them in black? Or render all in red and consolidate items in list?</text:p>
          </table:table-cell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track</text:p>
          </table:table-cell>
          <table:table-cell table:style-name="ce51" office:value-type="string" calcext:value-type="string">
            <text:p>Tracking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3" calcext:value-type="float">
            <text:p>53</text:p>
          </table:table-cell>
          <table:table-cell table:style-name="ce32" office:value-type="string" calcext:value-type="string">
            <text:p><text:s text:c="4"/>.empty</text:p>
          </table:table-cell>
          <table:table-cell table:style-name="ce50" office:value-type="string" calcext:value-type="string">
            <text:p>System shall track emptiness of mandatory field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4" calcext:value-type="float">
            <text:p>54</text:p>
          </table:table-cell>
          <table:table-cell table:style-name="ce32" office:value-type="string" calcext:value-type="string">
            <text:p><text:s text:c="4"/>.ref.invalid</text:p>
          </table:table-cell>
          <table:table-cell table:style-name="ce50" office:value-type="string" calcext:value-type="string">
            <text:p>System shall track invalid ref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5" calcext:value-type="float">
            <text:p>55</text:p>
          </table:table-cell>
          <table:table-cell table:style-name="ce32" office:value-type="string" calcext:value-type="string">
            <text:p><text:s text:c="4"/>.ref.deleted</text:p>
          </table:table-cell>
          <table:table-cell table:style-name="ce50" office:value-type="string" calcext:value-type="string">
            <text:p>System shall track [DELETED] refs as incomple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74" calcext:value-type="float">
            <text:p>74</text:p>
          </table:table-cell>
          <table:table-cell table:style-name="ce32" office:value-type="string" calcext:value-type="string">
            <text:p><text:s text:c="4"/>.org.missing</text:p>
          </table:table-cell>
          <table:table-cell table:style-name="ce50" office:value-type="string" calcext:value-type="string">
            <text:p>BA shall be able to track missing orgs (MF-07) by making an org field (FR-46) mandatory.</text:p>
            <text:p>Example: UC missing priority should be an incompletion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45" calcext:value-type="float">
            <text:p>145</text:p>
          </table:table-cell>
          <table:table-cell table:style-name="ce32" office:value-type="string" calcext:value-type="string">
            <text:p><text:s text:c="4"/>.smr</text:p>
          </table:table-cell>
          <table:table-cell table:style-name="ce50" office:value-type="string" calcext:value-type="string">
            <text:p>System shall track Semantic Header Rows without children as incompletio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<text:s text:c="2"/>.tag</text:p>
          </table:table-cell>
          <table:table-cell table:style-name="ce51" office:value-type="string" calcext:value-type="string">
            <text:p>Incompletion tags</text:p>
          </table:table-cell>
          <table:table-cell table:style-name="ce51" table:number-columns-repeated="2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6" calcext:value-type="float">
            <text:p>56</text:p>
          </table:table-cell>
          <table:table-cell table:style-name="ce32" office:value-type="string" calcext:value-type="string">
            <text:p><text:s text:c="4"/>.uc</text:p>
          </table:table-cell>
          <table:table-cell table:style-name="ce50" office:value-type="string" calcext:value-type="string">
            <text:p>BA shall be able to specify incompletion tags in reqs.</text:p>
            <text:p>Example: “#TODO”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7" calcext:value-type="float">
            <text:p>57</text:p>
          </table:table-cell>
          <table:table-cell table:style-name="ce32" office:value-type="string" calcext:value-type="string">
            <text:p><text:s text:c="4"/>.supp</text:p>
          </table:table-cell>
          <table:table-cell table:style-name="ce50" office:value-type="string" calcext:value-type="string">
            <text:p>BA shall be able to provide an incompletion tag instance with additional information as free text.</text:p>
            <text:p>Example “[TODO: Waiting for Bob's report]”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8" calcext:value-type="float">
            <text:p>58</text:p>
          </table:table-cell>
          <table:table-cell table:style-name="ce32" office:value-type="string" calcext:value-type="string">
            <text:p><text:s text:c="4"/>.loose</text:p>
          </table:table-cell>
          <table:table-cell table:style-name="ce50" office:value-type="string" calcext:value-type="string">
            <text:p>BA shall be able to specify incompletion tags as loose notes, i.e. bound to a project but not a specific req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59" calcext:value-type="float">
            <text:p>59</text:p>
          </table:table-cell>
          <table:table-cell table:style-name="ce32" office:value-type="string" calcext:value-type="string">
            <text:p><text:s text:c="4"/>.ref.reqs</text:p>
          </table:table-cell>
          <table:table-cell table:style-name="ce54" office:value-type="string" calcext:value-type="string">
            <text:p>BA shall be able to specify refs to reqs when providing additional info to an incompletion. <text:span text:style-name="T2">[Pri=Nice]</text:span>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0" calcext:value-type="float">
            <text:p>60</text:p>
          </table:table-cell>
          <table:table-cell table:style-name="ce32" office:value-type="string" calcext:value-type="string">
            <text:p><text:s text:c="4"/>.ref.steps</text:p>
          </table:table-cell>
          <table:table-cell table:style-name="ce54" office:value-type="string" calcext:value-type="string">
            <text:p>BA shall be able to specify step refs when providing additional info to an incompletion in a UC field. <text:span text:style-name="T2">[Pri=Nice]</text:span>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5" office:value-type="string" calcext:value-type="string">
            <text:p><text:s text:c="4"/>.type</text:p>
          </table:table-cell>
          <table:table-cell table:style-name="ce53" office:value-type="string" calcext:value-type="string">
            <text:p>Tag types</text:p>
          </table:table-cell>
          <table:table-cell table:style-name="ce70"/>
          <table:table-cell table:style-name="ce52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15" calcext:value-type="float">
            <text:p>115</text:p>
          </table:table-cell>
          <table:table-cell table:style-name="ce32" office:value-type="string" calcext:value-type="string">
            <text:p><text:s text:c="6"/>.list</text:p>
          </table:table-cell>
          <table:table-cell table:style-name="ce50" office:value-type="string" calcext:value-type="string">
            <text:p>BA shall be able to see a list of all incompletion tag typ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8" calcext:value-type="float">
            <text:p>68</text:p>
          </table:table-cell>
          <table:table-cell table:style-name="ce32" office:value-type="string" calcext:value-type="string">
            <text:p><text:s text:c="6"/>.create</text:p>
          </table:table-cell>
          <table:table-cell table:style-name="ce50" office:value-type="string" calcext:value-type="string">
            <text:p>BA shall be able to create new types of incompletion tag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69" calcext:value-type="float">
            <text:p>69</text:p>
          </table:table-cell>
          <table:table-cell table:style-name="ce32" office:value-type="string" calcext:value-type="string">
            <text:p><text:s text:c="6"/>.update</text:p>
          </table:table-cell>
          <table:table-cell table:style-name="ce50" office:value-type="string" calcext:value-type="string">
            <text:p>BA shall be able to rename incompletion tag type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0" calcext:value-type="float">
            <text:p>70</text:p>
          </table:table-cell>
          <table:table-cell table:style-name="ce32" office:value-type="string" calcext:value-type="string">
            <text:p><text:s text:c="8"/>.refs</text:p>
          </table:table-cell>
          <table:table-cell table:style-name="ce50" office:value-type="string" calcext:value-type="string">
            <text:p>System shall appear to rename all instances of a tag when its type is renamed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1" calcext:value-type="float">
            <text:p>7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delete incompletion tag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2" calcext:value-type="float">
            <text:p>7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Before incompletion tag deletion, user shall be able to see a summary of usage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3" calcext:value-type="float">
            <text:p>7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0" office:value-type="string" calcext:value-type="string">
            <text:p>Before incompletion tag deletion, user shall be able to see each instance of entity's values and associations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50"/>
          <table:table-cell table:style-name="ce46" table:number-columns-repeated="7"/>
          <table:table-cell table:number-columns-repeated="1010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96" calcext:value-type="float">
            <text:p>196</text:p>
          </table:table-cell>
          <table:table-cell table:style-name="ce32" office:value-type="string" calcext:value-type="string">
            <text:p><text:s text:c="4"/>.warn</text:p>
          </table:table-cell>
          <table:table-cell table:style-name="ce50" office:value-type="string" calcext:value-type="string">
            <text:p>If there are active associations, System shall warn the user that they will be <text:span text:style-name="T2">permanently</text:span> delet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 office:value-type="string" calcext:value-type="string">
            <text:p>Should this be a soft-deletion? How does this affect history &amp; deleted-reqs?</text:p>
          </table:table-cell>
          <table:table-cell table:style-name="ce46" table:number-columns-repeated="7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groupings</text:p>
          </table:table-cell>
          <table:table-cell table:style-name="ce47" office:value-type="string" calcext:value-type="string">
            <text:p>MF-07: Organisation</text:p>
          </table:table-cell>
          <table:table-cell table:style-name="ce47" table:number-columns-repeated="2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25" calcext:value-type="float">
            <text:p>25</text:p>
          </table:table-cell>
          <table:table-cell table:style-name="ce32" office:value-type="string" calcext:value-type="string">
            <text:p>.transitive</text:p>
          </table:table-cell>
          <table:table-cell table:style-name="ce50" office:value-type="string" calcext:value-type="string">
            <text:p>When determining whether a subject “has” a grouping (e.g. filtering UCs, populating a G-Field), System shall recursively check subject's groupings' children and parents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ap</text:p>
          </table:table-cell>
          <table:table-cell table:style-name="ce51" office:value-type="string" calcext:value-type="string">
            <text:p>Application</text:p>
          </table:table-cell>
          <table:table-cell table:style-name="ce51" table:number-columns-repeated="2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uc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32" office:value-type="string" calcext:value-type="string">
            <text:p><text:s text:c="4"/>.uce-add</text:p>
          </table:table-cell>
          <table:table-cell table:style-name="ce48" office:value-type="string" calcext:value-type="string">
            <text:p>BA shall be able to apply groupings to UC using the UCE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32" office:value-type="string" calcext:value-type="string">
            <text:p><text:s text:c="4"/>.uce-remove</text:p>
          </table:table-cell>
          <table:table-cell table:style-name="ce48" office:value-type="string" calcext:value-type="string">
            <text:p>BA shall be able to remove groupings to UC using the UCE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23" calcext:value-type="float">
            <text:p>23</text:p>
          </table:table-cell>
          <table:table-cell table:style-name="ce32" office:value-type="string" calcext:value-type="string">
            <text:p><text:s text:c="4"/>.ucfields</text:p>
          </table:table-cell>
          <table:table-cell table:style-name="ce50" office:value-type="string" calcext:value-type="string">
            <text:p>BA shall be able to apply groupings to fields within a UC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0" calcext:value-type="float">
            <text:p>190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UCs without using the UC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1" calcext:value-type="float">
            <text:p>191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UC without using the UC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llreq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2" calcext:value-type="float">
            <text:p>192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LL-req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93" calcext:value-type="float">
            <text:p>193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LL-req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string" calcext:value-type="string">
            <text:p><text:s text:c="2"/>.bulk</text:p>
          </table:table-cell>
          <table:table-cell table:style-name="ce55"/>
          <table:table-cell table:style-name="ce5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32" office:value-type="string" calcext:value-type="string">
            <text:p><text:s text:c="4"/>.add</text:p>
          </table:table-cell>
          <table:table-cell table:style-name="ce48" office:value-type="string" calcext:value-type="string">
            <text:p>BA shall be able to apply groupings to multiple LL/UC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<text:s text:c="4"/>.remove</text:p>
          </table:table-cell>
          <table:table-cell table:style-name="ce48" office:value-type="string" calcext:value-type="string">
            <text:p>BA shall be able to remove groupings to multiple LL/UC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types</text:p>
          </table:table-cell>
          <table:table-cell table:style-name="ce49" office:value-type="string" calcext:value-type="string">
            <text:p>Grouping types</text:p>
          </table:table-cell>
          <table:table-cell table:style-name="ce4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3" calcext:value-type="float">
            <text:p>13</text:p>
          </table:table-cell>
          <table:table-cell table:style-name="ce32" office:value-type="string" calcext:value-type="string">
            <text:p><text:s text:c="2"/>.tree</text:p>
          </table:table-cell>
          <table:table-cell table:style-name="ce50" office:value-type="string" calcext:value-type="string">
            <text:p>BA shall be able to create a tree of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4" calcext:value-type="float">
            <text:p>14</text:p>
          </table:table-cell>
          <table:table-cell table:style-name="ce32" office:value-type="string" calcext:value-type="string">
            <text:p><text:s text:c="4"/>.order</text:p>
          </table:table-cell>
          <table:table-cell table:style-name="ce50" office:value-type="string" calcext:value-type="string">
            <text:p>When modifying groupings in a tree, BA shall be able to specify the order of children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5" calcext:value-type="float">
            <text:p>15</text:p>
          </table:table-cell>
          <table:table-cell table:style-name="ce38" office:value-type="string" calcext:value-type="string">
            <text:p><text:s text:c="4"/>.many2many</text:p>
          </table:table-cell>
          <table:table-cell table:style-name="ce50" office:value-type="string" calcext:value-type="string">
            <text:p>When modifying groupings in a tree, BA shall be able to specify multiple parents of a child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9" calcext:value-type="float">
            <text:p>19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create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7" calcext:value-type="float">
            <text:p>17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groupings.</text:p>
          </table:table-cell>
          <table:table-cell table:style-name="ce69" office:value-type="date" office:date-value="2014-02-07" calcext:value-type="date">
            <text:p>4167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5" calcext:value-type="float">
            <text:p>185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a grouping after it is renam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" calcext:value-type="float">
            <text:p>18</text:p>
          </table:table-cell>
          <table:table-cell table:style-name="ce32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grouping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32" office:value-type="string" calcext:value-type="string">
            <text:p><text:s text:c="4"/>.fieldset</text:p>
          </table:table-cell>
          <table:table-cell table:style-name="ce50" office:value-type="string" calcext:value-type="string">
            <text:p>When a grouping is deleted, System shall keep fields based on that grouping intact. (They will become incompletion problems, see ???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78" office:value-type="string" calcext:value-type="string">
            <text:p>See what? Confirm this is how it will work</text:p>
          </table:table-cell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6" calcext:value-type="float">
            <text:p>186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grouping deletion, user shall be able to see a summary of usage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7" calcext:value-type="float">
            <text:p>187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grouping deletion, user shall be able to see each instance of grouping's values and associations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8" calcext:value-type="float">
            <text:p>188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56" office:value-type="string" calcext:value-type="string">
            <text:p>System shall hard-delete an grouping only when it has never been used and has no associations (including soft-deleted associations)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89" calcext:value-type="float">
            <text:p>189</text:p>
          </table:table-cell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Upon grouping deletion, System shall move it to the bin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7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1" calcext:value-type="float">
            <text:p>31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50" office:value-type="string" calcext:value-type="string">
            <text:p>BA shall be able to restore deleted groupings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2" calcext:value-type="float">
            <text:p>32</text:p>
          </table:table-cell>
          <table:table-cell table:style-name="ce32" office:value-type="string" calcext:value-type="string">
            <text:p><text:s text:c="4"/>.aps</text:p>
          </table:table-cell>
          <table:table-cell table:style-name="ce50" office:value-type="string" calcext:value-type="string">
            <text:p>When a grouping is restored, its requirement applications should be restored too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filter</text:p>
          </table:table-cell>
          <table:table-cell table:style-name="ce49" office:value-type="string" calcext:value-type="string">
            <text:p>Filter workings</text:p>
          </table:table-cell>
          <table:table-cell table:style-name="ce49" table:number-columns-repeated="2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28" calcext:value-type="float">
            <text:p>28</text:p>
          </table:table-cell>
          <table:table-cell table:style-name="ce32" office:value-type="string" calcext:value-type="string">
            <text:p><text:s text:c="2"/>.not</text:p>
          </table:table-cell>
          <table:table-cell table:style-name="ce50" office:value-type="string" calcext:value-type="string">
            <text:p>When specifying a grouping filter, User shall be able to specify NOT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29" calcext:value-type="float">
            <text:p>29</text:p>
          </table:table-cell>
          <table:table-cell table:style-name="ce32" office:value-type="string" calcext:value-type="string">
            <text:p><text:s text:c="2"/>.and</text:p>
          </table:table-cell>
          <table:table-cell table:style-name="ce50" office:value-type="string" calcext:value-type="string">
            <text:p>When specifying a grouping filter, User shall be able to specify AN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float" office:value="30" calcext:value-type="float">
            <text:p>30</text:p>
          </table:table-cell>
          <table:table-cell table:style-name="ce32" office:value-type="string" calcext:value-type="string">
            <text:p><text:s text:c="2"/>.or</text:p>
          </table:table-cell>
          <table:table-cell table:style-name="ce50" office:value-type="string" calcext:value-type="string">
            <text:p>When specifying a grouping filter, User shall be able to specify OR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6" office:value-type="float" office:value="34" calcext:value-type="float">
            <text:p>34</text:p>
          </table:table-cell>
          <table:table-cell table:style-name="ce33" office:value-type="string" calcext:value-type="string">
            <text:p>.browse</text:p>
          </table:table-cell>
          <table:table-cell table:style-name="ce49" office:value-type="string" calcext:value-type="string">
            <text:p>BA shall be able to browse groupings.</text:p>
          </table:table-cell>
          <table:table-cell table:style-name="ce71" office:value-type="date" office:date-value="2014-02-13" calcext:value-type="date">
            <text:p>41683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5" calcext:value-type="float">
            <text:p>35</text:p>
          </table:table-cell>
          <table:table-cell table:style-name="ce32" office:value-type="string" calcext:value-type="string">
            <text:p><text:s text:c="2"/>.rescope</text:p>
          </table:table-cell>
          <table:table-cell table:style-name="ce50" office:value-type="string" calcext:value-type="string">
            <text:p>BA shall be able to narrow the scope of browsing data, to a grouping with children.</text:p>
          </table:table-cell>
          <table:table-cell table:style-name="ce69" office:value-type="date" office:date-value="2014-09-05" calcext:value-type="date">
            <text:p>41887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6" calcext:value-type="float">
            <text:p>36</text:p>
          </table:table-cell>
          <table:table-cell table:style-name="ce32" office:value-type="string" calcext:value-type="string">
            <text:p><text:s text:c="2"/>.count</text:p>
          </table:table-cell>
          <table:table-cell table:style-name="ce50" office:value-type="string" calcext:value-type="string">
            <text:p>System shall display the number of reqs associated with each grouping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7" calcext:value-type="float">
            <text:p>37</text:p>
          </table:table-cell>
          <table:table-cell table:style-name="ce32" office:value-type="string" calcext:value-type="string">
            <text:p><text:s text:c="2"/>.missing</text:p>
          </table:table-cell>
          <table:table-cell table:style-name="ce50" office:value-type="string" calcext:value-type="string">
            <text:p>System shall display the number of reqs to which the top-level grouping is not applied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5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8" calcext:value-type="float">
            <text:p>38</text:p>
          </table:table-cell>
          <table:table-cell table:style-name="ce32" office:value-type="string" calcext:value-type="string">
            <text:p><text:s text:c="2"/>.read-ucs</text:p>
          </table:table-cell>
          <table:table-cell table:style-name="ce50" office:value-type="string" calcext:value-type="string">
            <text:p>BA shall be able to read all UCs with a given grouping applied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78" office:value-type="string" calcext:value-type="string">
            <text:p>Hmm... How does this play with LL-Reqs?</text:p>
          </table:table-cell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39" calcext:value-type="float">
            <text:p>39</text:p>
          </table:table-cell>
          <table:table-cell table:style-name="ce32" office:value-type="string" calcext:value-type="string">
            <text:p><text:s text:c="2"/>.read-steps</text:p>
          </table:table-cell>
          <table:table-cell table:style-name="ce50" office:value-type="string" calcext:value-type="string">
            <text:p>BA shall be able to read all UC steps with a given grouping applied.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78" office:value-type="string" calcext:value-type="string">
            <text:p>Hmm... How does this play with LL-Reqs?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llreq</text:p>
          </table:table-cell>
          <table:table-cell table:style-name="ce47" office:value-type="string" calcext:value-type="string">
            <text:p>MF-12: Low-level Requirements</text:p>
          </table:table-cell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data</text:p>
          </table:table-cell>
          <table:table-cell table:style-name="ce51" office:value-type="string" calcext:value-type="string">
            <text:p>Req Data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8" calcext:value-type="float">
            <text:p>78</text:p>
          </table:table-cell>
          <table:table-cell table:style-name="ce32" office:value-type="string" calcext:value-type="string">
            <text:p><text:s text:c="2"/>.id.auto</text:p>
          </table:table-cell>
          <table:table-cell table:style-name="ce48" office:value-type="string" calcext:value-type="string">
            <text:p>System shall allocate reqs a unique ID automatically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9" calcext:value-type="float">
            <text:p>79</text:p>
          </table:table-cell>
          <table:table-cell table:style-name="ce32" office:value-type="string" calcext:value-type="string">
            <text:p><text:s text:c="2"/>.id.fmt</text:p>
          </table:table-cell>
          <table:table-cell table:style-name="ce48" office:value-type="string" calcext:value-type="string">
            <text:p>System shall create unique ID reqs by combining a req-type's mnemonic &amp; a number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77" calcext:value-type="float">
            <text:p>77</text:p>
          </table:table-cell>
          <table:table-cell table:style-name="ce32" office:value-type="string" calcext:value-type="string">
            <text:p><text:s text:c="2"/>.last-updated</text:p>
          </table:table-cell>
          <table:table-cell table:style-name="ce48" office:value-type="string" calcext:value-type="string">
            <text:p>System shall maintain the last-updated timestamp of reqs automatically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0" calcext:value-type="float">
            <text:p>80</text:p>
          </table:table-cell>
          <table:table-cell table:style-name="ce32" office:value-type="string" calcext:value-type="string">
            <text:p><text:s text:c="2"/>.ref.reqs</text:p>
          </table:table-cell>
          <table:table-cell table:style-name="ce48" office:value-type="string" calcext:value-type="string">
            <text:p>BA shall be able to reference reqs from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8" calcext:value-type="float">
            <text:p>148</text:p>
          </table:table-cell>
          <table:table-cell table:style-name="ce32" office:value-type="string" calcext:value-type="string">
            <text:p><text:s text:c="2"/>.ref.shr</text:p>
          </table:table-cell>
          <table:table-cell table:style-name="ce48" office:value-type="string" calcext:value-type="string">
            <text:p>BA shall be able to reference SHRs from req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1" calcext:value-type="float">
            <text:p>81</text:p>
          </table:table-cell>
          <table:table-cell table:style-name="ce32" office:value-type="string" calcext:value-type="string">
            <text:p><text:s text:c="2"/>.ref.ucs</text:p>
          </table:table-cell>
          <table:table-cell table:style-name="ce48" office:value-type="string" calcext:value-type="string">
            <text:p>BA shall be able to reference UCs from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27" office:value-type="float" office:value="102" calcext:value-type="float">
            <text:p>102</text:p>
          </table:table-cell>
          <table:table-cell table:style-name="ce33" office:value-type="string" calcext:value-type="string">
            <text:p>.delete</text:p>
          </table:table-cell>
          <table:table-cell table:style-name="ce51" office:value-type="string" calcext:value-type="string">
            <text:p>BA shall be able to (soft) delete reqs.</text:p>
          </table:table-cell>
          <table:table-cell table:style-name="ce71" office:value-type="date" office:date-value="2014-05-15" calcext:value-type="date">
            <text:p>41774</text:p>
          </table:table-cell>
          <table:table-cell table:style-name="ce79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4" calcext:value-type="float">
            <text:p>104</text:p>
          </table:table-cell>
          <table:table-cell table:style-name="ce32" office:value-type="string" calcext:value-type="string">
            <text:p><text:s text:c="2"/>.hide</text:p>
          </table:table-cell>
          <table:table-cell table:style-name="ce48" office:value-type="string" calcext:value-type="string">
            <text:p>BA shall be able to hide deleted reqs from vie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3" calcext:value-type="float">
            <text:p>103</text:p>
          </table:table-cell>
          <table:table-cell table:style-name="ce32" office:value-type="string" calcext:value-type="string">
            <text:p><text:s text:c="2"/>.read</text:p>
          </table:table-cell>
          <table:table-cell table:style-name="ce48" office:value-type="string" calcext:value-type="string">
            <text:p>BA shall be able to read deleted reqs (usually in light grey and/or strikethrough)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6" calcext:value-type="float">
            <text:p>106</text:p>
          </table:table-cell>
          <table:table-cell table:style-name="ce32" office:value-type="string" calcext:value-type="string">
            <text:p><text:s text:c="2"/>.restore</text:p>
          </table:table-cell>
          <table:table-cell table:style-name="ce48" office:value-type="string" calcext:value-type="string">
            <text:p>BA shall be able to restore deleted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107" calcext:value-type="float">
            <text:p>107</text:p>
          </table:table-cell>
          <table:table-cell table:style-name="ce32" office:value-type="string" calcext:value-type="string">
            <text:p><text:s text:c="5"/>.refs</text:p>
          </table:table-cell>
          <table:table-cell table:style-name="ce57" office:value-type="string" calcext:value-type="string">
            <text:p>After restoring a deleted req, (unmodified) refs to it before it was deleted, should no longer be considered incompletion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26"/>
          <table:table-cell table:style-name="ce33" office:value-type="string" calcext:value-type="string">
            <text:p>.reqtypes</text:p>
          </table:table-cell>
          <table:table-cell table:style-name="ce51" office:value-type="string" calcext:value-type="string">
            <text:p>Requirement Types</text:p>
          </table:table-cell>
          <table:table-cell table:style-name="ce71" office:value-type="date" office:date-value="2014-05-16" calcext:value-type="date">
            <text:p>41775</text:p>
          </table:table-cell>
          <table:table-cell table:style-name="ce79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6" calcext:value-type="float">
            <text:p>116</text:p>
          </table:table-cell>
          <table:table-cell table:style-name="ce32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req type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7" calcext:value-type="float">
            <text:p>117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50" office:value-type="string" calcext:value-type="string">
            <text:p>BA shall be able to add a new req typ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8" calcext:value-type="float">
            <text:p>118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a req typ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9" calcext:value-type="float">
            <text:p>119</text:p>
          </table:table-cell>
          <table:table-cell table:style-name="ce32" office:value-type="string" calcext:value-type="string">
            <text:p><text:s text:c="4"/>.refs</text:p>
          </table:table-cell>
          <table:table-cell table:style-name="ce50" office:value-type="string" calcext:value-type="string">
            <text:p>When a req type's mnemonic is changed, System shall appear to rename all refs that include the mnemoni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2" calcext:value-type="float">
            <text:p>122</text:p>
          </table:table-cell>
          <table:table-cell table:style-name="ce32" office:value-type="string" calcext:value-type="string">
            <text:p><text:s text:c="4"/>.mnemonic</text:p>
          </table:table-cell>
          <table:table-cell table:style-name="ce50" office:value-type="string" calcext:value-type="string">
            <text:p>BA shall only be able to associate a req-type's mnemonic to the req-type that it was first associated with.</text:p>
            <text:p>i.e. System shall retain of history of mnemonics and prevent reuse.</text:p>
            <text:p>Required for CO-5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0" calcext:value-type="float">
            <text:p>120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0" office:value-type="string" calcext:value-type="string">
            <text:p>BA shall be able to (soft) delete a req type only when there are no reqs associated with it. (Excludes reqs in deleted status and inactive associations (e.g FR-91)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1" calcext:value-type="float">
            <text:p>121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0" office:value-type="string" calcext:value-type="string">
            <text:p>When listing req types, BA shall be able to see a summary of usage. (i.e. count of associated reqs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3" calcext:value-type="float">
            <text:p>123</text:p>
          </table:table-cell>
          <table:table-cell table:style-name="ce32" office:value-type="string" calcext:value-type="string">
            <text:p><text:s text:c="4"/>.hard</text:p>
          </table:table-cell>
          <table:table-cell table:style-name="ce50" office:value-type="string" calcext:value-type="string">
            <text:p>System shall hard-delete a req type only when it has never had any association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4" calcext:value-type="float">
            <text:p>124</text:p>
          </table:table-cell>
          <table:table-cell table:style-name="ce34" office:value-type="string" calcext:value-type="string">
            <text:p><text:s text:c="4"/>.after</text:p>
          </table:table-cell>
          <table:table-cell table:style-name="ce58" office:value-type="string" calcext:value-type="string">
            <text:p>After soft-deletion, req types should move to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25" calcext:value-type="float">
            <text:p>125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8" office:value-type="string" calcext:value-type="string">
            <text:p>BA shall be able to restore req types from the bi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view</text:p>
          </table:table-cell>
          <table:table-cell table:style-name="ce51" office:value-type="string" calcext:value-type="string">
            <text:p>Req View</text:p>
          </table:table-cell>
          <table:table-cell table:style-name="ce51" table:number-columns-repeated="2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4" calcext:value-type="float">
            <text:p>84</text:p>
          </table:table-cell>
          <table:table-cell table:style-name="ce32" office:value-type="string" calcext:value-type="string">
            <text:p><text:s text:c="2"/>.rows</text:p>
          </table:table-cell>
          <table:table-cell table:style-name="ce48" office:value-type="string" calcext:value-type="string">
            <text:p>BA shall be able to view all LL reqs with each req on its own ro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3" calcext:value-type="float">
            <text:p>83</text:p>
          </table:table-cell>
          <table:table-cell table:style-name="ce32" office:value-type="string" calcext:value-type="string">
            <text:p><text:s text:c="2"/>.table</text:p>
          </table:table-cell>
          <table:table-cell table:style-name="ce48" office:value-type="string" calcext:value-type="string">
            <text:p>BA shall be able to view all LL reqs as a table/grid.</text:p>
          </table:table-cell>
          <table:table-cell table:style-name="ce69" office:value-type="date" office:date-value="2014-05-19" calcext:value-type="date">
            <text:p>41778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6" calcext:value-type="float">
            <text:p>176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8" office:value-type="string" calcext:value-type="string">
            <text:p>BA shall be able to create new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69" calcext:value-type="float">
            <text:p>169</text:p>
          </table:table-cell>
          <table:table-cell table:style-name="ce32" office:value-type="string" calcext:value-type="string">
            <text:p><text:s text:c="2"/>.ucs</text:p>
          </table:table-cell>
          <table:table-cell table:style-name="ce48" office:value-type="string" calcext:value-type="string">
            <text:p>System shall display UCs as rows in the req view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70" calcext:value-type="float">
            <text:p>170</text:p>
          </table:table-cell>
          <table:table-cell table:style-name="ce34" office:value-type="string" calcext:value-type="string">
            <text:p><text:s text:c="4"/>.semid</text:p>
          </table:table-cell>
          <table:table-cell table:style-name="ce48" office:value-type="string" calcext:value-type="string">
            <text:p>BA shall be able to perform on UCs, all semantic-ID related behaviour applicable to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columns</text:p>
          </table:table-cell>
          <table:table-cell table:style-name="ce59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0" calcext:value-type="float">
            <text:p>140</text:p>
          </table:table-cell>
          <table:table-cell table:style-name="ce32" office:value-type="string" calcext:value-type="string">
            <text:p><text:s text:c="4"/>.desc</text:p>
          </table:table-cell>
          <table:table-cell table:style-name="ce48" office:value-type="string" calcext:value-type="string">
            <text:p>In the LL-req table, System shall always display a column of req desc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8" calcext:value-type="float">
            <text:p>138</text:p>
          </table:table-cell>
          <table:table-cell table:style-name="ce32" office:value-type="string" calcext:value-type="string">
            <text:p><text:s text:c="4"/>.ids</text:p>
          </table:table-cell>
          <table:table-cell table:style-name="ce48" office:value-type="string" calcext:value-type="string">
            <text:p>In the LL-req table, System shall always display a column of req I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9" calcext:value-type="float">
            <text:p>139</text:p>
          </table:table-cell>
          <table:table-cell table:style-name="ce32" office:value-type="string" calcext:value-type="string">
            <text:p><text:s text:c="4"/>.semid</text:p>
          </table:table-cell>
          <table:table-cell table:style-name="ce48" office:value-type="string" calcext:value-type="string">
            <text:p>In the LL-req table, System shall always display a column of semantic IDs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5" calcext:value-type="float">
            <text:p>95</text:p>
          </table:table-cell>
          <table:table-cell table:style-name="ce40" office:value-type="string" calcext:value-type="string">
            <text:p><text:s text:c="7"/>.dup</text:p>
          </table:table-cell>
          <table:table-cell table:style-name="ce48" office:value-type="string" calcext:value-type="string">
            <text:p>When the req list view with is sorted by semantic-ID and a req has multiple semantic IDs, System shall render in each position it occurs in the tree. (i.e. nearly-duplicate rows with different semantic IDs)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4" calcext:value-type="float">
            <text:p>94</text:p>
          </table:table-cell>
          <table:table-cell table:style-name="ce40" office:value-type="string" calcext:value-type="string">
            <text:p><text:s text:c="7"/>.indent</text:p>
          </table:table-cell>
          <table:table-cell table:style-name="ce48" office:value-type="string" calcext:value-type="string">
            <text:p>When rendering a tree of semantic IDs, System shall replace components also in the parent req, with indentation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3" calcext:value-type="float">
            <text:p>93</text:p>
          </table:table-cell>
          <table:table-cell table:style-name="ce40" office:value-type="string" calcext:value-type="string">
            <text:p><text:s text:c="7"/>.tree</text:p>
          </table:table-cell>
          <table:table-cell table:style-name="ce48" office:value-type="string" calcext:value-type="string">
            <text:p>When sorting by semantic IDs, System shall display reqs as a tree using sem-ID components (separated by dots) as nodes.</text:p>
            <text:p>Example: A.B.C is a child of A.B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37" calcext:value-type="float">
            <text:p>137</text:p>
          </table:table-cell>
          <table:table-cell table:style-name="ce32" office:value-type="string" calcext:value-type="string">
            <text:p><text:s text:c="4"/>.sorted</text:p>
          </table:table-cell>
          <table:table-cell table:style-name="ce48" office:value-type="string" calcext:value-type="string">
            <text:p>In the LL-req table, System shall give each criterion in the sort criteria it's own colum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editor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2" calcext:value-type="float">
            <text:p>172</text:p>
          </table:table-cell>
          <table:table-cell table:style-name="ce34" office:value-type="string" calcext:value-type="string">
            <text:p><text:s text:c="4"/>.copy</text:p>
          </table:table-cell>
          <table:table-cell table:style-name="ce48" office:value-type="string" calcext:value-type="string">
            <text:p>BA shall be able to create a copy of 1 or more (selected)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3" calcext:value-type="float">
            <text:p>173</text:p>
          </table:table-cell>
          <table:table-cell table:style-name="ce34" office:value-type="string" calcext:value-type="string">
            <text:p><text:s text:c="7"/>.selection</text:p>
          </table:table-cell>
          <table:table-cell table:style-name="ce48" office:value-type="string" calcext:value-type="string">
            <text:p>After creating a copy of LL-reqs (FR-172), System shall change the selection so that only the newly created rows are selected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4" calcext:value-type="float">
            <text:p>174</text:p>
          </table:table-cell>
          <table:table-cell table:style-name="ce34" office:value-type="string" calcext:value-type="string">
            <text:p><text:s text:c="7"/>.semid</text:p>
          </table:table-cell>
          <table:table-cell table:style-name="ce48" office:value-type="string" calcext:value-type="string">
            <text:p>When creating a copy of LL-reqs (FR-172), because sem-IDs are unique, System shall prefix each sem-ID with a unique prefix.</text:p>
            <text:p>Example a.b becomes copy001.a.b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5" calcext:value-type="float">
            <text:p>85</text:p>
          </table:table-cell>
          <table:table-cell table:style-name="ce32" office:value-type="string" calcext:value-type="string">
            <text:p><text:s text:c="4"/>.cursor</text:p>
          </table:table-cell>
          <table:table-cell table:style-name="ce48" office:value-type="string" calcext:value-type="string">
            <text:p>When editing LL reqs, BA shall be able to move the cursor to a different req in both directions with a single keystrok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6" calcext:value-type="float">
            <text:p>156</text:p>
          </table:table-cell>
          <table:table-cell table:style-name="ce34" office:value-type="string" calcext:value-type="string">
            <text:p><text:s text:c="4"/>.dups</text:p>
          </table:table-cell>
          <table:table-cell table:style-name="ce48" office:value-type="string" calcext:value-type="string">
            <text:p>When row is displayed more than once (in semantic trees), editing one instance should update the display of all other instance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7" calcext:value-type="float">
            <text:p>177</text:p>
          </table:table-cell>
          <table:table-cell table:style-name="ce37" office:value-type="string" calcext:value-type="string">
            <text:p><text:s text:c="2"/>.update</text:p>
          </table:table-cell>
          <table:table-cell table:style-name="ce60" office:value-type="string" calcext:value-type="string">
            <text:p>BA shall be able to update an existing LL-req.</text:p>
          </table:table-cell>
          <table:table-cell table:style-name="ce70" office:value-type="date" office:date-value="2014-05-22" calcext:value-type="date">
            <text:p>4178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8" calcext:value-type="float">
            <text:p>178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When an LL-req is updated, System shall appear to rename all references to i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0" calcext:value-type="float">
            <text:p>90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8" office:value-type="string" calcext:value-type="string">
            <text:p>BA shall be able to change the requirement type of a requirement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1" calcext:value-type="float">
            <text:p>91</text:p>
          </table:table-cell>
          <table:table-cell table:style-name="ce32" office:value-type="string" calcext:value-type="string">
            <text:p><text:s text:c="6"/>.restore</text:p>
          </table:table-cell>
          <table:table-cell table:style-name="ce48" office:value-type="string" calcext:value-type="string">
            <text:p>When a req's type is changed and later changed back to what it was previously, System restore it's original I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94" calcext:value-type="float">
            <text:p>194</text:p>
          </table:table-cell>
          <table:table-cell table:style-name="ce32" office:value-type="string" calcext:value-type="string">
            <text:p><text:s text:c="6"/>.bulk</text:p>
          </table:table-cell>
          <table:table-cell table:style-name="ce48" office:value-type="string" calcext:value-type="string">
            <text:p>BA shall be able to set the req-type for multiple reqs simultaneously.</text:p>
          </table:table-cell>
          <table:table-cell table:style-name="ce69" office:value-type="date" office:date-value="2014-05-23" calcext:value-type="date">
            <text:p>41782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7" calcext:value-type="float">
            <text:p>97</text:p>
          </table:table-cell>
          <table:table-cell table:style-name="ce40" office:value-type="string" calcext:value-type="string">
            <text:p><text:s text:c="4"/>.semid</text:p>
          </table:table-cell>
          <table:table-cell table:style-name="ce48" office:value-type="string" calcext:value-type="string">
            <text:p>BA shall be able to modify the semantic IDs of existing req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3" calcext:value-type="float">
            <text:p>143</text:p>
          </table:table-cell>
          <table:table-cell table:style-name="ce40" office:value-type="string" calcext:value-type="string">
            <text:p><text:s text:c="7"/>.0-n</text:p>
          </table:table-cell>
          <table:table-cell table:style-name="ce48" office:value-type="string" calcext:value-type="string">
            <text:p>BA shall be able to apply 0-n semantic IDs to LL-req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6" calcext:value-type="float">
            <text:p>96</text:p>
          </table:table-cell>
          <table:table-cell table:style-name="ce41" office:value-type="string" calcext:value-type="string">
            <text:p><text:s text:c="7"/>.show-all</text:p>
          </table:table-cell>
          <table:table-cell table:style-name="ce48" office:value-type="string" calcext:value-type="string">
            <text:p>BA shall be able to see all semantic IDs for a req with multiple, when editing a single ro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 office:value-type="string" calcext:value-type="string">
            <text:p>Idea: each duplicate row displays all semIDs but the first is the one that reflects its place in the tree, then the rest follow a-z in light grey.</text:p>
          </table:table-cell>
          <table:table-cell table:number-columns-repeated="1017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7" calcext:value-type="float">
            <text:p>167</text:p>
          </table:table-cell>
          <table:table-cell table:style-name="ce34" office:value-type="string" calcext:value-type="string">
            <text:p><text:s text:c="6"/>.bulk</text:p>
          </table:table-cell>
          <table:table-cell table:style-name="ce48" office:value-type="string" calcext:value-type="string">
            <text:p>BA shall be able to modify the common leading semantic ID component(s) of a set of reqs.</text:p>
            <text:p>Example: a.b.c &amp; a.b.d allows modification of “a.b” which BA can turn into “”, “x.b”, “a.b.x”, etc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8" calcext:value-type="float">
            <text:p>168</text:p>
          </table:table-cell>
          <table:table-cell table:style-name="ce34" office:value-type="string" calcext:value-type="string">
            <text:p><text:s text:c="8"/>.no-common</text:p>
          </table:table-cell>
          <table:table-cell table:style-name="ce48" office:value-type="string" calcext:value-type="string">
            <text:p>Further clarifying [FR-167], if when requesting to bulk-modify semantic IDs there is no common prefix, BA shall be able to specify one.</text:p>
            <text:p>Example: a.b &amp; f.g allows modification of “” which BA can turn into “x” to result in x.a.b &amp; x.f.g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float" office:value="171" calcext:value-type="float">
            <text:p>171</text:p>
          </table:table-cell>
          <table:table-cell table:style-name="ce34" office:value-type="string" calcext:value-type="string">
            <text:p><text:s text:c="4"/>.uc.title</text:p>
          </table:table-cell>
          <table:table-cell table:style-name="ce48" office:value-type="string" calcext:value-type="string">
            <text:p>BA shall be able to edit a UC title from the req view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9" calcext:value-type="float">
            <text:p>179</text:p>
          </table:table-cell>
          <table:table-cell table:style-name="ce37" office:value-type="string" calcext:value-type="string">
            <text:p><text:s text:c="2"/>.delete</text:p>
          </table:table-cell>
          <table:table-cell table:style-name="ce61" office:value-type="string" calcext:value-type="string">
            <text:p>Able to (soft) delete LL-req.</text:p>
          </table:table-cell>
          <table:table-cell table:style-name="ce70" office:value-type="date" office:date-value="2014-05-22" calcext:value-type="date">
            <text:p>4178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0" calcext:value-type="float">
            <text:p>180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LL-req deletion, user shall be able to see a count of incoming reference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1" calcext:value-type="float">
            <text:p>181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LL-req deletion, user shall be able to see each instance of incoming reference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2" calcext:value-type="float">
            <text:p>182</text:p>
          </table:table-cell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After LL-req deletion, System shall move entity to the bin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3" calcext:value-type="float">
            <text:p>183</text:p>
          </table:table-cell>
          <table:table-cell table:style-name="ce34" office:value-type="string" calcext:value-type="string">
            <text:p><text:s text:c="2"/>.restore</text:p>
          </table:table-cell>
          <table:table-cell table:style-name="ce56" office:value-type="string" calcext:value-type="string">
            <text:p>BA shall be able to restore LL-reqs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84" calcext:value-type="float">
            <text:p>184</text:p>
          </table:table-cell>
          <table:table-cell table:style-name="ce34" office:value-type="string" calcext:value-type="string">
            <text:p><text:s text:c="4"/>.data</text:p>
          </table:table-cell>
          <table:table-cell table:style-name="ce56" office:value-type="string" calcext:value-type="string">
            <text:p>Upon LL-req restoration, previous values and associations shall be restored also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filter</text:p>
          </table:table-cell>
          <table:table-cell table:style-name="ce59" table:number-columns-repeated="3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7" calcext:value-type="float">
            <text:p>87</text:p>
          </table:table-cell>
          <table:table-cell table:style-name="ce32" office:value-type="string" calcext:value-type="string">
            <text:p><text:s text:c="4"/>.grouping</text:p>
          </table:table-cell>
          <table:table-cell table:style-name="ce48" office:value-type="string" calcext:value-type="string">
            <text:p>BA shall be able to filter view of reqs by grouping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6" calcext:value-type="float">
            <text:p>86</text:p>
          </table:table-cell>
          <table:table-cell table:style-name="ce32" office:value-type="string" calcext:value-type="string">
            <text:p><text:s text:c="4"/>.reqtype</text:p>
          </table:table-cell>
          <table:table-cell table:style-name="ce48" office:value-type="string" calcext:value-type="string">
            <text:p>BA shall be able to filter view of reqs by req-typ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88" calcext:value-type="float">
            <text:p>88</text:p>
          </table:table-cell>
          <table:table-cell table:style-name="ce32" office:value-type="string" calcext:value-type="string">
            <text:p><text:s text:c="4"/>.txt</text:p>
          </table:table-cell>
          <table:table-cell table:style-name="ce48" office:value-type="string" calcext:value-type="string">
            <text:p>BA shall be able to filter view of reqs to rows containing a case-insensitive string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<text:s text:c="2"/>.sort</text:p>
          </table:table-cell>
          <table:table-cell table:style-name="ce59" table:number-columns-repeated="3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8" calcext:value-type="float">
            <text:p>98</text:p>
          </table:table-cell>
          <table:table-cell table:style-name="ce32" office:value-type="string" calcext:value-type="string">
            <text:p><text:s text:c="4"/>.default</text:p>
          </table:table-cell>
          <table:table-cell table:style-name="ce48" office:value-type="string" calcext:value-type="string">
            <text:p>When displaying a req list, by default, System shall sort the reqs by:</text:p>
            <text:p>1. Semantic ID (ASC, then blanks)</text:p>
            <text:p>2. Numeric ID (inc req-type mnemonic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9" calcext:value-type="float">
            <text:p>109</text:p>
          </table:table-cell>
          <table:table-cell table:style-name="ce32" office:value-type="string" calcext:value-type="string">
            <text:p><text:s text:c="4"/>.on-change</text:p>
          </table:table-cell>
          <table:table-cell table:style-name="ce48" office:value-type="string" calcext:value-type="string">
            <text:p>When a req is modified, System shall automatically resort the view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10" calcext:value-type="float">
            <text:p>110</text:p>
          </table:table-cell>
          <table:table-cell table:style-name="ce32" office:value-type="string" calcext:value-type="string">
            <text:p><text:s text:c="4"/>.post-change</text:p>
          </table:table-cell>
          <table:table-cell table:style-name="ce57" office:value-type="string" calcext:value-type="string">
            <text:p>When the user modifies req α and moves the cursor to req β in the same operation (eg. keystroke down), System shall (after re-sorting) preserve the cursors location on req β, and it should be visible on the screen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99" calcext:value-type="float">
            <text:p>99</text:p>
          </table:table-cell>
          <table:table-cell table:style-name="ce32" office:value-type="string" calcext:value-type="string">
            <text:p><text:s text:c="4"/>.custom</text:p>
          </table:table-cell>
          <table:table-cell table:style-name="ce48" office:value-type="string" calcext:value-type="string">
            <text:p>BA shall be able to customise sort logic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1" calcext:value-type="float">
            <text:p>141</text:p>
          </table:table-cell>
          <table:table-cell table:style-name="ce32" office:value-type="string" calcext:value-type="string">
            <text:p><text:s text:c="7"/>.fields</text:p>
          </table:table-cell>
          <table:table-cell table:style-name="ce48" office:value-type="string" calcext:value-type="string">
            <text:p>BA shall be able to use custom LL-req fields in the sort criteria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0" calcext:value-type="float">
            <text:p>100</text:p>
          </table:table-cell>
          <table:table-cell table:style-name="ce32" office:value-type="string" calcext:value-type="string">
            <text:p><text:s text:c="7"/>.mult</text:p>
          </table:table-cell>
          <table:table-cell table:style-name="ce48" office:value-type="string" calcext:value-type="string">
            <text:p>BA shall be able to sort by multiple, ordered columns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8" calcext:value-type="float">
            <text:p>108</text:p>
          </table:table-cell>
          <table:table-cell table:style-name="ce32" office:value-type="string" calcext:value-type="string">
            <text:p><text:s text:c="7"/>.off</text:p>
          </table:table-cell>
          <table:table-cell table:style-name="ce48" office:value-type="string" calcext:value-type="string">
            <text:p>When reqs are sorted using a custom order, BA must be able to restore the default order with a single mouse-click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.refs</text:p>
          </table:table-cell>
          <table:table-cell table:style-name="ce51" office:value-type="string" calcext:value-type="string">
            <text:p>Refs</text:p>
          </table:table-cell>
          <table:table-cell table:style-name="ce51" table:number-columns-repeated="2"/>
          <table:table-cell table:number-columns-repeated="1017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2" calcext:value-type="float">
            <text:p>152</text:p>
          </table:table-cell>
          <table:table-cell table:style-name="ce32" office:value-type="string" calcext:value-type="string">
            <text:p><text:s text:c="2"/>.disp.sem</text:p>
          </table:table-cell>
          <table:table-cell table:style-name="ce48" office:value-type="string" calcext:value-type="string">
            <text:p>For LL-req refs made using semantic ID, System shall render the ref using...</text:p>
            <text:p>  If ref'd sem-ID valid, use it.</text:p>
            <text:p>  If ref'd sem-ID renamed, use renamed one.</text:p>
            <text:p>  If ref'd sem-ID deleted, ref-tgt match {</text:p>
            <text:p>    case 1 sem-ID =&gt; use it</text:p>
            <text:p>    case 0 sem-ID =&gt; use unique-ID</text:p>
            <text:p>    case contains last-known sem-ID =&gt; use that and reassociate so that if it is renamed, the link is preserved</text:p>
            <text:p>    case _ =&gt; use unique ID</text:p>
            <text:p>  }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3" calcext:value-type="float">
            <text:p>153</text:p>
          </table:table-cell>
          <table:table-cell table:style-name="ce32" office:value-type="string" calcext:value-type="string">
            <text:p><text:s text:c="2"/>.disp.sem.short</text:p>
          </table:table-cell>
          <table:table-cell table:style-name="ce48" office:value-type="string" calcext:value-type="string">
            <text:p>When displaying a ref using a sem-ID, System shall omit leading sem-ID components that are the same in both the referer and referee.</text:p>
            <text:p>Example: A.B.C.F has ref [A.B.X.F] should just display [.X.F]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1" calcext:value-type="float">
            <text:p>151</text:p>
          </table:table-cell>
          <table:table-cell table:style-name="ce32" office:value-type="string" calcext:value-type="string">
            <text:p><text:s text:c="2"/>.disp.uniq</text:p>
          </table:table-cell>
          <table:table-cell table:style-name="ce48" office:value-type="string" calcext:value-type="string">
            <text:p>For LL-req refs made using unique ID, System shall render the ref using unique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5" calcext:value-type="float">
            <text:p>155</text:p>
          </table:table-cell>
          <table:table-cell table:style-name="ce32" office:value-type="string" calcext:value-type="string">
            <text:p><text:s text:c="2"/>.parse.sem</text:p>
          </table:table-cell>
          <table:table-cell table:style-name="ce48" office:value-type="string" calcext:value-type="string">
            <text:p>Where BA can specify refs to LL-reqs, BA can specify using a semant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4" calcext:value-type="float">
            <text:p>154</text:p>
          </table:table-cell>
          <table:table-cell table:style-name="ce32" office:value-type="string" calcext:value-type="string">
            <text:p><text:s text:c="2"/>.parse.sem.short</text:p>
          </table:table-cell>
          <table:table-cell table:style-name="ce48" office:value-type="string" calcext:value-type="string">
            <text:p>When parsing sem-ID refs if no literal match is found, System shall search for refs with a suffix matching the given ref, starting with the current sem-tree depth, and if no matches, moving out a layer until all reqs have been tested. If multiple matches are found in the same search depth, System shall insert them all.</text:p>
            <text:p>Eg. In [A.B.C] a ref to [.X] should look for [A.B.C.**.X] → [A.B.**.X] → [A.**.X] → [**.X]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01" calcext:value-type="float">
            <text:p>101</text:p>
          </table:table-cell>
          <table:table-cell table:style-name="ce32" office:value-type="string" calcext:value-type="string">
            <text:p><text:s text:c="2"/>.parse.uniq</text:p>
          </table:table-cell>
          <table:table-cell table:style-name="ce48" office:value-type="string" calcext:value-type="string">
            <text:p>Where BA can specify refs to LL-reqs, BA can specify using a numeric/unique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.shr</text:p>
          </table:table-cell>
          <table:table-cell table:style-name="ce51" office:value-type="string" calcext:value-type="string">
            <text:p>SHR (Semantic Header Row)</text:p>
          </table:table-cell>
          <table:table-cell table:style-name="ce72"/>
          <table:table-cell table:style-name="ce51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4" calcext:value-type="float">
            <text:p>144</text:p>
          </table:table-cell>
          <table:table-cell table:style-name="ce32" office:value-type="string" calcext:value-type="string">
            <text:p><text:s text:c="2"/>.create</text:p>
          </table:table-cell>
          <table:table-cell table:style-name="ce48" office:value-type="string" calcext:value-type="string">
            <text:p>BA shall be able to create an SHR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6" calcext:value-type="float">
            <text:p>146</text:p>
          </table:table-cell>
          <table:table-cell table:style-name="ce32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update only two attributes of an SHR: {sem-ID, desc}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9" calcext:value-type="float">
            <text:p>149</text:p>
          </table:table-cell>
          <table:table-cell table:style-name="ce32" office:value-type="string" calcext:value-type="string">
            <text:p><text:s text:c="4"/>.children</text:p>
          </table:table-cell>
          <table:table-cell table:style-name="ce50" office:value-type="string" calcext:value-type="string">
            <text:p>When the sem-ID of an SHR changes, System shall rename the matching portion of childrens' sem-ID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75" calcext:value-type="float">
            <text:p>175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When an SHR's semID is modified, System shall appear to rename all references to i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47" calcext:value-type="float">
            <text:p>147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48" office:value-type="string" calcext:value-type="string">
            <text:p>BA shall be able to (hard) delete an SHR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.token</text:p>
          </table:table-cell>
          <table:table-cell table:style-name="ce51" office:value-type="string" calcext:value-type="string">
            <text:p>Text Tokens</text:p>
          </table:table-cell>
          <table:table-cell table:style-name="ce72"/>
          <table:table-cell table:style-name="ce51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7" calcext:value-type="float">
            <text:p>157</text:p>
          </table:table-cell>
          <table:table-cell table:style-name="ce39" office:value-type="string" calcext:value-type="string">
            <text:p><text:s text:c="2"/>.create</text:p>
          </table:table-cell>
          <table:table-cell table:style-name="ce39" office:value-type="string" calcext:value-type="string">
            <text:p>BA shall be able to define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8" calcext:value-type="float">
            <text:p>158</text:p>
          </table:table-cell>
          <table:table-cell table:style-name="ce39" office:value-type="string" calcext:value-type="string">
            <text:p><text:s text:c="2"/>.list</text:p>
          </table:table-cell>
          <table:table-cell table:style-name="ce50" office:value-type="string" calcext:value-type="string">
            <text:p>BA shall be able to list all existing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59" calcext:value-type="float">
            <text:p>159</text:p>
          </table:table-cell>
          <table:table-cell table:style-name="ce39" office:value-type="string" calcext:value-type="string">
            <text:p><text:s text:c="2"/>.update</text:p>
          </table:table-cell>
          <table:table-cell table:style-name="ce50" office:value-type="string" calcext:value-type="string">
            <text:p>BA shall be able to modify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0" calcext:value-type="float">
            <text:p>160</text:p>
          </table:table-cell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after a text-token key is rename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1" calcext:value-type="float">
            <text:p>161</text:p>
          </table:table-cell>
          <table:table-cell table:style-name="ce34" office:value-type="string" calcext:value-type="string">
            <text:p><text:s text:c="2"/>.delete</text:p>
          </table:table-cell>
          <table:table-cell table:style-name="ce56" office:value-type="string" calcext:value-type="string">
            <text:p>BA shall be able to (hard) delete text-token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2" calcext:value-type="float">
            <text:p>162</text:p>
          </table:table-cell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text-token deletion, BA shall be able to see a summary of usage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3" calcext:value-type="float">
            <text:p>163</text:p>
          </table:table-cell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text-token deletion, BA shall be able to see each datem using the text-token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4" calcext:value-type="float">
            <text:p>164</text:p>
          </table:table-cell>
          <table:table-cell table:style-name="ce34" office:value-type="string" calcext:value-type="string">
            <text:p><text:s text:c="2"/>.use</text:p>
          </table:table-cell>
          <table:table-cell table:style-name="ce39" office:value-type="string" calcext:value-type="string">
            <text:p>BA shall be able to insert text-tokens in req tex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5" calcext:value-type="float">
            <text:p>165</text:p>
          </table:table-cell>
          <table:table-cell table:style-name="ce34" office:value-type="string" calcext:value-type="string">
            <text:p><text:s text:c="4"/>.render</text:p>
          </table:table-cell>
          <table:table-cell table:style-name="ce48" office:value-type="string" calcext:value-type="string">
            <text:p>When rendering a req value, System shall replace text-tokens with their token-value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3" office:value-type="float" office:value="166" calcext:value-type="float">
            <text:p>166</text:p>
          </table:table-cell>
          <table:table-cell table:style-name="ce34" office:value-type="string" calcext:value-type="string">
            <text:p><text:s text:c="4"/>.edit</text:p>
          </table:table-cell>
          <table:table-cell table:style-name="ce48" office:value-type="string" calcext:value-type="string">
            <text:p>When editing a req value, System shall display text-tokens (i.e. not expanded with their token-values)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7" table:number-columns-repeated="3"/>
          <table:table-cell table:style-name="ce42"/>
          <table:table-cell table:style-name="ce62" office:value-type="string" calcext:value-type="string">
            <text:p>Misc Requirements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3" office:value-type="float" office:value="24" calcext:value-type="float">
            <text:p>24</text:p>
          </table:table-cell>
          <table:table-cell table:style-name="ce32" office:value-type="string" calcext:value-type="string">
            <text:p>readuc.grouping.all</text:p>
          </table:table-cell>
          <table:table-cell table:style-name="ce50" office:value-type="string" calcext:value-type="string">
            <text:p>When reading a UC, the reader shall be able to see all groupings applied to the UC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29" office:value-type="float" office:value="21" calcext:value-type="float">
            <text:p>21</text:p>
          </table:table-cell>
          <table:table-cell table:style-name="ce32" office:value-type="string" calcext:value-type="string">
            <text:p>shares.read.filter</text:p>
          </table:table-cell>
          <table:table-cell table:style-name="ce63" office:value-type="string" calcext:value-type="string">
            <text:p>When reading shared UCs, AnonReader shall be able to filter UCs by groupings. [Pri=Nice]</text:p>
          </table:table-cell>
          <table:table-cell table:style-name="ce74" office:value-type="date" office:date-value="2014-02-07" calcext:value-type="date">
            <text:p>41677</text:p>
          </table:table-cell>
          <table:table-cell table:style-name="ce80"/>
          <table:table-cell table:number-columns-repeated="1017"/>
        </table:table-row>
        <table:table-row table:style-name="ro1">
          <table:table-cell table:number-columns-repeated="2"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revnum</text:p>
          </table:table-cell>
          <table:table-cell table:style-name="ce51" office:value-type="string" calcext:value-type="string">
            <text:p>Revision numbers</text:p>
          </table:table-cell>
          <table:table-cell table:style-name="ce51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26" calcext:value-type="float">
            <text:p>26</text:p>
          </table:table-cell>
          <table:table-cell table:style-name="ce32" office:value-type="string" calcext:value-type="string">
            <text:p><text:s text:c="2"/>.if</text:p>
          </table:table-cell>
          <table:table-cell table:style-name="ce50" office:value-type="string" calcext:value-type="string">
            <text:p>System shall increment the revision number of a requirement anytime <text:span text:style-name="T2">any</text:span><text:span text:style-name="T3"> user-observable change occurs, including field ordering changes, grouping renames, etc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float" office:value="27" calcext:value-type="float">
            <text:p>27</text:p>
          </table:table-cell>
          <table:table-cell table:style-name="ce32" office:value-type="string" calcext:value-type="string">
            <text:p><text:s text:c="2"/>.onlyif</text:p>
          </table:table-cell>
          <table:table-cell table:style-name="ce50" office:value-type="string" calcext:value-type="string">
            <text:p>System should preserve the revision number of a requirement when there is no <text:span text:style-name="T3">user-observable change between revisions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50"/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23" office:value-type="float" office:value="75" calcext:value-type="float">
            <text:p>75</text:p>
          </table:table-cell>
          <table:table-cell table:style-name="ce32" office:value-type="string" calcext:value-type="string">
            <text:p><text:s text:c="2"/>.major</text:p>
          </table:table-cell>
          <table:table-cell table:style-name="ce50" office:value-type="string" calcext:value-type="string">
            <text:p>System shall increment the major component of a revision number when the subject is modified directly by the user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-</text:p>
          </table:table-cell>
          <table:table-cell table:style-name="ce23" office:value-type="float" office:value="76" calcext:value-type="float">
            <text:p>76</text:p>
          </table:table-cell>
          <table:table-cell table:style-name="ce32" office:value-type="string" calcext:value-type="string">
            <text:p><text:s text:c="2"/>.minor</text:p>
          </table:table-cell>
          <table:table-cell table:style-name="ce50" office:value-type="string" calcext:value-type="string">
            <text:p>System shall increment the minor component of a revision number when the subject is modified by System as a consequence of another change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11"/>
          <table:table-cell table:style-name="ce18" table:number-columns-repeated="2"/>
          <table:table-cell table:style-name="ce43"/>
          <table:table-cell table:style-name="ce64" office:value-type="string" calcext:value-type="string">
            <text:p>Deleted or Deferred Requirements</text:p>
          </table:table-cell>
          <table:table-cell table:style-name="ce75" table:number-columns-repeated="2"/>
          <table:table-cell table:number-columns-repeated="1017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44" office:value-type="string" calcext:value-type="string">
            <text:p><text:s text:c="4"/>.shares</text:p>
          </table:table-cell>
          <table:table-cell table:style-name="ce65" office:value-type="string" calcext:value-type="string">
            <text:p>BA shall be able to filter shares' UC selection criteria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 office:value-type="string" calcext:value-type="string">
            <text:p>MF-02: Anon Shares is off the table for now.</text:p>
          </table:table-cell>
          <table:table-cell table:number-columns-repeated="1017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30" office:value-type="float" office:value="20" calcext:value-type="float">
            <text:p>20</text:p>
          </table:table-cell>
          <table:table-cell table:style-name="ce44" office:value-type="string" calcext:value-type="string">
            <text:p><text:s text:c="4"/>.readown</text:p>
          </table:table-cell>
          <table:table-cell table:style-name="ce65" office:value-type="string" calcext:value-type="string">
            <text:p>When reading own UCs, BA shall be able to filter UCs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 office:value-type="string" calcext:value-type="string">
            <text:p>ReadOwnUCs is off the table for now.</text:p>
          </table:table-cell>
          <table:table-cell table:number-columns-repeated="1017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30" office:value-type="float" office:value="12" calcext:value-type="float">
            <text:p>12</text:p>
          </table:table-cell>
          <table:table-cell table:style-name="ce44" office:value-type="string" calcext:value-type="string">
            <text:p><text:s text:c="4"/>.uc-list</text:p>
          </table:table-cell>
          <table:table-cell table:style-name="ce65" office:value-type="string" calcext:value-type="string">
            <text:p>[Obsolete by FR-87]</text:p>
            <text:p>BA shall be able to filter their view of a project's UCs by groupings.</text:p>
          </table:table-cell>
          <table:table-cell table:style-name="ce76" office:value-type="date" office:date-value="2014-05-23" calcext:value-type="date">
            <text:p>41782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42" calcext:value-type="float">
            <text:p>142</text:p>
          </table:table-cell>
          <table:table-cell table:style-name="ce44" office:value-type="string" calcext:value-type="string">
            <text:p><text:s text:c="2"/>.copy</text:p>
          </table:table-cell>
          <table:table-cell table:style-name="ce66" office:value-type="string" calcext:value-type="string">
            <text:p>BA shall be able to copy a field set from another project.</text:p>
          </table:table-cell>
          <table:table-cell table:style-name="ce76" office:value-type="date" office:date-value="2014-05-19" calcext:value-type="date">
            <text:p>41778</text:p>
          </table:table-cell>
          <table:table-cell table:style-name="ce66"/>
          <table:table-cell table:number-columns-repeated="101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42" calcext:value-type="float">
            <text:p>42</text:p>
          </table:table-cell>
          <table:table-cell table:style-name="ce44" office:value-type="string" calcext:value-type="string">
            <text:p><text:s text:c="4"/>.discards</text:p>
          </table:table-cell>
          <table:table-cell table:style-name="ce66" office:value-type="string" calcext:value-type="string">
            <text:p>When copying fields from another project, System shall move fields in the pre-copy fieldset that are absent from fieldset being copied, to the deleted (restorable) field section.</text:p>
          </table:table-cell>
          <table:table-cell table:style-name="ce76" office:value-type="date" office:date-value="2014-02-25" calcext:value-type="date">
            <text:p>41695</text:p>
          </table:table-cell>
          <table:table-cell table:style-name="ce66"/>
          <table:table-cell table:style-name="ce82"/>
          <table:table-cell/>
          <table:table-cell table:style-name="ce14"/>
          <table:table-cell table:number-columns-repeated="10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0" office:value-type="float" office:value="22" calcext:value-type="float">
            <text:p>22</text:p>
          </table:table-cell>
          <table:table-cell table:style-name="ce44" office:value-type="string" calcext:value-type="string">
            <text:p><text:s text:c="2"/>.copy</text:p>
          </table:table-cell>
          <table:table-cell table:style-name="ce65" office:value-type="string" calcext:value-type="string">
            <text:p>BA shall be able to copy a subset of groupings (including child nodes) between projects.</text:p>
          </table:table-cell>
          <table:table-cell table:style-name="ce76" office:value-type="date" office:date-value="2014-02-12" calcext:value-type="date">
            <text:p>41682</text:p>
          </table:table-cell>
          <table:table-cell table:style-name="ce65"/>
          <table:table-cell table:number-columns-repeated="1017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0" office:value-type="float" office:value="105" calcext:value-type="float">
            <text:p>105</text:p>
          </table:table-cell>
          <table:table-cell table:style-name="ce44" office:value-type="string" calcext:value-type="string">
            <text:p><text:s text:c="2"/>.refs</text:p>
          </table:table-cell>
          <table:table-cell table:style-name="ce65" office:value-type="string" calcext:value-type="string">
            <text:p>[Dup of FR-55]</text:p>
            <text:p>System shall track refs to deleted LL-reqs as incompletions.</text:p>
          </table:table-cell>
          <table:table-cell table:style-name="ce76" office:value-type="date" office:date-value="2014-05-15" calcext:value-type="date">
            <text:p>41774</text:p>
          </table:table-cell>
          <table:table-cell table:style-name="ce66"/>
          <table:table-cell table:number-columns-repeated="1017"/>
        </table:table-row>
        <table:table-row table:style-name="ro8">
          <table:table-cell table:style-name="ce12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float" office:value="111" calcext:value-type="float">
            <text:p>111</text:p>
          </table:table-cell>
          <table:table-cell table:style-name="ce44"/>
          <table:table-cell table:style-name="ce65" office:value-type="string" calcext:value-type="string">
            <text:p>[Dup of FR-85]</text:p>
            <text:p>BA  shall be able to move cursor around rows editing different requirements in close succession.</text:p>
          </table:table-cell>
          <table:table-cell table:style-name="ce76" office:value-type="date" office:date-value="2014-05-16" calcext:value-type="date">
            <text:p>41775</text:p>
          </table:table-cell>
          <table:table-cell table:style-name="ce66"/>
          <table:table-cell table:number-columns-repeated="1017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float" office:value="89" calcext:value-type="float">
            <text:p>89</text:p>
          </table:table-cell>
          <table:table-cell table:style-name="ce44" office:value-type="string" calcext:value-type="string">
            <text:p><text:s text:c="4"/>.copy</text:p>
          </table:table-cell>
          <table:table-cell table:style-name="ce66" office:value-type="string" calcext:value-type="string">
            <text:p>[Replaced by FR-172]</text:p>
            <text:p>BA shall be able to create a new req by copying another.</text:p>
          </table:table-cell>
          <table:table-cell table:style-name="ce76" office:value-type="date" office:date-value="2014-05-15" calcext:value-type="date">
            <text:p>41774</text:p>
          </table:table-cell>
          <table:table-cell table:style-name="ce66"/>
          <table:table-cell table:number-columns-repeated="1017"/>
        </table:table-row>
        <table:table-row table:style-name="ro1">
          <table:table-cell table:style-name="ce13"/>
          <table:table-cell table:style-name="ce20" table:number-columns-repeated="2"/>
          <table:table-cell table:style-name="ce45"/>
          <table:table-cell table:style-name="ce67" table:number-columns-repeated="2"/>
          <table:table-cell table:style-name="ce81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" table:style-name="ta1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68"/>
        <table:table-column table:style-name="co20" table:default-cell-style-name="ce14"/>
        <table:table-column table:style-name="co21" table:default-cell-style-name="ce46"/>
        <table:table-column table:style-name="co14" table:number-columns-repeated="1017" table:default-cell-style-name="ce46"/>
        <table:table-row table:style-name="ro2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-β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86" office:value-type="string" calcext:value-type="string">
            <text:p>REQUIREMENT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TODO</text:p>
          </table:table-cell>
          <table:table-cell table:style-name="ce84"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1" calcext:value-type="float">
            <text:p>1</text:p>
          </table:table-cell>
          <table:table-cell table:style-name="ce50" office:value-type="string" calcext:value-type="string">
            <text:p>All use cases in a project share the same field-set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2" calcext:value-type="float">
            <text:p>2</text:p>
          </table:table-cell>
          <table:table-cell table:style-name="ce50" office:value-type="string" calcext:value-type="string">
            <text:p>A field-set cannot contain more than 30 fields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3" calcext:value-type="float">
            <text:p>3</text:p>
          </table:table-cell>
          <table:table-cell table:style-name="ce50" office:value-type="string" calcext:value-type="string">
            <text:p>Each field name in a field-set must be unique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10" office:value-type="string" calcext:value-type="string">
            <text:p>-</text:p>
          </table:table-cell>
          <table:table-cell table:style-name="ce85" office:value-type="float" office:value="7" calcext:value-type="float">
            <text:p>7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4" calcext:value-type="float">
            <text:p>4</text:p>
          </table:table-cell>
          <table:table-cell table:style-name="ce50" office:value-type="string" calcext:value-type="string">
            <text:p>Revision number contract: all data visible in two presentations of a UC shall be identical when the revision numbers match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5" calcext:value-type="float">
            <text:p>5</text:p>
          </table:table-cell>
          <table:table-cell table:style-name="ce50" office:value-type="string" calcext:value-type="string">
            <text:p>When determining UCs without a given grouping applied, System shall select all UCs that do not have the grouping applied to the entire UC. (i.e. the grouping being applied to certain steps is not enough.)</text:p>
          </table:table-cell>
          <table:table-cell table:style-name="ce69" office:value-type="date" office:date-value="2014-02-13" calcext:value-type="date">
            <text:p>41683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BR</text:p>
          </table:table-cell>
          <table:table-cell table:style-name="ce10" office:value-type="float" office:value="6" calcext:value-type="float">
            <text:p>6</text:p>
          </table:table-cell>
          <table:table-cell table:style-name="ce50" office:value-type="string" calcext:value-type="string">
            <text:p>BA shall not be able to remove NC/AC/EC fields from a field-set.</text:p>
          </table:table-cell>
          <table:table-cell table:style-name="ce69" office:value-type="date" office:date-value="2014-02-25" calcext:value-type="date">
            <text:p>41695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10" office:value-type="string" calcext:value-type="string">
            <text:p>BR</text:p>
          </table:table-cell>
          <table:table-cell table:style-name="ce10" office:value-type="float" office:value="7" calcext:value-type="float">
            <text:p>7</text:p>
          </table:table-cell>
          <table:table-cell table:style-name="ce50" office:value-type="string" calcext:value-type="string">
            <text:p>Do not allow copy&amp;paste of UCs. (FR-172)</text:p>
          </table:table-cell>
          <table:table-cell table:style-name="ce69"/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1" calcext:value-type="float">
            <text:p>1</text:p>
          </table:table-cell>
          <table:table-cell table:style-name="ce50" office:value-type="string" calcext:value-type="string">
            <text:p>A field-set cannot be empty.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2" calcext:value-type="float">
            <text:p>2</text:p>
          </table:table-cell>
          <table:table-cell table:style-name="ce50" office:value-type="string" calcext:value-type="string">
            <text:p>Grouping names may be unique per project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48" office:value-type="string" calcext:value-type="string">
            <text:p>Grouping names must not exceed 60 characters.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6" calcext:value-type="float">
            <text:p>6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4" calcext:value-type="float">
            <text:p>4</text:p>
          </table:table-cell>
          <table:table-cell table:style-name="ce48" office:value-type="string" calcext:value-type="string">
            <text:p>When viewing multiple incompletions, the user shall be able to comprehend each item without leaving the page.</text:p>
          </table:table-cell>
          <table:table-cell table:style-name="ce69" office:value-type="date" office:date-value="2014-05-12" calcext:value-type="date">
            <text:p>41771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5" calcext:value-type="float">
            <text:p>5</text:p>
          </table:table-cell>
          <table:table-cell table:style-name="ce56" office:value-type="string" calcext:value-type="string">
            <text:p>A req's unique ID (eg. UC-3, FR-12) should always point to the same logical requirement. In other words, IDs can never be reallocated.</text:p>
          </table:table-cell>
          <table:table-cell table:style-name="ce69" office:value-type="date" office:date-value="2014-05-15" calcext:value-type="date">
            <text:p>41774</text:p>
          </table:table-cell>
          <table:table-cell table:style-name="ce32"/>
          <table:table-cell table:number-columns-repeated="1017"/>
        </table:table-row>
        <table:table-row table:style-name="ro7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87" office:value-type="string" calcext:value-type="string">
            <text:p>In the LL-req editor, If a req's data isn't available on the screen, when BA causes it to be displayed, System shall keep the already-visible data for that req on the screen. User shall not be required to scroll to see both sets of data. (Addresses the issue with horizontal scrolling in excel.)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" calcext:value-type="float">
            <text:p>1</text:p>
          </table:table-cell>
          <table:table-cell table:style-name="ce48" office:value-type="string" calcext:value-type="string">
            <text:p>Groupings have a name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2" calcext:value-type="float">
            <text:p>2</text:p>
          </table:table-cell>
          <table:table-cell table:style-name="ce48" office:value-type="string" calcext:value-type="string">
            <text:p>Groupings have a description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3" calcext:value-type="float">
            <text:p>3</text:p>
          </table:table-cell>
          <table:table-cell table:style-name="ce50" office:value-type="string" calcext:value-type="string">
            <text:p>Groupings can have 0:<text:span text:style-name="T3">n children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4" calcext:value-type="float">
            <text:p>4</text:p>
          </table:table-cell>
          <table:table-cell table:style-name="ce50" office:value-type="string" calcext:value-type="string">
            <text:p>Groupings can have 0:<text:span text:style-name="T3">n parents.</text:span></text:p>
          </table:table-cell>
          <table:table-cell table:style-name="ce69" office:value-type="date" office:date-value="2014-02-12" calcext:value-type="date">
            <text:p>41682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5" calcext:value-type="float">
            <text:p>5</text:p>
          </table:table-cell>
          <table:table-cell table:style-name="ce50" office:value-type="string" calcext:value-type="string">
            <text:p>Requirement type has a unique name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6" calcext:value-type="float">
            <text:p>6</text:p>
          </table:table-cell>
          <table:table-cell table:style-name="ce50" office:value-type="string" calcext:value-type="string">
            <text:p>Requirement type has a unique mnemonic matching /^[A-Z]{1,4}$/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7" calcext:value-type="float">
            <text:p>7</text:p>
          </table:table-cell>
          <table:table-cell table:style-name="ce50" office:value-type="string" calcext:value-type="string">
            <text:p>Semantic Header Rows shall have exactly one semant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8" calcext:value-type="float">
            <text:p>8</text:p>
          </table:table-cell>
          <table:table-cell table:style-name="ce50" office:value-type="string" calcext:value-type="string">
            <text:p>Semantic Header Rows shall not have a numeric ID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9" calcext:value-type="float">
            <text:p>9</text:p>
          </table:table-cell>
          <table:table-cell table:style-name="ce50" office:value-type="string" calcext:value-type="string">
            <text:p>Semantic Header Rows shall not have a user-defined req-type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5" calcext:value-type="float">
            <text:p>5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0" calcext:value-type="float">
            <text:p>10</text:p>
          </table:table-cell>
          <table:table-cell table:style-name="ce50" office:value-type="string" calcext:value-type="string">
            <text:p>Semantic Header Rows shall not have values for custom field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7" calcext:value-type="float">
            <text:p>7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1" calcext:value-type="float">
            <text:p>11</text:p>
          </table:table-cell>
          <table:table-cell table:style-name="ce50" office:value-type="string" calcext:value-type="string">
            <text:p>Semantic Header Rows shall not have groupings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2" calcext:value-type="float">
            <text:p>12</text:p>
          </table:table-cell>
          <table:table-cell table:style-name="ce50" office:value-type="string" calcext:value-type="string">
            <text:p>Text token keys conform to /^[a-z]+(\.[a-z]+)*$/i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3" calcext:value-type="float">
            <text:p>13</text:p>
          </table:table-cell>
          <table:table-cell table:style-name="ce50" office:value-type="string" calcext:value-type="string">
            <text:p>Text token keys are unique per projec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DD</text:p>
          </table:table-cell>
          <table:table-cell table:style-name="ce10" office:value-type="float" office:value="14" calcext:value-type="float">
            <text:p>14</text:p>
          </table:table-cell>
          <table:table-cell table:style-name="ce50" office:value-type="string" calcext:value-type="string">
            <text:p>Text token values are text.</text:p>
          </table:table-cell>
          <table:table-cell table:style-name="ce69" office:value-type="date" office:date-value="2014-05-20" calcext:value-type="date">
            <text:p>41779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15" calcext:value-type="float">
            <text:p>15</text:p>
          </table:table-cell>
          <table:table-cell table:style-name="ce50" office:value-type="string" calcext:value-type="string">
            <text:p>Semantic-IDs are unique per project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1" calcext:value-type="float">
            <text:p>1</text:p>
          </table:table-cell>
          <table:table-cell table:style-name="ce48" office:value-type="string" calcext:value-type="string">
            <text:p>User must be able to organise 100 flat reqs of same type into 5 versions in under 5 minutes.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6"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2" calcext:value-type="float">
            <text:p>2</text:p>
          </table:table-cell>
          <table:table-cell table:style-name="ce48" office:value-type="string" calcext:value-type="string">
            <text:p>Given a version with 40 UCs in it, a user must be able to redistribute every UC into one of 5 versions determined by (ordinal mod 5) in under 5 minutes. (i.e. 20% to ver A, 20% to ver B, etc.)</text:p>
          </table:table-cell>
          <table:table-cell table:style-name="ce69" office:value-type="date" office:date-value="2014-02-11" calcext:value-type="date">
            <text:p>41681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3" calcext:value-type="float">
            <text:p>3</text:p>
          </table:table-cell>
          <table:table-cell table:style-name="ce88" office:value-type="string" calcext:value-type="string">
            <text:p>BA shall be able to go from LL-req editor to a view of all LL-req incompletions in a single actio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4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4" calcext:value-type="float">
            <text:p>4</text:p>
          </table:table-cell>
          <table:table-cell table:style-name="ce88" office:value-type="string" calcext:value-type="string">
            <text:p>BA shall be able to go from a view of all LL-req incompletions to LL-req editor in a single action.</text:p>
          </table:table-cell>
          <table:table-cell table:style-name="ce69" office:value-type="date" office:date-value="2014-05-16" calcext:value-type="date">
            <text:p>41775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85" office:value-type="float" office:value="12" calcext:value-type="float">
            <text:p>12</text:p>
          </table:table-cell>
          <table:table-cell table:style-name="ce85"/>
          <table:table-cell table:style-name="ce10" office:value-type="string" calcext:value-type="string">
            <text:p>QR</text:p>
          </table:table-cell>
          <table:table-cell table:style-name="ce10" office:value-type="float" office:value="5" calcext:value-type="float">
            <text:p>5</text:p>
          </table:table-cell>
          <table:table-cell table:style-name="ce88" office:value-type="string" calcext:value-type="string">
            <text:p>Changing the browser's zoom level shall not affect horizontal space usage.</text:p>
            <text:p>Example: Many pages when you shrink them end up with unused, blank space on the right-hand side because the table width (or whatever) shrinks too.</text:p>
          </table:table-cell>
          <table:table-cell table:style-name="ce69" office:value-type="date" office:date-value="2014-05-22" calcext:value-type="date">
            <text:p>41781</text:p>
          </table:table-cell>
          <table:table-cell table:style-name="ce32"/>
          <table:table-cell table:number-columns-repeated="1017"/>
        </table:table-row>
        <table:table-row table:style-name="ro13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UC</text:p>
          </table:table-cell>
          <table:table-cell table:style-name="ce10" office:value-type="float" office:value="9" calcext:value-type="float">
            <text:p>9</text:p>
          </table:table-cell>
          <table:table-cell table:style-name="ce50" office:value-type="string" calcext:value-type="string">
            <text:p>Modify a Project's Fields</text:p>
          </table:table-cell>
          <table:table-cell table:style-name="ce69" office:value-type="date" office:date-value="2014-02-06" calcext:value-type="date">
            <text:p>41676</text:p>
          </table:table-cell>
          <table:table-cell table:style-name="ce32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90"/>
        <table:table-column table:style-name="co24" table:default-cell-style-name="ce90"/>
        <table:table-column table:style-name="co24" table:number-columns-repeated="17" table:default-cell-style-name="Default"/>
        <table:table-column table:style-name="co14" table:number-columns-repeated="1002" table:default-cell-style-name="Default"/>
        <table:table-row table:style-name="ro14">
          <table:table-cell table:number-columns-repeated="2"/>
          <table:table-cell table:style-name="ce92" office:value-type="string" calcext:value-type="string" table:number-columns-spanned="3" table:number-rows-spanned="1">
            <text:p>Requirements</text:p>
          </table:table-cell>
          <table:covered-table-cell table:number-columns-repeated="2" table:style-name="ce93"/>
          <table:table-cell table:style-name="ce100" office:value-type="string" calcext:value-type="string" table:number-columns-spanned="2" table:number-rows-spanned="1">
            <text:p>Fields</text:p>
          </table:table-cell>
          <table:covered-table-cell table:style-name="ce93"/>
          <table:table-cell table:number-columns-repeated="1015"/>
        </table:table-row>
        <table:table-row table:style-name="ro15">
          <table:table-cell table:number-columns-repeated="2"/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12" calcext:value-type="float">
            <text:p>12</text:p>
          </table:table-cell>
          <table:table-cell table:number-columns-repeated="2" table:style-name="ce93" office:value-type="float" office:value="5" calcext:value-type="float">
            <text:p>5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12" calcext:value-type="float">
            <text:p>12</text:p>
          </table:table-cell>
          <table:table-cell table:number-columns-repeated="1011"/>
        </table:table-row>
        <table:table-row table:style-name="ro4">
          <table:table-cell table:style-name="ce89" office:value-type="string" calcext:value-type="string">
            <text:p>CRUDL</text:p>
          </table:table-cell>
          <table:table-cell table:style-name="ce91"/>
          <table:table-cell table:style-name="ce94" office:value-type="string" calcext:value-type="string">
            <text:p>UC</text:p>
          </table:table-cell>
          <table:table-cell table:style-name="ce94" office:value-type="string" calcext:value-type="string">
            <text:p>LL Req</text:p>
          </table:table-cell>
          <table:table-cell table:style-name="ce94" office:value-type="string" calcext:value-type="string">
            <text:p>SHR</text:p>
          </table:table-cell>
          <table:table-cell table:style-name="ce101" office:value-type="string" calcext:value-type="string">
            <text:p>LL-Req</text:p>
            <text:p>Field</text:p>
          </table:table-cell>
          <table:table-cell table:style-name="ce101" office:value-type="string" calcext:value-type="string">
            <text:p>UC Field</text:p>
          </table:table-cell>
          <table:table-cell table:style-name="ce101" office:value-type="string" calcext:value-type="string">
            <text:p>Req Type</text:p>
          </table:table-cell>
          <table:table-cell table:style-name="ce101" office:value-type="string" calcext:value-type="string">
            <text:p>Grouping</text:p>
          </table:table-cell>
          <table:table-cell table:style-name="ce101" office:value-type="string" calcext:value-type="string">
            <text:p>Incompletion</text:p>
            <text:p>Type</text:p>
          </table:table-cell>
          <table:table-cell table:style-name="ce101" office:value-type="string" calcext:value-type="string">
            <text:p>Text</text:p>
            <text:p>tokens</text:p>
          </table:table-cell>
          <table:table-cell table:style-name="ce104" table:number-columns-repeated="1011"/>
        </table:table-row>
        <table:table-row table:style-name="ro15">
          <table:table-cell table:style-name="ce39" office:value-type="string" calcext:value-type="string">
            <text:p><text:s text:c="2"/>.list</text:p>
          </table:table-cell>
          <table:table-cell table:style-name="ce50" office:value-type="string" calcext:value-type="string">
            <text:p>User shall be able to list entities.</text:p>
          </table:table-cell>
          <table:table-cell table:style-name="ce95"/>
          <table:table-cell table:style-name="ce23" office:value-type="float" office:value="83" calcext:value-type="float">
            <text:p>83</text:p>
          </table:table-cell>
          <table:table-cell table:style-name="ce97" office:value-type="float" office:value="84" calcext:value-type="float">
            <text:p>84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58" calcext:value-type="float">
            <text:p>158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2"/>.create</text:p>
          </table:table-cell>
          <table:table-cell table:style-name="ce50" office:value-type="string" calcext:value-type="string">
            <text:p>User shall be able to create entities.</text:p>
          </table:table-cell>
          <table:table-cell table:style-name="ce95"/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57" calcext:value-type="float">
            <text:p>157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2"/>.update</text:p>
          </table:table-cell>
          <table:table-cell table:style-name="ce50" office:value-type="string" calcext:value-type="string">
            <text:p>User shall be able to modify entities.</text:p>
          </table:table-cell>
          <table:table-cell table:style-name="ce95"/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59" calcext:value-type="float">
            <text:p>159</text:p>
          </table:table-cell>
          <table:table-cell table:number-columns-repeated="1011"/>
        </table:table-row>
        <table:table-row table:style-name="ro15">
          <table:table-cell table:style-name="ce39" office:value-type="string" calcext:value-type="string">
            <text:p><text:s text:c="4"/>.order</text:p>
          </table:table-cell>
          <table:table-cell table:style-name="ce50" office:value-type="string" calcext:value-type="string">
            <text:p>User shall be able to reorder entities.</text:p>
          </table:table-cell>
          <table:table-cell table:style-name="ce95"/>
          <table:table-cell table:number-columns-repeated="2" table:style-name="ce23" office:value-type="string" calcext:value-type="string">
            <text:p>via sem-ID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4" calcext:value-type="float">
            <text:p>4</text:p>
          </table:table-cell>
          <table:table-cell table:style-name="ce102" office:value-type="string" calcext:value-type="string">
            <text:p>N/A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39" office:value-type="string" calcext:value-type="string">
            <text:p><text:s text:c="4"/>.refs</text:p>
          </table:table-cell>
          <table:table-cell table:style-name="ce50" office:value-type="string" calcext:value-type="string">
            <text:p>System shall appear to rename all references of entity after it is renamed.</text:p>
          </table:table-cell>
          <table:table-cell table:style-name="ce95"/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75" calcext:value-type="float">
            <text:p>175</text:p>
          </table:table-cell>
          <table:table-cell table:style-name="ce95" table:number-columns-repeated="2"/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60" calcext:value-type="float">
            <text:p>160</text:p>
          </table:table-cell>
          <table:table-cell table:number-columns-repeated="1011"/>
        </table:table-row>
        <table:table-row table:style-name="ro2">
          <table:table-cell table:style-name="ce34" office:value-type="string" calcext:value-type="string">
            <text:p><text:s text:c="2"/>.delete</text:p>
          </table:table-cell>
          <table:table-cell table:style-name="ce56" office:value-type="string" calcext:value-type="string">
            <text:p>User shall be able to (soft) delete entity.</text:p>
          </table:table-cell>
          <table:table-cell table:style-name="ce95"/>
          <table:table-cell table:style-name="ce23" office:value-type="float" office:value="179" calcext:value-type="float">
            <text:p>179</text:p>
          </table:table-cell>
          <table:table-cell table:style-name="ce98" office:value-type="string" calcext:value-type="string">
            <text:p>Hard only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 table:style-name="ce98" office:value-type="string" calcext:value-type="string">
            <text:p>Hard only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 text:c="4"/>.usage-summary</text:p>
          </table:table-cell>
          <table:table-cell table:style-name="ce56" office:value-type="string" calcext:value-type="string">
            <text:p>Before entity deletion, user shall be able to see a summary of usage.</text:p>
          </table:table-cell>
          <table:table-cell table:style-name="ce95"/>
          <table:table-cell table:style-name="ce23" office:value-type="float" office:value="180" calcext:value-type="float">
            <text:p>180</text:p>
          </table:table-cell>
          <table:table-cell table:style-name="ce95"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162" calcext:value-type="float">
            <text:p>162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 text:c="4"/>.usage-inspect</text:p>
          </table:table-cell>
          <table:table-cell table:style-name="ce56" office:value-type="string" calcext:value-type="string">
            <text:p>Before entity deletion, user shall be able to see each instance of entity's values and associations.</text:p>
          </table:table-cell>
          <table:table-cell table:style-name="ce95"/>
          <table:table-cell table:style-name="ce23" office:value-type="float" office:value="181" calcext:value-type="float">
            <text:p>181</text:p>
          </table:table-cell>
          <table:table-cell table:style-name="ce95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6" calcext:value-type="float">
            <text:p>6</text:p>
          </table:table-cell>
          <table:table-cell table:style-name="ce96" office:value-type="string" calcext:value-type="string">
            <text:p>No.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63" calcext:value-type="float">
            <text:p>163</text:p>
          </table:table-cell>
          <table:table-cell table:number-columns-repeated="1011"/>
        </table:table-row>
        <table:table-row table:style-name="ro6">
          <table:table-cell table:style-name="ce32" office:value-type="string" calcext:value-type="string">
            <text:p><text:s text:c="4"/>.hard</text:p>
          </table:table-cell>
          <table:table-cell table:style-name="ce56" office:value-type="string" calcext:value-type="string">
            <text:p>System shall hard-delete an entity only when it has never been used and has no associations (including soft-deleted associations).</text:p>
          </table:table-cell>
          <table:table-cell table:number-columns-repeated="2" table:style-name="ce96" office:value-type="string" calcext:value-type="string">
            <text:p>No.</text:p>
          </table:table-cell>
          <table:table-cell table:style-name="ce23" office:value-type="float" office:value="147" calcext:value-type="float">
            <text:p>147</text:p>
          </table:table-cell>
          <table:table-cell table:style-name="ce95" table:number-columns-repeated="2"/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161" calcext:value-type="float">
            <text:p>161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 text:c="4"/>.bin</text:p>
          </table:table-cell>
          <table:table-cell table:style-name="ce50" office:value-type="string" calcext:value-type="string">
            <text:p>Upon entity deletion, System shall move it to the bin.</text:p>
          </table:table-cell>
          <table:table-cell table:style-name="ce95"/>
          <table:table-cell table:style-name="ce23" office:value-type="float" office:value="182" calcext:value-type="float">
            <text:p>182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89" calcext:value-type="float">
            <text:p>189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2">
          <table:table-cell table:style-name="ce34" office:value-type="string" calcext:value-type="string">
            <text:p><text:s text:c="2"/>.restore</text:p>
          </table:table-cell>
          <table:table-cell table:style-name="ce56" office:value-type="string" calcext:value-type="string">
            <text:p>User shall be able to restore soft-deleted entities.</text:p>
          </table:table-cell>
          <table:table-cell table:style-name="ce95"/>
          <table:table-cell table:style-name="ce23" office:value-type="float" office:value="183" calcext:value-type="float">
            <text:p>183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4">
          <table:table-cell table:style-name="ce34" office:value-type="string" calcext:value-type="string">
            <text:p><text:s text:c="4"/>.data</text:p>
          </table:table-cell>
          <table:table-cell table:style-name="ce56" office:value-type="string" calcext:value-type="string">
            <text:p>Upon entity restoration, previous values and associations shall be restored also.</text:p>
          </table:table-cell>
          <table:table-cell table:style-name="ce95"/>
          <table:table-cell table:style-name="ce23" office:value-type="float" office:value="184" calcext:value-type="float">
            <text:p>184</text:p>
          </table:table-cell>
          <table:table-cell table:style-name="ce99" office:value-type="string" calcext:value-type="string">
            <text:p>No.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41" calcext:value-type="float">
            <text:p>41</text:p>
          </table:table-cell>
          <table:table-cell table:style-name="ce103" office:value-type="string" calcext:value-type="string">
            <text:p>N/A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99" office:value-type="string" calcext:value-type="string">
            <text:p>No.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9"/>
        </table:table-row>
        <table:table-row table:style-name="ro1" table:number-rows-repeated="104855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ups" table:style-name="ta1">
        <office:forms form:automatic-focus="false" form:apply-design-mode="false"/>
        <table:table-column table:style-name="co14" table:default-cell-style-name="Default"/>
        <table:table-column table:style-name="co25" table:default-cell-style-name="ce107"/>
        <table:table-column table:style-name="co14" table:number-columns-repeated="4" table:default-cell-style-name="Default"/>
        <table:table-row table:style-name="ro1">
          <table:table-cell table:style-name="ce105" office:value-type="string" calcext:value-type="string">
            <text:p>ID</text:p>
          </table:table-cell>
          <table:table-cell table:style-name="ce105" office:value-type="string" calcext:value-type="string">
            <text:p>Free (1=unused, 0=taken, &lt;0=du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6" table:formula="of:=1-COUNTIF([FRs.$C$2:.$C$992]; &quot;=&quot;&amp;[.A2])" office:value-type="float" office:value="0" calcext:value-type="float">
            <text:p/>
          </table:table-cell>
          <table:table-cell/>
          <table:table-cell table:style-name="ce108" office:value-type="string" calcext:value-type="string">
            <text:p>FRs</text:p>
          </table:table-cell>
          <table:table-cell table:style-name="ce108" office:value-type="string" calcext:value-type="string">
            <text:p>Flat</text:p>
          </table:table-cell>
          <table:table-cell table:style-name="ce108" office:value-type="string" calcext:value-type="string">
            <text:p>Total</text:p>
          </table:table-cell>
        </table:table-row>
        <table:table-row table:style-name="ro1">
          <table:table-cell table:formula="of:=[.A2]+1" office:value-type="float" office:value="2" calcext:value-type="float">
            <text:p/>
          </table:table-cell>
          <table:table-cell table:style-name="ce106" table:formula="of:=1-COUNTIF([FRs.$C$2:.$C$992]; &quot;=&quot;&amp;[.A3])" office:value-type="float" office:value="0" calcext:value-type="float">
            <text:p/>
          </table:table-cell>
          <table:table-cell/>
          <table:table-cell table:style-name="ce39" table:formula="of:=COUNTIF([FRs.$C$2:.$C$1012];&quot;&gt;0&quot;)" office:value-type="float" office:value="196" calcext:value-type="float">
            <text:p/>
          </table:table-cell>
          <table:table-cell table:style-name="ce39" table:formula="of:=COUNTIF([flat.$D$2:.$D$999];&quot;&gt;0&quot;)" office:value-type="float" office:value="34" calcext:value-type="float">
            <text:p/>
          </table:table-cell>
          <table:table-cell table:style-name="ce39" table:formula="of:=[.E3]+[.D3]" office:value-type="float" office:value="230" calcext:value-type="float">
            <text:p/>
          </table:table-cell>
        </table:table-row>
        <table:table-row table:style-name="ro1">
          <table:table-cell table:formula="of:=[.A3]+1" office:value-type="float" office:value="3" calcext:value-type="float">
            <text:p/>
          </table:table-cell>
          <table:table-cell table:style-name="ce106" table:formula="of:=1-COUNTIF([FRs.$C$2:.$C$992]; &quot;=&quot;&amp;[.A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/>
          </table:table-cell>
          <table:table-cell table:style-name="ce106" table:formula="of:=1-COUNTIF([FRs.$C$2:.$C$992]; &quot;=&quot;&amp;[.A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/>
          </table:table-cell>
          <table:table-cell table:style-name="ce106" table:formula="of:=1-COUNTIF([FRs.$C$2:.$C$992]; &quot;=&quot;&amp;[.A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/>
          </table:table-cell>
          <table:table-cell table:style-name="ce106" table:formula="of:=1-COUNTIF([FRs.$C$2:.$C$992]; &quot;=&quot;&amp;[.A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/>
          </table:table-cell>
          <table:table-cell table:style-name="ce106" table:formula="of:=1-COUNTIF([FRs.$C$2:.$C$992]; &quot;=&quot;&amp;[.A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/>
          </table:table-cell>
          <table:table-cell table:style-name="ce106" table:formula="of:=1-COUNTIF([FRs.$C$2:.$C$992]; &quot;=&quot;&amp;[.A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/>
          </table:table-cell>
          <table:table-cell table:style-name="ce106" table:formula="of:=1-COUNTIF([FRs.$C$2:.$C$992]; &quot;=&quot;&amp;[.A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/>
          </table:table-cell>
          <table:table-cell table:style-name="ce106" table:formula="of:=1-COUNTIF([FRs.$C$2:.$C$992]; &quot;=&quot;&amp;[.A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/>
          </table:table-cell>
          <table:table-cell table:style-name="ce106" table:formula="of:=1-COUNTIF([FRs.$C$2:.$C$992]; &quot;=&quot;&amp;[.A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/>
          </table:table-cell>
          <table:table-cell table:style-name="ce106" table:formula="of:=1-COUNTIF([FRs.$C$2:.$C$992]; &quot;=&quot;&amp;[.A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/>
          </table:table-cell>
          <table:table-cell table:style-name="ce106" table:formula="of:=1-COUNTIF([FRs.$C$2:.$C$992]; &quot;=&quot;&amp;[.A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/>
          </table:table-cell>
          <table:table-cell table:style-name="ce106" table:formula="of:=1-COUNTIF([FRs.$C$2:.$C$992]; &quot;=&quot;&amp;[.A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/>
          </table:table-cell>
          <table:table-cell table:style-name="ce106" table:formula="of:=1-COUNTIF([FRs.$C$2:.$C$992]; &quot;=&quot;&amp;[.A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/>
          </table:table-cell>
          <table:table-cell table:style-name="ce106" table:formula="of:=1-COUNTIF([FRs.$C$2:.$C$992]; &quot;=&quot;&amp;[.A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/>
          </table:table-cell>
          <table:table-cell table:style-name="ce106" table:formula="of:=1-COUNTIF([FRs.$C$2:.$C$992]; &quot;=&quot;&amp;[.A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/>
          </table:table-cell>
          <table:table-cell table:style-name="ce106" table:formula="of:=1-COUNTIF([FRs.$C$2:.$C$992]; &quot;=&quot;&amp;[.A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/>
          </table:table-cell>
          <table:table-cell table:style-name="ce106" table:formula="of:=1-COUNTIF([FRs.$C$2:.$C$992]; &quot;=&quot;&amp;[.A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/>
          </table:table-cell>
          <table:table-cell table:style-name="ce106" table:formula="of:=1-COUNTIF([FRs.$C$2:.$C$992]; &quot;=&quot;&amp;[.A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/>
          </table:table-cell>
          <table:table-cell table:style-name="ce106" table:formula="of:=1-COUNTIF([FRs.$C$2:.$C$992]; &quot;=&quot;&amp;[.A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/>
          </table:table-cell>
          <table:table-cell table:style-name="ce106" table:formula="of:=1-COUNTIF([FRs.$C$2:.$C$992]; &quot;=&quot;&amp;[.A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/>
          </table:table-cell>
          <table:table-cell table:style-name="ce106" table:formula="of:=1-COUNTIF([FRs.$C$2:.$C$992]; &quot;=&quot;&amp;[.A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/>
          </table:table-cell>
          <table:table-cell table:style-name="ce106" table:formula="of:=1-COUNTIF([FRs.$C$2:.$C$992]; &quot;=&quot;&amp;[.A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/>
          </table:table-cell>
          <table:table-cell table:style-name="ce106" table:formula="of:=1-COUNTIF([FRs.$C$2:.$C$992]; &quot;=&quot;&amp;[.A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/>
          </table:table-cell>
          <table:table-cell table:style-name="ce106" table:formula="of:=1-COUNTIF([FRs.$C$2:.$C$992]; &quot;=&quot;&amp;[.A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/>
          </table:table-cell>
          <table:table-cell table:style-name="ce106" table:formula="of:=1-COUNTIF([FRs.$C$2:.$C$992]; &quot;=&quot;&amp;[.A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/>
          </table:table-cell>
          <table:table-cell table:style-name="ce106" table:formula="of:=1-COUNTIF([FRs.$C$2:.$C$992]; &quot;=&quot;&amp;[.A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/>
          </table:table-cell>
          <table:table-cell table:style-name="ce106" table:formula="of:=1-COUNTIF([FRs.$C$2:.$C$992]; &quot;=&quot;&amp;[.A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/>
          </table:table-cell>
          <table:table-cell table:style-name="ce106" table:formula="of:=1-COUNTIF([FRs.$C$2:.$C$992]; &quot;=&quot;&amp;[.A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/>
          </table:table-cell>
          <table:table-cell table:style-name="ce106" table:formula="of:=1-COUNTIF([FRs.$C$2:.$C$992]; &quot;=&quot;&amp;[.A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/>
          </table:table-cell>
          <table:table-cell table:style-name="ce106" table:formula="of:=1-COUNTIF([FRs.$C$2:.$C$992]; &quot;=&quot;&amp;[.A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/>
          </table:table-cell>
          <table:table-cell table:style-name="ce106" table:formula="of:=1-COUNTIF([FRs.$C$2:.$C$992]; &quot;=&quot;&amp;[.A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/>
          </table:table-cell>
          <table:table-cell table:style-name="ce106" table:formula="of:=1-COUNTIF([FRs.$C$2:.$C$992]; &quot;=&quot;&amp;[.A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/>
          </table:table-cell>
          <table:table-cell table:style-name="ce106" table:formula="of:=1-COUNTIF([FRs.$C$2:.$C$992]; &quot;=&quot;&amp;[.A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/>
          </table:table-cell>
          <table:table-cell table:style-name="ce106" table:formula="of:=1-COUNTIF([FRs.$C$2:.$C$992]; &quot;=&quot;&amp;[.A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/>
          </table:table-cell>
          <table:table-cell table:style-name="ce106" table:formula="of:=1-COUNTIF([FRs.$C$2:.$C$992]; &quot;=&quot;&amp;[.A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/>
          </table:table-cell>
          <table:table-cell table:style-name="ce106" table:formula="of:=1-COUNTIF([FRs.$C$2:.$C$992]; &quot;=&quot;&amp;[.A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/>
          </table:table-cell>
          <table:table-cell table:style-name="ce106" table:formula="of:=1-COUNTIF([FRs.$C$2:.$C$992]; &quot;=&quot;&amp;[.A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/>
          </table:table-cell>
          <table:table-cell table:style-name="ce106" table:formula="of:=1-COUNTIF([FRs.$C$2:.$C$992]; &quot;=&quot;&amp;[.A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/>
          </table:table-cell>
          <table:table-cell table:style-name="ce106" table:formula="of:=1-COUNTIF([FRs.$C$2:.$C$992]; &quot;=&quot;&amp;[.A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/>
          </table:table-cell>
          <table:table-cell table:style-name="ce106" table:formula="of:=1-COUNTIF([FRs.$C$2:.$C$992]; &quot;=&quot;&amp;[.A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/>
          </table:table-cell>
          <table:table-cell table:style-name="ce106" table:formula="of:=1-COUNTIF([FRs.$C$2:.$C$992]; &quot;=&quot;&amp;[.A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/>
          </table:table-cell>
          <table:table-cell table:style-name="ce106" table:formula="of:=1-COUNTIF([FRs.$C$2:.$C$992]; &quot;=&quot;&amp;[.A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/>
          </table:table-cell>
          <table:table-cell table:style-name="ce106" table:formula="of:=1-COUNTIF([FRs.$C$2:.$C$992]; &quot;=&quot;&amp;[.A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/>
          </table:table-cell>
          <table:table-cell table:style-name="ce106" table:formula="of:=1-COUNTIF([FRs.$C$2:.$C$992]; &quot;=&quot;&amp;[.A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/>
          </table:table-cell>
          <table:table-cell table:style-name="ce106" table:formula="of:=1-COUNTIF([FRs.$C$2:.$C$992]; &quot;=&quot;&amp;[.A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/>
          </table:table-cell>
          <table:table-cell table:style-name="ce106" table:formula="of:=1-COUNTIF([FRs.$C$2:.$C$992]; &quot;=&quot;&amp;[.A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/>
          </table:table-cell>
          <table:table-cell table:style-name="ce106" table:formula="of:=1-COUNTIF([FRs.$C$2:.$C$992]; &quot;=&quot;&amp;[.A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/>
          </table:table-cell>
          <table:table-cell table:style-name="ce106" table:formula="of:=1-COUNTIF([FRs.$C$2:.$C$992]; &quot;=&quot;&amp;[.A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/>
          </table:table-cell>
          <table:table-cell table:style-name="ce106" table:formula="of:=1-COUNTIF([FRs.$C$2:.$C$992]; &quot;=&quot;&amp;[.A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/>
          </table:table-cell>
          <table:table-cell table:style-name="ce106" table:formula="of:=1-COUNTIF([FRs.$C$2:.$C$992]; &quot;=&quot;&amp;[.A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/>
          </table:table-cell>
          <table:table-cell table:style-name="ce106" table:formula="of:=1-COUNTIF([FRs.$C$2:.$C$992]; &quot;=&quot;&amp;[.A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/>
          </table:table-cell>
          <table:table-cell table:style-name="ce106" table:formula="of:=1-COUNTIF([FRs.$C$2:.$C$992]; &quot;=&quot;&amp;[.A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/>
          </table:table-cell>
          <table:table-cell table:style-name="ce106" table:formula="of:=1-COUNTIF([FRs.$C$2:.$C$992]; &quot;=&quot;&amp;[.A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/>
          </table:table-cell>
          <table:table-cell table:style-name="ce106" table:formula="of:=1-COUNTIF([FRs.$C$2:.$C$992]; &quot;=&quot;&amp;[.A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/>
          </table:table-cell>
          <table:table-cell table:style-name="ce106" table:formula="of:=1-COUNTIF([FRs.$C$2:.$C$992]; &quot;=&quot;&amp;[.A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/>
          </table:table-cell>
          <table:table-cell table:style-name="ce106" table:formula="of:=1-COUNTIF([FRs.$C$2:.$C$992]; &quot;=&quot;&amp;[.A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/>
          </table:table-cell>
          <table:table-cell table:style-name="ce106" table:formula="of:=1-COUNTIF([FRs.$C$2:.$C$992]; &quot;=&quot;&amp;[.A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/>
          </table:table-cell>
          <table:table-cell table:style-name="ce106" table:formula="of:=1-COUNTIF([FRs.$C$2:.$C$992]; &quot;=&quot;&amp;[.A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/>
          </table:table-cell>
          <table:table-cell table:style-name="ce106" table:formula="of:=1-COUNTIF([FRs.$C$2:.$C$992]; &quot;=&quot;&amp;[.A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/>
          </table:table-cell>
          <table:table-cell table:style-name="ce106" table:formula="of:=1-COUNTIF([FRs.$C$2:.$C$992]; &quot;=&quot;&amp;[.A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/>
          </table:table-cell>
          <table:table-cell table:style-name="ce106" table:formula="of:=1-COUNTIF([FRs.$C$2:.$C$992]; &quot;=&quot;&amp;[.A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/>
          </table:table-cell>
          <table:table-cell table:style-name="ce106" table:formula="of:=1-COUNTIF([FRs.$C$2:.$C$992]; &quot;=&quot;&amp;[.A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/>
          </table:table-cell>
          <table:table-cell table:style-name="ce106" table:formula="of:=1-COUNTIF([FRs.$C$2:.$C$992]; &quot;=&quot;&amp;[.A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/>
          </table:table-cell>
          <table:table-cell table:style-name="ce106" table:formula="of:=1-COUNTIF([FRs.$C$2:.$C$992]; &quot;=&quot;&amp;[.A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/>
          </table:table-cell>
          <table:table-cell table:style-name="ce106" table:formula="of:=1-COUNTIF([FRs.$C$2:.$C$992]; &quot;=&quot;&amp;[.A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/>
          </table:table-cell>
          <table:table-cell table:style-name="ce106" table:formula="of:=1-COUNTIF([FRs.$C$2:.$C$992]; &quot;=&quot;&amp;[.A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/>
          </table:table-cell>
          <table:table-cell table:style-name="ce106" table:formula="of:=1-COUNTIF([FRs.$C$2:.$C$992]; &quot;=&quot;&amp;[.A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/>
          </table:table-cell>
          <table:table-cell table:style-name="ce106" table:formula="of:=1-COUNTIF([FRs.$C$2:.$C$992]; &quot;=&quot;&amp;[.A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/>
          </table:table-cell>
          <table:table-cell table:style-name="ce106" table:formula="of:=1-COUNTIF([FRs.$C$2:.$C$992]; &quot;=&quot;&amp;[.A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/>
          </table:table-cell>
          <table:table-cell table:style-name="ce106" table:formula="of:=1-COUNTIF([FRs.$C$2:.$C$992]; &quot;=&quot;&amp;[.A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/>
          </table:table-cell>
          <table:table-cell table:style-name="ce106" table:formula="of:=1-COUNTIF([FRs.$C$2:.$C$992]; &quot;=&quot;&amp;[.A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/>
          </table:table-cell>
          <table:table-cell table:style-name="ce106" table:formula="of:=1-COUNTIF([FRs.$C$2:.$C$992]; &quot;=&quot;&amp;[.A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/>
          </table:table-cell>
          <table:table-cell table:style-name="ce106" table:formula="of:=1-COUNTIF([FRs.$C$2:.$C$992]; &quot;=&quot;&amp;[.A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/>
          </table:table-cell>
          <table:table-cell table:style-name="ce106" table:formula="of:=1-COUNTIF([FRs.$C$2:.$C$992]; &quot;=&quot;&amp;[.A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/>
          </table:table-cell>
          <table:table-cell table:style-name="ce106" table:formula="of:=1-COUNTIF([FRs.$C$2:.$C$992]; &quot;=&quot;&amp;[.A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/>
          </table:table-cell>
          <table:table-cell table:style-name="ce106" table:formula="of:=1-COUNTIF([FRs.$C$2:.$C$992]; &quot;=&quot;&amp;[.A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/>
          </table:table-cell>
          <table:table-cell table:style-name="ce106" table:formula="of:=1-COUNTIF([FRs.$C$2:.$C$992]; &quot;=&quot;&amp;[.A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/>
          </table:table-cell>
          <table:table-cell table:style-name="ce106" table:formula="of:=1-COUNTIF([FRs.$C$2:.$C$992]; &quot;=&quot;&amp;[.A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/>
          </table:table-cell>
          <table:table-cell table:style-name="ce106" table:formula="of:=1-COUNTIF([FRs.$C$2:.$C$992]; &quot;=&quot;&amp;[.A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/>
          </table:table-cell>
          <table:table-cell table:style-name="ce106" table:formula="of:=1-COUNTIF([FRs.$C$2:.$C$992]; &quot;=&quot;&amp;[.A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/>
          </table:table-cell>
          <table:table-cell table:style-name="ce106" table:formula="of:=1-COUNTIF([FRs.$C$2:.$C$992]; &quot;=&quot;&amp;[.A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/>
          </table:table-cell>
          <table:table-cell table:style-name="ce106" table:formula="of:=1-COUNTIF([FRs.$C$2:.$C$992]; &quot;=&quot;&amp;[.A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/>
          </table:table-cell>
          <table:table-cell table:style-name="ce106" table:formula="of:=1-COUNTIF([FRs.$C$2:.$C$992]; &quot;=&quot;&amp;[.A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/>
          </table:table-cell>
          <table:table-cell table:style-name="ce106" table:formula="of:=1-COUNTIF([FRs.$C$2:.$C$992]; &quot;=&quot;&amp;[.A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/>
          </table:table-cell>
          <table:table-cell table:style-name="ce106" table:formula="of:=1-COUNTIF([FRs.$C$2:.$C$992]; &quot;=&quot;&amp;[.A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/>
          </table:table-cell>
          <table:table-cell table:style-name="ce106" table:formula="of:=1-COUNTIF([FRs.$C$2:.$C$992]; &quot;=&quot;&amp;[.A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/>
          </table:table-cell>
          <table:table-cell table:style-name="ce106" table:formula="of:=1-COUNTIF([FRs.$C$2:.$C$992]; &quot;=&quot;&amp;[.A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/>
          </table:table-cell>
          <table:table-cell table:style-name="ce106" table:formula="of:=1-COUNTIF([FRs.$C$2:.$C$992]; &quot;=&quot;&amp;[.A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/>
          </table:table-cell>
          <table:table-cell table:style-name="ce106" table:formula="of:=1-COUNTIF([FRs.$C$2:.$C$992]; &quot;=&quot;&amp;[.A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/>
          </table:table-cell>
          <table:table-cell table:style-name="ce106" table:formula="of:=1-COUNTIF([FRs.$C$2:.$C$992]; &quot;=&quot;&amp;[.A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/>
          </table:table-cell>
          <table:table-cell table:style-name="ce106" table:formula="of:=1-COUNTIF([FRs.$C$2:.$C$992]; &quot;=&quot;&amp;[.A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/>
          </table:table-cell>
          <table:table-cell table:style-name="ce106" table:formula="of:=1-COUNTIF([FRs.$C$2:.$C$992]; &quot;=&quot;&amp;[.A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/>
          </table:table-cell>
          <table:table-cell table:style-name="ce106" table:formula="of:=1-COUNTIF([FRs.$C$2:.$C$992]; &quot;=&quot;&amp;[.A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/>
          </table:table-cell>
          <table:table-cell table:style-name="ce106" table:formula="of:=1-COUNTIF([FRs.$C$2:.$C$992]; &quot;=&quot;&amp;[.A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/>
          </table:table-cell>
          <table:table-cell table:style-name="ce106" table:formula="of:=1-COUNTIF([FRs.$C$2:.$C$992]; &quot;=&quot;&amp;[.A9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/>
          </table:table-cell>
          <table:table-cell table:style-name="ce106" table:formula="of:=1-COUNTIF([FRs.$C$2:.$C$992]; &quot;=&quot;&amp;[.A9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/>
          </table:table-cell>
          <table:table-cell table:style-name="ce106" table:formula="of:=1-COUNTIF([FRs.$C$2:.$C$992]; &quot;=&quot;&amp;[.A10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/>
          </table:table-cell>
          <table:table-cell table:style-name="ce106" table:formula="of:=1-COUNTIF([FRs.$C$2:.$C$992]; &quot;=&quot;&amp;[.A10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/>
          </table:table-cell>
          <table:table-cell table:style-name="ce106" table:formula="of:=1-COUNTIF([FRs.$C$2:.$C$992]; &quot;=&quot;&amp;[.A10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/>
          </table:table-cell>
          <table:table-cell table:style-name="ce106" table:formula="of:=1-COUNTIF([FRs.$C$2:.$C$992]; &quot;=&quot;&amp;[.A10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/>
          </table:table-cell>
          <table:table-cell table:style-name="ce106" table:formula="of:=1-COUNTIF([FRs.$C$2:.$C$992]; &quot;=&quot;&amp;[.A10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/>
          </table:table-cell>
          <table:table-cell table:style-name="ce106" table:formula="of:=1-COUNTIF([FRs.$C$2:.$C$992]; &quot;=&quot;&amp;[.A10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/>
          </table:table-cell>
          <table:table-cell table:style-name="ce106" table:formula="of:=1-COUNTIF([FRs.$C$2:.$C$992]; &quot;=&quot;&amp;[.A10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/>
          </table:table-cell>
          <table:table-cell table:style-name="ce106" table:formula="of:=1-COUNTIF([FRs.$C$2:.$C$992]; &quot;=&quot;&amp;[.A10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/>
          </table:table-cell>
          <table:table-cell table:style-name="ce106" table:formula="of:=1-COUNTIF([FRs.$C$2:.$C$992]; &quot;=&quot;&amp;[.A10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/>
          </table:table-cell>
          <table:table-cell table:style-name="ce106" table:formula="of:=1-COUNTIF([FRs.$C$2:.$C$992]; &quot;=&quot;&amp;[.A10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/>
          </table:table-cell>
          <table:table-cell table:style-name="ce106" table:formula="of:=1-COUNTIF([FRs.$C$2:.$C$992]; &quot;=&quot;&amp;[.A11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/>
          </table:table-cell>
          <table:table-cell table:style-name="ce106" table:formula="of:=1-COUNTIF([FRs.$C$2:.$C$992]; &quot;=&quot;&amp;[.A11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/>
          </table:table-cell>
          <table:table-cell table:style-name="ce106" table:formula="of:=1-COUNTIF([FRs.$C$2:.$C$992]; &quot;=&quot;&amp;[.A11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/>
          </table:table-cell>
          <table:table-cell table:style-name="ce106" table:formula="of:=1-COUNTIF([FRs.$C$2:.$C$992]; &quot;=&quot;&amp;[.A11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/>
          </table:table-cell>
          <table:table-cell table:style-name="ce106" table:formula="of:=1-COUNTIF([FRs.$C$2:.$C$992]; &quot;=&quot;&amp;[.A11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/>
          </table:table-cell>
          <table:table-cell table:style-name="ce106" table:formula="of:=1-COUNTIF([FRs.$C$2:.$C$992]; &quot;=&quot;&amp;[.A11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/>
          </table:table-cell>
          <table:table-cell table:style-name="ce106" table:formula="of:=1-COUNTIF([FRs.$C$2:.$C$992]; &quot;=&quot;&amp;[.A11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/>
          </table:table-cell>
          <table:table-cell table:style-name="ce106" table:formula="of:=1-COUNTIF([FRs.$C$2:.$C$992]; &quot;=&quot;&amp;[.A11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/>
          </table:table-cell>
          <table:table-cell table:style-name="ce106" table:formula="of:=1-COUNTIF([FRs.$C$2:.$C$992]; &quot;=&quot;&amp;[.A11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/>
          </table:table-cell>
          <table:table-cell table:style-name="ce106" table:formula="of:=1-COUNTIF([FRs.$C$2:.$C$992]; &quot;=&quot;&amp;[.A11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/>
          </table:table-cell>
          <table:table-cell table:style-name="ce106" table:formula="of:=1-COUNTIF([FRs.$C$2:.$C$992]; &quot;=&quot;&amp;[.A12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/>
          </table:table-cell>
          <table:table-cell table:style-name="ce106" table:formula="of:=1-COUNTIF([FRs.$C$2:.$C$992]; &quot;=&quot;&amp;[.A12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/>
          </table:table-cell>
          <table:table-cell table:style-name="ce106" table:formula="of:=1-COUNTIF([FRs.$C$2:.$C$992]; &quot;=&quot;&amp;[.A12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/>
          </table:table-cell>
          <table:table-cell table:style-name="ce106" table:formula="of:=1-COUNTIF([FRs.$C$2:.$C$992]; &quot;=&quot;&amp;[.A12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/>
          </table:table-cell>
          <table:table-cell table:style-name="ce106" table:formula="of:=1-COUNTIF([FRs.$C$2:.$C$992]; &quot;=&quot;&amp;[.A12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/>
          </table:table-cell>
          <table:table-cell table:style-name="ce106" table:formula="of:=1-COUNTIF([FRs.$C$2:.$C$992]; &quot;=&quot;&amp;[.A12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/>
          </table:table-cell>
          <table:table-cell table:style-name="ce106" table:formula="of:=1-COUNTIF([FRs.$C$2:.$C$992]; &quot;=&quot;&amp;[.A12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/>
          </table:table-cell>
          <table:table-cell table:style-name="ce106" table:formula="of:=1-COUNTIF([FRs.$C$2:.$C$992]; &quot;=&quot;&amp;[.A12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/>
          </table:table-cell>
          <table:table-cell table:style-name="ce106" table:formula="of:=1-COUNTIF([FRs.$C$2:.$C$992]; &quot;=&quot;&amp;[.A12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/>
          </table:table-cell>
          <table:table-cell table:style-name="ce106" table:formula="of:=1-COUNTIF([FRs.$C$2:.$C$992]; &quot;=&quot;&amp;[.A12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/>
          </table:table-cell>
          <table:table-cell table:style-name="ce106" table:formula="of:=1-COUNTIF([FRs.$C$2:.$C$992]; &quot;=&quot;&amp;[.A13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/>
          </table:table-cell>
          <table:table-cell table:style-name="ce106" table:formula="of:=1-COUNTIF([FRs.$C$2:.$C$992]; &quot;=&quot;&amp;[.A13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/>
          </table:table-cell>
          <table:table-cell table:style-name="ce106" table:formula="of:=1-COUNTIF([FRs.$C$2:.$C$992]; &quot;=&quot;&amp;[.A13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/>
          </table:table-cell>
          <table:table-cell table:style-name="ce106" table:formula="of:=1-COUNTIF([FRs.$C$2:.$C$992]; &quot;=&quot;&amp;[.A13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/>
          </table:table-cell>
          <table:table-cell table:style-name="ce106" table:formula="of:=1-COUNTIF([FRs.$C$2:.$C$992]; &quot;=&quot;&amp;[.A13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/>
          </table:table-cell>
          <table:table-cell table:style-name="ce106" table:formula="of:=1-COUNTIF([FRs.$C$2:.$C$992]; &quot;=&quot;&amp;[.A13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/>
          </table:table-cell>
          <table:table-cell table:style-name="ce106" table:formula="of:=1-COUNTIF([FRs.$C$2:.$C$992]; &quot;=&quot;&amp;[.A13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/>
          </table:table-cell>
          <table:table-cell table:style-name="ce106" table:formula="of:=1-COUNTIF([FRs.$C$2:.$C$992]; &quot;=&quot;&amp;[.A13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/>
          </table:table-cell>
          <table:table-cell table:style-name="ce106" table:formula="of:=1-COUNTIF([FRs.$C$2:.$C$992]; &quot;=&quot;&amp;[.A13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/>
          </table:table-cell>
          <table:table-cell table:style-name="ce106" table:formula="of:=1-COUNTIF([FRs.$C$2:.$C$992]; &quot;=&quot;&amp;[.A13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/>
          </table:table-cell>
          <table:table-cell table:style-name="ce106" table:formula="of:=1-COUNTIF([FRs.$C$2:.$C$992]; &quot;=&quot;&amp;[.A14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/>
          </table:table-cell>
          <table:table-cell table:style-name="ce106" table:formula="of:=1-COUNTIF([FRs.$C$2:.$C$992]; &quot;=&quot;&amp;[.A14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/>
          </table:table-cell>
          <table:table-cell table:style-name="ce106" table:formula="of:=1-COUNTIF([FRs.$C$2:.$C$992]; &quot;=&quot;&amp;[.A14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/>
          </table:table-cell>
          <table:table-cell table:style-name="ce106" table:formula="of:=1-COUNTIF([FRs.$C$2:.$C$992]; &quot;=&quot;&amp;[.A14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/>
          </table:table-cell>
          <table:table-cell table:style-name="ce106" table:formula="of:=1-COUNTIF([FRs.$C$2:.$C$992]; &quot;=&quot;&amp;[.A14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/>
          </table:table-cell>
          <table:table-cell table:style-name="ce106" table:formula="of:=1-COUNTIF([FRs.$C$2:.$C$992]; &quot;=&quot;&amp;[.A14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/>
          </table:table-cell>
          <table:table-cell table:style-name="ce106" table:formula="of:=1-COUNTIF([FRs.$C$2:.$C$992]; &quot;=&quot;&amp;[.A14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/>
          </table:table-cell>
          <table:table-cell table:style-name="ce106" table:formula="of:=1-COUNTIF([FRs.$C$2:.$C$992]; &quot;=&quot;&amp;[.A14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/>
          </table:table-cell>
          <table:table-cell table:style-name="ce106" table:formula="of:=1-COUNTIF([FRs.$C$2:.$C$992]; &quot;=&quot;&amp;[.A14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/>
          </table:table-cell>
          <table:table-cell table:style-name="ce106" table:formula="of:=1-COUNTIF([FRs.$C$2:.$C$992]; &quot;=&quot;&amp;[.A14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/>
          </table:table-cell>
          <table:table-cell table:style-name="ce106" table:formula="of:=1-COUNTIF([FRs.$C$2:.$C$992]; &quot;=&quot;&amp;[.A15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0]+1" office:value-type="float" office:value="150" calcext:value-type="float">
            <text:p/>
          </table:table-cell>
          <table:table-cell table:style-name="ce106" table:formula="of:=1-COUNTIF([FRs.$C$2:.$C$992]; &quot;=&quot;&amp;[.A15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1]+1" office:value-type="float" office:value="151" calcext:value-type="float">
            <text:p/>
          </table:table-cell>
          <table:table-cell table:style-name="ce106" table:formula="of:=1-COUNTIF([FRs.$C$2:.$C$992]; &quot;=&quot;&amp;[.A15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/>
          </table:table-cell>
          <table:table-cell table:style-name="ce106" table:formula="of:=1-COUNTIF([FRs.$C$2:.$C$992]; &quot;=&quot;&amp;[.A15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3]+1" office:value-type="float" office:value="153" calcext:value-type="float">
            <text:p/>
          </table:table-cell>
          <table:table-cell table:style-name="ce106" table:formula="of:=1-COUNTIF([FRs.$C$2:.$C$992]; &quot;=&quot;&amp;[.A15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4]+1" office:value-type="float" office:value="154" calcext:value-type="float">
            <text:p/>
          </table:table-cell>
          <table:table-cell table:style-name="ce106" table:formula="of:=1-COUNTIF([FRs.$C$2:.$C$992]; &quot;=&quot;&amp;[.A15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/>
          </table:table-cell>
          <table:table-cell table:style-name="ce106" table:formula="of:=1-COUNTIF([FRs.$C$2:.$C$992]; &quot;=&quot;&amp;[.A15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6]+1" office:value-type="float" office:value="156" calcext:value-type="float">
            <text:p/>
          </table:table-cell>
          <table:table-cell table:style-name="ce106" table:formula="of:=1-COUNTIF([FRs.$C$2:.$C$992]; &quot;=&quot;&amp;[.A15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7]+1" office:value-type="float" office:value="157" calcext:value-type="float">
            <text:p/>
          </table:table-cell>
          <table:table-cell table:style-name="ce106" table:formula="of:=1-COUNTIF([FRs.$C$2:.$C$992]; &quot;=&quot;&amp;[.A15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/>
          </table:table-cell>
          <table:table-cell table:style-name="ce106" table:formula="of:=1-COUNTIF([FRs.$C$2:.$C$992]; &quot;=&quot;&amp;[.A15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59]+1" office:value-type="float" office:value="159" calcext:value-type="float">
            <text:p/>
          </table:table-cell>
          <table:table-cell table:style-name="ce106" table:formula="of:=1-COUNTIF([FRs.$C$2:.$C$992]; &quot;=&quot;&amp;[.A16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0]+1" office:value-type="float" office:value="160" calcext:value-type="float">
            <text:p/>
          </table:table-cell>
          <table:table-cell table:style-name="ce106" table:formula="of:=1-COUNTIF([FRs.$C$2:.$C$992]; &quot;=&quot;&amp;[.A16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1]+1" office:value-type="float" office:value="161" calcext:value-type="float">
            <text:p/>
          </table:table-cell>
          <table:table-cell table:style-name="ce106" table:formula="of:=1-COUNTIF([FRs.$C$2:.$C$992]; &quot;=&quot;&amp;[.A16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/>
          </table:table-cell>
          <table:table-cell table:style-name="ce106" table:formula="of:=1-COUNTIF([FRs.$C$2:.$C$992]; &quot;=&quot;&amp;[.A16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3]+1" office:value-type="float" office:value="163" calcext:value-type="float">
            <text:p/>
          </table:table-cell>
          <table:table-cell table:style-name="ce106" table:formula="of:=1-COUNTIF([FRs.$C$2:.$C$992]; &quot;=&quot;&amp;[.A16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4]+1" office:value-type="float" office:value="164" calcext:value-type="float">
            <text:p/>
          </table:table-cell>
          <table:table-cell table:style-name="ce106" table:formula="of:=1-COUNTIF([FRs.$C$2:.$C$992]; &quot;=&quot;&amp;[.A16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5]+1" office:value-type="float" office:value="165" calcext:value-type="float">
            <text:p/>
          </table:table-cell>
          <table:table-cell table:style-name="ce106" table:formula="of:=1-COUNTIF([FRs.$C$2:.$C$992]; &quot;=&quot;&amp;[.A16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/>
          </table:table-cell>
          <table:table-cell table:style-name="ce106" table:formula="of:=1-COUNTIF([FRs.$C$2:.$C$992]; &quot;=&quot;&amp;[.A16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/>
          </table:table-cell>
          <table:table-cell table:style-name="ce106" table:formula="of:=1-COUNTIF([FRs.$C$2:.$C$992]; &quot;=&quot;&amp;[.A16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/>
          </table:table-cell>
          <table:table-cell table:style-name="ce106" table:formula="of:=1-COUNTIF([FRs.$C$2:.$C$992]; &quot;=&quot;&amp;[.A16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69]+1" office:value-type="float" office:value="169" calcext:value-type="float">
            <text:p/>
          </table:table-cell>
          <table:table-cell table:style-name="ce106" table:formula="of:=1-COUNTIF([FRs.$C$2:.$C$992]; &quot;=&quot;&amp;[.A17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0]+1" office:value-type="float" office:value="170" calcext:value-type="float">
            <text:p/>
          </table:table-cell>
          <table:table-cell table:style-name="ce106" table:formula="of:=1-COUNTIF([FRs.$C$2:.$C$992]; &quot;=&quot;&amp;[.A17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1]+1" office:value-type="float" office:value="171" calcext:value-type="float">
            <text:p/>
          </table:table-cell>
          <table:table-cell table:style-name="ce106" table:formula="of:=1-COUNTIF([FRs.$C$2:.$C$992]; &quot;=&quot;&amp;[.A17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2]+1" office:value-type="float" office:value="172" calcext:value-type="float">
            <text:p/>
          </table:table-cell>
          <table:table-cell table:style-name="ce106" table:formula="of:=1-COUNTIF([FRs.$C$2:.$C$992]; &quot;=&quot;&amp;[.A17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/>
          </table:table-cell>
          <table:table-cell table:style-name="ce106" table:formula="of:=1-COUNTIF([FRs.$C$2:.$C$992]; &quot;=&quot;&amp;[.A17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4]+1" office:value-type="float" office:value="174" calcext:value-type="float">
            <text:p/>
          </table:table-cell>
          <table:table-cell table:style-name="ce106" table:formula="of:=1-COUNTIF([FRs.$C$2:.$C$992]; &quot;=&quot;&amp;[.A17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/>
          </table:table-cell>
          <table:table-cell table:style-name="ce106" table:formula="of:=1-COUNTIF([FRs.$C$2:.$C$992]; &quot;=&quot;&amp;[.A17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/>
          </table:table-cell>
          <table:table-cell table:style-name="ce106" table:formula="of:=1-COUNTIF([FRs.$C$2:.$C$992]; &quot;=&quot;&amp;[.A17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7]+1" office:value-type="float" office:value="177" calcext:value-type="float">
            <text:p/>
          </table:table-cell>
          <table:table-cell table:style-name="ce106" table:formula="of:=1-COUNTIF([FRs.$C$2:.$C$992]; &quot;=&quot;&amp;[.A17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/>
          </table:table-cell>
          <table:table-cell table:style-name="ce106" table:formula="of:=1-COUNTIF([FRs.$C$2:.$C$992]; &quot;=&quot;&amp;[.A17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/>
          </table:table-cell>
          <table:table-cell table:style-name="ce106" table:formula="of:=1-COUNTIF([FRs.$C$2:.$C$992]; &quot;=&quot;&amp;[.A18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0]+1" office:value-type="float" office:value="180" calcext:value-type="float">
            <text:p/>
          </table:table-cell>
          <table:table-cell table:style-name="ce106" table:formula="of:=1-COUNTIF([FRs.$C$2:.$C$992]; &quot;=&quot;&amp;[.A18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1]+1" office:value-type="float" office:value="181" calcext:value-type="float">
            <text:p/>
          </table:table-cell>
          <table:table-cell table:style-name="ce106" table:formula="of:=1-COUNTIF([FRs.$C$2:.$C$992]; &quot;=&quot;&amp;[.A18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/>
          </table:table-cell>
          <table:table-cell table:style-name="ce106" table:formula="of:=1-COUNTIF([FRs.$C$2:.$C$992]; &quot;=&quot;&amp;[.A18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3]+1" office:value-type="float" office:value="183" calcext:value-type="float">
            <text:p/>
          </table:table-cell>
          <table:table-cell table:style-name="ce106" table:formula="of:=1-COUNTIF([FRs.$C$2:.$C$992]; &quot;=&quot;&amp;[.A18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4]+1" office:value-type="float" office:value="184" calcext:value-type="float">
            <text:p/>
          </table:table-cell>
          <table:table-cell table:style-name="ce106" table:formula="of:=1-COUNTIF([FRs.$C$2:.$C$992]; &quot;=&quot;&amp;[.A18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5]+1" office:value-type="float" office:value="185" calcext:value-type="float">
            <text:p/>
          </table:table-cell>
          <table:table-cell table:style-name="ce106" table:formula="of:=1-COUNTIF([FRs.$C$2:.$C$992]; &quot;=&quot;&amp;[.A18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6]+1" office:value-type="float" office:value="186" calcext:value-type="float">
            <text:p/>
          </table:table-cell>
          <table:table-cell table:style-name="ce106" table:formula="of:=1-COUNTIF([FRs.$C$2:.$C$992]; &quot;=&quot;&amp;[.A18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7]+1" office:value-type="float" office:value="187" calcext:value-type="float">
            <text:p/>
          </table:table-cell>
          <table:table-cell table:style-name="ce106" table:formula="of:=1-COUNTIF([FRs.$C$2:.$C$992]; &quot;=&quot;&amp;[.A188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8]+1" office:value-type="float" office:value="188" calcext:value-type="float">
            <text:p/>
          </table:table-cell>
          <table:table-cell table:style-name="ce106" table:formula="of:=1-COUNTIF([FRs.$C$2:.$C$992]; &quot;=&quot;&amp;[.A189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89]+1" office:value-type="float" office:value="189" calcext:value-type="float">
            <text:p/>
          </table:table-cell>
          <table:table-cell table:style-name="ce106" table:formula="of:=1-COUNTIF([FRs.$C$2:.$C$992]; &quot;=&quot;&amp;[.A190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0]+1" office:value-type="float" office:value="190" calcext:value-type="float">
            <text:p/>
          </table:table-cell>
          <table:table-cell table:style-name="ce106" table:formula="of:=1-COUNTIF([FRs.$C$2:.$C$992]; &quot;=&quot;&amp;[.A191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1]+1" office:value-type="float" office:value="191" calcext:value-type="float">
            <text:p/>
          </table:table-cell>
          <table:table-cell table:style-name="ce106" table:formula="of:=1-COUNTIF([FRs.$C$2:.$C$992]; &quot;=&quot;&amp;[.A192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2]+1" office:value-type="float" office:value="192" calcext:value-type="float">
            <text:p/>
          </table:table-cell>
          <table:table-cell table:style-name="ce106" table:formula="of:=1-COUNTIF([FRs.$C$2:.$C$992]; &quot;=&quot;&amp;[.A193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3]+1" office:value-type="float" office:value="193" calcext:value-type="float">
            <text:p/>
          </table:table-cell>
          <table:table-cell table:style-name="ce106" table:formula="of:=1-COUNTIF([FRs.$C$2:.$C$992]; &quot;=&quot;&amp;[.A194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4]+1" office:value-type="float" office:value="194" calcext:value-type="float">
            <text:p/>
          </table:table-cell>
          <table:table-cell table:style-name="ce106" table:formula="of:=1-COUNTIF([FRs.$C$2:.$C$992]; &quot;=&quot;&amp;[.A195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5]+1" office:value-type="float" office:value="195" calcext:value-type="float">
            <text:p/>
          </table:table-cell>
          <table:table-cell table:style-name="ce106" table:formula="of:=1-COUNTIF([FRs.$C$2:.$C$992]; &quot;=&quot;&amp;[.A196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6]+1" office:value-type="float" office:value="196" calcext:value-type="float">
            <text:p/>
          </table:table-cell>
          <table:table-cell table:style-name="ce106" table:formula="of:=1-COUNTIF([FRs.$C$2:.$C$992]; &quot;=&quot;&amp;[.A197]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formula="of:=[.A197]+1" office:value-type="float" office:value="197" calcext:value-type="float">
            <text:p/>
          </table:table-cell>
          <table:table-cell table:style-name="ce106" table:formula="of:=1-COUNTIF([FRs.$C$2:.$C$992]; &quot;=&quot;&amp;[.A1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198]+1" office:value-type="float" office:value="198" calcext:value-type="float">
            <text:p/>
          </table:table-cell>
          <table:table-cell table:style-name="ce106" table:formula="of:=1-COUNTIF([FRs.$C$2:.$C$992]; &quot;=&quot;&amp;[.A1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/>
          </table:table-cell>
          <table:table-cell table:style-name="ce106" table:formula="of:=1-COUNTIF([FRs.$C$2:.$C$992]; &quot;=&quot;&amp;[.A2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0]+1" office:value-type="float" office:value="200" calcext:value-type="float">
            <text:p/>
          </table:table-cell>
          <table:table-cell table:style-name="ce106" table:formula="of:=1-COUNTIF([FRs.$C$2:.$C$992]; &quot;=&quot;&amp;[.A20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/>
          </table:table-cell>
          <table:table-cell table:style-name="ce106" table:formula="of:=1-COUNTIF([FRs.$C$2:.$C$992]; &quot;=&quot;&amp;[.A20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2]+1" office:value-type="float" office:value="202" calcext:value-type="float">
            <text:p/>
          </table:table-cell>
          <table:table-cell table:style-name="ce106" table:formula="of:=1-COUNTIF([FRs.$C$2:.$C$992]; &quot;=&quot;&amp;[.A20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3]+1" office:value-type="float" office:value="203" calcext:value-type="float">
            <text:p/>
          </table:table-cell>
          <table:table-cell table:style-name="ce106" table:formula="of:=1-COUNTIF([FRs.$C$2:.$C$992]; &quot;=&quot;&amp;[.A20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/>
          </table:table-cell>
          <table:table-cell table:style-name="ce106" table:formula="of:=1-COUNTIF([FRs.$C$2:.$C$992]; &quot;=&quot;&amp;[.A20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5]+1" office:value-type="float" office:value="205" calcext:value-type="float">
            <text:p/>
          </table:table-cell>
          <table:table-cell table:style-name="ce106" table:formula="of:=1-COUNTIF([FRs.$C$2:.$C$992]; &quot;=&quot;&amp;[.A20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/>
          </table:table-cell>
          <table:table-cell table:style-name="ce106" table:formula="of:=1-COUNTIF([FRs.$C$2:.$C$992]; &quot;=&quot;&amp;[.A20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7]+1" office:value-type="float" office:value="207" calcext:value-type="float">
            <text:p/>
          </table:table-cell>
          <table:table-cell table:style-name="ce106" table:formula="of:=1-COUNTIF([FRs.$C$2:.$C$992]; &quot;=&quot;&amp;[.A20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8]+1" office:value-type="float" office:value="208" calcext:value-type="float">
            <text:p/>
          </table:table-cell>
          <table:table-cell table:style-name="ce106" table:formula="of:=1-COUNTIF([FRs.$C$2:.$C$992]; &quot;=&quot;&amp;[.A20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09]+1" office:value-type="float" office:value="209" calcext:value-type="float">
            <text:p/>
          </table:table-cell>
          <table:table-cell table:style-name="ce106" table:formula="of:=1-COUNTIF([FRs.$C$2:.$C$992]; &quot;=&quot;&amp;[.A21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/>
          </table:table-cell>
          <table:table-cell table:style-name="ce106" table:formula="of:=1-COUNTIF([FRs.$C$2:.$C$992]; &quot;=&quot;&amp;[.A21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/>
          </table:table-cell>
          <table:table-cell table:style-name="ce106" table:formula="of:=1-COUNTIF([FRs.$C$2:.$C$992]; &quot;=&quot;&amp;[.A21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2]+1" office:value-type="float" office:value="212" calcext:value-type="float">
            <text:p/>
          </table:table-cell>
          <table:table-cell table:style-name="ce106" table:formula="of:=1-COUNTIF([FRs.$C$2:.$C$992]; &quot;=&quot;&amp;[.A21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3]+1" office:value-type="float" office:value="213" calcext:value-type="float">
            <text:p/>
          </table:table-cell>
          <table:table-cell table:style-name="ce106" table:formula="of:=1-COUNTIF([FRs.$C$2:.$C$992]; &quot;=&quot;&amp;[.A21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/>
          </table:table-cell>
          <table:table-cell table:style-name="ce106" table:formula="of:=1-COUNTIF([FRs.$C$2:.$C$992]; &quot;=&quot;&amp;[.A21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5]+1" office:value-type="float" office:value="215" calcext:value-type="float">
            <text:p/>
          </table:table-cell>
          <table:table-cell table:style-name="ce106" table:formula="of:=1-COUNTIF([FRs.$C$2:.$C$992]; &quot;=&quot;&amp;[.A21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/>
          </table:table-cell>
          <table:table-cell table:style-name="ce106" table:formula="of:=1-COUNTIF([FRs.$C$2:.$C$992]; &quot;=&quot;&amp;[.A21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7]+1" office:value-type="float" office:value="217" calcext:value-type="float">
            <text:p/>
          </table:table-cell>
          <table:table-cell table:style-name="ce106" table:formula="of:=1-COUNTIF([FRs.$C$2:.$C$992]; &quot;=&quot;&amp;[.A21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/>
          </table:table-cell>
          <table:table-cell table:style-name="ce106" table:formula="of:=1-COUNTIF([FRs.$C$2:.$C$992]; &quot;=&quot;&amp;[.A21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/>
          </table:table-cell>
          <table:table-cell table:style-name="ce106" table:formula="of:=1-COUNTIF([FRs.$C$2:.$C$992]; &quot;=&quot;&amp;[.A22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0]+1" office:value-type="float" office:value="220" calcext:value-type="float">
            <text:p/>
          </table:table-cell>
          <table:table-cell table:style-name="ce106" table:formula="of:=1-COUNTIF([FRs.$C$2:.$C$992]; &quot;=&quot;&amp;[.A22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/>
          </table:table-cell>
          <table:table-cell table:style-name="ce106" table:formula="of:=1-COUNTIF([FRs.$C$2:.$C$992]; &quot;=&quot;&amp;[.A22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2]+1" office:value-type="float" office:value="222" calcext:value-type="float">
            <text:p/>
          </table:table-cell>
          <table:table-cell table:style-name="ce106" table:formula="of:=1-COUNTIF([FRs.$C$2:.$C$992]; &quot;=&quot;&amp;[.A22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/>
          </table:table-cell>
          <table:table-cell table:style-name="ce106" table:formula="of:=1-COUNTIF([FRs.$C$2:.$C$992]; &quot;=&quot;&amp;[.A22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4]+1" office:value-type="float" office:value="224" calcext:value-type="float">
            <text:p/>
          </table:table-cell>
          <table:table-cell table:style-name="ce106" table:formula="of:=1-COUNTIF([FRs.$C$2:.$C$992]; &quot;=&quot;&amp;[.A22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5]+1" office:value-type="float" office:value="225" calcext:value-type="float">
            <text:p/>
          </table:table-cell>
          <table:table-cell table:style-name="ce106" table:formula="of:=1-COUNTIF([FRs.$C$2:.$C$992]; &quot;=&quot;&amp;[.A22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/>
          </table:table-cell>
          <table:table-cell table:style-name="ce106" table:formula="of:=1-COUNTIF([FRs.$C$2:.$C$992]; &quot;=&quot;&amp;[.A22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7]+1" office:value-type="float" office:value="227" calcext:value-type="float">
            <text:p/>
          </table:table-cell>
          <table:table-cell table:style-name="ce106" table:formula="of:=1-COUNTIF([FRs.$C$2:.$C$992]; &quot;=&quot;&amp;[.A22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8]+1" office:value-type="float" office:value="228" calcext:value-type="float">
            <text:p/>
          </table:table-cell>
          <table:table-cell table:style-name="ce106" table:formula="of:=1-COUNTIF([FRs.$C$2:.$C$992]; &quot;=&quot;&amp;[.A22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29]+1" office:value-type="float" office:value="229" calcext:value-type="float">
            <text:p/>
          </table:table-cell>
          <table:table-cell table:style-name="ce106" table:formula="of:=1-COUNTIF([FRs.$C$2:.$C$992]; &quot;=&quot;&amp;[.A23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/>
          </table:table-cell>
          <table:table-cell table:style-name="ce106" table:formula="of:=1-COUNTIF([FRs.$C$2:.$C$992]; &quot;=&quot;&amp;[.A23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/>
          </table:table-cell>
          <table:table-cell table:style-name="ce106" table:formula="of:=1-COUNTIF([FRs.$C$2:.$C$992]; &quot;=&quot;&amp;[.A23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/>
          </table:table-cell>
          <table:table-cell table:style-name="ce106" table:formula="of:=1-COUNTIF([FRs.$C$2:.$C$992]; &quot;=&quot;&amp;[.A23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/>
          </table:table-cell>
          <table:table-cell table:style-name="ce106" table:formula="of:=1-COUNTIF([FRs.$C$2:.$C$992]; &quot;=&quot;&amp;[.A23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4]+1" office:value-type="float" office:value="234" calcext:value-type="float">
            <text:p/>
          </table:table-cell>
          <table:table-cell table:style-name="ce106" table:formula="of:=1-COUNTIF([FRs.$C$2:.$C$992]; &quot;=&quot;&amp;[.A23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/>
          </table:table-cell>
          <table:table-cell table:style-name="ce106" table:formula="of:=1-COUNTIF([FRs.$C$2:.$C$992]; &quot;=&quot;&amp;[.A23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/>
          </table:table-cell>
          <table:table-cell table:style-name="ce106" table:formula="of:=1-COUNTIF([FRs.$C$2:.$C$992]; &quot;=&quot;&amp;[.A23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7]+1" office:value-type="float" office:value="237" calcext:value-type="float">
            <text:p/>
          </table:table-cell>
          <table:table-cell table:style-name="ce106" table:formula="of:=1-COUNTIF([FRs.$C$2:.$C$992]; &quot;=&quot;&amp;[.A23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8]+1" office:value-type="float" office:value="238" calcext:value-type="float">
            <text:p/>
          </table:table-cell>
          <table:table-cell table:style-name="ce106" table:formula="of:=1-COUNTIF([FRs.$C$2:.$C$992]; &quot;=&quot;&amp;[.A23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39]+1" office:value-type="float" office:value="239" calcext:value-type="float">
            <text:p/>
          </table:table-cell>
          <table:table-cell table:style-name="ce106" table:formula="of:=1-COUNTIF([FRs.$C$2:.$C$992]; &quot;=&quot;&amp;[.A24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/>
          </table:table-cell>
          <table:table-cell table:style-name="ce106" table:formula="of:=1-COUNTIF([FRs.$C$2:.$C$992]; &quot;=&quot;&amp;[.A24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1]+1" office:value-type="float" office:value="241" calcext:value-type="float">
            <text:p/>
          </table:table-cell>
          <table:table-cell table:style-name="ce106" table:formula="of:=1-COUNTIF([FRs.$C$2:.$C$992]; &quot;=&quot;&amp;[.A24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2]+1" office:value-type="float" office:value="242" calcext:value-type="float">
            <text:p/>
          </table:table-cell>
          <table:table-cell table:style-name="ce106" table:formula="of:=1-COUNTIF([FRs.$C$2:.$C$992]; &quot;=&quot;&amp;[.A24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3]+1" office:value-type="float" office:value="243" calcext:value-type="float">
            <text:p/>
          </table:table-cell>
          <table:table-cell table:style-name="ce106" table:formula="of:=1-COUNTIF([FRs.$C$2:.$C$992]; &quot;=&quot;&amp;[.A24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/>
          </table:table-cell>
          <table:table-cell table:style-name="ce106" table:formula="of:=1-COUNTIF([FRs.$C$2:.$C$992]; &quot;=&quot;&amp;[.A24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/>
          </table:table-cell>
          <table:table-cell table:style-name="ce106" table:formula="of:=1-COUNTIF([FRs.$C$2:.$C$992]; &quot;=&quot;&amp;[.A24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6]+1" office:value-type="float" office:value="246" calcext:value-type="float">
            <text:p/>
          </table:table-cell>
          <table:table-cell table:style-name="ce106" table:formula="of:=1-COUNTIF([FRs.$C$2:.$C$992]; &quot;=&quot;&amp;[.A24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7]+1" office:value-type="float" office:value="247" calcext:value-type="float">
            <text:p/>
          </table:table-cell>
          <table:table-cell table:style-name="ce106" table:formula="of:=1-COUNTIF([FRs.$C$2:.$C$992]; &quot;=&quot;&amp;[.A24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8]+1" office:value-type="float" office:value="248" calcext:value-type="float">
            <text:p/>
          </table:table-cell>
          <table:table-cell table:style-name="ce106" table:formula="of:=1-COUNTIF([FRs.$C$2:.$C$992]; &quot;=&quot;&amp;[.A24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49]+1" office:value-type="float" office:value="249" calcext:value-type="float">
            <text:p/>
          </table:table-cell>
          <table:table-cell table:style-name="ce106" table:formula="of:=1-COUNTIF([FRs.$C$2:.$C$992]; &quot;=&quot;&amp;[.A25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0]+1" office:value-type="float" office:value="250" calcext:value-type="float">
            <text:p/>
          </table:table-cell>
          <table:table-cell table:style-name="ce106" table:formula="of:=1-COUNTIF([FRs.$C$2:.$C$992]; &quot;=&quot;&amp;[.A25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1]+1" office:value-type="float" office:value="251" calcext:value-type="float">
            <text:p/>
          </table:table-cell>
          <table:table-cell table:style-name="ce106" table:formula="of:=1-COUNTIF([FRs.$C$2:.$C$992]; &quot;=&quot;&amp;[.A25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2]+1" office:value-type="float" office:value="252" calcext:value-type="float">
            <text:p/>
          </table:table-cell>
          <table:table-cell table:style-name="ce106" table:formula="of:=1-COUNTIF([FRs.$C$2:.$C$992]; &quot;=&quot;&amp;[.A25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3]+1" office:value-type="float" office:value="253" calcext:value-type="float">
            <text:p/>
          </table:table-cell>
          <table:table-cell table:style-name="ce106" table:formula="of:=1-COUNTIF([FRs.$C$2:.$C$992]; &quot;=&quot;&amp;[.A25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/>
          </table:table-cell>
          <table:table-cell table:style-name="ce106" table:formula="of:=1-COUNTIF([FRs.$C$2:.$C$992]; &quot;=&quot;&amp;[.A25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5]+1" office:value-type="float" office:value="255" calcext:value-type="float">
            <text:p/>
          </table:table-cell>
          <table:table-cell table:style-name="ce106" table:formula="of:=1-COUNTIF([FRs.$C$2:.$C$992]; &quot;=&quot;&amp;[.A25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/>
          </table:table-cell>
          <table:table-cell table:style-name="ce106" table:formula="of:=1-COUNTIF([FRs.$C$2:.$C$992]; &quot;=&quot;&amp;[.A25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/>
          </table:table-cell>
          <table:table-cell table:style-name="ce106" table:formula="of:=1-COUNTIF([FRs.$C$2:.$C$992]; &quot;=&quot;&amp;[.A25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8]+1" office:value-type="float" office:value="258" calcext:value-type="float">
            <text:p/>
          </table:table-cell>
          <table:table-cell table:style-name="ce106" table:formula="of:=1-COUNTIF([FRs.$C$2:.$C$992]; &quot;=&quot;&amp;[.A25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/>
          </table:table-cell>
          <table:table-cell table:style-name="ce106" table:formula="of:=1-COUNTIF([FRs.$C$2:.$C$992]; &quot;=&quot;&amp;[.A26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0]+1" office:value-type="float" office:value="260" calcext:value-type="float">
            <text:p/>
          </table:table-cell>
          <table:table-cell table:style-name="ce106" table:formula="of:=1-COUNTIF([FRs.$C$2:.$C$992]; &quot;=&quot;&amp;[.A26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1]+1" office:value-type="float" office:value="261" calcext:value-type="float">
            <text:p/>
          </table:table-cell>
          <table:table-cell table:style-name="ce106" table:formula="of:=1-COUNTIF([FRs.$C$2:.$C$992]; &quot;=&quot;&amp;[.A26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2]+1" office:value-type="float" office:value="262" calcext:value-type="float">
            <text:p/>
          </table:table-cell>
          <table:table-cell table:style-name="ce106" table:formula="of:=1-COUNTIF([FRs.$C$2:.$C$992]; &quot;=&quot;&amp;[.A26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3]+1" office:value-type="float" office:value="263" calcext:value-type="float">
            <text:p/>
          </table:table-cell>
          <table:table-cell table:style-name="ce106" table:formula="of:=1-COUNTIF([FRs.$C$2:.$C$992]; &quot;=&quot;&amp;[.A26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4]+1" office:value-type="float" office:value="264" calcext:value-type="float">
            <text:p/>
          </table:table-cell>
          <table:table-cell table:style-name="ce106" table:formula="of:=1-COUNTIF([FRs.$C$2:.$C$992]; &quot;=&quot;&amp;[.A26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5]+1" office:value-type="float" office:value="265" calcext:value-type="float">
            <text:p/>
          </table:table-cell>
          <table:table-cell table:style-name="ce106" table:formula="of:=1-COUNTIF([FRs.$C$2:.$C$992]; &quot;=&quot;&amp;[.A26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6]+1" office:value-type="float" office:value="266" calcext:value-type="float">
            <text:p/>
          </table:table-cell>
          <table:table-cell table:style-name="ce106" table:formula="of:=1-COUNTIF([FRs.$C$2:.$C$992]; &quot;=&quot;&amp;[.A26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/>
          </table:table-cell>
          <table:table-cell table:style-name="ce106" table:formula="of:=1-COUNTIF([FRs.$C$2:.$C$992]; &quot;=&quot;&amp;[.A26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8]+1" office:value-type="float" office:value="268" calcext:value-type="float">
            <text:p/>
          </table:table-cell>
          <table:table-cell table:style-name="ce106" table:formula="of:=1-COUNTIF([FRs.$C$2:.$C$992]; &quot;=&quot;&amp;[.A26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69]+1" office:value-type="float" office:value="269" calcext:value-type="float">
            <text:p/>
          </table:table-cell>
          <table:table-cell table:style-name="ce106" table:formula="of:=1-COUNTIF([FRs.$C$2:.$C$992]; &quot;=&quot;&amp;[.A27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0]+1" office:value-type="float" office:value="270" calcext:value-type="float">
            <text:p/>
          </table:table-cell>
          <table:table-cell table:style-name="ce106" table:formula="of:=1-COUNTIF([FRs.$C$2:.$C$992]; &quot;=&quot;&amp;[.A27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/>
          </table:table-cell>
          <table:table-cell table:style-name="ce106" table:formula="of:=1-COUNTIF([FRs.$C$2:.$C$992]; &quot;=&quot;&amp;[.A27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/>
          </table:table-cell>
          <table:table-cell table:style-name="ce106" table:formula="of:=1-COUNTIF([FRs.$C$2:.$C$992]; &quot;=&quot;&amp;[.A27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/>
          </table:table-cell>
          <table:table-cell table:style-name="ce106" table:formula="of:=1-COUNTIF([FRs.$C$2:.$C$992]; &quot;=&quot;&amp;[.A27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4]+1" office:value-type="float" office:value="274" calcext:value-type="float">
            <text:p/>
          </table:table-cell>
          <table:table-cell table:style-name="ce106" table:formula="of:=1-COUNTIF([FRs.$C$2:.$C$992]; &quot;=&quot;&amp;[.A27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/>
          </table:table-cell>
          <table:table-cell table:style-name="ce106" table:formula="of:=1-COUNTIF([FRs.$C$2:.$C$992]; &quot;=&quot;&amp;[.A27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/>
          </table:table-cell>
          <table:table-cell table:style-name="ce106" table:formula="of:=1-COUNTIF([FRs.$C$2:.$C$992]; &quot;=&quot;&amp;[.A27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/>
          </table:table-cell>
          <table:table-cell table:style-name="ce106" table:formula="of:=1-COUNTIF([FRs.$C$2:.$C$992]; &quot;=&quot;&amp;[.A27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8]+1" office:value-type="float" office:value="278" calcext:value-type="float">
            <text:p/>
          </table:table-cell>
          <table:table-cell table:style-name="ce106" table:formula="of:=1-COUNTIF([FRs.$C$2:.$C$992]; &quot;=&quot;&amp;[.A27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79]+1" office:value-type="float" office:value="279" calcext:value-type="float">
            <text:p/>
          </table:table-cell>
          <table:table-cell table:style-name="ce106" table:formula="of:=1-COUNTIF([FRs.$C$2:.$C$992]; &quot;=&quot;&amp;[.A28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0]+1" office:value-type="float" office:value="280" calcext:value-type="float">
            <text:p/>
          </table:table-cell>
          <table:table-cell table:style-name="ce106" table:formula="of:=1-COUNTIF([FRs.$C$2:.$C$992]; &quot;=&quot;&amp;[.A28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1]+1" office:value-type="float" office:value="281" calcext:value-type="float">
            <text:p/>
          </table:table-cell>
          <table:table-cell table:style-name="ce106" table:formula="of:=1-COUNTIF([FRs.$C$2:.$C$992]; &quot;=&quot;&amp;[.A28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2]+1" office:value-type="float" office:value="282" calcext:value-type="float">
            <text:p/>
          </table:table-cell>
          <table:table-cell table:style-name="ce106" table:formula="of:=1-COUNTIF([FRs.$C$2:.$C$992]; &quot;=&quot;&amp;[.A28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3]+1" office:value-type="float" office:value="283" calcext:value-type="float">
            <text:p/>
          </table:table-cell>
          <table:table-cell table:style-name="ce106" table:formula="of:=1-COUNTIF([FRs.$C$2:.$C$992]; &quot;=&quot;&amp;[.A28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4]+1" office:value-type="float" office:value="284" calcext:value-type="float">
            <text:p/>
          </table:table-cell>
          <table:table-cell table:style-name="ce106" table:formula="of:=1-COUNTIF([FRs.$C$2:.$C$992]; &quot;=&quot;&amp;[.A28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/>
          </table:table-cell>
          <table:table-cell table:style-name="ce106" table:formula="of:=1-COUNTIF([FRs.$C$2:.$C$992]; &quot;=&quot;&amp;[.A28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/>
          </table:table-cell>
          <table:table-cell table:style-name="ce106" table:formula="of:=1-COUNTIF([FRs.$C$2:.$C$992]; &quot;=&quot;&amp;[.A28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7]+1" office:value-type="float" office:value="287" calcext:value-type="float">
            <text:p/>
          </table:table-cell>
          <table:table-cell table:style-name="ce106" table:formula="of:=1-COUNTIF([FRs.$C$2:.$C$992]; &quot;=&quot;&amp;[.A28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8]+1" office:value-type="float" office:value="288" calcext:value-type="float">
            <text:p/>
          </table:table-cell>
          <table:table-cell table:style-name="ce106" table:formula="of:=1-COUNTIF([FRs.$C$2:.$C$992]; &quot;=&quot;&amp;[.A28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89]+1" office:value-type="float" office:value="289" calcext:value-type="float">
            <text:p/>
          </table:table-cell>
          <table:table-cell table:style-name="ce106" table:formula="of:=1-COUNTIF([FRs.$C$2:.$C$992]; &quot;=&quot;&amp;[.A29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0]+1" office:value-type="float" office:value="290" calcext:value-type="float">
            <text:p/>
          </table:table-cell>
          <table:table-cell table:style-name="ce106" table:formula="of:=1-COUNTIF([FRs.$C$2:.$C$992]; &quot;=&quot;&amp;[.A291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1]+1" office:value-type="float" office:value="291" calcext:value-type="float">
            <text:p/>
          </table:table-cell>
          <table:table-cell table:style-name="ce106" table:formula="of:=1-COUNTIF([FRs.$C$2:.$C$992]; &quot;=&quot;&amp;[.A292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2]+1" office:value-type="float" office:value="292" calcext:value-type="float">
            <text:p/>
          </table:table-cell>
          <table:table-cell table:style-name="ce106" table:formula="of:=1-COUNTIF([FRs.$C$2:.$C$992]; &quot;=&quot;&amp;[.A293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3]+1" office:value-type="float" office:value="293" calcext:value-type="float">
            <text:p/>
          </table:table-cell>
          <table:table-cell table:style-name="ce106" table:formula="of:=1-COUNTIF([FRs.$C$2:.$C$992]; &quot;=&quot;&amp;[.A294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4]+1" office:value-type="float" office:value="294" calcext:value-type="float">
            <text:p/>
          </table:table-cell>
          <table:table-cell table:style-name="ce106" table:formula="of:=1-COUNTIF([FRs.$C$2:.$C$992]; &quot;=&quot;&amp;[.A295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5]+1" office:value-type="float" office:value="295" calcext:value-type="float">
            <text:p/>
          </table:table-cell>
          <table:table-cell table:style-name="ce106" table:formula="of:=1-COUNTIF([FRs.$C$2:.$C$992]; &quot;=&quot;&amp;[.A296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6]+1" office:value-type="float" office:value="296" calcext:value-type="float">
            <text:p/>
          </table:table-cell>
          <table:table-cell table:style-name="ce106" table:formula="of:=1-COUNTIF([FRs.$C$2:.$C$992]; &quot;=&quot;&amp;[.A297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7]+1" office:value-type="float" office:value="297" calcext:value-type="float">
            <text:p/>
          </table:table-cell>
          <table:table-cell table:style-name="ce106" table:formula="of:=1-COUNTIF([FRs.$C$2:.$C$992]; &quot;=&quot;&amp;[.A298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8]+1" office:value-type="float" office:value="298" calcext:value-type="float">
            <text:p/>
          </table:table-cell>
          <table:table-cell table:style-name="ce106" table:formula="of:=1-COUNTIF([FRs.$C$2:.$C$992]; &quot;=&quot;&amp;[.A299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/>
          </table:table-cell>
          <table:table-cell table:style-name="ce106" table:formula="of:=1-COUNTIF([FRs.$C$2:.$C$992]; &quot;=&quot;&amp;[.A300])" office:value-type="float" office:value="1" calcext:value-type="float">
            <text:p/>
          </table:table-cell>
          <table:table-cell table:number-columns-repeated="4"/>
        </table:table-row>
        <table:table-row table:style-name="ro1">
          <table:table-cell table:formula="of:=[.A300]+1" office:value-type="float" office:value="300" calcext:value-type="float">
            <text:p/>
          </table:table-cell>
          <table:table-cell table:style-name="ce106" table:formula="of:=1-COUNTIF([FRs.$C$2:.$C$992]; &quot;=&quot;&amp;[.A301])" office:value-type="float" office:value="1" calcext:value-type="float">
            <text:p/>
          </table:table-cell>
          <table:table-cell table:number-columns-repeated="4"/>
        </table:table-row>
        <table:table-row table:style-name="ro1" table:number-rows-repeated="9">
          <table:table-cell/>
          <table:table-cell table:style-name="ce106"/>
          <table:table-cell table:number-columns-repeated="4"/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Rs.A149:FRs.G151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flat.A1:flat.G34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4:25:28.105832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3:20:51.297104666</meta:creation-date>
    <dc:date>2014-05-29T14:27:06.057332263</dc:date>
    <meta:editing-duration>P1DT48M42S</meta:editing-duration>
    <meta:editing-cycles>99</meta:editing-cycles>
    <meta:generator>LibreOffice/4.2.3.3$Linux_X86_64 LibreOffice_project/420m0$Build-3</meta:generator>
    <meta:document-statistic meta:table-count="4" meta:cell-count="2261" meta:object-count="0"/>
  </office:meta>
</office:document-meta>
</file>