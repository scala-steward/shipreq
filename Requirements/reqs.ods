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14.817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10.539cm"/>
    </style:style>
    <style:style style:name="co11" style:family="table-column">
      <style:table-column-properties fo:break-before="auto" style:column-width="6.376cm"/>
    </style:style>
    <style:style style:name="co12" style:family="table-column">
      <style:table-column-properties fo:break-before="auto" style:column-width="5.99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873cm" fo:break-before="auto" style:use-optimal-row-height="true"/>
    </style:style>
    <style:style style:name="ro7" style:family="table-row">
      <style:table-row-properties style:row-height="2.13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fo:color="#b3b3b3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top"/>
    </style:style>
    <style:style style:name="ce9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0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order="0.06pt solid #000000" style:vertical-align="top"/>
      <style:text-properties fo:color="#b3b3b3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top"/>
      <style:text-properties fo:color="#b3b3b3"/>
    </style:style>
    <style:style style:name="ce20" style:family="table-cell" style:parent-style-name="Default">
      <style:table-cell-properties style:vertical-align="top"/>
      <style:text-properties fo:color="#008000"/>
    </style:style>
    <style:style style:name="ce2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  <style:text-properties fo:color="#008000"/>
    </style:style>
    <style:style style:name="ce23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q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default-cell-style-name="ce5"/>
        <table:table-column table:style-name="co7" table:default-cell-style-name="ce17"/>
        <table:table-column table:style-name="co8" table:number-columns-repeated="1017" table:default-cell-style-name="ce17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8"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BR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l use cases in a project share the same field-set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BR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 field-set cannot contain more than 30 fields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BR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ach field name in a field-set must be unique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CO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 field-set cannot be empty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hen modifying fields, BA shall be able to remove fields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hen modifying fields, BA shall be able to add fields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hen modifying fields, BA shall be able to modify fields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hen modifying fields, BA shall be able to reorder fields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hen modifying fields, System shall indicate how many UCs have non-default content for each field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hen modifying fields, BA shall be able to see each instance of non-default content for a field.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"/>
          <table:table-cell table:style-name="ce4" office:value-type="string" calcext:value-type="string">
            <text:p>UC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dify a Project's Fields</text:p>
          </table:table-cell>
          <table:table-cell table:style-name="ce13" office:value-type="date" office:date-value="2014-02-06" calcext:value-type="date">
            <text:p>06/02/14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BR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Grouping names may be unique per project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Grouping names must not exceed 60 characters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DD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Groupings have a name.</text:p>
          </table:table-cell>
          <table:table-cell table:style-name="ce13" office:value-type="date" office:date-value="2014-02-11" calcext:value-type="date">
            <text:p>11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DD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Groupings have a description.</text:p>
          </table:table-cell>
          <table:table-cell table:style-name="ce13" office:value-type="date" office:date-value="2014-02-11" calcext:value-type="date">
            <text:p>11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DD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Groupings can have 0:<text:span text:style-name="T2">n children.</text:span>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DD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Groupings can have 0:<text:span text:style-name="T2">n parents.</text:span>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 office:value-type="float" office:value="1" calcext:value-type="float">
            <text:p>MF-01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A shall be able to apply groupings to UC using the UCE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 office:value-type="float" office:value="1" calcext:value-type="float">
            <text:p>MF-01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BA shall be able to remove groupings to UC using the UCE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A shall be able to apply groupings to multiple UCs simultaneously (without using the UCE)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BA shall be able to remove groupings to multiple UCs simultaneously (without using the UCE)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 office:value-type="float" office:value="2" calcext:value-type="float">
            <text:p>MF-02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A shall be able to filter shares' UC selection criteria by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BA shall be able to filter their view of a project's UCs by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When modifying groupings, BA shall be able to create a tree of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When modifying groupings in a tree, BA shall be able to specify the order of children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When modifying groupings in a tree, BA shall be able to specify multiple parents of a child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BA shall be able to create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BA shall be able to modify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BA shall be able to delete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BA shall be able to list all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When reading own UCs, BA shall be able to filter UCs by groupings.</text:p>
          </table:table-cell>
          <table:table-cell table:style-name="ce13" office:value-type="date" office:date-value="2014-02-07" calcext:value-type="date">
            <text:p>07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2" calcext:value-type="float">
            <text:p>MF-02</text:p>
          </table:table-cell>
          <table:table-cell table:style-name="ce6" office:value-type="string" calcext:value-type="string">
            <text:p>FR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When reading shared UCs, AnonReader shall be able to filter UCs by groupings. [Pri=Nice]</text:p>
          </table:table-cell>
          <table:table-cell table:style-name="ce14" office:value-type="date" office:date-value="2014-02-07" calcext:value-type="date">
            <text:p>07/02/14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BA shall be able to copy a subset of groupings (including child nodes) between projects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BA shall be able to apply groupings to fields within a UC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hen reading a UC, the reader shall be able to see all groupings applied to the UC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When searching/filtering by groupings, User shall be able to specify NOT to a grouping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When searching/filtering by groupings, User shall be able to combine criteria using AND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When searching/filtering by groupings, User shall be able to combine criteria using OR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BA shall be able to restore deleted groupings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When a grouping is restored, its requirement applications should be restored too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When a grouping is deleted, System shall not remove fields based on it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BA shall be able to browse groupings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When browsing groupings, BA shall be able to narrow the scope of browsing data, to a parent grouping which children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When browsing groupings, System shall display the number of UCs with each grouping applied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When browsing groupings, System shall display the number of UCs to which the top-level grouping is not applied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 office:value-type="float" office:value="3" calcext:value-type="float">
            <text:p>MF-03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When browsing groupings, BA shall be able to read all UCs with a given grouping applied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FR</text:p>
          </table:table-cell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When browsing groupings, BA shall be able to read all UC steps with a given grouping applied.</text:p>
          </table:table-cell>
          <table:table-cell table:style-name="ce13" office:value-type="date" office:date-value="2014-02-13" calcext:value-type="date">
            <text:p>13/02/14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QR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ser must be able to organise 100 flat reqs of same type into 5 versions in under 5 minutes.</text:p>
          </table:table-cell>
          <table:table-cell table:style-name="ce13" office:value-type="date" office:date-value="2014-02-11" calcext:value-type="date">
            <text:p>11/02/14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2"/>
          <table:table-cell table:style-name="ce4" office:value-type="string" calcext:value-type="string">
            <text:p>QR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3" office:value-type="date" office:date-value="2014-02-11" calcext:value-type="date">
            <text:p>11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style-name="ce2" office:value-type="float" office:value="7" calcext:value-type="float">
            <text:p>MF-07</text:p>
          </table:table-cell>
          <table:table-cell table:style-name="ce4" office:value-type="string" calcext:value-type="string">
            <text:p>BR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style-name="ce2" office:value-type="float" office:value="7" calcext:value-type="float">
            <text:p>MF-07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System shall increment the revision number of a requirement anytime <text:span text:style-name="T3">any</text:span><text:span text:style-name="T2"> user-observable change occurs, including field ordering changes, grouping renames, etc.</text:span>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style-name="ce2" office:value-type="float" office:value="7" calcext:value-type="float">
            <text:p>MF-07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System should not increment the revision number of a requirement when there is no <text:span text:style-name="T2">user-observable change between revisions.</text:span></text:p>
          </table:table-cell>
          <table:table-cell table:style-name="ce13" office:value-type="date" office:date-value="2014-02-12" calcext:value-type="date">
            <text:p>12/02/14</text:p>
          </table:table-cell>
          <table:table-cell table:style-name="ce15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tersection probs" table:style-name="ta1">
        <table:table-column table:style-name="co9" table:number-columns-repeated="2" table:default-cell-style-name="ce17"/>
        <table:table-column table:style-name="co10" table:default-cell-style-name="ce12"/>
        <table:table-column table:style-name="co11" table:default-cell-style-name="ce12"/>
        <table:table-column table:style-name="co8" table:number-columns-repeated="1020" table:default-cell-style-name="ce17"/>
        <table:table-row table:style-name="ro5">
          <table:table-cell table:style-name="ce18" office:value-type="string" calcext:value-type="string">
            <text:p>MF-α</text:p>
          </table:table-cell>
          <table:table-cell table:style-name="ce18" office:value-type="string" calcext:value-type="string">
            <text:p>MF-β</text:p>
          </table:table-cell>
          <table:table-cell table:style-name="ce21" office:value-type="string" calcext:value-type="string">
            <text:p>Concern</text:p>
          </table:table-cell>
          <table:table-cell table:style-name="ce21" office:value-type="string" calcext:value-type="string">
            <text:p>Conclusion</text:p>
          </table:table-cell>
          <table:table-cell table:style-name="ce18" table:number-columns-repeated="1020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ovide a default FV when adding new fields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3">part of</text:span><text:span text:style-name="T2"> team X)</text:span></text:p>
          </table:table-cell>
          <table:table-cell table:number-columns-repeated="1021"/>
        </table:table-row>
        <table:table-row table:style-name="ro7">
          <table:table-cell table:style-name="ce20" office:value-type="string" calcext:value-type="string">
            <text:p>Field Customisation</text:p>
          </table:table-cell>
          <table:table-cell table:style-name="ce20" office:value-type="string" calcext:value-type="string">
            <text:p>Organisation</text:p>
          </table:table-cell>
          <table:table-cell table:style-name="ce22" office:value-type="string" calcext:value-type="string">
            <text:p>When FSs with grouping-display-fields are shared, what happens when referenced groupings are updated.</text:p>
          </table:table-cell>
          <table:table-cell table:style-name="ce22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elds based on deleted groupings should be reported as an error.</text:p>
          </table:table-cell>
          <table:table-cell table:number-columns-repeated="1021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UDL" table:style-name="ta1">
        <table:table-column table:style-name="co12" table:default-cell-style-name="Default"/>
        <table:table-column table:style-name="co8" table:number-columns-repeated="6" table:default-cell-style-name="ce26"/>
        <table:table-column table:style-name="co8" table:default-cell-style-name="Default"/>
        <table:table-row table:style-name="ro5">
          <table:table-cell table:style-name="ce23" office:value-type="string" calcext:value-type="string">
            <text:p>SUBJECT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24" office:value-type="string" calcext:value-type="string">
            <text:p>CARD/QTY</text:p>
          </table:table-cell>
        </table:table-row>
        <table:table-row table:style-name="ro5">
          <table:table-cell table:style-name="ce11" office:value-type="string" calcext:value-type="string">
            <text:p>Field-set</text:p>
          </table:table-cell>
          <table:table-cell table:style-name="ce25" office:value-type="string" calcext:value-type="string">
            <text:p>invis</text:p>
          </table:table-cell>
          <table:table-cell table:number-columns-repeated="2" table:style-name="ce25" office:value-type="string" calcext:value-type="string">
            <text:p>UC-9</text:p>
          </table:table-cell>
          <table:table-cell table:style-name="ce25" office:value-type="string" calcext:value-type="string">
            <text:p>invis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25" office:value-type="string" calcext:value-type="string">
            <text:p>UC-9</text:p>
          </table:table-cell>
        </table:table-row>
        <table:table-row table:style-name="ro5">
          <table:table-cell table:style-name="ce11" office:value-type="string" calcext:value-type="string">
            <text:p>Field</text:p>
          </table:table-cell>
          <table:table-cell table:number-columns-repeated="7" table:style-name="ce25" office:value-type="string" calcext:value-type="string">
            <text:p>UC-9</text:p>
          </table:table-cell>
        </table:table-row>
        <table:table-row table:style-name="ro5">
          <table:table-cell table:style-name="ce11" office:value-type="string" calcext:value-type="string">
            <text:p>Grouping</text:p>
          </table:table-cell>
          <table:table-cell table:style-name="ce25" table:number-columns-repeated="7"/>
        </table:table-row>
        <table:table-row table:style-name="ro5">
          <table:table-cell table:style-name="ce11" office:value-type="string" calcext:value-type="string">
            <text:p>Grouping relationship</text:p>
          </table:table-cell>
          <table:table-cell table:style-name="ce25" table:number-columns-repeated="7"/>
        </table:table-row>
        <table:table-row table:style-name="ro5" table:number-rows-repeated="1048570">
          <table:table-cell table:number-columns-repeated="8"/>
        </table:table-row>
        <table:table-row table:style-name="ro8">
          <table:table-cell table:number-columns-repeated="8"/>
        </table:table-row>
      </table:table>
      <table:named-expressions/>
      <table:database-ranges>
        <table:database-range table:name="__Anonymous_Sheet_DB__0" table:target-range-address="reqs.A1:reqs.G55" table:display-filter-buttons="true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1:08:08.343025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2-13T12:15:35.791222897</dc:date>
    <meta:editing-duration>PT1H37M46S</meta:editing-duration>
    <meta:editing-cycles>13</meta:editing-cycles>
    <meta:generator>LibreOffice/4.1.5.3$Linux_x86 LibreOffice_project/410m0$Build-3</meta:generator>
    <meta:document-statistic meta:table-count="3" meta:cell-count="343" meta:object-count="0"/>
  </office:meta>
</office:document-meta>
</file>