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4.915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14.817cm"/>
    </style:style>
    <style:style style:name="co21" style:family="table-column">
      <style:table-column-properties fo:break-before="auto" style:column-width="2.803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235cm"/>
    </style:style>
    <style:style style:name="co24" style:family="table-column">
      <style:table-column-properties fo:break-before="auto" style:column-width="8.377cm"/>
    </style:style>
    <style:style style:name="co25" style:family="table-column">
      <style:table-column-properties fo:break-before="auto" style:column-width="2.452cm"/>
    </style:style>
    <style:style style:name="co26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4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57cm" fo:break-before="auto" style:use-optimal-row-height="true"/>
    </style:style>
    <style:style style:name="ro7" style:family="table-row">
      <style:table-row-properties style:row-height="1.314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4.244cm" fo:break-before="auto" style:use-optimal-row-height="tru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2.988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1.295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#ffff00" fo:wrap-option="wrap" fo:border="0.06pt solid #000000" style:vertical-align="top"/>
    </style:style>
    <style:style style:name="ce74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5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transparent" fo:wrap-option="wrap" fo:border="0.06pt solid #000000" style:vertical-align="top"/>
    </style:style>
    <style:style style:name="ce77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9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3" style:family="table-cell" style:parent-style-name="Default">
      <style:table-cell-properties fo:background-color="#ffffcc" fo:wrap-option="wrap" fo:border="0.06pt solid #000000"/>
    </style:style>
    <style:style style:name="ce84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6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8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9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7" style:family="table-cell" style:parent-style-name="Default">
      <style:table-cell-properties fo:wrap-option="wrap" style:vertical-align="top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0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1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1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2" style:family="table-cell" style:parent-style-name="Default">
      <style:table-cell-properties fo:background-color="#ffffcc" fo:wrap-option="wrap" fo:border="0.06pt solid #000000" style:vertical-align="top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background-color="#008000" fo:wrap-option="wrap" fo:border="0.06pt solid #000000" style:vertical-align="top"/>
      <style:text-properties fo:color="#ffffff" style:font-name="Arimo" fo:font-style="italic" fo:font-weight="bold" style:font-name-asian="TianZhen" style:font-style-asian="italic" style:font-weight-asian="bold" style:font-name-complex="FreeSans" style:font-style-complex="italic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9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style:vertical-align="top"/>
      <style:text-properties style:use-window-font-color="true"/>
    </style:style>
    <style:style style:name="ce12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9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 fo:border="0.06pt solid #000000"/>
    </style:style>
    <style:style style:name="ce132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3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4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color="#ff000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66"/>
        <table:table-column table:style-name="co5" table:default-cell-style-name="ce97"/>
        <table:table-column table:style-name="co6" table:default-cell-style-name="ce97"/>
        <table:table-column table:style-name="co7" table:default-cell-style-name="ce97"/>
        <table:table-column table:style-name="co8" table:default-cell-style-name="ce19"/>
        <table:table-column table:style-name="co9" table:default-cell-style-name="ce19"/>
        <table:table-column table:style-name="co10" table:default-cell-style-name="ce123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1010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66])+1" office:value-type="float" office:value="289" calcext:value-type="float">
            <text:p>NEXT: 289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20" office:value-type="string" calcext:value-type="string">
            <text:p>Complete</text:p>
          </table:table-cell>
          <table:table-cell table:style-name="ce120" office:value-type="string" calcext:value-type="string">
            <text:p>Correct</text:p>
          </table:table-cell>
          <table:table-cell table:style-name="ce120" office:value-type="string" calcext:value-type="string">
            <text:p>Feasible</text:p>
          </table:table-cell>
          <table:table-cell table:style-name="ce120" office:value-type="string" calcext:value-type="string">
            <text:p>Necessary</text:p>
          </table:table-cell>
          <table:table-cell table:style-name="ce120" office:value-type="string" calcext:value-type="string">
            <text:p>Prioritised</text:p>
          </table:table-cell>
          <table:table-cell table:style-name="ce120" office:value-type="string" calcext:value-type="string">
            <text:p>Unambiguous</text:p>
          </table:table-cell>
          <table:table-cell table:style-name="ce120" office:value-type="string" calcext:value-type="string">
            <text:p>Verifiable</text:p>
          </table:table-cell>
          <table:table-cell table:style-name="ce126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2"/>
          <table:table-cell table:style-name="ce120" table:number-columns-repeated="7"/>
          <table:table-cell table:style-name="ce126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org-ap</text:p>
          </table:table-cell>
          <table:table-cell table:style-name="ce69" office:value-type="string" calcext:value-type="string">
            <text:p>Groupings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groupin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groupings to UC using the UCE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groupings to fields within a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2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11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2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2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define a field type based on a groupin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grouping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grouping field is mandator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grouping fields according to the names of underlying grouping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3" calcext:value-type="float">
            <text:p>FR-283</text:p>
          </table:table-cell>
          <table:table-cell table:style-name="ce47" office:value-type="string" calcext:value-type="string">
            <text:p><text:s text:c="2"/>.implication</text:p>
          </table:table-cell>
          <table:table-cell table:style-name="ce73" office:value-type="string" calcext:value-type="string">
            <text:p>BA shall be able to define a field type based on transitive implication from a req-type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4" calcext:value-type="float">
            <text:p>FR-284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3" office:value-type="string" calcext:value-type="string">
            <text:p>System shall prevent the existence of more than one field based on the same implying req-type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5" calcext:value-type="float">
            <text:p>FR-285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3" office:value-type="string" calcext:value-type="string">
            <text:p>System shall automatically name implication fields according to the names of underlying req-types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86" calcext:value-type="float">
            <text:p>FR-286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3" office:value-type="string" calcext:value-type="string">
            <text:p>A field based on transitive implication from a req-type, shall be a read-only view that displays all reqs of the underlying req-type, that transitively imply a subject req.</text:p>
            <text:p><text:span text:style-name="T1">Eg. Req X is directly implied by MF-3 and UC-5. UC-5 is implied by MF-7. MF field for req X displays MF-3, MF-7.</text:span>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0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ncompletions</text:p>
          </table:table-cell>
          <table:table-cell table:style-name="ce67" office:value-type="string" calcext:value-type="string">
            <text:p>MF-06: Incompletions</text:p>
          </table:table-cell>
          <table:table-cell table:style-name="ce67" table:number-columns-repeated="2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ncompletions in reqs, r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70"/>
          <table:table-cell table:style-name="ce120"/>
          <table:table-cell/>
          <table:table-cell table:style-name="ce19"/>
          <table:table-cell table:style-name="ce120" table:number-columns-repeated="4"/>
          <table:table-cell table:style-name="ce126" table:number-columns-repeated="1008"/>
          <table:table-cell table:number-columns-repeated="2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4" office:value-type="string" calcext:value-type="string">
            <text:p>Inspection</text:p>
          </table:table-cell>
          <table:table-cell table:style-name="ce74" table:number-columns-repeated="2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ncomple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120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ncompletions in each. [Pri=?]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8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ncompletions in each. [Pri=?]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ncompletion inspection view. (See <text:span text:style-name="T1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style-name="ce120"/>
          <table:table-cell table:number-columns-repeated="1016"/>
        </table:table-row>
        <table:table-row table:style-name="ro3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9" table:number-columns-repeated="2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ncompletion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ncompletion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ncompletion exist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the incompletion tag's additional info (if specified)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11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4" office:value-type="string" calcext:value-type="string">
            <text:p>Tracking</text:p>
          </table:table-cell>
          <table:table-cell table:style-name="ce74" table:number-columns-repeated="2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ncompletion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grouping</text:p>
          </table:table-cell>
          <table:table-cell table:style-name="ce70" office:value-type="string" calcext:value-type="string">
            <text:p>When a grouping is deleted, a field based on it should be flagged as an incompletion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ncompletion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ncompletion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98" office:value-type="date" office:date-value="2014-06-18" calcext:value-type="date">
            <text:p>18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org.missing</text:p>
          </table:table-cell>
          <table:table-cell table:style-name="ce70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5" calcext:value-type="float">
            <text:p>FR-275</text:p>
          </table:table-cell>
          <table:table-cell table:style-name="ce45" office:value-type="string" calcext:value-type="string">
            <text:p><text:s text:c="4"/>.org.nokids</text:p>
          </table:table-cell>
          <table:table-cell table:style-name="ce70" office:value-type="string" calcext:value-type="string">
            <text:p>System shall track non-applicable groupings without children as incompletion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org.enum</text:p>
          </table:table-cell>
          <table:table-cell table:style-name="ce70" office:value-type="string" calcext:value-type="string">
            <text:p>BA shall be able to track when two or more enum-groupings (FR-253) (or its children) are applied to the same req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ncompletion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74" calcext:value-type="float">
            <text:p>FR-274</text:p>
          </table:table-cell>
          <table:table-cell table:style-name="ce45" office:value-type="string" calcext:value-type="string">
            <text:p><text:s text:c="4"/>.steps.empty</text:p>
          </table:table-cell>
          <table:table-cell table:style-name="ce70" office:value-type="string" calcext:value-type="string">
            <text:p>System shall track emptiness of UC steps as incompletions.</text:p>
          </table:table-cell>
          <table:table-cell table:style-name="ce98" office:value-type="date" office:date-value="2014-07-02" calcext:value-type="date">
            <text:p>02/07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4" office:value-type="string" calcext:value-type="string">
            <text:p>Incompletion tags</text:p>
          </table:table-cell>
          <table:table-cell table:style-name="ce74" table:number-columns-repeated="2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ncompletion tags in reqs.</text:p>
            <text:p>Example: “#TODO”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ncompletion tags as loose notes, i.e. bound to a project but not a specific req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5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Tag types</text:p>
          </table:table-cell>
          <table:table-cell table:style-name="ce99"/>
          <table:table-cell table:style-name="ce112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incompletion tag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incompletion tag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incompletion tag type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tag when its type is renamed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incompletion tags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incompletion tag deletion, user shall be able to see a summary of us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incompletion tag deletion, user shall be able to see each instance of entity's values and associations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88" calcext:value-type="float">
            <text:p>FR-2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incompletion tag only when it has never been used and has no associations (including soft-deleted associations).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an incompletion tag has been soft-deleted but is still in-use, System shall render users as if the instance of usage didn't exist. (ie. appearance of hard-deletion)</text:p>
          </table:table-cell>
          <table:table-cell table:style-name="ce98" office:value-type="date" office:date-value="2014-08-02" calcext:value-type="date">
            <text:p>02/08/14</text:p>
          </table:table-cell>
          <table:table-cell table:style-name="ce111"/>
          <table:table-cell table:style-name="ce66" table:number-columns-repeated="7"/>
          <table:table-cell table:number-columns-repeated="1010"/>
        </table:table-row>
        <table:table-row table:style-name="ro4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groupings</text:p>
          </table:table-cell>
          <table:table-cell table:style-name="ce67" office:value-type="string" calcext:value-type="string">
            <text:p>MF-07: Organisation</text:p>
          </table:table-cell>
          <table:table-cell table:style-name="ce67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grouping, System shall consider all subreqs as having the same groupings applied.</text:p>
            <text:p>i.e. G⊗a ∧ a⊏b → G⊗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6" calcext:value-type="float">
            <text:p>FR-276</text:p>
          </table:table-cell>
          <table:table-cell table:style-name="ce45" office:value-type="string" calcext:value-type="string">
            <text:p>.ap-parse</text:p>
          </table:table-cell>
          <table:table-cell table:style-name="ce70" office:value-type="string" calcext:value-type="string">
            <text:p>BA shall be able to apply a grouping in any req text field by specifying a hash followed by the refkey.</text:p>
            <text:p><text:span text:style-name="T3">Example: #pri=low</text:span>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MF-01</text:p>
            <text:p>MF-12</text:p>
          </table:table-cell>
          <table:table-cell table:style-name="ce31" office:value-type="float" office:value="277" calcext:value-type="float">
            <text:p>FR-277</text:p>
          </table:table-cell>
          <table:table-cell table:style-name="ce45" office:value-type="string" calcext:value-type="string">
            <text:p><text:s text:c="2"/>.extract</text:p>
          </table:table-cell>
          <table:table-cell table:style-name="ce70" office:value-type="string" calcext:value-type="string">
            <text:p>When parsing text input for a non-subreq req, System shall extract groupings applied via hashtag and move them into the req's grouping storage. (So its grouping columns.)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Grouping types</text:p>
          </table:table-cell>
          <table:table-cell table:style-name="ce71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6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6" office:value-type="string" calcext:value-type="string">
            <text:p>BA shall be able to specify that a grouping's children are mutually-exclusive (like an enum or sum-type).</text:p>
          </table:table-cell>
          <table:table-cell table:style-name="ce98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groupin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groupings in a tree, BA shall be able to specify the order of children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groupings in a tree, BA shall be able to specify multiple parents of a child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groupin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groupin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groupings.</text:p>
          </table:table-cell>
          <table:table-cell table:style-name="ce98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grouping once it's been created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grouping after it is rename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grouping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grouping deletion, user shall be able to see a summary of usage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1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grouping deletion, user shall be able to see each instance of grouping's values and associations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1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grouping deletion, System shall move it to the bin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groupin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grouping is restored, its requirement applications should be restored too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groupings.</text:p>
          </table:table-cell>
          <table:table-cell table:style-name="ce100" office:value-type="date" office:date-value="2014-02-13" calcext:value-type="date">
            <text:p>13/02/14</text:p>
          </table:table-cell>
          <table:table-cell table:style-name="ce7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6" office:value-type="string" calcext:value-type="string">
            <text:p>When browsing groupings, BA shall be able to apply a filter to the requirement scope.</text:p>
            <text:p>(This affects allocations graphs and req lists. See <text:span text:style-name="T1">Filtering</text:span> section.)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7" office:value-type="string" calcext:value-type="string">
            <text:p>Grouping allocation graph</text:p>
          </table:table-cell>
          <table:table-cell table:style-name="ce81" table:number-columns-repeated="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groupings, System presents top-level grouping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7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101" office:value-type="date" office:date-value="2014-06-03" calcext:value-type="date">
            <text:p>03/06/14</text:p>
          </table:table-cell>
          <table:table-cell table:style-name="ce8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grouping allocation graph for the subject groupin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8" office:value-type="string" calcext:value-type="string">
            <text:p>BA shall be able to change the grouping scope to a child of the subject grouping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8" office:value-type="string" calcext:value-type="string">
            <text:p>BA shall be able to change the grouping scope to the subject grouping's parent.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10"/>
        </table:table-row>
        <table:table-row table:style-name="ro4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8" office:value-type="string" calcext:value-type="string">
            <text:p>BA shall be able to change the grouping scope to the top-level. [FR-220]</text:p>
          </table:table-cell>
          <table:table-cell table:style-name="ce102" office:value-type="date" office:date-value="2014-06-03" calcext:value-type="date">
            <text:p>03/06/14</text:p>
          </table:table-cell>
          <table:table-cell table:style-name="ce78"/>
          <table:table-cell table:style-name="ce121" table:number-columns-repeated="2"/>
          <table:table-cell table:style-name="ce124"/>
          <table:table-cell table:style-name="ce121" table:number-columns-repeated="4"/>
          <table:table-cell table:style-name="ce127" table:number-columns-repeated="1010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113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grouping or one of its children, to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grouping or one of its children, from selected requirement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groupings</text:p>
          </table:table-cell>
          <table:table-cell table:style-name="ce79" office:value-type="string" calcext:value-type="string">
            <text:p>Edit groupings</text:p>
          </table:table-cell>
          <table:table-cell table:style-name="ce81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grouping as a child of the subject groupin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groupin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grouping or one of its children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grouping of <text:s/>the subject grouping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2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Req Data</text:p>
          </table:table-cell>
          <table:table-cell table:style-name="ce74" table:number-columns-repeated="2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4" office:value-type="string" calcext:value-type="string">
            <text:p>BA shall be able to (soft) delete reqs.</text:p>
          </table:table-cell>
          <table:table-cell table:style-name="ce100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80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4" office:value-type="string" calcext:value-type="string">
            <text:p>Requirement Types</text:p>
          </table:table-cell>
          <table:table-cell table:style-name="ce100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8" office:value-type="string" calcext:value-type="string">
            <text:p>After soft-deletion, req types should move to the bi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8" office:value-type="string" calcext:value-type="string">
            <text:p>BA shall be able to restore req types from the bi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4" office:value-type="string" calcext:value-type="string">
            <text:p>Req Table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1">Filtering</text:span> section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5">Example: if a selected req has sem-IDs {a.b, x.y} and the user creates a new req with sem-ID {.f}, then its expanded sem-IDs should be {a.b.f, x.y.f}.</text:span>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5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1" table:number-columns-repeated="3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string" calcext:value-type="string">
            <text:p>MF-12</text:p>
            <text:p>MF-13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287" calcext:value-type="float">
            <text:p>FR-287</text:p>
          </table:table-cell>
          <table:table-cell table:style-name="ce45" office:value-type="string" calcext:value-type="string">
            <text:p><text:s text:c="4"/>.impcol-dup</text:p>
          </table:table-cell>
          <table:table-cell table:style-name="ce68" office:value-type="string" calcext:value-type="string">
            <text:p>When the req list view with is sorted by an implication field (FR-283) and a req has multiple matching implying reqs, System shall a row for each, just like FR-95.</text:p>
          </table:table-cell>
          <table:table-cell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1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due to sem-ID or implication field), editing one instance should update the display of all other instances.</text:p>
          </table:table-cell>
          <table:table-cell table:style-name="ce98" office:value-type="date" office:date-value="2014-10-07" calcext:value-type="date">
            <text:p>07/10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2" office:value-type="string" calcext:value-type="string">
            <text:p>BA shall be able to update an existing LL-req.</text:p>
          </table:table-cell>
          <table:table-cell table:style-name="ce99" office:value-type="date" office:date-value="2014-05-22" calcext:value-type="date">
            <text:p>22/05/14</text:p>
          </table:table-cell>
          <table:table-cell table:style-name="ce8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<text:span text:style-name="T6">Example: a.b.c &amp; a.b.d allows modification of “a.b” which BA can turn into “”, “x.b”, “a.b.x”, etc.</text:span>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3" office:value-type="string" calcext:value-type="string">
            <text:p>Able to (soft) delete LL-req.</text:p>
          </table:table-cell>
          <table:table-cell table:style-name="ce99" office:value-type="date" office:date-value="2014-05-22" calcext:value-type="date">
            <text:p>22/05/14</text:p>
          </table:table-cell>
          <table:table-cell table:style-name="ce8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1" table:number-columns-repeated="3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80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style-name="ce98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4" office:value-type="string" calcext:value-type="string">
            <text:p>Refs</text:p>
          </table:table-cell>
          <table:table-cell table:style-name="ce74" table:number-columns-repeated="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4" office:value-type="string" calcext:value-type="string">
            <text:p>SHR (Semantic Header Row)</text:p>
          </table:table-cell>
          <table:table-cell table:style-name="ce103"/>
          <table:table-cell table:style-name="ce74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4" office:value-type="string" calcext:value-type="string">
            <text:p>Text Tokens</text:p>
          </table:table-cell>
          <table:table-cell table:style-name="ce103"/>
          <table:table-cell table:style-name="ce115" office:value-type="string" calcext:value-type="string">
            <text:p>Is this really the best idea?</text:p>
          </table:table-cell>
          <table:table-cell table:style-name="ce122"/>
          <table:table-cell table:number-columns-repeated="2"/>
          <table:table-cell table:style-name="ce122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2" table:number-columns-repeated="2"/>
          <table:table-cell table:number-columns-repeated="1012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style-name="ce122" table:number-columns-repeated="2"/>
          <table:table-cell table:number-columns-repeated="1012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style-name="ce120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2"/>
          <table:table-cell table:number-columns-repeated="1017"/>
        </table:table-row>
        <table:table-row table:style-name="ro1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style-name="ce98" office:value-type="date" office:date-value="2014-06-22" calcext:value-type="date">
            <text:p>2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4" office:value-type="string" calcext:value-type="string">
            <text:p>Data</text:p>
          </table:table-cell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6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68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i.e. a⇒b ∧ b⊏c → a⇒c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4" office:value-type="string" calcext:value-type="string">
            <text:p>Reqs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11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 other active reqs. They shall be selected by default.</text:p>
          </table:table-cell>
          <table:table-cell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active req. They shall be deselected by default.</text:p>
          </table:table-cell>
          <table:table-cell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82" calcext:value-type="float">
            <text:p>FR-282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deleting a req α and selecting a req β to also delete, BA shall also be able to delete β's implied reqs in the same deletion. (transiitivity)</text:p>
          </table:table-cell>
          <table:table-cell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81" calcext:value-type="float">
            <text:p>FR-28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68" office:value-type="string" calcext:value-type="string">
            <text:p>When restoring a req α and selecting a directly implied req β to also restore, BA shall also be able to restore β's implied reqs in the same restoration. (transiitivity)</text:p>
          </table:table-cell>
          <table:table-cell table:style-name="ce98" office:value-type="date" office:date-value="2014-07-07" calcext:value-type="date">
            <text:p>07/07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4" office:value-type="string" calcext:value-type="string">
            <text:p>UC Steps</text:p>
          </table:table-cell>
          <table:table-cell table:style-name="ce74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MF-1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7: Auto-Save &amp; Undo</text:p>
          </table:table-cell>
          <table:table-cell table:style-name="ce67"/>
          <table:table-cell table:style-name="ce116" office:value-type="string" calcext:value-type="string">
            <text:p>analyse properly in phase 3</text:p>
          </table:table-cell>
          <table:table-cell table:number-columns-repeated="1017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8" calcext:value-type="float">
            <text:p>FR-278</text:p>
          </table:table-cell>
          <table:table-cell table:style-name="ce45" office:value-type="string" calcext:value-type="string">
            <text:p>.autosave</text:p>
          </table:table-cell>
          <table:table-cell table:style-name="ce68" office:value-type="string" calcext:value-type="string">
            <text:p>System should automatically (specifically, without requiring user interaction) save user's changes after they are made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79" calcext:value-type="float">
            <text:p>FR-279</text:p>
          </table:table-cell>
          <table:table-cell table:style-name="ce45" office:value-type="string" calcext:value-type="string">
            <text:p>.undo-reqs</text:p>
          </table:table-cell>
          <table:table-cell table:style-name="ce68" office:value-type="string" calcext:value-type="string">
            <text:p>User shall be able to undo any req-content change they make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68" office:value-type="string" calcext:value-type="string">
            <text:p>Config too?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MF-17</text:p>
          </table:table-cell>
          <table:table-cell table:style-name="ce3"/>
          <table:table-cell table:style-name="ce31" office:value-type="float" office:value="280" calcext:value-type="float">
            <text:p>FR-280</text:p>
          </table:table-cell>
          <table:table-cell table:style-name="ce45" office:value-type="string" calcext:value-type="string">
            <text:p>.redo</text:p>
          </table:table-cell>
          <table:table-cell table:style-name="ce68" office:value-type="string" calcext:value-type="string">
            <text:p>User shall be able to redo any undo operation they perform, immediately after performing i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8" table:number-columns-repeated="3"/>
          <table:table-cell table:style-name="ce56"/>
          <table:table-cell table:style-name="ce84" office:value-type="string" calcext:value-type="string">
            <text:p>Misc Requirements</text:p>
          </table:table-cell>
          <table:table-cell table:style-name="ce104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grouping.all</text:p>
          </table:table-cell>
          <table:table-cell table:style-name="ce70" office:value-type="string" calcext:value-type="string">
            <text:p>When reading a UC, the reader shall be able to see all groupings applied to the UC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5" office:value-type="string" calcext:value-type="string">
            <text:p>When reading shared UCs, AnonReader shall be able to filter UCs by groupings. [Pri=Nice]</text:p>
          </table:table-cell>
          <table:table-cell table:style-name="ce105" office:value-type="date" office:date-value="2014-02-07" calcext:value-type="date">
            <text:p>07/02/14</text:p>
          </table:table-cell>
          <table:table-cell table:style-name="ce87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87"/>
          <table:table-cell table:number-columns-repeated="1017"/>
        </table:table-row>
        <table:table-row table:style-name="ro3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71" table:number-columns-repeated="2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ncompletion type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filter by grouping(s)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style-name="ce98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98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4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4" office:value-type="string" calcext:value-type="string">
            <text:p>Revision numbers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1">any</text:span><text:span text:style-name="T7"> user-observable change occurs, including field ordering changes, grouping renames, etc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4"/>
          <table:table-cell table:style-name="ce23" table:number-columns-repeated="2"/>
          <table:table-cell table:style-name="ce58"/>
          <table:table-cell table:style-name="ce86" office:value-type="string" calcext:value-type="string">
            <text:p>Deleted or Deferred Requirements</text:p>
          </table:table-cell>
          <table:table-cell table:style-name="ce106" table:number-columns-repeated="2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7" office:value-type="string" calcext:value-type="string">
            <text:p>System shall display the number of reqs associated with each grouping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7" office:value-type="string" calcext:value-type="string">
            <text:p>System shall display the number of reqs to which the top-level grouping is not applied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7" office:value-type="string" calcext:value-type="string">
            <text:p>BA shall be able to read all UCs with a given grouping applied.</text:p>
          </table:table-cell>
          <table:table-cell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7" office:value-type="string" calcext:value-type="string">
            <text:p>BA shall be able to read all UC steps with a given grouping applied.</text:p>
          </table:table-cell>
          <table:table-cell table:style-name="ce105" office:value-type="date" office:date-value="2014-02-13" calcext:value-type="date">
            <text:p>13/02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7" office:value-type="string" calcext:value-type="string">
            <text:p>BA shall be able to filter shares' UC selection criteria by grouping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7" office:value-type="string" calcext:value-type="string">
            <text:p>When reading own UCs, BA shall be able to filter UCs by grouping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7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multiple LL/UC reqs simultaneously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multiple LL/UC reqs simultaneously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87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4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UCs without using the UCE.</text:p>
          </table:table-cell>
          <table:table-cell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UC without using the UCE.</text:p>
          </table:table-cell>
          <table:table-cell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9" office:value-type="string" calcext:value-type="string">
            <text:p>BA shall be able to apply groupings to LL-reqs.</text:p>
          </table:table-cell>
          <table:table-cell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9" office:value-type="string" calcext:value-type="string">
            <text:p>BA shall be able to remove groupings to LL-reqs.</text:p>
          </table:table-cell>
          <table:table-cell table:style-name="ce107" office:value-type="date" office:date-value="2014-05-23" calcext:value-type="date">
            <text:p>23/05/14</text:p>
          </table:table-cell>
          <table:table-cell table:style-name="ce117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8" office:value-type="string" calcext:value-type="string">
            <text:p>BA shall be able to copy a field set from another project.</text:p>
          </table:table-cell>
          <table:table-cell table:style-name="ce105" office:value-type="date" office:date-value="2014-05-19" calcext:value-type="date">
            <text:p>19/05/14</text:p>
          </table:table-cell>
          <table:table-cell table:style-name="ce88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8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05" office:value-type="date" office:date-value="2014-02-25" calcext:value-type="date">
            <text:p>25/02/14</text:p>
          </table:table-cell>
          <table:table-cell table:style-name="ce88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subset of groupings (including child nodes) between projects.</text:p>
          </table:table-cell>
          <table:table-cell table:style-name="ce105" office:value-type="date" office:date-value="2014-02-12" calcext:value-type="date">
            <text:p>12/02/14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7" office:value-type="string" calcext:value-type="string">
            <text:p>[Dup of FR-55]</text:p>
            <text:p>System shall track refs to deleted LL-reqs as incompletions.</text:p>
          </table:table-cell>
          <table:table-cell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7"/>
        </table:table-row>
        <table:table-row table:style-name="ro7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7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05" office:value-type="date" office:date-value="2014-05-16" calcext:value-type="date">
            <text:p>16/05/14</text:p>
          </table:table-cell>
          <table:table-cell table:style-name="ce88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8" office:value-type="string" calcext:value-type="string">
            <text:p>[Replaced by FR-172]</text:p>
            <text:p>BA shall be able to create a new req by copying another.</text:p>
          </table:table-cell>
          <table:table-cell table:style-name="ce105" office:value-type="date" office:date-value="2014-05-15" calcext:value-type="date">
            <text:p>15/05/14</text:p>
          </table:table-cell>
          <table:table-cell table:style-name="ce88"/>
          <table:table-cell table:number-columns-repeated="1017"/>
        </table:table-row>
        <table:table-row table:style-name="ro3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90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08" office:value-type="date" office:date-value="2014-06-02" calcext:value-type="date">
            <text:p>02/06/14</text:p>
          </table:table-cell>
          <table:table-cell table:style-name="ce90" office:value-type="string" calcext:value-type="string">
            <text:p>FR-201 is enough</text:p>
          </table:table-cell>
          <table:table-cell table:number-columns-repeated="1017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1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style-name="ce109" office:value-type="date" office:date-value="2014-05-12" calcext:value-type="date">
            <text:p>12/05/14</text:p>
          </table:table-cell>
          <table:table-cell table:style-name="ce95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4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2" office:value-type="string" calcext:value-type="string">
            <text:p>System shall display UCs as rows in the req view.</text:p>
          </table:table-cell>
          <table:table-cell table:style-name="ce109" office:value-type="date" office:date-value="2014-05-22" calcext:value-type="date">
            <text:p>22/05/14</text:p>
          </table:table-cell>
          <table:table-cell table:style-name="ce92" office:value-type="string" calcext:value-type="string">
            <text:p>FR-84 covers this now.</text:p>
          </table:table-cell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3" office:value-type="string" calcext:value-type="string">
            <text:p>Modifying an LL-req field set</text:p>
          </table:table-cell>
          <table:table-cell table:style-name="ce93"/>
          <table:table-cell table:style-name="ce118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90" office:value-type="string" calcext:value-type="string">
            <text:p>BA shall be able to see a list of all existing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90" office:value-type="string" calcext:value-type="string">
            <text:p>BA shall be able to add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90" office:value-type="string" calcext:value-type="string">
            <text:p>BA shall be able to modify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90" office:value-type="string" calcext:value-type="string">
            <text:p>BA shall be able to reorder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90" office:value-type="string" calcext:value-type="string">
            <text:p>BA shall be able to (soft) delete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4" office:value-type="string" calcext:value-type="string">
            <text:p>System shall indicate how many LL-reqs have content for each LL-req field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4" office:value-type="string" calcext:value-type="string">
            <text:p>BA shall be able to see each instance of content for an LL-req field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90" office:value-type="string" calcext:value-type="string">
            <text:p>When (soft) deleting an LL-req field, System shall move it to the bin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90" office:value-type="string" calcext:value-type="string">
            <text:p>BA shall be able to restore deleted LL-req fields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90" office:value-type="string" calcext:value-type="string">
            <text:p>When an LL-req field is restored, System shall restore corresponding field values for each LL-req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0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90" office:value-type="string" calcext:value-type="string">
            <text:p>BA shall be able to specify mandatory-ness of LL-req field.</text:p>
          </table:table-cell>
          <table:table-cell table:style-name="ce108" office:value-type="date" office:date-value="2014-05-16" calcext:value-type="date">
            <text:p>16/05/14</text:p>
          </table:table-cell>
          <table:covered-table-cell table:style-name="ce94"/>
          <table:table-cell table:number-columns-repeated="1017"/>
        </table:table-row>
        <table:table-row table:style-name="ro4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2" office:value-type="string" calcext:value-type="string">
            <text:p>BA shall be able to filter view of reqs by grouping.</text:p>
          </table:table-cell>
          <table:table-cell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50 generic.</text:p>
          </table:table-cell>
          <table:table-cell table:number-columns-repeated="1017"/>
        </table:table-row>
        <table:table-row table:style-name="ro4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2" office:value-type="string" calcext:value-type="string">
            <text:p>BA shall be able to filter view of reqs by req-type.</text:p>
          </table:table-cell>
          <table:table-cell table:style-name="ce109" office:value-type="date" office:date-value="2014-05-15" calcext:value-type="date">
            <text:p>15/05/14</text:p>
          </table:table-cell>
          <table:table-cell table:style-name="ce92" office:value-type="string" calcext:value-type="string">
            <text:p>Made FR-112 generic.</text:p>
          </table:table-cell>
          <table:table-cell table:number-columns-repeated="1017"/>
        </table:table-row>
        <table:table-row table:style-name="ro3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196" calcext:value-type="float">
            <text:p>FR-196</text:p>
          </table:table-cell>
          <table:table-cell table:style-name="ce62" office:value-type="string" calcext:value-type="string">
            <text:p><text:s text:c="4"/>.warn</text:p>
          </table:table-cell>
          <table:table-cell table:style-name="ce95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style-name="ce109" office:value-type="date" office:date-value="2014-06-10" calcext:value-type="date">
            <text:p>10/06/14</text:p>
          </table:table-cell>
          <table:table-cell table:style-name="ce95" office:value-type="string" calcext:value-type="string">
            <text:p>Soft delete when in use like everything else.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6" table:number-columns-repeated="2"/>
          <table:table-cell table:style-name="ce11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97"/>
        <table:table-column table:style-name="co21" table:default-cell-style-name="ce19"/>
        <table:table-column table:style-name="co22" table:default-cell-style-name="ce66"/>
        <table:table-column table:style-name="co15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9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6"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0" office:value-type="string" calcext:value-type="string">
            <text:p>-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8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8"/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8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6" calcext:value-type="float">
            <text:p>MF-06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8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30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7">n children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7">n parents.</text:span></text:p>
          </table:table-cell>
          <table:table-cell table:style-name="ce98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8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2" calcext:value-type="float">
            <text:p>MF-12</text:p>
          </table:table-cell>
          <table:table-cell table:style-name="ce128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6" calcext:value-type="float">
            <text:p>16</text:p>
          </table:table-cell>
          <table:table-cell table:style-name="ce70" office:value-type="string" calcext:value-type="string">
            <text:p>Applicable groupings have a refkey, a string that can be used with a hashtag to apply the grouping in text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7" calcext:value-type="float">
            <text:p>17</text:p>
          </table:table-cell>
          <table:table-cell table:style-name="ce70" office:value-type="string" calcext:value-type="string">
            <text:p>Semantic-ID components must match this format: /[a-z0-9][a-z0-9_]*/</text:p>
            <text:p>Must not contain: []{}&lt;&gt;.-?: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8" calcext:value-type="float">
            <text:p>18</text:p>
          </table:table-cell>
          <table:table-cell table:style-name="ce70" office:value-type="string" calcext:value-type="string">
            <text:p>Hashtag-like refkeys (groupings, incmp) must match this format: /[A-Za-z0-9][A-Za-z0-9_-=.]*/</text:p>
            <text:p>Must not contain: []{}&lt;&gt;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string" calcext:value-type="string"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Hashtag-like refkeys (groupings, incmp) must be unique.</text:p>
            <text:p>e.g. can't have both a grouping and an incompletion with refkey #X.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Field refkeys must match this format: /[a-z][a-z0-9_]*/</text:p>
            <text:p>Must not contain: []{}&lt;&gt;.?</text:p>
          </table:table-cell>
          <table:table-cell table:style-name="ce98" office:value-type="date" office:date-value="2014-07-10" calcext:value-type="date">
            <text:p>10/07/14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128" office:value-type="string" calcext:value-type="string">
            <text:p>MF-05</text:p>
            <text:p>MF-06</text:p>
            <text:p>MF-07</text:p>
          </table:table-cell>
          <table:table-cell table:style-name="ce128"/>
          <table:table-cell table:style-name="ce10" office:value-type="string" calcext:value-type="string">
            <text:p>DD</text:p>
          </table:table-cell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Refkeys must be case-insensitive.</text:p>
            <text:p>eg. #HELLO should match #Hello</text:p>
          </table:table-cell>
          <table:table-cell table:style-name="ce98" office:value-type="date" office:date-value="2015-01-03" calcext:value-type="date">
            <text:p>03/01/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8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31" office:value-type="string" calcext:value-type="string">
            <text:p>BA shall be able to go from LL-req editor to a view of all LL-req incompletions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31" office:value-type="string" calcext:value-type="string">
            <text:p>BA shall be able to go from a view of all LL-req incompletions to LL-req editor in a single action.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8" office:value-type="float" office:value="12" calcext:value-type="float">
            <text:p>MF-12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31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8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17" calcext:value-type="float">
            <text:p>MF-17</text:p>
          </table:table-cell>
          <table:table-cell table:style-name="ce128"/>
          <table:table-cell table:style-name="ce10" office:value-type="string" calcext:value-type="string">
            <text:p>QR</text:p>
          </table:table-cell>
          <table:table-cell table:style-name="ce10" office:value-type="float" office:value="6" calcext:value-type="float">
            <text:p>6</text:p>
          </table:table-cell>
          <table:table-cell table:style-name="ce131" office:value-type="string" calcext:value-type="string">
            <text:p>In the event of server or client failure, a user shouldn't lose more than 2 minutes of work.</text:p>
          </table:table-cell>
          <table:table-cell table:style-name="ce98" office:value-type="date" office:date-value="2014-07-03" calcext:value-type="date">
            <text:p>03/07/14</text:p>
          </table:table-cell>
          <table:table-cell table:style-name="ce45" office:value-type="string" calcext:value-type="string">
            <text:p>2min = arbitrary.</text:p>
          </table:table-cell>
          <table:table-cell table:number-columns-repeated="1017"/>
        </table:table-row>
        <table:table-row table:style-name="ro12">
          <table:table-cell table:style-name="ce128" office:value-type="float" office:value="13" calcext:value-type="float">
            <text:p>MF-13</text:p>
          </table:table-cell>
          <table:table-cell table:style-name="ce128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8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5" calcext:value-type="float">
            <text:p>MF-05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8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8" office:value-type="float" office:value="7" calcext:value-type="float">
            <text:p>MF-07</text:p>
          </table:table-cell>
          <table:table-cell table:style-name="ce128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8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table:table-column table:style-name="co23" table:default-cell-style-name="Default"/>
        <table:table-column table:style-name="co24" table:default-cell-style-name="ce133"/>
        <table:table-column table:style-name="co25" table:default-cell-style-name="ce133"/>
        <table:table-column table:style-name="co25" table:number-columns-repeated="17" table:default-cell-style-name="Default"/>
        <table:table-column table:style-name="co15" table:number-columns-repeated="1002" table:default-cell-style-name="Default"/>
        <table:table-row table:style-name="ro15">
          <table:table-cell table:number-columns-repeated="2"/>
          <table:table-cell table:style-name="ce135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6"/>
          <table:table-cell table:style-name="ce144" office:value-type="string" calcext:value-type="string">
            <text:p>Fields</text:p>
          </table:table-cell>
          <table:table-cell table:number-columns-repeated="1016"/>
        </table:table-row>
        <table:table-row table:style-name="ro16">
          <table:table-cell table:number-columns-repeated="2"/>
          <table:table-cell table:style-name="ce136" office:value-type="float" office:value="1" calcext:value-type="float">
            <text:p>MF-01</text:p>
          </table:table-cell>
          <table:table-cell table:number-columns-repeated="2" table:style-name="ce136" office:value-type="float" office:value="12" calcext:value-type="float">
            <text:p>MF-12</text:p>
          </table:table-cell>
          <table:table-cell table:style-name="ce136" office:value-type="float" office:value="5" calcext:value-type="float">
            <text:p>MF-05</text:p>
          </table:table-cell>
          <table:table-cell table:style-name="ce136" office:value-type="float" office:value="12" calcext:value-type="float">
            <text:p>MF-12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2"/>
        </table:table-row>
        <table:table-row table:style-name="ro3">
          <table:table-cell table:style-name="ce132" office:value-type="string" calcext:value-type="string">
            <text:p>CRUDL</text:p>
          </table:table-cell>
          <table:table-cell table:style-name="ce134"/>
          <table:table-cell table:style-name="ce137" office:value-type="string" calcext:value-type="string">
            <text:p>UC</text:p>
          </table:table-cell>
          <table:table-cell table:style-name="ce137" office:value-type="string" calcext:value-type="string">
            <text:p>LL Req</text:p>
          </table:table-cell>
          <table:table-cell table:style-name="ce137" office:value-type="string" calcext:value-type="string">
            <text:p>SHR</text:p>
          </table:table-cell>
          <table:table-cell table:style-name="ce140" office:value-type="string" calcext:value-type="string">
            <text:p>Field</text:p>
          </table:table-cell>
          <table:table-cell table:style-name="ce140" office:value-type="string" calcext:value-type="string">
            <text:p>Req Type</text:p>
          </table:table-cell>
          <table:table-cell table:style-name="ce140" office:value-type="string" calcext:value-type="string">
            <text:p>Grouping</text:p>
          </table:table-cell>
          <table:table-cell table:style-name="ce140" office:value-type="string" calcext:value-type="string">
            <text:p>Incompletion</text:p>
            <text:p>Type</text:p>
          </table:table-cell>
          <table:table-cell table:style-name="ce140" office:value-type="string" calcext:value-type="string">
            <text:p>Text</text:p>
            <text:p>tokens</text:p>
          </table:table-cell>
          <table:table-cell/>
          <table:table-cell table:style-name="ce147" table:number-columns-repeated="1011"/>
        </table:table-row>
        <table:table-row table:style-name="ro16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8"/>
          <table:table-cell table:style-name="ce31" office:value-type="float" office:value="83" calcext:value-type="float">
            <text:p>FR-83</text:p>
          </table:table-cell>
          <table:table-cell table:style-name="ce141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6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8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6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8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6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8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5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8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8"/>
          <table:table-cell table:style-name="ce31" office:value-type="float" office:value="179" calcext:value-type="float">
            <text:p>FR-179</text:p>
          </table:table-cell>
          <table:table-cell table:style-name="ce142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2" office:value-type="string" calcext:value-type="string">
            <text:p>Hard only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8"/>
          <table:table-cell table:style-name="ce31" office:value-type="float" office:value="180" calcext:value-type="float">
            <text:p>FR-180</text:p>
          </table:table-cell>
          <table:table-cell table:style-name="ce138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8"/>
          <table:table-cell table:style-name="ce31" office:value-type="float" office:value="181" calcext:value-type="float">
            <text:p>FR-181</text:p>
          </table:table-cell>
          <table:table-cell table:style-name="ce138"/>
          <table:table-cell table:style-name="ce31" office:value-type="float" office:value="6" calcext:value-type="float">
            <text:p>FR-06</text:p>
          </table:table-cell>
          <table:table-cell table:style-name="ce139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9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8"/>
          <table:table-cell table:style-name="ce31" office:value-type="float" office:value="182" calcext:value-type="float">
            <text:p>FR-182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8"/>
          <table:table-cell table:style-name="ce31" office:value-type="float" office:value="183" calcext:value-type="float">
            <text:p>FR-183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8"/>
          <table:table-cell table:style-name="ce31" office:value-type="float" office:value="184" calcext:value-type="float">
            <text:p>FR-184</text:p>
          </table:table-cell>
          <table:table-cell table:style-name="ce143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6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3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float" office:value="6" calcext:value-type="float">
            <text:p>MF-06</text:p>
          </table:table-cell>
          <table:table-cell table:style-name="ce136" office:value-type="float" office:value="7" calcext:value-type="float">
            <text:p>MF-07</text:p>
          </table:table-cell>
          <table:table-cell table:style-name="ce136" office:value-type="float" office:value="12" calcext:value-type="float">
            <text:p>MF-12</text:p>
          </table:table-cell>
          <table:table-cell table:number-columns-repeated="1017"/>
        </table:table-row>
        <table:table-row table:style-name="ro3">
          <table:table-cell table:style-name="ce132" office:value-type="string" calcext:value-type="string">
            <text:p>Filters</text:p>
          </table:table-cell>
          <table:table-cell/>
          <table:table-cell table:style-name="ce140" office:value-type="string" calcext:value-type="string">
            <text:p>Incompletion</text:p>
            <text:p>Results</text:p>
          </table:table-cell>
          <table:table-cell table:style-name="ce140" office:value-type="string" calcext:value-type="string">
            <text:p>Groupings</text:p>
          </table:table-cell>
          <table:table-cell table:style-name="ce140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5" table:default-cell-style-name="Default"/>
        <table:table-column table:style-name="co26" table:default-cell-style-name="ce150"/>
        <table:table-column table:style-name="co15" table:number-columns-repeated="4" table:default-cell-style-name="Default"/>
        <table:table-row table:style-name="ro1"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9" table:formula="of:=1-COUNTIF([FRs.$C$2:.$C$965]; &quot;=&quot;&amp;[.A2])" office:value-type="float" office:value="0" calcext:value-type="float">
            <text:p>0</text:p>
          </table:table-cell>
          <table:table-cell/>
          <table:table-cell table:style-name="ce151" office:value-type="string" calcext:value-type="string">
            <text:p>FRs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9" table:formula="of:=1-COUNTIF([FRs.$C$2:.$C$965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85];&quot;&gt;0&quot;)" office:value-type="float" office:value="288" calcext:value-type="float">
            <text:p>288</text:p>
          </table:table-cell>
          <table:table-cell table:style-name="ce49" table:formula="of:=COUNTIF([flat.$D$2:.$D$1004];&quot;&gt;0&quot;)" office:value-type="float" office:value="44" calcext:value-type="float">
            <text:p>44</text:p>
          </table:table-cell>
          <table:table-cell table:style-name="ce49" table:formula="of:=[.E3]+[.D3]" office:value-type="float" office:value="332" calcext:value-type="float">
            <text:p>3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9" table:formula="of:=1-COUNTIF([FRs.$C$2:.$C$96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9" table:formula="of:=1-COUNTIF([FRs.$C$2:.$C$96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9" table:formula="of:=1-COUNTIF([FRs.$C$2:.$C$96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9" table:formula="of:=1-COUNTIF([FRs.$C$2:.$C$96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9" table:formula="of:=1-COUNTIF([FRs.$C$2:.$C$96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9" table:formula="of:=1-COUNTIF([FRs.$C$2:.$C$96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9" table:formula="of:=1-COUNTIF([FRs.$C$2:.$C$96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9" table:formula="of:=1-COUNTIF([FRs.$C$2:.$C$96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9" table:formula="of:=1-COUNTIF([FRs.$C$2:.$C$96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9" table:formula="of:=1-COUNTIF([FRs.$C$2:.$C$96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9" table:formula="of:=1-COUNTIF([FRs.$C$2:.$C$96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9" table:formula="of:=1-COUNTIF([FRs.$C$2:.$C$96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9" table:formula="of:=1-COUNTIF([FRs.$C$2:.$C$96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9" table:formula="of:=1-COUNTIF([FRs.$C$2:.$C$96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9" table:formula="of:=1-COUNTIF([FRs.$C$2:.$C$96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9" table:formula="of:=1-COUNTIF([FRs.$C$2:.$C$96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9" table:formula="of:=1-COUNTIF([FRs.$C$2:.$C$96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9" table:formula="of:=1-COUNTIF([FRs.$C$2:.$C$96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9" table:formula="of:=1-COUNTIF([FRs.$C$2:.$C$96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9" table:formula="of:=1-COUNTIF([FRs.$C$2:.$C$96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9" table:formula="of:=1-COUNTIF([FRs.$C$2:.$C$96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9" table:formula="of:=1-COUNTIF([FRs.$C$2:.$C$96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9" table:formula="of:=1-COUNTIF([FRs.$C$2:.$C$96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9" table:formula="of:=1-COUNTIF([FRs.$C$2:.$C$96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9" table:formula="of:=1-COUNTIF([FRs.$C$2:.$C$96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9" table:formula="of:=1-COUNTIF([FRs.$C$2:.$C$96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9" table:formula="of:=1-COUNTIF([FRs.$C$2:.$C$96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9" table:formula="of:=1-COUNTIF([FRs.$C$2:.$C$96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9" table:formula="of:=1-COUNTIF([FRs.$C$2:.$C$96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9" table:formula="of:=1-COUNTIF([FRs.$C$2:.$C$96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9" table:formula="of:=1-COUNTIF([FRs.$C$2:.$C$96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9" table:formula="of:=1-COUNTIF([FRs.$C$2:.$C$96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9" table:formula="of:=1-COUNTIF([FRs.$C$2:.$C$96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9" table:formula="of:=1-COUNTIF([FRs.$C$2:.$C$96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9" table:formula="of:=1-COUNTIF([FRs.$C$2:.$C$96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9" table:formula="of:=1-COUNTIF([FRs.$C$2:.$C$96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9" table:formula="of:=1-COUNTIF([FRs.$C$2:.$C$96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9" table:formula="of:=1-COUNTIF([FRs.$C$2:.$C$96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9" table:formula="of:=1-COUNTIF([FRs.$C$2:.$C$96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9" table:formula="of:=1-COUNTIF([FRs.$C$2:.$C$96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9" table:formula="of:=1-COUNTIF([FRs.$C$2:.$C$96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9" table:formula="of:=1-COUNTIF([FRs.$C$2:.$C$96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9" table:formula="of:=1-COUNTIF([FRs.$C$2:.$C$96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9" table:formula="of:=1-COUNTIF([FRs.$C$2:.$C$96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9" table:formula="of:=1-COUNTIF([FRs.$C$2:.$C$96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9" table:formula="of:=1-COUNTIF([FRs.$C$2:.$C$96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9" table:formula="of:=1-COUNTIF([FRs.$C$2:.$C$96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9" table:formula="of:=1-COUNTIF([FRs.$C$2:.$C$96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9" table:formula="of:=1-COUNTIF([FRs.$C$2:.$C$96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9" table:formula="of:=1-COUNTIF([FRs.$C$2:.$C$96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9" table:formula="of:=1-COUNTIF([FRs.$C$2:.$C$96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9" table:formula="of:=1-COUNTIF([FRs.$C$2:.$C$96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9" table:formula="of:=1-COUNTIF([FRs.$C$2:.$C$96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9" table:formula="of:=1-COUNTIF([FRs.$C$2:.$C$96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9" table:formula="of:=1-COUNTIF([FRs.$C$2:.$C$96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9" table:formula="of:=1-COUNTIF([FRs.$C$2:.$C$96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9" table:formula="of:=1-COUNTIF([FRs.$C$2:.$C$96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9" table:formula="of:=1-COUNTIF([FRs.$C$2:.$C$96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9" table:formula="of:=1-COUNTIF([FRs.$C$2:.$C$96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9" table:formula="of:=1-COUNTIF([FRs.$C$2:.$C$96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9" table:formula="of:=1-COUNTIF([FRs.$C$2:.$C$96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9" table:formula="of:=1-COUNTIF([FRs.$C$2:.$C$96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9" table:formula="of:=1-COUNTIF([FRs.$C$2:.$C$96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9" table:formula="of:=1-COUNTIF([FRs.$C$2:.$C$96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9" table:formula="of:=1-COUNTIF([FRs.$C$2:.$C$96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9" table:formula="of:=1-COUNTIF([FRs.$C$2:.$C$96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9" table:formula="of:=1-COUNTIF([FRs.$C$2:.$C$96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9" table:formula="of:=1-COUNTIF([FRs.$C$2:.$C$96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9" table:formula="of:=1-COUNTIF([FRs.$C$2:.$C$96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9" table:formula="of:=1-COUNTIF([FRs.$C$2:.$C$96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9" table:formula="of:=1-COUNTIF([FRs.$C$2:.$C$96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9" table:formula="of:=1-COUNTIF([FRs.$C$2:.$C$96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9" table:formula="of:=1-COUNTIF([FRs.$C$2:.$C$96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9" table:formula="of:=1-COUNTIF([FRs.$C$2:.$C$96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9" table:formula="of:=1-COUNTIF([FRs.$C$2:.$C$96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9" table:formula="of:=1-COUNTIF([FRs.$C$2:.$C$96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9" table:formula="of:=1-COUNTIF([FRs.$C$2:.$C$96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9" table:formula="of:=1-COUNTIF([FRs.$C$2:.$C$96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9" table:formula="of:=1-COUNTIF([FRs.$C$2:.$C$96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9" table:formula="of:=1-COUNTIF([FRs.$C$2:.$C$96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9" table:formula="of:=1-COUNTIF([FRs.$C$2:.$C$96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9" table:formula="of:=1-COUNTIF([FRs.$C$2:.$C$96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9" table:formula="of:=1-COUNTIF([FRs.$C$2:.$C$96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9" table:formula="of:=1-COUNTIF([FRs.$C$2:.$C$96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9" table:formula="of:=1-COUNTIF([FRs.$C$2:.$C$96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9" table:formula="of:=1-COUNTIF([FRs.$C$2:.$C$96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9" table:formula="of:=1-COUNTIF([FRs.$C$2:.$C$96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9" table:formula="of:=1-COUNTIF([FRs.$C$2:.$C$96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9" table:formula="of:=1-COUNTIF([FRs.$C$2:.$C$96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9" table:formula="of:=1-COUNTIF([FRs.$C$2:.$C$96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9" table:formula="of:=1-COUNTIF([FRs.$C$2:.$C$96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9" table:formula="of:=1-COUNTIF([FRs.$C$2:.$C$96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9" table:formula="of:=1-COUNTIF([FRs.$C$2:.$C$96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9" table:formula="of:=1-COUNTIF([FRs.$C$2:.$C$96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9" table:formula="of:=1-COUNTIF([FRs.$C$2:.$C$96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9" table:formula="of:=1-COUNTIF([FRs.$C$2:.$C$96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9" table:formula="of:=1-COUNTIF([FRs.$C$2:.$C$96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9" table:formula="of:=1-COUNTIF([FRs.$C$2:.$C$96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9" table:formula="of:=1-COUNTIF([FRs.$C$2:.$C$96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9" table:formula="of:=1-COUNTIF([FRs.$C$2:.$C$96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9" table:formula="of:=1-COUNTIF([FRs.$C$2:.$C$96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9" table:formula="of:=1-COUNTIF([FRs.$C$2:.$C$96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9" table:formula="of:=1-COUNTIF([FRs.$C$2:.$C$96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9" table:formula="of:=1-COUNTIF([FRs.$C$2:.$C$96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9" table:formula="of:=1-COUNTIF([FRs.$C$2:.$C$96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9" table:formula="of:=1-COUNTIF([FRs.$C$2:.$C$96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9" table:formula="of:=1-COUNTIF([FRs.$C$2:.$C$96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9" table:formula="of:=1-COUNTIF([FRs.$C$2:.$C$96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9" table:formula="of:=1-COUNTIF([FRs.$C$2:.$C$96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9" table:formula="of:=1-COUNTIF([FRs.$C$2:.$C$96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9" table:formula="of:=1-COUNTIF([FRs.$C$2:.$C$96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9" table:formula="of:=1-COUNTIF([FRs.$C$2:.$C$96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9" table:formula="of:=1-COUNTIF([FRs.$C$2:.$C$96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9" table:formula="of:=1-COUNTIF([FRs.$C$2:.$C$96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9" table:formula="of:=1-COUNTIF([FRs.$C$2:.$C$96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9" table:formula="of:=1-COUNTIF([FRs.$C$2:.$C$96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9" table:formula="of:=1-COUNTIF([FRs.$C$2:.$C$96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9" table:formula="of:=1-COUNTIF([FRs.$C$2:.$C$96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9" table:formula="of:=1-COUNTIF([FRs.$C$2:.$C$96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9" table:formula="of:=1-COUNTIF([FRs.$C$2:.$C$96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9" table:formula="of:=1-COUNTIF([FRs.$C$2:.$C$96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9" table:formula="of:=1-COUNTIF([FRs.$C$2:.$C$96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9" table:formula="of:=1-COUNTIF([FRs.$C$2:.$C$96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9" table:formula="of:=1-COUNTIF([FRs.$C$2:.$C$96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9" table:formula="of:=1-COUNTIF([FRs.$C$2:.$C$96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9" table:formula="of:=1-COUNTIF([FRs.$C$2:.$C$96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9" table:formula="of:=1-COUNTIF([FRs.$C$2:.$C$96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9" table:formula="of:=1-COUNTIF([FRs.$C$2:.$C$96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9" table:formula="of:=1-COUNTIF([FRs.$C$2:.$C$96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9" table:formula="of:=1-COUNTIF([FRs.$C$2:.$C$96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9" table:formula="of:=1-COUNTIF([FRs.$C$2:.$C$96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9" table:formula="of:=1-COUNTIF([FRs.$C$2:.$C$96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9" table:formula="of:=1-COUNTIF([FRs.$C$2:.$C$96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9" table:formula="of:=1-COUNTIF([FRs.$C$2:.$C$96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9" table:formula="of:=1-COUNTIF([FRs.$C$2:.$C$96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9" table:formula="of:=1-COUNTIF([FRs.$C$2:.$C$96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9" table:formula="of:=1-COUNTIF([FRs.$C$2:.$C$96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9" table:formula="of:=1-COUNTIF([FRs.$C$2:.$C$96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9" table:formula="of:=1-COUNTIF([FRs.$C$2:.$C$96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9" table:formula="of:=1-COUNTIF([FRs.$C$2:.$C$96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9" table:formula="of:=1-COUNTIF([FRs.$C$2:.$C$96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9" table:formula="of:=1-COUNTIF([FRs.$C$2:.$C$96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9" table:formula="of:=1-COUNTIF([FRs.$C$2:.$C$96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9" table:formula="of:=1-COUNTIF([FRs.$C$2:.$C$96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9" table:formula="of:=1-COUNTIF([FRs.$C$2:.$C$96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9" table:formula="of:=1-COUNTIF([FRs.$C$2:.$C$96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9" table:formula="of:=1-COUNTIF([FRs.$C$2:.$C$96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9" table:formula="of:=1-COUNTIF([FRs.$C$2:.$C$96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9" table:formula="of:=1-COUNTIF([FRs.$C$2:.$C$96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9" table:formula="of:=1-COUNTIF([FRs.$C$2:.$C$96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9" table:formula="of:=1-COUNTIF([FRs.$C$2:.$C$96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9" table:formula="of:=1-COUNTIF([FRs.$C$2:.$C$96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9" table:formula="of:=1-COUNTIF([FRs.$C$2:.$C$96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9" table:formula="of:=1-COUNTIF([FRs.$C$2:.$C$96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9" table:formula="of:=1-COUNTIF([FRs.$C$2:.$C$96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9" table:formula="of:=1-COUNTIF([FRs.$C$2:.$C$96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9" table:formula="of:=1-COUNTIF([FRs.$C$2:.$C$96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9" table:formula="of:=1-COUNTIF([FRs.$C$2:.$C$96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9" table:formula="of:=1-COUNTIF([FRs.$C$2:.$C$96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9" table:formula="of:=1-COUNTIF([FRs.$C$2:.$C$96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9" table:formula="of:=1-COUNTIF([FRs.$C$2:.$C$96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9" table:formula="of:=1-COUNTIF([FRs.$C$2:.$C$96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9" table:formula="of:=1-COUNTIF([FRs.$C$2:.$C$96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9" table:formula="of:=1-COUNTIF([FRs.$C$2:.$C$96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9" table:formula="of:=1-COUNTIF([FRs.$C$2:.$C$96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9" table:formula="of:=1-COUNTIF([FRs.$C$2:.$C$96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9" table:formula="of:=1-COUNTIF([FRs.$C$2:.$C$96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9" table:formula="of:=1-COUNTIF([FRs.$C$2:.$C$96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9" table:formula="of:=1-COUNTIF([FRs.$C$2:.$C$96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9" table:formula="of:=1-COUNTIF([FRs.$C$2:.$C$96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9" table:formula="of:=1-COUNTIF([FRs.$C$2:.$C$96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9" table:formula="of:=1-COUNTIF([FRs.$C$2:.$C$96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9" table:formula="of:=1-COUNTIF([FRs.$C$2:.$C$96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9" table:formula="of:=1-COUNTIF([FRs.$C$2:.$C$96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9" table:formula="of:=1-COUNTIF([FRs.$C$2:.$C$96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9" table:formula="of:=1-COUNTIF([FRs.$C$2:.$C$96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9" table:formula="of:=1-COUNTIF([FRs.$C$2:.$C$96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9" table:formula="of:=1-COUNTIF([FRs.$C$2:.$C$96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9" table:formula="of:=1-COUNTIF([FRs.$C$2:.$C$96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9" table:formula="of:=1-COUNTIF([FRs.$C$2:.$C$96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9" table:formula="of:=1-COUNTIF([FRs.$C$2:.$C$96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9" table:formula="of:=1-COUNTIF([FRs.$C$2:.$C$96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9" table:formula="of:=1-COUNTIF([FRs.$C$2:.$C$96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9" table:formula="of:=1-COUNTIF([FRs.$C$2:.$C$96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9" table:formula="of:=1-COUNTIF([FRs.$C$2:.$C$96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9" table:formula="of:=1-COUNTIF([FRs.$C$2:.$C$96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9" table:formula="of:=1-COUNTIF([FRs.$C$2:.$C$96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9" table:formula="of:=1-COUNTIF([FRs.$C$2:.$C$96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9" table:formula="of:=1-COUNTIF([FRs.$C$2:.$C$96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9" table:formula="of:=1-COUNTIF([FRs.$C$2:.$C$96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9" table:formula="of:=1-COUNTIF([FRs.$C$2:.$C$96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9" table:formula="of:=1-COUNTIF([FRs.$C$2:.$C$96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9" table:formula="of:=1-COUNTIF([FRs.$C$2:.$C$96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9" table:formula="of:=1-COUNTIF([FRs.$C$2:.$C$96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9" table:formula="of:=1-COUNTIF([FRs.$C$2:.$C$96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9" table:formula="of:=1-COUNTIF([FRs.$C$2:.$C$96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9" table:formula="of:=1-COUNTIF([FRs.$C$2:.$C$96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9" table:formula="of:=1-COUNTIF([FRs.$C$2:.$C$96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9" table:formula="of:=1-COUNTIF([FRs.$C$2:.$C$96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9" table:formula="of:=1-COUNTIF([FRs.$C$2:.$C$96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9" table:formula="of:=1-COUNTIF([FRs.$C$2:.$C$96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9" table:formula="of:=1-COUNTIF([FRs.$C$2:.$C$96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9" table:formula="of:=1-COUNTIF([FRs.$C$2:.$C$96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9" table:formula="of:=1-COUNTIF([FRs.$C$2:.$C$96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9" table:formula="of:=1-COUNTIF([FRs.$C$2:.$C$96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9" table:formula="of:=1-COUNTIF([FRs.$C$2:.$C$96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9" table:formula="of:=1-COUNTIF([FRs.$C$2:.$C$96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9" table:formula="of:=1-COUNTIF([FRs.$C$2:.$C$96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9" table:formula="of:=1-COUNTIF([FRs.$C$2:.$C$96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9" table:formula="of:=1-COUNTIF([FRs.$C$2:.$C$96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9" table:formula="of:=1-COUNTIF([FRs.$C$2:.$C$96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9" table:formula="of:=1-COUNTIF([FRs.$C$2:.$C$96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9" table:formula="of:=1-COUNTIF([FRs.$C$2:.$C$96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9" table:formula="of:=1-COUNTIF([FRs.$C$2:.$C$96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9" table:formula="of:=1-COUNTIF([FRs.$C$2:.$C$96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9" table:formula="of:=1-COUNTIF([FRs.$C$2:.$C$96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9" table:formula="of:=1-COUNTIF([FRs.$C$2:.$C$96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9" table:formula="of:=1-COUNTIF([FRs.$C$2:.$C$96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9" table:formula="of:=1-COUNTIF([FRs.$C$2:.$C$96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9" table:formula="of:=1-COUNTIF([FRs.$C$2:.$C$96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9" table:formula="of:=1-COUNTIF([FRs.$C$2:.$C$96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9" table:formula="of:=1-COUNTIF([FRs.$C$2:.$C$96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9" table:formula="of:=1-COUNTIF([FRs.$C$2:.$C$96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9" table:formula="of:=1-COUNTIF([FRs.$C$2:.$C$96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9" table:formula="of:=1-COUNTIF([FRs.$C$2:.$C$96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9" table:formula="of:=1-COUNTIF([FRs.$C$2:.$C$96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9" table:formula="of:=1-COUNTIF([FRs.$C$2:.$C$96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9" table:formula="of:=1-COUNTIF([FRs.$C$2:.$C$96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9" table:formula="of:=1-COUNTIF([FRs.$C$2:.$C$96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9" table:formula="of:=1-COUNTIF([FRs.$C$2:.$C$96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9" table:formula="of:=1-COUNTIF([FRs.$C$2:.$C$96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9" table:formula="of:=1-COUNTIF([FRs.$C$2:.$C$96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9" table:formula="of:=1-COUNTIF([FRs.$C$2:.$C$96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9" table:formula="of:=1-COUNTIF([FRs.$C$2:.$C$96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9" table:formula="of:=1-COUNTIF([FRs.$C$2:.$C$96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9" table:formula="of:=1-COUNTIF([FRs.$C$2:.$C$96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9" table:formula="of:=1-COUNTIF([FRs.$C$2:.$C$96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9" table:formula="of:=1-COUNTIF([FRs.$C$2:.$C$96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9" table:formula="of:=1-COUNTIF([FRs.$C$2:.$C$96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9" table:formula="of:=1-COUNTIF([FRs.$C$2:.$C$96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9" table:formula="of:=1-COUNTIF([FRs.$C$2:.$C$96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9" table:formula="of:=1-COUNTIF([FRs.$C$2:.$C$96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9" table:formula="of:=1-COUNTIF([FRs.$C$2:.$C$96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9" table:formula="of:=1-COUNTIF([FRs.$C$2:.$C$96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9" table:formula="of:=1-COUNTIF([FRs.$C$2:.$C$96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9" table:formula="of:=1-COUNTIF([FRs.$C$2:.$C$96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9" table:formula="of:=1-COUNTIF([FRs.$C$2:.$C$96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9" table:formula="of:=1-COUNTIF([FRs.$C$2:.$C$96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9" table:formula="of:=1-COUNTIF([FRs.$C$2:.$C$96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9" table:formula="of:=1-COUNTIF([FRs.$C$2:.$C$96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9" table:formula="of:=1-COUNTIF([FRs.$C$2:.$C$96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9" table:formula="of:=1-COUNTIF([FRs.$C$2:.$C$96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9" table:formula="of:=1-COUNTIF([FRs.$C$2:.$C$96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9" table:formula="of:=1-COUNTIF([FRs.$C$2:.$C$96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9" table:formula="of:=1-COUNTIF([FRs.$C$2:.$C$96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9" table:formula="of:=1-COUNTIF([FRs.$C$2:.$C$96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9" table:formula="of:=1-COUNTIF([FRs.$C$2:.$C$96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9" table:formula="of:=1-COUNTIF([FRs.$C$2:.$C$96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9" table:formula="of:=1-COUNTIF([FRs.$C$2:.$C$96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9" table:formula="of:=1-COUNTIF([FRs.$C$2:.$C$96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9" table:formula="of:=1-COUNTIF([FRs.$C$2:.$C$96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9" table:formula="of:=1-COUNTIF([FRs.$C$2:.$C$96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9" table:formula="of:=1-COUNTIF([FRs.$C$2:.$C$96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9" table:formula="of:=1-COUNTIF([FRs.$C$2:.$C$96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9" table:formula="of:=1-COUNTIF([FRs.$C$2:.$C$965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9" table:formula="of:=1-COUNTIF([FRs.$C$2:.$C$965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9" table:formula="of:=1-COUNTIF([FRs.$C$2:.$C$965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9" table:formula="of:=1-COUNTIF([FRs.$C$2:.$C$965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9" table:formula="of:=1-COUNTIF([FRs.$C$2:.$C$965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9" table:formula="of:=1-COUNTIF([FRs.$C$2:.$C$965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9" table:formula="of:=1-COUNTIF([FRs.$C$2:.$C$965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9" table:formula="of:=1-COUNTIF([FRs.$C$2:.$C$965]; &quot;=&quot;&amp;[.A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9" table:formula="of:=1-COUNTIF([FRs.$C$2:.$C$965]; &quot;=&quot;&amp;[.A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9" table:formula="of:=1-COUNTIF([FRs.$C$2:.$C$965]; &quot;=&quot;&amp;[.A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9" table:formula="of:=1-COUNTIF([FRs.$C$2:.$C$965]; &quot;=&quot;&amp;[.A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9" table:formula="of:=1-COUNTIF([FRs.$C$2:.$C$965]; &quot;=&quot;&amp;[.A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9" table:formula="of:=1-COUNTIF([FRs.$C$2:.$C$965]; &quot;=&quot;&amp;[.A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9" table:formula="of:=1-COUNTIF([FRs.$C$2:.$C$965]; &quot;=&quot;&amp;[.A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9" table:formula="of:=1-COUNTIF([FRs.$C$2:.$C$965]; &quot;=&quot;&amp;[.A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9" table:formula="of:=1-COUNTIF([FRs.$C$2:.$C$965]; &quot;=&quot;&amp;[.A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9" table:formula="of:=1-COUNTIF([FRs.$C$2:.$C$965]; &quot;=&quot;&amp;[.A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9" table:formula="of:=1-COUNTIF([FRs.$C$2:.$C$965]; &quot;=&quot;&amp;[.A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9" table:formula="of:=1-COUNTIF([FRs.$C$2:.$C$965]; &quot;=&quot;&amp;[.A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9" table:formula="of:=1-COUNTIF([FRs.$C$2:.$C$965]; &quot;=&quot;&amp;[.A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9" table:formula="of:=1-COUNTIF([FRs.$C$2:.$C$965]; &quot;=&quot;&amp;[.A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9" table:formula="of:=1-COUNTIF([FRs.$C$2:.$C$965]; &quot;=&quot;&amp;[.A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9" table:formula="of:=1-COUNTIF([FRs.$C$2:.$C$96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9" table:formula="of:=1-COUNTIF([FRs.$C$2:.$C$96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9" table:formula="of:=1-COUNTIF([FRs.$C$2:.$C$96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9" table:formula="of:=1-COUNTIF([FRs.$C$2:.$C$96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9" table:formula="of:=1-COUNTIF([FRs.$C$2:.$C$96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9" table:formula="of:=1-COUNTIF([FRs.$C$2:.$C$96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9" table:formula="of:=1-COUNTIF([FRs.$C$2:.$C$96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9" table:formula="of:=1-COUNTIF([FRs.$C$2:.$C$96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9" table:formula="of:=1-COUNTIF([FRs.$C$2:.$C$96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9" table:formula="of:=1-COUNTIF([FRs.$C$2:.$C$96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9" table:formula="of:=1-COUNTIF([FRs.$C$2:.$C$96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9" table:formula="of:=1-COUNTIF([FRs.$C$2:.$C$96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9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22" table:orientation="column"/>
        <table:database-range table:name="__Anonymous_Sheet_DB__1" table:target-range-address="flat.A1:flat.G4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15:25:34.84734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5-02-11T15:53:02.619009899</dc:date>
    <meta:editing-duration>P2DT7H37M17S</meta:editing-duration>
    <meta:editing-cycles>171</meta:editing-cycles>
    <meta:generator>LibreOffice/4.3.5.2.0$Linux_X86_64 LibreOffice_project/430m0$Build-2</meta:generator>
    <meta:document-statistic meta:table-count="4" meta:cell-count="2885" meta:object-count="0"/>
  </office:meta>
</office:document-meta>
</file>