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14.817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9.973cm"/>
    </style:style>
    <style:style style:name="co10" style:family="table-column">
      <style:table-column-properties fo:break-before="auto" style:column-width="5.99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Arimo" style:font-name-asian="TianZhen" style:font-name-complex="FreeSans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  <style:text-properties fo:color="#ff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q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"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ll use cases in a project share the same field-set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A field-set cannot contain more than 30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BR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Each field name in a field-set must be unique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C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 field-set cannot be empty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When modifying fields, BA shall be able to remove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When modifying fields, BA shall be able to add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When modifying fields, BA shall be able to modify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When modifying fields, BA shall be able to reorder fields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When modifying fields, System shall indicate how many UCs have non-default content for each field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When modifying fields, BA shall be able to see each instance of non-default content for a field.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UC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Modify a Project's Fields</text:p>
          </table:table-cell>
          <table:table-cell table:style-name="ce10" office:value-type="date" office:date-value="2014-02-06" calcext:value-type="date">
            <text:p>06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BA shall be able to apply groupings to multiple UCs simultaneously (without using the UCE)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BA shall be able to remove groupings to multiple UCs simultaneously (without using the UCE)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BA shall be able to filter their view of a project's UCs by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When modifying groupings, BA shall be able to create a tree of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When modifying groupings in a tree, BA shall be able to specify the order of children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When modifying groupings in a tree, BA shall be able to specify multiple parents of a child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BA shall be able to create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11" office:value-type="string" calcext:value-type="string">
            <text:p>more detail required? constraints? fields = name, desc. 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BA shall be able to modify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11" office:value-type="string" calcext:value-type="string">
            <text:p>more detail required?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BA shall be able to delete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11" office:value-type="string" calcext:value-type="string">
            <text:p>more detail required?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BA shall be able to list all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UC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Inspect application of groupings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MF-07,01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BA shall be able to apply groupings to UC using the UCE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MF-07,01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BA shall be able to remove groupings to UC using the UCE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11" office:value-type="string" calcext:value-type="string">
            <text:p>multiple? if so, \/ or /\ unions?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F-07,02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BA shall be able to filter shares' UC selection criteria by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When reading own UCs, BA shall be able to filter UCs by groupings.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MF-07,02</text:p>
          </table:table-cell>
          <table:table-cell table:style-name="ce5" office:value-type="string" calcext:value-type="string">
            <text:p>FR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When reading shared UCs, AnonReader shall be able to filter UCs by groupings. [Pri=Nice]</text:p>
          </table:table-cell>
          <table:table-cell table:style-name="ce10" office:value-type="date" office:date-value="2014-02-07" calcext:value-type="date">
            <text:p>07/02/14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 table:number-columns-repeated="2"/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Intersection probs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7" table:number-columns-repeated="1021" table:default-cell-style-name="Default"/>
        <table:table-row table:style-name="ro1">
          <table:table-cell table:style-name="ce12" office:value-type="string" calcext:value-type="string">
            <text:p>MF-α</text:p>
          </table:table-cell>
          <table:table-cell table:style-name="ce12" office:value-type="string" calcext:value-type="string">
            <text:p>MF-β</text:p>
          </table:table-cell>
          <table:table-cell table:style-name="ce12" office:value-type="string" calcext:value-type="string">
            <text:p>Concern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table:style-name="ce13"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1">part of</text:span><text:span text:style-name="T2"> team X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When FSs with grouping-display-fields are shared, what happens when referenced groupings are updated.</text:p>
          </table:table-cell>
          <table:table-cell table:number-columns-repeated="1021"/>
        </table:table-row>
      </table:table>
      <table:table table:name="CRUDL" table:style-name="ta1">
        <table:table-column table:style-name="co10" table:default-cell-style-name="Default"/>
        <table:table-column table:style-name="co7" table:number-columns-repeated="6" table:default-cell-style-name="ce4"/>
        <table:table-column table:style-name="co7" table:default-cell-style-name="Default"/>
        <table:table-row table:style-name="ro1">
          <table:table-cell table:style-name="ce6" office:value-type="string" calcext:value-type="string">
            <text:p>SUBJEC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ORDER (verb t.)</text:p>
            </office:annotation>
            <text:p>O</text:p>
          </table:table-cell>
          <table:table-cell table:style-name="ce1" office:value-type="string" calcext:value-type="string">
            <text:p>CARD/QTY</text:p>
          </table:table-cell>
        </table:table-row>
        <table:table-row table:style-name="ro1">
          <table:table-cell table:style-name="ce7" office:value-type="string" calcext:value-type="string">
            <text:p>Field-set</text:p>
          </table:table-cell>
          <table:table-cell table:style-name="ce5" office:value-type="string" calcext:value-type="string">
            <text:p>invis</text:p>
          </table:table-cell>
          <table:table-cell table:number-columns-repeated="2" table:style-name="ce5" office:value-type="string" calcext:value-type="string">
            <text:p>UC-9</text:p>
          </table:table-cell>
          <table:table-cell table:style-name="ce5" office:value-type="string" calcext:value-type="string">
            <text:p>invis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 office:value-type="string" calcext:value-type="string">
            <text:p>UC-9</text:p>
          </table:table-cell>
        </table:table-row>
        <table:table-row table:style-name="ro1">
          <table:table-cell table:style-name="ce7" office:value-type="string" calcext:value-type="string">
            <text:p>Field</text:p>
          </table:table-cell>
          <table:table-cell table:number-columns-repeated="7" table:style-name="ce5" office:value-type="string" calcext:value-type="string">
            <text:p>UC-9</text:p>
          </table:table-cell>
        </table:table-row>
        <table:table-row table:style-name="ro1">
          <table:table-cell table:style-name="ce7" office:value-type="string" calcext:value-type="string">
            <text:p>Grouping</text:p>
          </table:table-cell>
          <table:table-cell table:style-name="ce5" table:number-columns-repeated="7"/>
        </table:table-row>
        <table:table-row table:style-name="ro1">
          <table:table-cell table:style-name="ce7" office:value-type="string" calcext:value-type="string">
            <text:p>Grouping link relationship</text:p>
          </table:table-cell>
          <table:table-cell table:style-name="ce5" table:number-columns-repeated="7"/>
        </table:table-row>
        <table:table-row table:style-name="ro1">
          <table:table-cell table:style-name="ce7" office:value-type="string" calcext:value-type="string">
            <text:p>Grouping tree relationship</text:p>
          </table:table-cell>
          <table:table-cell table:style-name="ce5" table:number-columns-repeated="7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reqs.A1:reqs.F2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10:27:33.566112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07T17:25:07.041525985</dc:date>
    <meta:editing-duration>PT1H27M47S</meta:editing-duration>
    <meta:editing-cycles>3</meta:editing-cycles>
    <meta:generator>LibreOffice/4.1.4.2$Linux_X86_64 LibreOffice_project/410m0$Build-2</meta:generator>
    <meta:document-statistic meta:table-count="3" meta:cell-count="199" meta:object-count="0"/>
  </office:meta>
</office:document-meta>
</file>