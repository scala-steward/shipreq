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0.71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7.221cm"/>
    </style:style>
    <style:style style:name="ro1" style:family="table-row">
      <style:table-row-properties style:row-height="0.448cm" fo:break-before="auto" style:use-optimal-row-height="true"/>
    </style:style>
    <style:style style:name="ro2" style:family="table-row">
      <style:table-row-properties style:row-height="0.478cm" fo:break-before="auto" style:use-optimal-row-height="true"/>
    </style:style>
    <style:style style:name="ro3" style:family="table-row">
      <style:table-row-properties style:row-height="0.89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color="#ff420e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3" style:family="table-cell" style:parent-style-name="Default">
      <style:table-cell-properties style:vertical-align="top"/>
    </style:style>
    <style:style style:name="ce4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no-wrap" style:vertical-align="top"/>
    </style:style>
    <style:style style:name="ce6" style:family="table-cell" style:parent-style-name="Default">
      <style:table-cell-properties fo:wrap-option="wrap" style:vertical-align="top"/>
    </style:style>
    <style:style style:name="ce7" style:family="table-cell" style:parent-style-name="Default">
      <style:table-cell-properties style:vertical-align="top"/>
      <style:text-properties fo:color="#ff0000"/>
    </style:style>
    <style:style style:name="ce8" style:family="table-cell" style:parent-style-name="Default">
      <style:table-cell-properties style:vertical-align="top"/>
      <style:text-properties fo:color="#ff0000" fo:font-weight="bold" style:font-weight-asian="bold" style:font-weight-complex="bold"/>
    </style:style>
    <style:style style:name="T1" style:family="text">
      <style:text-properties style:font-name="Arimo" fo:font-weight="bold" style:font-name-asian="TianZhen" style:font-weight-asian="bold" style:font-name-complex="FreeSans" style:font-weight-complex="bold"/>
    </style:style>
  </office:automatic-styles>
  <office:body>
    <office:spreadsheet>
      <table:table table:name="reqs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6"/>
        <table:table-column table:style-name="co2" table:number-columns-repeated="1021" table:default-cell-style-name="ce3"/>
        <table:table-row table:style-name="ro1">
          <table:table-cell table:style-name="ce1" office:value-type="string" calcext:value-type="string">
            <text:p>Completeness Evaluation</text:p>
          </table:table-cell>
          <table:table-cell table:number-columns-repeated="102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roblem</text:p>
          </table:table-cell>
          <table:table-cell office:value-type="string" calcext:value-type="string">
            <text:p>It's tedious to manually read each UC to determine whether it's complete.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roblem</text:p>
          </table:table-cell>
          <table:table-cell office:value-type="string" calcext:value-type="string">
            <text:p>It's tedious to manually read each UC to find placeholders for pending info. (TODOs, TBDs etc)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roblem</text:p>
          </table:table-cell>
          <table:table-cell office:value-type="string" calcext:value-type="string">
            <text:p>It's tedious to manually read each UC to find empty fields.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Problem</text:p>
          </table:table-cell>
          <table:table-cell office:value-type="string" calcext:value-type="string">
            <text:p>It's tedious to manually read each UC to find invalid tokens. ([DELETED], [1.2?] etc)</text:p>
          </table:table-cell>
          <table:table-cell table:number-columns-repeated="102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I want to know how many incompletions/UC. (?)</text:p>
          </table:table-cell>
          <table:table-cell table:style-name="ce7" office:value-type="string" calcext:value-type="string">
            <text:p>Just a single UC? Is this: “When looking at a UC list, quickly see how complete each is?”</text:p>
            <text:p>Or in UCE, see a number of incopmletions?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I want to know how many incompletions across all UCs. (?)</text:p>
          </table:table-cell>
          <table:table-cell table:style-name="ce7" office:value-type="string" calcext:value-type="string">
            <text:p>With scoping. (See 2 down)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WS</text:p>
          </table:table-cell>
          <table:table-cell office:value-type="string" calcext:value-type="string">
            <text:p>Some fields are mandatory, some are ok empty.</text:p>
          </table:table-cell>
          <table:table-cell table:style-name="ce7" office:value-type="string" calcext:value-type="string">
            <text:p>Intersection with MF-05: Field Customisation</text:p>
          </table:table-cell>
          <table:table-cell table:number-columns-repeated="102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Any bulk-UC incompleteness analysis should accept a filter on the UC scope.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uto-populate mandatory fields with TODOs in new UCs.</text:p>
          </table:table-cell>
          <table:table-cell office:value-type="string" calcext:value-type="string">
            <text:p>No. Will be trouble when making a field optional.</text:p>
          </table:table-cell>
          <table:table-cell table:number-columns-repeated="102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RWS</text:p>
          </table:table-cell>
          <table:table-cell office:value-type="string" calcext:value-type="string">
            <text:p>Incompletions usually coloured red.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WS</text:p>
          </table:table-cell>
          <table:table-cell office:value-type="string" calcext:value-type="string">
            <text:p>TODOs/TBDs often come with additional information to explain the incompletion, or pending condition.</text:p>
          </table:table-cell>
          <table:table-cell table:style-name="ce7" office:value-type="string" calcext:value-type="string">
            <text:p>Exactly what kind of info</text:p>
          </table:table-cell>
          <table:table-cell table:number-columns-repeated="1020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RWS</text:p>
          </table:table-cell>
          <table:table-cell office:value-type="string" calcext:value-type="string">
            <text:p>Different types of incompletions may be considered less of less importance than others.</text:p>
          </table:table-cell>
          <table:table-cell table:style-name="ce7" office:value-type="string" calcext:value-type="string">
            <text:p>Examples. Really?</text:p>
            <text:p><text:span text:style-name="T1">“</text:span><text:span text:style-name="T1">different types” = arbitrary types? = tag CRUDL?</text:span>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roblem</text:p>
          </table:table-cell>
          <table:table-cell office:value-type="string" calcext:value-type="string">
            <text:p>When viewing multiple incompletions, the user may not understand some incompletions without context.</text:p>
          </table:table-cell>
          <table:table-cell table:number-columns-repeated="102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When viewing multiple incompletions, the user must be able to comprehend each item in context without leaving the page.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When viewing multiple incompletions, the user must be able to see each item's UC name.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When viewing multiple incompletions, the user must be able to see each item's UC field in which it occurs.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When viewing multiple incompletions, the user must be able to see each TODO/TBD's supplimentary info.</text:p>
          </table:table-cell>
          <table:table-cell table:number-columns-repeated="102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When viewing multiple incompletions, the user must be able to see field text around each TODO/TBD that doesn't contain supplimentary info.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When viewing multiple incompletions, the user must be able to see field text around each invalid reference.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When showing field text around an incompletion, it might be an idea to show the containing sentence.</text:p>
          </table:table-cell>
          <table:table-cell table:number-columns-repeated="102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When showing field text around an incompletion, it might be an idea to show just a number of words before the tag (important) and a number after (less important).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RWS</text:p>
          </table:table-cell>
          <table:table-cell office:value-type="string" calcext:value-type="string">
            <text:p>When a UC is missing a version or priority, it's often considered an incompletion.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User must be able to change the mandatory-ness of a field in-use.</text:p>
          </table:table-cell>
          <table:table-cell table:style-name="ce8" office:value-type="string" calcext:value-type="string">
            <text:p>mandatoryness changes, analys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Need to store free text notes, not associated with a UC or req.</text:p>
          </table:table-cell>
          <table:table-cell table:style-name="ce8"/>
          <table:table-cell table:number-columns-repeated="1020"/>
        </table:table-row>
        <table:table-row table:style-name="ro1">
          <table:table-cell table:number-columns-repeated="3"/>
          <table:table-cell table:style-name="ce8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Incompletion type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mpty field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leted step ref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nvalid step ref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nvalid UC ref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User-defined tags: TODO, TBD.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Notes (unrelated to reqs)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4" office:value-type="string" calcext:value-type="string">
            <text:p>Empty field strategy</text:p>
          </table:table-cell>
          <table:table-cell table:number-columns-repeated="1022"/>
        </table:table-row>
        <table:table-row table:style-name="ro1">
          <table:table-cell/>
          <table:table-cell table:style-name="ce5" office:value-type="string" calcext:value-type="string">
            <text:p>1) Fields get TODOs inserted when new.</text:p>
          </table:table-cell>
          <table:table-cell table:style-name="Default"/>
          <table:table-cell table:number-columns-repeated="1021"/>
        </table:table-row>
        <table:table-row table:style-name="ro1">
          <table:table-cell/>
          <table:table-cell table:style-name="ce5" office:value-type="string" calcext:value-type="string">
            <text:p>2) Fields have a mandatory switch, incomplete when empty.</text:p>
          </table:table-cell>
          <table:table-cell table:style-name="Default"/>
          <table:table-cell table:number-columns-repeated="1021"/>
        </table:table-row>
        <table:table-row table:style-name="ro1">
          <table:table-cell/>
          <table:table-cell table:style-name="ce5" office:value-type="string" calcext:value-type="string">
            <text:p>3) Incompletions → Empty fields → Field XXX → UCs</text:p>
          </table:table-cell>
          <table:table-cell table:style-name="Default"/>
          <table:table-cell table:number-columns-repeated="1021"/>
        </table:table-row>
        <table:table-row table:style-name="ro1" table:number-rows-repeated="1048461">
          <table:table-cell table:number-columns-repeated="1024"/>
        </table:table-row>
        <table:table-row table:style-name="ro4" table:number-rows-repeated="73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4">00/00/0000</text:date>, <text:time style:data-style-name="N2" text:time-value="0000-00-00T10:55:02.8944042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7T17:45:55.440643359</meta:creation-date>
    <dc:date>2014-02-24T14:55:25.376604323</dc:date>
    <meta:editing-duration>PT8H5M48S</meta:editing-duration>
    <meta:editing-cycles>16</meta:editing-cycles>
    <meta:generator>LibreOffice/4.1.5.3$Linux_X86_64 LibreOffice_project/410m0$Build-3</meta:generator>
    <meta:document-statistic meta:table-count="1" meta:cell-count="92" meta:object-count="0"/>
  </office:meta>
</office:document-meta>
</file>