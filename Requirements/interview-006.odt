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officeooo:rsid="0004d230" officeooo:paragraph-rsid="0004d230"/>
    </style:style>
    <style:style style:name="P2" style:family="paragraph" style:parent-style-name="Standard">
      <style:text-properties fo:color="#ff420e" fo:font-weight="bold" officeooo:rsid="0004d230" officeooo:paragraph-rsid="0004d230" style:font-weight-asian="bold" style:font-weight-complex="bold"/>
    </style:style>
    <style:style style:name="P3" style:family="paragraph" style:parent-style-name="Standard">
      <style:text-properties officeooo:rsid="000585c4" officeooo:paragraph-rsid="000585c4"/>
    </style:style>
    <style:style style:name="P4" style:family="paragraph" style:parent-style-name="Standard">
      <style:text-properties fo:font-size="10pt" fo:font-style="italic" officeooo:rsid="000eb297" officeooo:paragraph-rsid="000eb297" style:font-size-asian="10pt" style:font-style-asian="italic" style:font-size-complex="10pt" style:font-style-complex="italic"/>
    </style:style>
    <style:style style:name="P5" style:family="paragraph" style:parent-style-name="Standard">
      <style:text-properties fo:font-size="10pt" fo:font-style="italic" fo:font-weight="bold" officeooo:rsid="000eb297" officeooo:paragraph-rsid="000eb297" style:font-size-asian="10pt" style:font-style-asian="italic" style:font-weight-asian="bold" style:font-size-complex="10pt" style:font-style-complex="italic" style:font-weight-complex="bold"/>
    </style:style>
    <style:style style:name="P6" style:family="paragraph" style:parent-style-name="Standard">
      <style:text-properties officeooo:rsid="00065487" officeooo:paragraph-rsid="00065487"/>
    </style:style>
    <style:style style:name="P7" style:family="paragraph" style:parent-style-name="Standard">
      <style:text-properties officeooo:rsid="00076a8c" officeooo:paragraph-rsid="00076a8c"/>
    </style:style>
    <style:style style:name="P8" style:family="paragraph" style:parent-style-name="Standard">
      <style:text-properties officeooo:rsid="0008573e" officeooo:paragraph-rsid="0008573e"/>
    </style:style>
    <style:style style:name="P9" style:family="paragraph" style:parent-style-name="Standard">
      <style:text-properties officeooo:rsid="000afd1c" officeooo:paragraph-rsid="000afd1c"/>
    </style:style>
    <style:style style:name="P10" style:family="paragraph" style:parent-style-name="Standard">
      <style:text-properties officeooo:rsid="000ba8a9" officeooo:paragraph-rsid="000c37d3"/>
    </style:style>
    <style:style style:name="P11" style:family="paragraph" style:parent-style-name="Standard">
      <style:text-properties officeooo:rsid="000c37d3" officeooo:paragraph-rsid="000c37d3"/>
    </style:style>
    <style:style style:name="P12" style:family="paragraph" style:parent-style-name="Standard">
      <style:text-properties officeooo:rsid="000eb297" officeooo:paragraph-rsid="000eb297"/>
    </style:style>
    <style:style style:name="P13" style:family="paragraph" style:parent-style-name="Standard">
      <style:paragraph-properties fo:margin-left="1.251cm" fo:margin-right="0cm" fo:text-indent="0cm" style:auto-text-indent="false"/>
      <style:text-properties fo:font-size="10pt" fo:font-style="italic" officeooo:rsid="0005e501" officeooo:paragraph-rsid="0005e501" style:font-size-asian="10pt" style:font-style-asian="italic" style:font-size-complex="10pt" style:font-style-complex="italic"/>
    </style:style>
    <style:style style:name="P14" style:family="paragraph" style:parent-style-name="Standard">
      <style:paragraph-properties fo:margin-left="2.3cm" fo:margin-right="0cm" fo:text-indent="0cm" style:auto-text-indent="false"/>
      <style:text-properties fo:font-size="10pt" fo:font-style="italic" officeooo:rsid="001038d3" officeooo:paragraph-rsid="001038d3" style:font-size-asian="10pt" style:font-style-asian="italic" style:font-size-complex="10pt" style:font-style-complex="italic"/>
    </style:style>
    <style:style style:name="P15" style:family="paragraph" style:parent-style-name="Standard" style:list-style-name="L1">
      <style:text-properties officeooo:rsid="00065487" officeooo:paragraph-rsid="00065487"/>
    </style:style>
    <style:style style:name="P16" style:family="paragraph" style:parent-style-name="Standard" style:list-style-name="L1">
      <style:text-properties officeooo:rsid="00076a8c" officeooo:paragraph-rsid="00076a8c"/>
    </style:style>
    <style:style style:name="P17" style:family="paragraph" style:parent-style-name="Standard" style:list-style-name="L1">
      <style:text-properties officeooo:rsid="000afd1c" officeooo:paragraph-rsid="000afd1c"/>
    </style:style>
    <style:style style:name="P18" style:family="paragraph" style:parent-style-name="Standard" style:list-style-name="L2">
      <style:text-properties officeooo:rsid="000afd1c" officeooo:paragraph-rsid="000afd1c"/>
    </style:style>
    <style:style style:name="P19" style:family="paragraph" style:parent-style-name="Standard" style:list-style-name="L2">
      <style:text-properties officeooo:rsid="0008573e" officeooo:paragraph-rsid="0008573e"/>
    </style:style>
    <style:style style:name="P20" style:family="paragraph" style:parent-style-name="Standard" style:list-style-name="L2">
      <style:text-properties officeooo:rsid="000a2da3" officeooo:paragraph-rsid="000a2da3"/>
    </style:style>
    <style:style style:name="P21" style:family="paragraph" style:parent-style-name="Standard" style:list-style-name="L2">
      <style:text-properties officeooo:rsid="000cdafe" officeooo:paragraph-rsid="000cdafe"/>
    </style:style>
    <style:style style:name="P22" style:family="paragraph" style:parent-style-name="Standard" style:list-style-name="L3">
      <style:text-properties officeooo:rsid="000ba8a9" officeooo:paragraph-rsid="000c37d3"/>
    </style:style>
    <style:style style:name="P23" style:family="paragraph" style:parent-style-name="Standard" style:list-style-name="L3">
      <style:text-properties officeooo:rsid="000c37d3" officeooo:paragraph-rsid="000c37d3"/>
    </style:style>
    <style:style style:name="P24" style:family="paragraph" style:parent-style-name="Standard" style:list-style-name="L4">
      <style:text-properties officeooo:rsid="000eb297" officeooo:paragraph-rsid="000eb297"/>
    </style:style>
    <style:style style:name="P25" style:family="paragraph" style:parent-style-name="Standard" style:list-style-name="L5">
      <style:text-properties officeooo:rsid="000f6b8d" officeooo:paragraph-rsid="000f6b8d"/>
    </style:style>
    <style:style style:name="P26" style:family="paragraph" style:parent-style-name="Standard" style:list-style-name="L5">
      <style:text-properties fo:font-style="normal" officeooo:rsid="001038d3" officeooo:paragraph-rsid="001038d3" style:font-style-asian="normal" style:font-style-complex="normal"/>
    </style:style>
    <style:style style:name="P27" style:family="paragraph" style:parent-style-name="Standard">
      <style:text-properties fo:font-style="normal" officeooo:rsid="001038d3" officeooo:paragraph-rsid="001038d3" style:font-style-asian="normal" style:font-style-complex="normal"/>
    </style:style>
    <style:style style:name="P28" style:family="paragraph" style:parent-style-name="Standard">
      <style:text-properties fo:font-style="normal" officeooo:rsid="00120a03" officeooo:paragraph-rsid="00109603" style:font-style-asian="normal" style:font-style-complex="normal"/>
    </style:style>
    <style:style style:name="P29" style:family="paragraph" style:parent-style-name="Standard">
      <style:text-properties fo:color="#ff420e" fo:font-style="normal" fo:font-weight="bold" officeooo:rsid="0004d230" officeooo:paragraph-rsid="0013e8b7" style:font-style-asian="normal" style:font-weight-asian="bold" style:font-style-complex="normal" style:font-weight-complex="bold"/>
    </style:style>
    <style:style style:name="P30" style:family="paragraph" style:parent-style-name="Standard">
      <style:text-properties officeooo:rsid="0013e8b7" officeooo:paragraph-rsid="0013e8b7"/>
    </style:style>
    <style:style style:name="P31" style:family="paragraph" style:parent-style-name="Standard" style:list-style-name="L6">
      <style:text-properties officeooo:rsid="0013e8b7" officeooo:paragraph-rsid="0013e8b7"/>
    </style:style>
    <style:style style:name="P32" style:family="paragraph" style:parent-style-name="Standard" style:list-style-name="L6">
      <style:text-properties officeooo:rsid="00142e94" officeooo:paragraph-rsid="00142e94"/>
    </style:style>
    <style:style style:name="P33" style:family="paragraph" style:parent-style-name="Standard">
      <style:text-properties officeooo:rsid="00142e94" officeooo:paragraph-rsid="00142e94"/>
    </style:style>
    <style:style style:name="P34" style:family="paragraph" style:parent-style-name="Standard">
      <style:text-properties officeooo:rsid="001611bb" officeooo:paragraph-rsid="001611bb"/>
    </style:style>
    <style:style style:name="P35" style:family="paragraph" style:parent-style-name="Standard" style:list-style-name="L7">
      <style:text-properties officeooo:rsid="001611bb" officeooo:paragraph-rsid="001611bb"/>
    </style:style>
    <style:style style:name="P36" style:family="paragraph" style:parent-style-name="Standard" style:list-style-name="L7">
      <style:text-properties officeooo:rsid="001611bb" officeooo:paragraph-rsid="001808a3"/>
    </style:style>
    <style:style style:name="P37" style:family="paragraph" style:parent-style-name="Standard">
      <style:text-properties officeooo:rsid="0019c341" officeooo:paragraph-rsid="0019c341"/>
    </style:style>
    <style:style style:name="P38" style:family="paragraph" style:parent-style-name="Standard">
      <style:text-properties officeooo:rsid="0019c341" officeooo:paragraph-rsid="001a5162"/>
    </style:style>
    <style:style style:name="P39" style:family="paragraph" style:parent-style-name="Standard">
      <style:text-properties officeooo:rsid="00109603" officeooo:paragraph-rsid="00109603"/>
    </style:style>
    <style:style style:name="P40" style:family="paragraph" style:parent-style-name="Standard">
      <style:text-properties officeooo:rsid="001a5162" officeooo:paragraph-rsid="001a5162"/>
    </style:style>
    <style:style style:name="T1" style:family="text">
      <style:text-properties fo:font-style="italic" style:font-style-asian="italic" style:font-style-complex="italic"/>
    </style:style>
    <style:style style:name="T2" style:family="text">
      <style:text-properties fo:font-style="italic" officeooo:rsid="000f471e" style:font-style-asian="italic" style:font-style-complex="italic"/>
    </style:style>
    <style:style style:name="T3" style:family="text">
      <style:text-properties fo:font-style="italic" style:text-underline-style="solid" style:text-underline-width="auto" style:text-underline-color="font-color" officeooo:rsid="000f471e" style:font-style-asian="italic" style:font-style-complex="italic"/>
    </style:style>
    <style:style style:name="T4" style:family="text">
      <style:text-properties officeooo:rsid="0005e501"/>
    </style:style>
    <style:style style:name="T5" style:family="text">
      <style:text-properties officeooo:rsid="000c37d3"/>
    </style:style>
    <style:style style:name="T6" style:family="text">
      <style:text-properties officeooo:rsid="000cdafe"/>
    </style:style>
    <style:style style:name="T7" style:family="text">
      <style:text-properties fo:font-style="normal" style:font-style-asian="normal" style:font-style-complex="normal"/>
    </style:style>
    <style:style style:name="T8" style:family="text">
      <style:text-properties fo:font-style="normal" officeooo:rsid="000eb297" style:font-style-asian="normal" style:font-style-complex="normal"/>
    </style:style>
    <style:style style:name="T9" style:family="text">
      <style:text-properties fo:font-style="normal" officeooo:rsid="000f471e" style:font-style-asian="normal" style:font-style-complex="normal"/>
    </style:style>
    <style:style style:name="T10" style:family="text">
      <style:text-properties fo:font-style="normal" officeooo:rsid="0010cc9a" style:font-style-asian="normal" style:font-style-complex="normal"/>
    </style:style>
    <style:style style:name="T11" style:family="text">
      <style:text-properties fo:font-style="normal" officeooo:rsid="00120a03" style:font-style-asian="normal" style:font-style-complex="normal"/>
    </style:style>
    <style:style style:name="T12" style:family="text">
      <style:text-properties officeooo:rsid="0013e8b7"/>
    </style:style>
    <style:style style:name="T13" style:family="text">
      <style:text-properties officeooo:rsid="00142e94"/>
    </style:style>
    <style:style style:name="T14" style:family="text">
      <style:text-properties officeooo:rsid="001808a3"/>
    </style:style>
    <style:style style:name="T15" style:family="text">
      <style:text-properties officeooo:rsid="001a51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w-Level Requirements]</text:p>
      <text:p text:style-name="P1"/>
      <text:p text:style-name="P3">Low-level requirements are critical in the requirements process.</text:p>
      <text:p text:style-name="P3"/>
      <text:p text:style-name="P3">My assuption is that they are atomic because they are nearly always stored as a flat list with each requirement having its own ID. Actually in <text:span text:style-name="T1">Software Requirements 3</text:span>, it says that each (LL) requirement should be independent. <text:span text:style-name="T4">A problem (I feel) with this is that you end up with lots of requirements that are very long and only different to other requirements by a word or two. Examples:</text:span></text:p>
      <text:p text:style-name="P3"/>
      <text:p text:style-name="P13">The user shall be able to allocate liability of a financial event by specifying a ratio. </text:p>
      <text:p text:style-name="P13">The user shall be able to allocate liability of a financial event by specifying percentages. </text:p>
      <text:p text:style-name="P13">The user shall be able to allocate liability of a financial event by specifying prices. </text:p>
      <text:p text:style-name="P13"/>
      <text:p text:style-name="P6">People usually use Excel for this so whatever solution we come up with shouldn't be a worse UX than using Excel. Things we normally do in Excel are:</text:p>
      <text:list xml:id="list2346902573767874692" text:style-name="L1">
        <text:list-item>
          <text:p text:style-name="P15">see a bunch in a list and move the cursor around editing them all.</text:p>
        </text:list-item>
        <text:list-item>
          <text:p text:style-name="P15">filter rows by some sort of criteria</text:p>
        </text:list-item>
        <text:list-item>
          <text:p text:style-name="P15">mass search/replace</text:p>
        </text:list-item>
        <text:list-item>
          <text:p text:style-name="P15">copy, paste, edit</text:p>
        </text:list-item>
        <text:list-item>
          <text:p text:style-name="P16">add/remove columns</text:p>
        </text:list-item>
        <text:list-item>
          <text:p text:style-name="P16">change the type of a requirement (eg. FR to CO)</text:p>
        </text:list-item>
        <text:list-item>
          <text:p text:style-name="P17">incomplete stuff I can colour red</text:p>
        </text:list-item>
      </text:list>
      <text:p text:style-name="P7"/>
      <text:p text:style-name="P8">Excel works quite well actually. The problems that I have using it are:</text:p>
      <text:list xml:id="list8146241986572821377" text:style-name="L2">
        <text:list-item>
          <text:p text:style-name="P19">Have to manually manage req IDs (unique, increment per type)</text:p>
        </text:list-item>
        <text:list-item>
          <text:p text:style-name="P20">Keeping track of last-updated date. (revision would be nice as well)</text:p>
        </text:list-item>
        <text:list-item>
          <text:p text:style-name="P20">Linking to MFs (grouping by?)</text:p>
        </text:list-item>
        <text:list-item>
          <text:p text:style-name="P20">Some reqs arise as a result of two or more features intersecting, this is sort of hard to represent. What I'm doing in one project is having two MF columns, one for strongly-related, one for weakly-related. So far it works well. In some cases I even put a dash for strongly-related and the only feature in weakly-related which was an interesting side-effect.</text:p>
        </text:list-item>
        <text:list-item>
          <text:p text:style-name="P20">No way to reference other requirements although I don't remember doing that much. (wait...ever?)</text:p>
        </text:list-item>
        <text:list-item>
          <text:p text:style-name="P20">Have to restrain myself adding columns bcos too many scrolls half the stuff off the screen.</text:p>
        </text:list-item>
        <text:list-item>
          <text:p text:style-name="P18">Have to store UCs which are already stored elsewhere. Then of course they go out-of-date.</text:p>
        </text:list-item>
        <text:list-item>
          <text:p text:style-name="P21">It's annoying having to type “shall be able to” so often.</text:p>
        </text:list-item>
      </text:list>
      <text:p text:style-name="P9"/>
      <text:p text:style-name="P10">Wow, I think that might be all these is to it. Having them recorded is the important part. <text:span text:style-name="T5">What else?...</text:span></text:p>
      <text:list xml:id="list4453954638446358545" text:style-name="L3">
        <text:list-item>
          <text:p text:style-name="P22">How they are used later is they are filtered and copied into docs (like SRS).</text:p>
        </text:list-item>
        <text:list-item>
          <text:p text:style-name="P22">Eventually each should ideally by approved and signed-off.</text:p>
        </text:list-item>
        <text:list-item>
          <text:p text:style-name="P23">It would be good to scan them all for ambiguous language.</text:p>
        </text:list-item>
        <text:list-item>
          <text:p text:style-name="P23">The same incompletions functonality that applies to use cases should apply here as well.</text:p>
        </text:list-item>
        <text:list-item>
          <text:p text:style-name="P23">I used to imagine having a checklist per requirement that I would tick during review. The attributes in the checklist come from the <text:span text:style-name="T1">SR3</text:span> book and they are: <text:span text:style-name="T6">complete, correct, feasible, necessary, prioritised, unambiguous, verifiable.</text:span></text:p>
        </text:list-item>
      </text:list>
      <text:p text:style-name="P11"/>
      <text:p text:style-name="P12">Looking at examples in Appendix C of <text:span text:style-name="T1">SR3</text:span><text:span text:style-name="T7">, I note the following:</text:span></text:p>
      <text:list xml:id="list7637064110418893810" text:style-name="L4">
        <text:list-item>
          <text:p text:style-name="P24"><text:span text:style-name="T7">Other LL requirements are indeed referenced regularly, </text:span><text:span text:style-name="T9">o</text:span><text:span text:style-name="T7">ften Business Rules. </text:span><text:span text:style-name="T9">An example of an </text:span><text:soft-page-break/><text:span text:style-name="T9">FR reference is “</text:span><text:span text:style-name="T2">If </text:span><text:span text:style-name="T3">[Order.Done]</text:span><text:span text:style-name="T2"> fails, the COS shall roll back ...</text:span><text:span text:style-name="T9">”</text:span></text:p>
        </text:list-item>
        <text:list-item>
          <text:p text:style-name="P24"><text:span text:style-name="T7">Functional Requirements </text:span><text:span text:style-name="T1">do not</text:span><text:span text:style-name="T7"> use a FR-</text:span><text:span text:style-name="T1">n</text:span><text:span text:style-name="T7"> ID system! Nor are they flat. They are instead heirarchical and named. Example:</text:span></text:p>
        </text:list-item>
      </text:list>
      <text:p text:style-name="P5"><text:tab/><text:tab/>Order.Menu:<text:tab/><text:tab/>Viewing a menu</text:p>
      <text:p text:style-name="P4"><text:tab/><text:tab/><text:tab/>.Date:<text:tab/><text:tab/>The COS shall display a menu for the date that the Patron specified.</text:p>
      <text:p text:style-name="P4"><text:tab/><text:tab/><text:tab/>.Available:<text:tab/>The menu for the specified date shall display only those food items ...</text:p>
      <text:list xml:id="list3534623380843814146" text:style-name="L5">
        <text:list-item>
          <text:p text:style-name="P25"><text:span text:style-name="T8">I</text:span><text:span text:style-name="T7">'m seeing some 3-letter requirement-type IDs. (AVL for Availability Requirement)</text:span></text:p>
        </text:list-item>
        <text:list-item>
          <text:p text:style-name="P26">This guy combines multiple things into the same requirement. Example:</text:p>
        </text:list-item>
      </text:list>
      <text:p text:style-name="P14">The COS shall display the remaining available delivery times for the meal date. The COS shall alow the Patron to require one of the delivery times shown, to change the order to be picked up in the cafeteria, or to cancel the order.</text:p>
      <text:p text:style-name="P27"/>
      <text:p text:style-name="P39"><text:span text:style-name="T7">The difference between FR-</text:span><text:span text:style-name="T1">n</text:span><text:span text:style-name="T7"> and text-tree-style functonal requirements is disconcerting but I wonder if there's a way I could merge the two instead of anyone having to make the distinction up-front (and stick to it). </text:span><text:span text:style-name="T10">In the text-based scenario stable IDs would be required under-the-covers; in the numeric scenario the other style might be achieved by groupings </text:span><text:span text:style-name="T11">and a mechanism to make some FRs children of others.</text:span></text:p>
      <text:p text:style-name="P39"><text:span text:style-name="T11"/></text:p>
      <text:p text:style-name="P40"><text:span text:style-name="T11">R</text:span><text:span text:style-name="T7">equirement-types are arbitrary and need to be customisable. I need to be able to add &amp; remove types, set type mnemonics, modify fields (columns) per type.</text:span></text:p>
      <text:p text:style-name="P28"/>
      <text:p text:style-name="P28"/>
      <text:p text:style-name="P29">[<text:span text:style-name="T12">High</text:span>-Level Requirements]</text:p>
      <text:p text:style-name="Standard"/>
      <text:p text:style-name="P30">Let's see what types of high-level requirements there are.</text:p>
      <text:list xml:id="list3535310609141783171" text:style-name="L6">
        <text:list-item>
          <text:p text:style-name="P31">Business Objectives <text:span text:style-name="T13">&amp; </text:span>Success Criteria</text:p>
        </text:list-item>
        <text:list-item>
          <text:p text:style-name="P31">Business Risks</text:p>
        </text:list-item>
        <text:list-item>
          <text:p text:style-name="P32">Major Features</text:p>
        </text:list-item>
        <text:list-item>
          <text:p text:style-name="P32">Exclusions &amp; Limitations</text:p>
        </text:list-item>
        <text:list-item>
          <text:p text:style-name="P32">Assumptions &amp; Dependencies</text:p>
        </text:list-item>
        <text:list-item>
          <text:p text:style-name="P32">Operating Environment</text:p>
        </text:list-item>
        <text:list-item>
          <text:p text:style-name="P32">Quality Attributes</text:p>
        </text:list-item>
      </text:list>
      <text:p text:style-name="P33"/>
      <text:p text:style-name="P34">So what are the differences between HL &amp; LL requirements? I'm not really sure anymore. Maybe none... Some of them (SC, EX, LI, AS, DE) might be a bit ambiguous. How? Um, let's see...</text:p>
      <text:list xml:id="list3388804252360624703" text:style-name="L7">
        <text:list-item>
          <text:p text:style-name="P35">SC: project/business vs functional/implementation</text:p>
        </text:list-item>
        <text:list-item>
          <text:p text:style-name="P36">EX: <text:span text:style-name="T14">Project scope vs </text:span>functional/implementation <text:span text:style-name="T14">(?)</text:span></text:p>
        </text:list-item>
        <text:list-item>
          <text:p text:style-name="P36">LI: <text:span text:style-name="T14">Project scope vs </text:span>functional/implementation <text:span text:style-name="T14">(?)</text:span></text:p>
        </text:list-item>
        <text:list-item>
          <text:p text:style-name="P35">AS: “</text:p>
        </text:list-item>
        <text:list-item>
          <text:p text:style-name="P35">DE: “</text:p>
        </text:list-item>
      </text:list>
      <text:p text:style-name="P34"/>
      <text:p text:style-name="P37">Ok, it seems that SC is the only one that would matter and even then probably not much. Scope could be distinguished by grouping or if one really wanted, by creating different requirement-types.</text:p>
      <text:p text:style-name="P37"/>
      <text:p text:style-name="P38">Why are HL &amp; LL distinguished then? I guess HL comes down from the Gods at the beginning of a project and isn't edited anywhere near as much as LL reqs are. In fact, I'd often not want to see HL reqs when I'm working on LL reqs. <text:span text:style-name="T15">Vica-versa too; when I'm working on business/scope reqs and making project-wide considerations I don't want to see the fine-grained solution requirements.</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7T12:52:16.733393364</meta:creation-date>
    <dc:date>2014-02-17T19:38:21.495358883</dc:date>
    <meta:editing-duration>PT2M34S</meta:editing-duration>
    <meta:editing-cycles>2</meta:editing-cycles>
    <meta:generator>LibreOffice/4.1.5.3$Linux_X86_64 LibreOffice_project/410m0$Build-3</meta:generator>
    <meta:document-statistic meta:table-count="0" meta:image-count="0" meta:object-count="0" meta:page-count="2" meta:paragraph-count="57" meta:word-count="925" meta:character-count="5346" meta:non-whitespace-character-count="4501"/>
  </office:meta>
</office:document-meta>
</file>