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6.793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8"/>
        <table:table-column table:style-name="co5" table:default-cell-style-name="ce11"/>
        <table:table-column table:style-name="co2" table:default-cell-style-name="ce3"/>
        <table:table-column table:style-name="co6" table:default-cell-style-name="Default"/>
        <table:table-column table:style-name="co7" table:number-columns-repeated="2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Analysed</text:p>
          </table:table-cell>
          <table:table-cell table:style-name="ce10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7" office:value-type="string" calcext:value-type="string">
            <text:p>Prelim</text:p>
          </table:table-cell>
          <table:table-cell table:style-name="ce7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style-name="ce9"/>
          <table:table-cell/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008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010</text:p>
          </table:table-cell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11</text:p>
          </table:table-cell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11</text:p>
          </table:table-cell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012</text:p>
          </table:table-cell>
          <table:table-cell table:style-name="ce4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012</text:p>
          </table:table-cell>
          <table:table-cell table:style-name="ce4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3:10:57.005150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6-27T13:11:50.853124950</dc:date>
    <meta:editing-duration>PT5H5M48S</meta:editing-duration>
    <meta:editing-cycles>21</meta:editing-cycles>
    <meta:generator>LibreOffice/4.2.5.2$Linux_x86 LibreOffice_project/420m0$Build-2</meta:generator>
    <meta:document-statistic meta:table-count="1" meta:cell-count="163" meta:object-count="0"/>
  </office:meta>
</office:document-meta>
</file>