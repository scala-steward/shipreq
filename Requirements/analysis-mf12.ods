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15.787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17cm"/>
    </style:style>
    <style:style style:name="co7" style:family="table-column">
      <style:table-column-properties fo:break-before="auto" style:column-width="7.805cm"/>
    </style:style>
    <style:style style:name="co8" style:family="table-column">
      <style:table-column-properties fo:break-before="auto" style:column-width="4.28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2.141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font-name="Tino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6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vertical-align="top"/>
      <style:text-properties fo:color="#ff0000" fo:font-size="10pt" style:font-size-asian="10pt" style:font-size-complex="10pt"/>
    </style:style>
    <style:style style:name="ce9" style:family="table-cell" style:parent-style-name="Default">
      <style:table-cell-properties fo:wrap-option="wrap" style:vertical-align="top"/>
      <style:text-properties fo:color="#800000" fo:font-size="10pt" style:font-size-asian="10pt" style:font-size-complex="10pt"/>
    </style:style>
    <style:style style:name="ce10" style:family="table-cell" style:parent-style-name="Default" style:data-style-name="N3">
      <style:table-cell-properties style:vertical-align="top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06pt solid #000000" style:vertical-align="top"/>
    </style:style>
    <style:style style:name="ce1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b3b3b3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="0.06pt solid #000000" style:vertical-align="top"/>
    </style:style>
    <style:style style:name="ce17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table table:name="interview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[Low-Level Requirements]</text:p>
          </table:table-cell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ow-level requirements are critical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ssumption</text:p>
          </table:table-cell>
          <table:table-cell table:style-name="ce7" office:value-type="string" calcext:value-type="string">
            <text:p>Atomic</text:p>
          </table:table-cell>
          <table:table-cell office:value-type="string" calcext:value-type="string">
            <text:p>Disproven below.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usiness Req</text:p>
          </table:table-cell>
          <table:table-cell table:style-name="ce7" office:value-type="string" calcext:value-type="string">
            <text:p>UX mustn't be worse with ShipReq than Excel.</text:p>
          </table:table-cell>
          <table:table-cell table:style-name="ce8" office:value-type="string" calcext:value-type="string">
            <text:p>Determine how measure this.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style-name="ce7" office:value-type="string" calcext:value-type="string">
            <text:p>LL reqs should have the same incompletions functionality as UCs.</text:p>
          </table:table-cell>
          <table:table-cell table:style-name="ce8" office:value-type="string" calcext:value-type="string">
            <text:p>Make specific &amp; test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style-name="ce7" office:value-type="string" calcext:value-type="string">
            <text:p>Must be able to add / remove / modify requirement types.</text:p>
          </table:table-cell>
          <table:table-cell table:style-name="ce8" office:value-type="string" calcext:value-type="string">
            <text:p>More detail, maybe UC?</text:p>
          </table:table-cell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You end up with lots of requirements that are very long and only different to other requirements by a word or two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managing req IDs (unique, increment per type). Error-prone, distracting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managing last-updated date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linking LL reqs to MF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Representing the driving MFs of a LL req is a difficult problem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No way to reference other requirements without manually managed plain text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Have to restrain myself adding columns bcos too many causes horizontal scrolling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Storing UC headers in the LL req flat list is duplication and error-pron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Annoying to type “shall be able to” so often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s can be driven by more than just one MF.</text:p>
          </table:table-cell>
          <table:table-cell table:number-columns-repeated="1021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LL reqs can have a weakly-related MF without a strongly-related MF.</text:p>
          </table:table-cell>
          <table:table-cell table:number-columns-repeated="1021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uirement type mnemonics exist with 3 letters.</text:p>
          </table:table-cell>
          <table:table-cell table:style-name="ce9" office:value-type="string" calcext:value-type="string">
            <text:p>Limit is arbitrary really. No real tech reason.</text:p>
            <text:p>I'd guess 94% are 2-letters, 6% 3. Let's say 5 then.</text:p>
          </table:table-cell>
          <table:table-cell table:style-name="ce10" table:formula="of:=26^3" office:value-type="float" office:value="17576" calcext:value-type="float">
            <text:p>17,576</text:p>
          </table:table-cell>
          <table:table-cell table:style-name="ce10" table:formula="of:=26^4" office:value-type="float" office:value="456976" calcext:value-type="float">
            <text:p>456,976</text:p>
          </table:table-cell>
          <table:table-cell table:style-name="ce10" table:formula="of:=26^5" office:value-type="float" office:value="11881376" calcext:value-type="float">
            <text:p>11,881,376</text:p>
          </table:table-cell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LL reqs are not always atomic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uirement types are arbitrary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Different requirement types may need different columns (attributes)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Often exist as flat list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See multiple reqs simultaneously as row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Move cursor around rows editing different requirements in close succession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Filter visible reqs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Mass search/replace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reate a new req by copying an existing one, then editing it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Add/remove columns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hange the requirement typ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olour incomplete requirements red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-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LL Reqs normally don't have a revision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BA often copies a subset of LL reqs into a targetted doc. (SRS)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FRs can be heirarchical/nested instead of flat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FRs can have semantic, text-based IDs instead of FR-n styl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Semantic FRs IDs in a heirarchy extend their parents IDs. Eg. A.B.C is a child of A.B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It would be nice to have a revision for LL reqs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LL reqs should be approved and signed-off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Ability to have LL reqs monitored for ambiguous language.</text:p>
          </table:table-cell>
          <table:table-cell table:number-columns-repeated="1021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Having a checklist per LL req comprised of: complete, correct, feasible, necessary, prioritised, unambiguous, verifiabl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Not having to choose between semantic and numeric req type id schemes may be ideal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Semantic req-type ids may be producable using groupings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Allowing nesting of reqs using numeric req-type ids may be desirabl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numeric portion of a req id is usually 2 digits min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-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rt visible reqs by user-specified order.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X Comp" table:style-name="ta1">
        <table:table-column table:style-name="co6" table:default-cell-style-name="ce4"/>
        <table:table-column table:style-name="co7" table:default-cell-style-name="ce7"/>
        <table:table-column table:style-name="co5" table:number-columns-repeated="3" table:default-cell-style-name="ce4"/>
        <table:table-column table:style-name="co8" table:default-cell-style-name="ce4"/>
        <table:table-column table:style-name="co5" table:number-columns-repeated="1018" table:default-cell-style-name="ce4"/>
        <table:table-row table:style-name="ro4">
          <table:table-cell table:style-name="ce11" office:value-type="string" calcext:value-type="string">
            <text:p>RWS TASK</text:p>
          </table:table-cell>
          <table:table-cell table:style-name="ce14" office:value-type="string" calcext:value-type="string">
            <text:p>WHY?</text:p>
          </table:table-cell>
          <table:table-cell table:style-name="ce11" office:value-type="string" calcext:value-type="string">
            <text:p>PEN</text:p>
          </table:table-cell>
          <table:table-cell table:style-name="ce11" office:value-type="string" calcext:value-type="string">
            <text:p>FREQ</text:p>
            <text:p>(5=Always)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CONCLUSION</text:p>
          </table:table-cell>
          <table:table-cell table:style-name="ce17" table:number-columns-repeated="1018"/>
        </table:table-row>
        <table:table-row table:style-name="ro6">
          <table:table-cell table:style-name="ce12" office:value-type="string" calcext:value-type="string">
            <text:p>See multiple reqs simultaneously as rows.</text:p>
          </table:table-cell>
          <table:table-cell table:style-name="ce12" office:value-type="string" calcext:value-type="string">
            <text:p>Reqs are all related. When writing a new req I need to see what else exists to keep the language consistent, to make sure I don't rewrite something that exists.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table:formula="of:=[.D2]*[.C2]" office:value-type="float" office:value="25" calcext:value-type="float">
            <text:p>25</text:p>
          </table:table-cell>
          <table:table-cell table:style-name="ce16" office:value-type="string" calcext:value-type="string">
            <text:p>Req comparable UX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Move cursor around rows editing different requirements in close succession.</text:p>
          </table:table-cell>
          <table:table-cell table:style-name="ce12" office:value-type="string" calcext:value-type="string">
            <text:p>Reqs are often very closely related. The BA's mind is often on a few at once and the BA will subsequently want to edit a few at once sometimes.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3]*[.C3]" office:value-type="float" office:value="20" calcext:value-type="float">
            <text:p>20</text:p>
          </table:table-cell>
          <table:table-cell table:style-name="ce16" office:value-type="string" calcext:value-type="string">
            <text:p>Req comparable UX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Filter visible reqs.</text:p>
          </table:table-cell>
          <table:table-cell table:style-name="ce12" office:value-type="string" calcext:value-type="string">
            <text:p>Too much info is overwhelming. Nearly always only working on a subset.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formula="of:=[.D4]*[.C4]" office:value-type="float" office:value="16" calcext:value-type="float">
            <text:p>16</text:p>
          </table:table-cell>
          <table:table-cell table:style-name="ce16" office:value-type="string" calcext:value-type="string">
            <text:p>Req comparable UX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Search</text:p>
          </table:table-cell>
          <table:table-cell table:style-name="ce12" office:value-type="string" calcext:value-type="string">
            <text:p>Can't find what I have in mind. Too much effort/time to read everything looking for it.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D5]*[.C5]" office:value-type="float" office:value="3" calcext:value-type="float">
            <text:p>3</text:p>
          </table:table-cell>
          <table:table-cell table:style-name="ce16" office:value-type="string" calcext:value-type="string">
            <text:p>Defer to dedicated MF</text:p>
          </table:table-cell>
          <table:table-cell table:number-columns-repeated="1018"/>
        </table:table-row>
        <table:table-row table:style-name="ro8">
          <table:table-cell table:style-name="ce12" office:value-type="string" calcext:value-type="string">
            <text:p>Mass replace</text:p>
          </table:table-cell>
          <table:table-cell table:style-name="ce12" office:value-type="string" calcext:value-type="string">
            <text:p>Sometimes something like an actor will change name, too much effort &amp; time to replace manually, not to mention error-prone.</text:p>
            <text:p>Sometimes I will want to replace in order to make language consistent across reqs.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D6]*[.C6]" office:value-type="float" office:value="4" calcext:value-type="float">
            <text:p>4</text:p>
          </table:table-cell>
          <table:table-cell table:style-name="ce16" office:value-type="string" calcext:value-type="string">
            <text:p>Defer to dedicated MF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reate a new req by copying an existing one, then editing it.</text:p>
          </table:table-cell>
          <table:table-cell table:style-name="ce12" office:value-type="string" calcext:value-type="string">
            <text:p>Reqs often have similar text and attributes.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7]*[.C7]" office:value-type="float" office:value="12" calcext:value-type="float">
            <text:p>12</text:p>
          </table:table-cell>
          <table:table-cell table:style-name="ce16" office:value-type="string" calcext:value-type="string">
            <text:p>Req comparable UX</text:p>
          </table:table-cell>
          <table:table-cell table:number-columns-repeated="1018"/>
        </table:table-row>
        <table:table-row table:style-name="ro9">
          <table:table-cell table:style-name="ce12" office:value-type="string" calcext:value-type="string">
            <text:p>Change the requirement type.</text:p>
          </table:table-cell>
          <table:table-cell table:style-name="ce12" office:value-type="string" calcext:value-type="string">
            <text:p>Correct a mistake.</text:p>
            <text:p>Rewording leads to a type change.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8]*[.C8]" office:value-type="float" office:value="6" calcext:value-type="float">
            <text:p>6</text:p>
          </table:table-cell>
          <table:table-cell table:style-name="ce12" office:value-type="string" calcext:value-type="string">
            <text:p>Exclude from UX comp; just do what's best to solve problem.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Colour incomplete requirements red.</text:p>
          </table:table-cell>
          <table:table-cell table:style-name="ce12" office:value-type="string" calcext:value-type="string">
            <text:p>There are so many requirements, many are complete, many are not. I need a way to reduce scope to the incomplete ones so I can complete them.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formula="of:=[.D9]*[.C9]" office:value-type="float" office:value="9" calcext:value-type="float">
            <text:p>9</text:p>
          </table:table-cell>
          <table:table-cell table:style-name="ce12" office:value-type="string" calcext:value-type="string">
            <text:p>Exclude from UX comp; just do what's best to solve problem.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Sort visible reqs by user-specified order.</text:p>
          </table:table-cell>
          <table:table-cell table:style-name="ce12" office:value-type="string" calcext:value-type="string">
            <text:p>Find requirements with similar prefixes.</text:p>
            <text:p>See in groups of priority.</text:p>
            <text:p/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0]*[.C10]" office:value-type="float" office:value="6" calcext:value-type="float">
            <text:p>6</text:p>
          </table:table-cell>
          <table:table-cell table:style-name="ce15" office:value-type="string" calcext:value-type="string">
            <text:p>??????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style-name="ce7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interview.A3:interview.AMJ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4:57:26.978581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0:52:36.945258386</meta:creation-date>
    <dc:date>2014-02-24T15:05:44.347522784</dc:date>
    <meta:editing-duration>PT1H15M9S</meta:editing-duration>
    <meta:editing-cycles>8</meta:editing-cycles>
    <meta:generator>LibreOffice/4.1.5.3$Linux_X86_64 LibreOffice_project/410m0$Build-3</meta:generator>
    <meta:document-statistic meta:table-count="2" meta:cell-count="202" meta:object-count="0"/>
  </office:meta>
</office:document-meta>
</file>