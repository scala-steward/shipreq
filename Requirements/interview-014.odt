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1a3039" officeooo:paragraph-rsid="001a3039"/>
    </style:style>
    <style:style style:name="P2" style:family="paragraph" style:parent-style-name="Standard">
      <style:text-properties officeooo:paragraph-rsid="001a3039"/>
    </style:style>
    <style:style style:name="P3" style:family="paragraph" style:parent-style-name="Standard">
      <style:text-properties officeooo:rsid="001c2655" officeooo:paragraph-rsid="001c2655"/>
    </style:style>
    <style:style style:name="P4" style:family="paragraph" style:parent-style-name="Standard" style:list-style-name="L1">
      <style:text-properties officeooo:rsid="001c2655" officeooo:paragraph-rsid="001c2655"/>
    </style:style>
    <style:style style:name="P5" style:family="paragraph" style:parent-style-name="Standard">
      <style:text-properties officeooo:paragraph-rsid="001c2655"/>
    </style:style>
    <style:style style:name="P6" style:family="paragraph" style:parent-style-name="Standard">
      <style:text-properties officeooo:paragraph-rsid="001f05f1"/>
    </style:style>
    <style:style style:name="P7" style:family="paragraph" style:parent-style-name="Standard" style:list-style-name="L2">
      <style:text-properties officeooo:paragraph-rsid="001f05f1"/>
    </style:style>
    <style:style style:name="P8" style:family="paragraph" style:parent-style-name="Standard">
      <style:text-properties officeooo:rsid="0020d8d4" officeooo:paragraph-rsid="0020d8d4"/>
    </style:style>
    <style:style style:name="P9" style:family="paragraph" style:parent-style-name="Standard" style:list-style-name="L3">
      <style:text-properties officeooo:rsid="0020d8d4" officeooo:paragraph-rsid="0020d8d4"/>
    </style:style>
    <style:style style:name="P10" style:family="paragraph" style:parent-style-name="Standard" style:list-style-name="L4">
      <style:text-properties officeooo:rsid="0020d8d4" officeooo:paragraph-rsid="0020d8d4"/>
    </style:style>
    <style:style style:name="P11" style:family="paragraph" style:parent-style-name="Standard">
      <style:text-properties officeooo:paragraph-rsid="0020d8d4"/>
    </style:style>
    <style:style style:name="P12" style:family="paragraph" style:parent-style-name="Standard" style:list-style-name="L4">
      <style:text-properties officeooo:paragraph-rsid="0020d8d4"/>
    </style:style>
    <style:style style:name="P13" style:family="paragraph" style:parent-style-name="Standard" style:list-style-name="L4">
      <style:text-properties officeooo:paragraph-rsid="002148b6"/>
    </style:style>
    <style:style style:name="P14" style:family="paragraph" style:parent-style-name="Standard">
      <style:text-properties officeooo:paragraph-rsid="002148b6"/>
    </style:style>
    <style:style style:name="P15" style:family="paragraph" style:parent-style-name="Standard">
      <style:text-properties officeooo:paragraph-rsid="00231bba"/>
    </style:style>
    <style:style style:name="P16" style:family="paragraph" style:parent-style-name="Standard">
      <style:text-properties officeooo:paragraph-rsid="0025eb77"/>
    </style:style>
    <style:style style:name="P17" style:family="paragraph" style:parent-style-name="Standard">
      <style:text-properties fo:font-style="normal" officeooo:rsid="0025eb77" officeooo:paragraph-rsid="0025eb77" style:font-style-asian="normal" style:font-style-complex="normal"/>
    </style:style>
    <style:style style:name="P18" style:family="paragraph" style:parent-style-name="Standard">
      <style:text-properties fo:font-style="normal" officeooo:rsid="0026b9f6" officeooo:paragraph-rsid="0026b9f6" style:font-style-asian="normal" style:font-style-complex="normal"/>
    </style:style>
    <style:style style:name="P19" style:family="paragraph" style:parent-style-name="Standard">
      <style:text-properties officeooo:paragraph-rsid="0026b9f6"/>
    </style:style>
    <style:style style:name="P20" style:family="paragraph" style:parent-style-name="Standard">
      <style:text-properties officeooo:paragraph-rsid="00282b6f"/>
    </style:style>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2148b6"/>
    </style:style>
    <style:style style:name="T1" style:family="text">
      <style:text-properties officeooo:rsid="001a3039"/>
    </style:style>
    <style:style style:name="T2" style:family="text">
      <style:text-properties officeooo:rsid="001c2655"/>
    </style:style>
    <style:style style:name="T3" style:family="text">
      <style:text-properties officeooo:rsid="001f05f1"/>
    </style:style>
    <style:style style:name="T4" style:family="text">
      <style:text-properties officeooo:rsid="0020d8d4"/>
    </style:style>
    <style:style style:name="T5" style:family="text">
      <style:text-properties fo:font-style="italic" officeooo:rsid="0020d8d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0d8d4" style:font-style-asian="normal" style:font-style-complex="normal"/>
    </style:style>
    <style:style style:name="T8" style:family="text">
      <style:text-properties fo:font-style="normal" officeooo:rsid="002148b6" style:font-style-asian="normal" style:font-style-complex="normal"/>
    </style:style>
    <style:style style:name="T9" style:family="text">
      <style:text-properties fo:font-style="normal" officeooo:rsid="00239482" style:font-style-asian="normal" style:font-style-complex="normal"/>
    </style:style>
    <style:style style:name="T10" style:family="text">
      <style:text-properties fo:font-style="normal" officeooo:rsid="0024eeb5" style:font-style-asian="normal" style:font-style-complex="normal"/>
    </style:style>
    <style:style style:name="T11" style:family="text">
      <style:text-properties fo:font-style="normal" officeooo:rsid="00231bba" style:font-style-asian="normal" style:font-style-complex="normal"/>
    </style:style>
    <style:style style:name="T12" style:family="text">
      <style:text-properties fo:font-style="normal" officeooo:rsid="0025eb77" style:font-style-asian="normal" style:font-style-complex="normal"/>
    </style:style>
    <style:style style:name="T13" style:family="text">
      <style:text-properties fo:font-style="normal" officeooo:rsid="0026b9f6" style:font-style-asian="normal" style:font-style-complex="normal"/>
    </style:style>
    <style:style style:name="T14" style:family="text">
      <style:text-properties fo:font-style="normal" officeooo:rsid="00282b6f" style:font-style-asian="normal" style:font-style-complex="normal"/>
    </style:style>
    <style:style style:name="T15" style:family="text">
      <style:text-properties officeooo:rsid="0026b9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ipReq as it stands is currently only useful for 1-person projects. Two people can't work together unless they share the same login, which is terrible for everyone including me. It's critical that I add multi user support.</text:p>
      <text:p text:style-name="P1"/>
      <text:p text:style-name="P2"><text:span text:style-name="T1">I need a team to be able to use ShipReq collaboratively. It can be really simple at first: just allow the project owner to add/remove users to a collaborators list. Once on the list, a collaborator will see the project in their projects list and be able to work on it just like the owner. Simple.</text:span></text:p>
      <text:p text:style-name="P2"/>
      <text:p text:style-name="P2"><text:span text:style-name="T1">Another expansion of the simplicity would be to allow the transference of ownership. I don't know if that means the new owner would need to accept ownership first but whatever, it's more about enabling capability at this point to get the business running. Plenty of time for goldplating and improvement once I've got real users, I mean features that won't be used until I've got a good bunch of users needn't be built now. Btw, Whatsapp has a simple model wrt to group chats. One or more admins, transfer as much as you like. Leave and ownership transfers to a random collaborator. Simple &amp; easy.</text:span></text:p>
      <text:p text:style-name="P2"/>
      <text:p text:style-name="P5"><text:span text:style-name="T2">So once multiple users can work on a project together it then introduces a bunch of new requirements. Maybe these should be separate but still, here are the thoughts:</text:span></text:p>
      <text:p text:style-name="P5"/>
      <text:p text:style-name="P3">If I'm working on a project with someone, I'm going to want to know what changes they're making. Potential solutions are:</text:p>
      <text:list xml:id="list2502568682" text:style-name="L1">
        <text:list-item>
          <text:p text:style-name="P4">audit trail</text:p>
        </text:list-item>
        <text:list-item>
          <text:p text:style-name="P4">diff of project between T₁ (eg. when I last logged in), and T₂ (eg. now) – I mean actual diff, not list of events</text:p>
        </text:list-item>
      </text:list>
      <text:p text:style-name="P3"/>
      <text:p text:style-name="P5"><text:span text:style-name="T2">Also want to communicate with other collaborators. Potential ideas: inline chat, tag them in places to leave them inline msgs. Maybe have columns (fields) with user(s) as values to represent assignees; in which case will probably want to have a many-to-many acyclic tree like tags so that user groups can exist and fields can be constrained by upper bounds (eg. assigned testers vs devs vs clients). Whatever the combination of solutions, when I login I want to be able to quickly see &lt;whatever&gt;: if I have any unread chat msgs, if I've been recently tagged, where and why I'm still tagged, what shit I've been assigned, etc. I want it to be quick and easy. If I have to go to ReqTable and write my own filters then that's not quick and easy.</text:span></text:p>
      <text:p text:style-name="P5"/>
      <text:p text:style-name="P6"><text:span text:style-name="T3">Will definitely need new filter capabilities. Example:{createdBy,updatedBy,containsRefTo} {me,@blah}</text:span></text:p>
      <text:p text:style-name="P6"/>
      <text:p text:style-name="P6"><text:span text:style-name="T3">An interesting side-effect of multiusernessness is that it introduces the consideration of personal vs global data/config. The one example is saved views.</text:span></text:p>
      <text:list xml:id="list3683176005" text:style-name="L2">
        <text:list-item>
          <text:p text:style-name="P7"><text:span text:style-name="T3">Users should be able to create their own saved views</text:span></text:p>
        </text:list-item>
        <text:list-item>
          <text:p text:style-name="P7"><text:span text:style-name="T3">Users shouldn't have to see everyone else's</text:span></text:p>
        </text:list-item>
        <text:list-item>
          <text:p text:style-name="P7"><text:span text:style-name="T3">Users (eg admin) should be able to create saved views for the team</text:span></text:p>
        </text:list-item>
      </text:list>
      <text:p text:style-name="P6"><text:span text:style-name="T3">What else is there apart from saved views?</text:span></text:p>
      <text:p text:style-name="P6"/>
      <text:p text:style-name="P11"><text:span text:style-name="T4">Most of the thought above considers multiple </text:span><text:span text:style-name="T5">authors</text:span><text:span text:style-name="T7">. Not all users are req authors though. Other user classes that jump out are:</text:span></text:p>
      <text:list xml:id="list1401494453" text:style-name="L3">
        <text:list-item>
          <text:p text:style-name="P9"><text:span text:style-name="T6">devs</text:span></text:p>
        </text:list-item>
        <text:list-item>
          <text:p text:style-name="P9"><text:span text:style-name="T6">testers</text:span></text:p>
        </text:list-item>
        <text:list-item>
          <text:p text:style-name="P9"><text:span text:style-name="T6">clients / product owner</text:span></text:p>
        </text:list-item>
      </text:list>
      <text:p text:style-name="P8"><text:span text:style-name="T6"/></text:p>
      <text:p text:style-name="P11"><text:soft-page-break/><text:span text:style-name="T7">Full detail here is probably going to far; there's no need to plan the entire roadmap right now. Some quick high-level thoughts now, detail later...</text:span></text:p>
      <text:list xml:id="list74039534" text:style-name="L4">
        <text:list-item>
          <text:p text:style-name="P10"><text:span text:style-name="T6">devs &amp; testers – want to know what's assigned to them, see what version, and modify the status &amp; assignee</text:span></text:p>
        </text:list-item>
        <text:list-item>
          <text:p text:style-name="P12"><text:span text:style-name="T7">devs, maybe testers, maybe clients – probably want notifications when certain reqs change</text:span></text:p>
        </text:list-item>
        <text:list-item>
          <text:p text:style-name="P12"><text:span text:style-name="T7">clients – want to know the overall/high-level status, eg. how is MF-1 progressing, how much is done, pending, what releases will it go in to</text:span></text:p>
        </text:list-item>
        <text:list-item>
          <text:p text:style-name="P13"><text:span text:style-name="T7">e</text:span><text:span text:style-name="T8">veryone – for scope X, who made certain changes (i.e. if a req changes and even everyone gets notifications, great, but also need to know who made changes so they can talk to them if problem)</text:span></text:p>
        </text:list-item>
        <text:list-item>
          <text:p text:style-name="P13"><text:span text:style-name="T7">e</text:span><text:span text:style-name="T8">veryone – suggest/demand changes but not make it themselves</text:span></text:p>
        </text:list-item>
        <text:list-item>
          <text:p text:style-name="P13"><text:span text:style-name="T7">e</text:span><text:span text:style-name="T8">veryone – ask questions about a req?</text:span></text:p>
        </text:list-item>
      </text:list>
      <text:p text:style-name="P21"><text:span text:style-name="T8"/></text:p>
      <text:p text:style-name="P14"><text:span text:style-name="T8"/></text:p>
      <text:p text:style-name="P15"><text:span text:style-name="T8">N</text:span><text:span text:style-name="T11">ow let's talk about audit trails. </text:span><text:span text:style-name="T9">Users need to be able to see them, they'll be long so also filter and scroll around. </text:span><text:span text:style-name="T10">Users need to be able to view the entire project audit trail, but it's also important the each req display the relevant events in ReqDetail. What I mean by that is if you open up a req in ReqDetail, down the bottom there should be a read-only field that shows a subset of the global audit trail that are events that have impacted the selected req (like the history tab in jira). It might be annoying to always display the list because it could be very long and distracting, maybe the field could have a little button saying “show” or something?</text:span></text:p>
      <text:p text:style-name="P15"><text:span text:style-name="T10"/></text:p>
      <text:p text:style-name="P16"><text:span text:style-name="T10">I</text:span><text:span text:style-name="T12">t also might be a common case to want to see all changes made by other users since the current user's last change.</text:span></text:p>
      <text:p text:style-name="P16"><text:span text:style-name="T12"/></text:p>
      <text:p text:style-name="P17">So looking at a big list is going to be useful sometimes but other times it's going to be useless because there's too much repetitive (and intermediate) information. In such cases a user needs the ability to see a diff between revisions. The user should be able to choose the <text:span text:style-name="T15">start/end revs.</text:span></text:p>
      <text:p text:style-name="P17"/>
      <text:p text:style-name="P19"><text:span text:style-name="T13">Also, once we have read-only mode available, user should be able to view the project at an old revision.</text:span></text:p>
      <text:p text:style-name="P19"><text:span text:style-name="T13"/></text:p>
      <text:p text:style-name="P18">Baselining is a common thing is requirements. Our audit trail means we're a bit like git for requirements. We can tag revisions and see changes since, etc. I'm not sure if users should be allowed to modify revision tags, probably – ShipReq isn't a preventative product. Probably there should be permissioning at the project level and maybe even the tag level to declare who can and can't modify tags once they're created. Notifications are out of scope right now but maybe in future all relevant parties will be notified when a tag is modified. In fact, tagging should be part of the audit trail (unlike Git).</text:p>
      <text:p text:style-name="P18"/>
      <text:p text:style-name="P20"><text:span text:style-name="T14">Treating ShipReq like git leads to an obvious question: do we allow branching? DEFINATELY not in the medium term, I've got no fucking customers. But in future... maybe? An idea is that requirement existence (i.e. IDs) exist globally, but are included in some branches. This means that merging a branch doesn't result in multiple reqs fighting for the same ids, and it also captures an interesting aspect of the reality in that when you focus on a branch, the other stuff still exists in reality, it's just not part of the branch you're looking at. But merge conflicts would be inevitable. Don't want to have to think about that right now.</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urce Han Serif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ource Han Serif C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30T08:27:09.714525505</meta:creation-date>
    <dc:date>2020-01-30T13:57:42.277693629</dc:date>
    <meta:editing-duration>PT41S</meta:editing-duration>
    <meta:editing-cycles>1</meta:editing-cycles>
    <meta:generator>LibreOffice/6.3.4.2.0$Linux_X86_64 LibreOffice_project/30$Build-2</meta:generator>
    <meta:document-statistic meta:table-count="0" meta:image-count="0" meta:object-count="0" meta:page-count="2" meta:paragraph-count="31" meta:word-count="1081" meta:character-count="6094" meta:non-whitespace-character-count="5052"/>
  </office:meta>
</office:document-meta>
</file>