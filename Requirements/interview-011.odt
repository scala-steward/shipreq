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a10" officeooo:paragraph-rsid="00134a10"/>
    </style:style>
    <style:style style:name="P2" style:family="paragraph" style:parent-style-name="Standard">
      <style:text-properties officeooo:rsid="00134a10" officeooo:paragraph-rsid="00162a2b"/>
    </style:style>
    <style:style style:name="P3" style:family="paragraph" style:parent-style-name="Standard">
      <style:text-properties officeooo:rsid="00162a2b" officeooo:paragraph-rsid="00162a2b"/>
    </style:style>
    <style:style style:name="P4" style:family="paragraph" style:parent-style-name="Standard">
      <style:text-properties fo:color="#ff6633" fo:font-weight="bold" officeooo:rsid="00134a10" officeooo:paragraph-rsid="00134a10" style:font-weight-asian="bold" style:font-weight-complex="bold"/>
    </style:style>
    <style:style style:name="P5" style:family="paragraph" style:parent-style-name="Standard">
      <style:text-properties officeooo:rsid="00175f20" officeooo:paragraph-rsid="00175f20"/>
    </style:style>
    <style:style style:name="P6" style:family="paragraph" style:parent-style-name="Standard">
      <style:text-properties officeooo:rsid="00183aa2" officeooo:paragraph-rsid="00183aa2"/>
    </style:style>
    <style:style style:name="P7" style:family="paragraph" style:parent-style-name="Standard" style:list-style-name="L1">
      <style:text-properties officeooo:rsid="00134a10" officeooo:paragraph-rsid="00134a10"/>
    </style:style>
    <style:style style:name="P8" style:family="paragraph" style:parent-style-name="Standard">
      <style:text-properties fo:color="#ff6633" fo:font-weight="bold" officeooo:rsid="00175f20" officeooo:paragraph-rsid="00162a2b" style:font-weight-asian="bold" style:font-weight-complex="bold"/>
    </style:style>
    <style:style style:name="P9" style:family="paragraph" style:parent-style-name="Standard" style:list-style-name="L2">
      <style:text-properties officeooo:rsid="00175f20" officeooo:paragraph-rsid="00175f20"/>
    </style:style>
    <style:style style:name="P10" style:family="paragraph" style:parent-style-name="Standard" style:list-style-name="L3">
      <style:text-properties officeooo:rsid="00183aa2" officeooo:paragraph-rsid="00183aa2"/>
    </style:style>
    <style:style style:name="P11" style:family="paragraph" style:parent-style-name="Standard">
      <style:text-properties officeooo:rsid="00183aa2" officeooo:paragraph-rsid="00183aa2"/>
    </style:style>
    <style:style style:name="P12" style:family="paragraph" style:parent-style-name="Standard">
      <style:text-properties officeooo:rsid="001a5fec" officeooo:paragraph-rsid="001a5fec"/>
    </style:style>
    <style:style style:name="T1" style:family="text">
      <style:text-properties officeooo:rsid="00162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F-08: </text:span>History/Audit</text:p>
      <text:p text:style-name="P1"/>
      <text:list xml:id="list1833662337171348445" text:style-name="L1">
        <text:list-item>
          <text:p text:style-name="P7">View a project as it was at a previous point in time.</text:p>
        </text:list-item>
        <text:list-item>
          <text:p text:style-name="P7">Tag a point in time.</text:p>
        </text:list-item>
        <text:list-item>
          <text:p text:style-name="P7">See list of changes.</text:p>
        </text:list-item>
        <text:list-item>
          <text:p text:style-name="P7">Compare. See the difference between two points in time.</text:p>
        </text:list-item>
      </text:list>
      <text:p text:style-name="P1"/>
      <text:p text:style-name="P1">Scope should be the entire project, so: requirements, groupings, fields, config.</text:p>
      <text:p text:style-name="P1">Exceptions: tags.</text:p>
      <text:p text:style-name="P1"/>
      <text:p text:style-name="P1">Tags should be modifiable, deletable. One should be able to create a tag for a previous point in time, not just the current time.</text:p>
      <text:p text:style-name="P1"/>
      <text:p text:style-name="P1">Changes are immutable. If changes are to include comments then they will need to be mutable but I don't think it's worth it; more work to dev and maintain, process becomes tedious for user.</text:p>
      <text:p text:style-name="P1">Granularity of a change. Easiest would be atomic, eg. “User A changed UC-3 step 3.0.5.a from X to Y at T”. When viewing a list of changes, that would get tedious as users often edit the same req many times in succession. There is value in each change being recorded (rather than aggregating &amp; saving) because one can quickly and easily delete valuable data without realising. Instead view-based tactics should probably be employed, such as wrapping up sequential changes to the same req in the list display with maybe the number of collapsed changes and a button to expand and see them all. What about bulk operations, like applying a grouping to 50 reqs, or field-set editing where all changes will probably be applied on save? Maybe that strategy being inconsistent with the reqs (presuming auto-save) is the problem; if there's auto-save for reqs there should probably be auto-save for everything including project cfg. Then undo and/or revert becomes very important.</text:p>
      <text:p text:style-name="P1"/>
      <text:p text:style-name="P3">Comparison. I imagine specifying two points in time (one defaulting to <text:span text:style-name="T2">now</text:span><text:span text:style-name="T3">) and seeing a list of changes between the two. Not the list of changes in between those points in time, no, just what is totally different once all changes are squashed. (eg. don't show me 20 changes to FR-4, just show me 0 or 1.)</text:span></text:p>
      <text:p text:style-name="P3"><text:span text:style-name="T3">Another idea is v</text:span>iewing side by side with changes highlighted. Honestly though, these are solution ideas, tool ideas. The use cases and motivations for using any of these should be analysed and I'm not doing that now.</text:p>
      <text:p text:style-name="P3"/>
      <text:p text:style-name="P3"/>
      <text:p text:style-name="P8">MF-17: Undo &amp; Auto-Save</text:p>
      <text:p text:style-name="P2"/>
      <text:list xml:id="list3505186503701605377" text:style-name="L2">
        <text:list-item>
          <text:p text:style-name="P9">Changes to projects need to be persisted.</text:p>
        </text:list-item>
        <text:list-item>
          <text:p text:style-name="P9">Multiple users can view a project simultaneously.</text:p>
        </text:list-item>
        <text:list-item>
          <text:p text:style-name="P9">Multiple users can edit a project simultaneously.</text:p>
        </text:list-item>
        <text:list-item>
          <text:p text:style-name="P9">When editing, a user needs to revert &amp; abort the change (avoiding a save and audit-trail update).</text:p>
        </text:list-item>
        <text:list-item>
          <text:p text:style-name="P9">After editing, a user needs to revert 1 or more immediate changes.</text:p>
        </text:list-item>
        <text:list-item>
          <text:p text:style-name="P9">Must minimise user need to resolve conflicting concurrent changes.</text:p>
        </text:list-item>
      </text:list>
      <text:p text:style-name="P5"/>
      <text:p text:style-name="P6">Foreseeable issues:</text:p>
      <text:list xml:id="list1718597071931959860" text:style-name="L3">
        <text:list-item>
          <text:p text:style-name="P10"><text:span text:style-name="T4">Manual save:</text:span> annoying UX burden, data-loss risk, may cause change-set mindfulness &amp; strategising in idiots like me.</text:p>
        </text:list-item>
        <text:list-item>
          <text:p text:style-name="P10"><text:span text:style-name="T4">Auto save per change:</text:span> more network connectivity (degrade perf &amp; UX), more server-side effort, more DB space, change logs too detailed (created step, indented step, edited step x10).</text:p>
        </text:list-item>
      </text:list>
      <text:p text:style-name="P6"/>
      <text:p text:style-name="P12">Idea: If timed saves gets the go-ahead, should probably prevent data from being saved for 30 sec to avoid noisy mistakes. So if user edits field A, 30 save timer starts, then 29 sec later user edits B. 1 sec later and the 30 sec timer is up, field B shouldn't be saved because it is only 1 second o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5T14:14:33.061218442</meta:creation-date>
    <dc:date>2014-06-30T19:33:07.512188409</dc:date>
    <meta:editing-duration>PT43M48S</meta:editing-duration>
    <meta:editing-cycles>4</meta:editing-cycles>
    <meta:generator>LibreOffice/4.2.5.2$Linux_X86_64 LibreOffice_project/420m0$Build-2</meta:generator>
    <meta:document-statistic meta:table-count="0" meta:image-count="0" meta:object-count="0" meta:page-count="1" meta:paragraph-count="23" meta:word-count="540" meta:character-count="3099" meta:non-whitespace-character-count="2593"/>
  </office:meta>
</office:document-meta>
</file>