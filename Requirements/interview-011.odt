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a10" officeooo:paragraph-rsid="00134a10"/>
    </style:style>
    <style:style style:name="P2" style:family="paragraph" style:parent-style-name="Standard">
      <style:text-properties officeooo:rsid="00134a10" officeooo:paragraph-rsid="00162a2b"/>
    </style:style>
    <style:style style:name="P3" style:family="paragraph" style:parent-style-name="Standard">
      <style:text-properties officeooo:rsid="00162a2b" officeooo:paragraph-rsid="00162a2b"/>
    </style:style>
    <style:style style:name="P4" style:family="paragraph" style:parent-style-name="Standard">
      <style:text-properties fo:color="#ff6633" fo:font-weight="bold" officeooo:rsid="00134a10" officeooo:paragraph-rsid="00134a10" style:font-weight-asian="bold" style:font-weight-complex="bold"/>
    </style:style>
    <style:style style:name="P5" style:family="paragraph" style:parent-style-name="Standard">
      <style:text-properties fo:color="#ff6633" fo:font-weight="bold" officeooo:rsid="00175f20" officeooo:paragraph-rsid="00162a2b" style:font-weight-asian="bold" style:font-weight-complex="bold"/>
    </style:style>
    <style:style style:name="P6" style:family="paragraph" style:parent-style-name="Standard">
      <style:text-properties officeooo:rsid="00175f20" officeooo:paragraph-rsid="00175f20"/>
    </style:style>
    <style:style style:name="P7" style:family="paragraph" style:parent-style-name="Standard">
      <style:text-properties officeooo:rsid="00183aa2" officeooo:paragraph-rsid="00183aa2"/>
    </style:style>
    <style:style style:name="P8" style:family="paragraph" style:parent-style-name="Standard">
      <style:text-properties officeooo:rsid="001a5fec" officeooo:paragraph-rsid="001a5fec"/>
    </style:style>
    <style:style style:name="P9" style:family="paragraph" style:parent-style-name="Standard">
      <style:text-properties officeooo:rsid="001e3990" officeooo:paragraph-rsid="001e3990"/>
    </style:style>
    <style:style style:name="P10" style:family="paragraph" style:parent-style-name="Standard">
      <style:text-properties officeooo:rsid="0021f743" officeooo:paragraph-rsid="0021f743"/>
    </style:style>
    <style:style style:name="P11" style:family="paragraph" style:parent-style-name="Standard" style:list-style-name="L1">
      <style:text-properties officeooo:rsid="00134a10" officeooo:paragraph-rsid="00134a10"/>
    </style:style>
    <style:style style:name="P12" style:family="paragraph" style:parent-style-name="Standard" style:list-style-name="L2">
      <style:text-properties officeooo:rsid="00175f20" officeooo:paragraph-rsid="00175f20"/>
    </style:style>
    <style:style style:name="P13" style:family="paragraph" style:parent-style-name="Standard" style:list-style-name="L3">
      <style:text-properties officeooo:rsid="00183aa2" officeooo:paragraph-rsid="00183aa2"/>
    </style:style>
    <style:style style:name="P14" style:family="paragraph" style:parent-style-name="Standard" style:list-style-name="L4">
      <style:text-properties officeooo:rsid="0021f743" officeooo:paragraph-rsid="0021f743"/>
    </style:style>
    <style:style style:name="P15" style:family="paragraph" style:parent-style-name="Standard">
      <style:text-properties fo:font-style="italic" officeooo:rsid="00200dbf" officeooo:paragraph-rsid="001e3990" style:font-style-asian="italic" style:font-style-complex="italic"/>
    </style:style>
    <style:style style:name="P16" style:family="paragraph" style:parent-style-name="Standard">
      <style:text-properties officeooo:rsid="00162a2b" officeooo:paragraph-rsid="00162a2b"/>
    </style:style>
    <style:style style:name="P17" style:family="paragraph" style:parent-style-name="Standard">
      <style:text-properties officeooo:rsid="00233b78" officeooo:paragraph-rsid="00233b78"/>
    </style:style>
    <style:style style:name="T1" style:family="text">
      <style:text-properties officeooo:rsid="00162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officeooo:rsid="001d59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F-08: </text:span>History/Audit</text:p>
      <text:p text:style-name="P1"/>
      <text:list xml:id="list929652327726453995" text:style-name="L1">
        <text:list-item>
          <text:p text:style-name="P11">View a project as it was at a previous point in time.</text:p>
        </text:list-item>
        <text:list-item>
          <text:p text:style-name="P11">Tag a point in time.</text:p>
        </text:list-item>
        <text:list-item>
          <text:p text:style-name="P11">See list of changes.</text:p>
        </text:list-item>
        <text:list-item>
          <text:p text:style-name="P11">Compare. See the difference between two points in time.</text:p>
        </text:list-item>
      </text:list>
      <text:p text:style-name="P1"/>
      <text:p text:style-name="P1">Scope should be the entire project, so: requirements, groupings, fields, config.</text:p>
      <text:p text:style-name="P1">Exceptions: tags.</text:p>
      <text:p text:style-name="P1"/>
      <text:p text:style-name="P1">Tags should be modifiable, deletable. One should be able to create a tag for a previous point in time, not just the current time.</text:p>
      <text:p text:style-name="P1"/>
      <text:p text:style-name="P1">Changes are immutable. If changes are to include comments then they will need to be mutable but I don't think it's worth it; more work to dev and maintain, process becomes tedious for user.</text:p>
      <text:p text:style-name="P1">Granularity of a change. Easiest would be atomic, eg. “User A changed UC-3 step 3.0.5.a from X to Y at T”. When viewing a list of changes, that would get tedious as users often edit the same req many times in succession. There is value in each change being recorded (rather than aggregating &amp; saving) because one can quickly and easily delete valuable data without realising. Instead view-based tactics should probably be employed, such as wrapping up sequential changes to the same req in the list display with maybe the number of collapsed changes and a button to expand and see them all. What about bulk operations, like applying a grouping to 50 reqs, or field-set editing where all changes will probably be applied on save? Maybe that strategy being inconsistent with the reqs (presuming auto-save) is the problem; if there's auto-save for reqs there should probably be auto-save for everything including project cfg. Then undo and/or revert becomes very important.</text:p>
      <text:p text:style-name="P1"/>
      <text:p text:style-name="P3">Comparison. I imagine specifying two points in time (one defaulting to <text:span text:style-name="T2">now</text:span><text:span text:style-name="T3">) and seeing a list of changes between the two. Not the list of changes in between those points in time, no, just what is totally different once all changes are squashed. (eg. don't show me 20 changes to FR-4, just show me 0 or 1.)</text:span></text:p>
      <text:p text:style-name="P3"><text:span text:style-name="T3">Another idea is v</text:span>iewing side by side with changes highlighted. Honestly though, these are solution ideas, tool ideas. The use cases and motivations for using any of these should be analysed and I'm not doing that now.</text:p>
      <text:p text:style-name="P3"/>
      <text:p text:style-name="P17">Another thing, usage columns may need to show two values: currently-in-use, historically-in-use. Reason being that it may be confusing to see usage 0 but only be able to soft-delete instead of hard-delete.</text:p>
      <text:p text:style-name="P3"/>
      <text:p text:style-name="P3"/>
      <text:p text:style-name="P5">MF-17: Undo &amp; Auto-Save</text:p>
      <text:p text:style-name="P2"/>
      <text:list xml:id="list1326147982265855866" text:style-name="L2">
        <text:list-item>
          <text:p text:style-name="P12">Changes to projects need to be persisted.</text:p>
        </text:list-item>
        <text:list-item>
          <text:p text:style-name="P12">Multiple users can view a project simultaneously.</text:p>
        </text:list-item>
        <text:list-item>
          <text:p text:style-name="P12">Multiple users can edit a project simultaneously.</text:p>
        </text:list-item>
        <text:list-item>
          <text:p text:style-name="P12">When editing, a user needs to revert &amp; abort the change (avoiding a save and audit-trail update).</text:p>
        </text:list-item>
        <text:list-item>
          <text:p text:style-name="P12">After editing, a user needs to revert 1 or more immediate changes.</text:p>
        </text:list-item>
        <text:list-item>
          <text:p text:style-name="P12">Must minimise user need to resolve conflicting concurrent changes.</text:p>
        </text:list-item>
      </text:list>
      <text:p text:style-name="P6"/>
      <text:p text:style-name="P7">Foreseeable issues:</text:p>
      <text:list xml:id="list6393569719837041376" text:style-name="L3">
        <text:list-item>
          <text:p text:style-name="P13"><text:span text:style-name="T4">Manual save:</text:span> annoying UX burden, data-loss risk, may cause change-set mindfulness &amp; strategising in idiots like me.</text:p>
        </text:list-item>
        <text:list-item>
          <text:p text:style-name="P13"><text:span text:style-name="T4">Auto save per change:</text:span> more network connectivity (degrade perf &amp; UX), more server-side effort, more DB space, change logs too detailed (created step, indented step, edited step x10).</text:p>
        </text:list-item>
      </text:list>
      <text:p text:style-name="P7"/>
      <text:p text:style-name="P8">Idea: If timed saves gets the go-ahead, should probably prevent data from being saved for 30 sec to avoid noisy mistakes. So if user edits field A, 30 save timer starts, then 29 sec later user edits B. 1 sec later and the 30 sec timer is up, field B shouldn't be saved because it is only 1 second old. <text:span text:style-name="T5">Consider this a min-bound; similarly, a max bound would be desirable. If for what ever reason a person spends 20min on the same req then something goes wrong, you losing the entire 20min of work would be unacceptable. It should probably not wait longer than 3min or so.</text:span></text:p>
      <text:p text:style-name="P8"/>
      <text:p text:style-name="P10">Going to think about some phase-2-relevant concerns.</text:p>
      <text:list xml:id="list267949789795033564" text:style-name="L4">
        <text:list-item>
          <text:p text:style-name="P14">Data loss must be avoided at all costs. Doing it for grouping types, fields etc. Req content must've be losable. Minimum required = save history, don't even need to make it accessible at first.</text:p>
        </text:list-item>
        <text:list-item>
          <text:p text:style-name="P14">Immediately mistakes are not uncommon. Hence immediate undo is required.</text:p>
        </text:list-item>
      </text:list>
      <text:p text:style-name="P8"/>
      <text:p text:style-name="P15">Moving notes out of plan.md:</text:p>
      <text:p text:style-name="P9">Undo an undo.</text:p>
      <text:p text:style-name="P9"><text:s text:c="2"/>- Connection problems. </text:p>
      <text:p text:style-name="P9"><text:s text:c="2"/>- Validation problems. (Eg. cyclic structs, etc.) </text:p>
      <text:p text:style-name="P9"><text:s text:c="4"/>Delayed saving probably fine but validation is better asap. </text:p>
      <text:p text:style-name="P9"><text:s text:c="2"/>- Knockon effects such as add/del/reind step handled how? </text:p>
      <text:p text:style-name="P9"><text:s text:c="4"/>Am I conflating saving + history concerns with multi-user anti-conflict </text:p>
      <text:p text:style-name="P9"><text:s text:c="4"/>concerns? Seems like it. </text:p>
      <text:p text:style-name="P9"><text:s text:c="2"/>- Actually MF-17 shouldn't be a problem until there are multiple users (in a </text:p>
      <text:p text:style-name="P9"><text:s text:c="4"/>single-user ctx it only affects multiple tabs). Maybe simplest would be best </text:p>
      <text:p text:style-name="P9"><text:s text:c="4"/>until phase 3? Consider history reqs for data structures but whack save </text:p>
      <text:p text:style-name="P9"><text:s text:c="4"/>buttons on things and/or auto-save (LL-reqs) where appropriate for now. </text:p>
      <text:p text:style-name="P9"><text:s text:c="4"/>UX inconsistency but maybe ok short-term, changability cost shouldn't be hi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5T14:14:33.061218442</meta:creation-date>
    <dc:date>2014-08-02T10:18:02.483303476</dc:date>
    <meta:editing-duration>PT1H29M59S</meta:editing-duration>
    <meta:editing-cycles>9</meta:editing-cycles>
    <meta:generator>LibreOffice/4.2.5.2$Linux_x86 LibreOffice_project/420m0$Build-2</meta:generator>
    <meta:document-statistic meta:table-count="0" meta:image-count="0" meta:object-count="0" meta:page-count="1" meta:paragraph-count="40" meta:word-count="782" meta:character-count="4634" meta:non-whitespace-character-count="3859"/>
  </office:meta>
</office:document-meta>
</file>