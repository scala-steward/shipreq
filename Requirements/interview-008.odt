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nos1" svg:font-family="Tino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fo:color="#000080" fo:font-weight="normal" officeooo:rsid="00231911" officeooo:paragraph-rsid="00231911" style:font-weight-asian="normal" style:font-weight-complex="normal"/>
    </style:style>
    <style:style style:name="P2" style:family="paragraph" style:parent-style-name="Standard">
      <style:text-properties fo:color="#000080" fo:font-weight="normal" officeooo:rsid="0025eed0" officeooo:paragraph-rsid="0025eed0" style:font-weight-asian="normal" style:font-weight-complex="normal"/>
    </style:style>
    <style:style style:name="P3" style:family="paragraph" style:parent-style-name="Standard">
      <style:text-properties fo:color="#000080" fo:font-weight="normal" officeooo:rsid="0025eed0" officeooo:paragraph-rsid="0026c2be" style:font-weight-asian="normal" style:font-weight-complex="normal"/>
    </style:style>
    <style:style style:name="P4" style:family="paragraph" style:parent-style-name="Standard">
      <style:text-properties fo:color="#000080" fo:font-weight="normal" officeooo:rsid="0026c2be" officeooo:paragraph-rsid="0026c2be" style:font-weight-asian="normal" style:font-weight-complex="normal"/>
    </style:style>
    <style:style style:name="P5" style:family="paragraph" style:parent-style-name="Standard">
      <style:text-properties fo:color="#000080" fo:font-weight="normal" officeooo:rsid="00290392" officeooo:paragraph-rsid="00290392" style:font-weight-asian="normal" style:font-weight-complex="normal"/>
    </style:style>
    <style:style style:name="P6" style:family="paragraph" style:parent-style-name="Standard">
      <style:text-properties fo:color="#000080" fo:font-weight="normal" officeooo:rsid="002908ec" officeooo:paragraph-rsid="002908ec" style:font-weight-asian="normal" style:font-weight-complex="normal"/>
    </style:style>
    <style:style style:name="P7" style:family="paragraph" style:parent-style-name="Standard">
      <style:text-properties fo:color="#000080" fo:font-weight="normal" officeooo:rsid="0029e1fb" officeooo:paragraph-rsid="0029e1fb" style:font-weight-asian="normal" style:font-weight-complex="normal"/>
    </style:style>
    <style:style style:name="P8" style:family="paragraph" style:parent-style-name="Standard">
      <style:text-properties fo:color="#000080" fo:font-weight="normal" officeooo:rsid="002c8703" officeooo:paragraph-rsid="002da298" style:font-weight-asian="normal" style:font-weight-complex="normal"/>
    </style:style>
    <style:style style:name="P9" style:family="paragraph" style:parent-style-name="Standard">
      <style:text-properties fo:color="#000080" fo:font-weight="normal" officeooo:rsid="002f0a67" officeooo:paragraph-rsid="002f0a67" style:font-weight-asian="normal" style:font-weight-complex="normal"/>
    </style:style>
    <style:style style:name="P10" style:family="paragraph" style:parent-style-name="Standard">
      <style:text-properties fo:color="#000080" fo:font-weight="normal" officeooo:rsid="00302dd8" officeooo:paragraph-rsid="00302dd8" style:font-weight-asian="normal" style:font-weight-complex="normal"/>
    </style:style>
    <style:style style:name="P11" style:family="paragraph" style:parent-style-name="Standard">
      <style:text-properties fo:font-weight="normal" officeooo:rsid="00102846" officeooo:paragraph-rsid="00102846" style:font-weight-asian="normal" style:font-weight-complex="normal"/>
    </style:style>
    <style:style style:name="P12" style:family="paragraph" style:parent-style-name="Standard">
      <style:text-properties fo:font-weight="normal" officeooo:rsid="00102846" officeooo:paragraph-rsid="00207ba3" style:font-weight-asian="normal" style:font-weight-complex="normal"/>
    </style:style>
    <style:style style:name="P13" style:family="paragraph" style:parent-style-name="Standard">
      <style:text-properties fo:font-weight="normal" officeooo:rsid="00102846" officeooo:paragraph-rsid="002da298" style:font-weight-asian="normal" style:font-weight-complex="normal"/>
    </style:style>
    <style:style style:name="P14" style:family="paragraph" style:parent-style-name="Standard">
      <style:text-properties fo:font-weight="normal" officeooo:rsid="0010c013" officeooo:paragraph-rsid="0010c013" style:font-weight-asian="normal" style:font-weight-complex="normal"/>
    </style:style>
    <style:style style:name="P15" style:family="paragraph" style:parent-style-name="Standard">
      <style:text-properties fo:font-weight="normal" officeooo:rsid="000f7e57" officeooo:paragraph-rsid="000f7e57" style:font-weight-asian="normal" style:font-weight-complex="normal"/>
    </style:style>
    <style:style style:name="P16" style:family="paragraph" style:parent-style-name="Standard">
      <style:text-properties fo:font-weight="normal" officeooo:rsid="001568f1" officeooo:paragraph-rsid="001568f1" style:font-weight-asian="normal" style:font-weight-complex="normal"/>
    </style:style>
    <style:style style:name="P17" style:family="paragraph" style:parent-style-name="Standard">
      <style:text-properties fo:font-weight="normal" officeooo:rsid="001c08d7" officeooo:paragraph-rsid="001c08d7" style:font-weight-asian="normal" style:font-weight-complex="normal"/>
    </style:style>
    <style:style style:name="P18" style:family="paragraph" style:parent-style-name="Standard">
      <style:text-properties fo:font-weight="normal" officeooo:rsid="001d7227" officeooo:paragraph-rsid="001d7227" style:font-weight-asian="normal" style:font-weight-complex="normal"/>
    </style:style>
    <style:style style:name="P19" style:family="paragraph" style:parent-style-name="Standard">
      <style:text-properties fo:font-weight="normal" officeooo:rsid="001f76e8" officeooo:paragraph-rsid="001f76e8" style:font-weight-asian="normal" style:font-weight-complex="normal"/>
    </style:style>
    <style:style style:name="P20" style:family="paragraph" style:parent-style-name="Standard">
      <style:text-properties fo:font-weight="normal" officeooo:rsid="00222216" officeooo:paragraph-rsid="00222216" style:font-weight-asian="normal" style:font-weight-complex="normal"/>
    </style:style>
    <style:style style:name="P21" style:family="paragraph" style:parent-style-name="Standard">
      <style:text-properties fo:font-weight="normal" officeooo:rsid="002262c4" officeooo:paragraph-rsid="002262c4" style:font-weight-asian="normal" style:font-weight-complex="normal"/>
    </style:style>
    <style:style style:name="P22" style:family="paragraph" style:parent-style-name="Standard">
      <style:text-properties style:use-window-font-color="true" fo:font-weight="normal" officeooo:rsid="0010c013" officeooo:paragraph-rsid="002262c4" style:font-weight-asian="normal" style:font-weight-complex="normal"/>
    </style:style>
    <style:style style:name="P23" style:family="paragraph" style:parent-style-name="Standard">
      <style:text-properties fo:color="#000080" fo:font-weight="normal" officeooo:rsid="00222216" officeooo:paragraph-rsid="00222216" style:font-weight-asian="normal" style:font-weight-complex="normal"/>
    </style:style>
    <style:style style:name="P24" style:family="paragraph" style:parent-style-name="Standard">
      <style:text-properties fo:color="#000080" fo:font-weight="normal" officeooo:rsid="00246f24" officeooo:paragraph-rsid="00207ba3" style:font-weight-asian="normal" style:font-weight-complex="normal"/>
    </style:style>
    <style:style style:name="P25" style:family="paragraph" style:parent-style-name="Standard" style:list-style-name="L2">
      <style:text-properties fo:color="#000080" fo:font-weight="normal" officeooo:rsid="002908ec" officeooo:paragraph-rsid="002908ec" style:font-weight-asian="normal" style:font-weight-complex="normal"/>
    </style:style>
    <style:style style:name="P26" style:family="paragraph" style:parent-style-name="Standard" style:list-style-name="L3">
      <style:text-properties fo:color="#000080" fo:font-weight="normal" officeooo:rsid="002f0a67" officeooo:paragraph-rsid="002f0a67" style:font-weight-asian="normal" style:font-weight-complex="normal"/>
    </style:style>
    <style:style style:name="P27" style:family="paragraph" style:parent-style-name="Standard">
      <style:text-properties fo:color="#000080" fo:font-weight="normal" officeooo:rsid="003226df" officeooo:paragraph-rsid="00207ba3" style:font-weight-asian="normal" style:font-weight-complex="normal"/>
    </style:style>
    <style:style style:name="P28" style:family="paragraph" style:parent-style-name="Standard">
      <style:text-properties fo:color="#000080" fo:font-weight="normal" officeooo:rsid="003226df" officeooo:paragraph-rsid="00342018" style:font-weight-asian="normal" style:font-weight-complex="normal"/>
    </style:style>
    <style:style style:name="P29" style:family="paragraph" style:parent-style-name="Standard">
      <style:text-properties fo:color="#000080" fo:font-weight="normal" officeooo:rsid="003226df" officeooo:paragraph-rsid="003baf34" style:font-weight-asian="normal" style:font-weight-complex="normal"/>
    </style:style>
    <style:style style:name="P30" style:family="paragraph" style:parent-style-name="Standard">
      <style:text-properties fo:color="#000080" fo:font-weight="normal" officeooo:rsid="003baf34" officeooo:paragraph-rsid="003baf34" style:font-weight-asian="normal" style:font-weight-complex="normal"/>
    </style:style>
    <style:style style:name="P31" style:family="paragraph" style:parent-style-name="Standard">
      <style:text-properties fo:color="#000080" fo:font-weight="normal" officeooo:rsid="003bdbe9" officeooo:paragraph-rsid="003bdbe9" style:font-weight-asian="normal" style:font-weight-complex="normal"/>
    </style:style>
    <style:style style:name="P32" style:family="paragraph" style:parent-style-name="Standard" style:list-style-name="L4">
      <style:text-properties fo:color="#000080" fo:font-weight="normal" officeooo:rsid="003bdbe9" officeooo:paragraph-rsid="003bdbe9" style:font-weight-asian="normal" style:font-weight-complex="normal"/>
    </style:style>
    <style:style style:name="P33" style:family="paragraph" style:parent-style-name="Standard" style:list-style-name="L4">
      <style:text-properties fo:color="#000080" fo:font-weight="normal" officeooo:rsid="003d4e11" officeooo:paragraph-rsid="003d4e11" style:font-weight-asian="normal" style:font-weight-complex="normal"/>
    </style:style>
    <style:style style:name="P34" style:family="paragraph" style:parent-style-name="Standard">
      <style:text-properties fo:color="#000080" style:font-name="Tinos" fo:font-weight="normal" officeooo:rsid="0026c2be" officeooo:paragraph-rsid="0026c2be" style:font-weight-asian="normal" style:font-weight-complex="normal"/>
    </style:style>
    <style:style style:name="P35" style:family="paragraph" style:parent-style-name="Standard">
      <style:text-properties fo:color="#000080" style:font-name="Tinos" fo:font-weight="normal" officeooo:rsid="0026c2be" officeooo:paragraph-rsid="00286c86" style:font-weight-asian="normal" style:font-weight-complex="normal"/>
    </style:style>
    <style:style style:name="P36" style:family="paragraph" style:parent-style-name="Standard">
      <style:text-properties fo:color="#000080" style:font-name="Tinos" fo:font-weight="normal" officeooo:rsid="00286c86" officeooo:paragraph-rsid="00286c86" style:font-weight-asian="normal" style:font-weight-complex="normal"/>
    </style:style>
    <style:style style:name="P37" style:family="paragraph" style:parent-style-name="Standard">
      <style:text-properties fo:color="#000080" style:font-name="Tinos" fo:font-weight="normal" officeooo:rsid="00290392" officeooo:paragraph-rsid="00290392" style:font-weight-asian="normal" style:font-weight-complex="normal"/>
    </style:style>
    <style:style style:name="P38" style:family="paragraph" style:parent-style-name="Standard" style:list-style-name="L1">
      <style:text-properties fo:font-weight="normal" officeooo:rsid="000f7e57" officeooo:paragraph-rsid="000f7e57" style:font-weight-asian="normal" style:font-weight-complex="normal"/>
    </style:style>
    <style:style style:name="P39" style:family="paragraph" style:parent-style-name="Standard" style:list-style-name="L1">
      <style:text-properties fo:font-weight="normal" officeooo:rsid="000f7e57" officeooo:paragraph-rsid="000fbfca" style:font-weight-asian="normal" style:font-weight-complex="normal"/>
    </style:style>
    <style:style style:name="P40" style:family="paragraph" style:parent-style-name="Standard" style:list-style-name="L1">
      <style:text-properties fo:font-weight="normal" officeooo:rsid="000fbfca" officeooo:paragraph-rsid="000fbfca" style:font-weight-asian="normal" style:font-weight-complex="normal"/>
    </style:style>
    <style:style style:name="P41" style:family="paragraph" style:parent-style-name="Standard">
      <style:text-properties fo:font-weight="normal" officeooo:rsid="00342018" officeooo:paragraph-rsid="003478ae" style:font-weight-asian="normal" style:font-weight-complex="normal"/>
    </style:style>
    <style:style style:name="P42" style:family="paragraph" style:parent-style-name="Standard">
      <style:text-properties fo:font-weight="normal" officeooo:rsid="00342018" officeooo:paragraph-rsid="003baf34" style:font-weight-asian="normal" style:font-weight-complex="normal"/>
    </style:style>
    <style:style style:name="P43" style:family="paragraph" style:parent-style-name="Standard">
      <style:text-properties fo:font-weight="normal" officeooo:rsid="0019ad6e" officeooo:paragraph-rsid="003478ae" style:font-weight-asian="normal" style:font-weight-complex="normal"/>
    </style:style>
    <style:style style:name="P44" style:family="paragraph" style:parent-style-name="Standard">
      <style:text-properties fo:font-weight="normal" officeooo:rsid="00102846" officeooo:paragraph-rsid="0026c2be" style:font-weight-asian="normal" style:font-weight-complex="normal"/>
    </style:style>
    <style:style style:name="P45" style:family="paragraph" style:parent-style-name="Standard">
      <style:text-properties fo:font-weight="bold" officeooo:rsid="001f76e8" officeooo:paragraph-rsid="003478ae" style:font-weight-asian="bold" style:font-weight-complex="bold"/>
    </style:style>
    <style:style style:name="P46" style:family="paragraph" style:parent-style-name="Standard">
      <style:text-properties fo:font-weight="bold" officeooo:rsid="001f76e8" officeooo:paragraph-rsid="003baf34" style:font-weight-asian="bold" style:font-weight-complex="bold"/>
    </style:style>
    <style:style style:name="T1" style:family="text">
      <style:text-properties officeooo:rsid="000fbfca"/>
    </style:style>
    <style:style style:name="T2" style:family="text">
      <style:text-properties officeooo:rsid="0010c013"/>
    </style:style>
    <style:style style:name="T3" style:family="text">
      <style:text-properties officeooo:rsid="001f4b93"/>
    </style:style>
    <style:style style:name="T4" style:family="text">
      <style:text-properties fo:color="#000080"/>
    </style:style>
    <style:style style:name="T5" style:family="text">
      <style:text-properties fo:color="#000080" fo:font-style="italic" style:font-style-asian="italic" style:font-style-complex="italic"/>
    </style:style>
    <style:style style:name="T6" style:family="text">
      <style:text-properties fo:color="#000080" officeooo:rsid="002262c4"/>
    </style:style>
    <style:style style:name="T7" style:family="text">
      <style:text-properties fo:color="#000080" officeooo:rsid="00231911"/>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f4b93"/>
    </style:style>
    <style:style style:name="T10" style:family="text">
      <style:text-properties style:text-underline-style="none"/>
    </style:style>
    <style:style style:name="T11" style:family="text">
      <style:text-properties fo:font-style="italic" style:font-style-asian="italic" style:font-style-complex="italic"/>
    </style:style>
    <style:style style:name="T12" style:family="text">
      <style:text-properties fo:font-style="italic" officeooo:rsid="003226df" style:font-style-asian="italic" style:font-style-complex="italic"/>
    </style:style>
    <style:style style:name="T13" style:family="text">
      <style:text-properties officeooo:rsid="00246f24"/>
    </style:style>
    <style:style style:name="T14" style:family="text">
      <style:text-properties style:font-name="Tinos1"/>
    </style:style>
    <style:style style:name="T15" style:family="text">
      <style:text-properties style:font-name="Tinos1" officeooo:rsid="002da298"/>
    </style:style>
    <style:style style:name="T16" style:family="text">
      <style:text-properties style:font-name="Tinos"/>
    </style:style>
    <style:style style:name="T17" style:family="text">
      <style:text-properties style:font-name="Tinos" officeooo:rsid="0026c2be"/>
    </style:style>
    <style:style style:name="T18" style:family="text">
      <style:text-properties officeooo:rsid="0026c2be"/>
    </style:style>
    <style:style style:name="T19" style:family="text">
      <style:text-properties officeooo:rsid="002b57b8"/>
    </style:style>
    <style:style style:name="T20" style:family="text">
      <style:text-properties officeooo:rsid="002da298"/>
    </style:style>
    <style:style style:name="T21" style:family="text">
      <style:text-properties officeooo:rsid="002f74a1"/>
    </style:style>
    <style:style style:name="T22" style:family="text">
      <style:text-properties officeooo:rsid="003226df"/>
    </style:style>
    <style:style style:name="T23" style:family="text">
      <style:text-properties fo:font-style="normal" officeooo:rsid="003226df" style:font-style-asian="normal" style:font-style-complex="normal"/>
    </style:style>
    <style:style style:name="T24" style:family="text">
      <style:text-properties fo:font-weight="normal" officeooo:rsid="00342018"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es anyone ever <text:span text:style-name="T8">delete LL reqs</text:span>? What else needs to happen when a req is deleted? <text:span text:style-name="T2">What about references to it?</text:span></text:p>
      <text:p text:style-name="P20"><text:span text:style-name="T4">Yes. Normally I just grey it out. The ID isn't recoverable. ID should </text:span><text:span text:style-name="T5">always</text:span><text:span text:style-name="T4"> point to the same logic requirement. As for references, if there are any I guess I'd delete them. Sometimes it might make sense to </text:span><text:span text:style-name="T6">keep them. Eg. “Blah blah. (Replaces FR-23)”</text:span></text:p>
      <text:p text:style-name="P20"/>
      <text:p text:style-name="P22">If references to a deleted ref were around, would you need to know about it? Why? What if the system didn't show you where they were?</text:p>
      <text:p text:style-name="P21"><text:span text:style-name="T4">I'd always want to be alerted to it, yes. Cos those refs would usually be invalid. </text:span><text:span text:style-name="T7">If they system didn't show me, it'd be annoying to manually check through everything and I would end up missing stuff.</text:span></text:p>
      <text:p text:style-name="P23"/>
      <text:p text:style-name="P14">Does anyone ever need to <text:span text:style-name="T8">see</text:span><text:span text:style-name="T10"> what </text:span><text:span text:style-name="T8">a deleted req </text:span>was? Why? What happens if they can't?</text:p>
      <text:p text:style-name="P1">Yes. There could be an offline reference to it, <text:span text:style-name="T13">or I may want to see what it was to undelete it. If I can't, that would mean it was gone forever, right? That's bad. (See next Q)</text:span></text:p>
      <text:p text:style-name="P12"/>
      <text:p text:style-name="P14">Does anyone ever <text:span text:style-name="T8">restore a deleted req</text:span>? Why? What happens if they can't?</text:p>
      <text:p text:style-name="P24">Definately. Requirements change, scope changes and those changes often cause requirements to be deleted and then later restored and tweaked. If data were lost, that would be terrible. Unacceptable.</text:p>
      <text:p text:style-name="P12"/>
      <text:p text:style-name="P15">When <text:span text:style-name="T8">removing a requirement-type</text:span>, <text:span text:style-name="T1">please opine about the following effects:</text:span></text:p>
      <text:list xml:id="list5054642114038007007" text:style-name="L1">
        <text:list-item>
          <text:p text:style-name="P38"><text:span text:style-name="T1">Associated r</text:span>equirements are deleted.</text:p>
        </text:list-item>
        <text:list-item>
          <text:p text:style-name="P39"><text:span text:style-name="T1">Associated r</text:span>equirements are <text:span text:style-name="T1">moved into a different req type. If no other req types exist, prevent operation.</text:span></text:p>
        </text:list-item>
        <text:list-item>
          <text:p text:style-name="P40">If associated requirements exist, prevent operation.</text:p>
        </text:list-item>
      </text:list>
      <text:p text:style-name="P2">If I were deleting a requirement-type that would imply I was reorganising. Consequentially I wouldn't want anything automatically deleted (bye bye option #1). If it were very easy (as it should be) to change requirements' types in bulk then #3 works. #2 seems like a nice fallback but it's a shortcut which implies that it isn't easy to <text:s/>change requirements' types in bulk. That's bad. I thought we made it easy in [MF-07: Organisation], it should be like that.</text:p>
      <text:p text:style-name="P46"/>
      <text:p text:style-name="P42">Why is vertical scrolling ok but <text:span text:style-name="T8">horizontal scrolling</text:span> so bad?</text:p>
      <text:p text:style-name="P30">Vertical scrolling is normally fine because you scroll entire reqs on and off the screen. With horizontal scrolling you end up scrolling useful info about your focussed req off the screen, not to mention the entire screen is then full of less-useful info about <text:span text:style-name="T11">all</text:span> reqs, most of which you don't care about.</text:p>
      <text:p text:style-name="P29"/>
      <text:p text:style-name="P16">Please list <text:span text:style-name="T8">custom columns and attributes</text:span> that LL reqs sometimes get. Please also list ones that are specific to certain requirement-types.</text:p>
      <text:p text:style-name="P2">MF<text:tab/><text:tab/>The <text:span text:style-name="T18">primary M</text:span>ajor-<text:span text:style-name="T18">F</text:span>eature <text:span text:style-name="T18">driving the requirement</text:span>.</text:p>
      <text:p text:style-name="P3">MF-<text:span text:style-name="T14">β</text:span><text:span text:style-name="T16"><text:tab/><text:tab/></text:span><text:span text:style-name="T17">A M</text:span><text:span text:style-name="T16">ajor-</text:span><text:span text:style-name="T17">F</text:span><text:span text:style-name="T16">eature </text:span><text:span text:style-name="T17">that also contributes to the need for the requirement</text:span><text:span text:style-name="T16">.</text:span></text:p>
      <text:p text:style-name="P4">Created<text:tab/>When the req was first written.</text:p>
      <text:p text:style-name="P34">Updated<text:tab/>When the req was last updated.</text:p>
      <text:p text:style-name="P36">Version<text:tab/>The version in which the requirement is scheduled.</text:p>
      <text:p text:style-name="P37">Priority<text:tab/>Obvious.</text:p>
      <text:p text:style-name="P35">Example<text:tab/>An example of the requirement being applied.</text:p>
      <text:p text:style-name="P36">Notes<text:tab/><text:tab/>Any additional information that clarifies the requirement.</text:p>
      <text:p text:style-name="P35">TODO<text:tab/><text:tab/>Reasons why the requirement needs more work.</text:p>
      <text:p text:style-name="P5"/>
      <text:p text:style-name="P6">Business Rules have columns:</text:p>
      <text:list xml:id="list7769440678617895357" text:style-name="L2">
        <text:list-item>
          <text:p text:style-name="P25">Type of rule</text:p>
        </text:list-item>
        <text:list-item>
          <text:p text:style-name="P25">Static or dynamic</text:p>
        </text:list-item>
        <text:list-item>
          <text:p text:style-name="P25">Source</text:p>
        </text:list-item>
      </text:list>
      <text:p text:style-name="P7">These look like they could be accomplished by groupings (MF-07) but <text:span text:style-name="T19">does one lose something doing it that way instead of a table with dedicated columns?</text:span></text:p>
      <text:p text:style-name="P44"/>
      <text:p text:style-name="P41">Why do you <text:span text:style-name="T8">need custom columns/attributes</text:span>? What would bother you if you had to store all of the info that you'd normally store in custom columns, in the req description?</text:p>
      <text:p text:style-name="P31">I need the columns because reqs have important attributes (RWM) and I need them recorded.</text:p>
      <text:p text:style-name="P31">When it's in a grid/table, it's</text:p>
      <text:list xml:id="list6146982694327869118" text:style-name="L4">
        <text:list-item>
          <text:p text:style-name="P32">Easy to see when something is missing.</text:p>
        </text:list-item>
        <text:list-item>
          <text:p text:style-name="P32">Easier to comprehend. Less cognative effort required because I don't need to read to find the info I need.</text:p>
        </text:list-item>
        <text:list-item>
          <text:p text:style-name="P33">Some columns are not necessary to the reader. The reader may read them once and from that time onwards the req makes enough sense on its own. They provide additional context that is required for less than 50% of reads.</text:p>
        </text:list-item>
      </text:list>
      <text:p text:style-name="P45"/>
      <text:p text:style-name="P43">When would you ever want to assign a req <text:span text:style-name="T8">multiple semantic-IDs</text:span>? Why? What would the effect be if the system didn't allow this?</text:p>
      <text:p text:style-name="P8">When a requirement exists in an intersection between two or more features. <text:span text:style-name="T20">If the system didn't allow this then either 1) I'd have to scan some other column to find secondarily-related reqs (eg. MF-</text:span><text:span text:style-name="T15">β), or 2) I'd have to use refs to point a reader to the other requirements.</text:span></text:p>
      <text:p text:style-name="P13"/>
      <text:p text:style-name="P17">When sorting requirements, please provide <text:span text:style-name="T8">sorting examples</text:span>. When would you want to sort? After you accomplish your task, when would you need to sort next?</text:p>
      <text:list xml:id="list8235056389730300570" text:style-name="L3">
        <text:list-item>
          <text:p text:style-name="P26">Sort by updated-date. When reviewing. Afterwards I'd restore the default sort order.</text:p>
        </text:list-item>
        <text:list-item>
          <text:p text:style-name="P26">Sort by MF . semantic-IDs . numeric-ID. When editing to check organisation. Afterwards nothing; this is my default sort order.</text:p>
        </text:list-item>
        <text:list-item>
          <text:p text:style-name="P26">Sort by desc. When looking for duplicates. Afterwards I'd restore the default sort order.</text:p>
        </text:list-item>
      </text:list>
      <text:p text:style-name="P12"/>
      <text:p text:style-name="P18">When sorting, if you were unable to select <text:span text:style-name="T8">DESC order</text:span> instead of ASC, how would that affect you? How important would that be to you?</text:p>
      <text:p text:style-name="P9">Don't really care. Look up instead of down. Although it might annoy me with a priority column. <text:span text:style-name="T21">Even then, not very much I don't think.</text:span></text:p>
      <text:p text:style-name="P12"/>
      <text:p text:style-name="P18">When sorting is active and you change the content of a requirement which puts it out-of-order, <text:span text:style-name="T3">should the view </text:span><text:span text:style-name="T9">reorder immediately</text:span><text:span text:style-name="T3">?</text:span></text:p>
      <text:p text:style-name="P19">SI: It doesn't, but a little button appears saying “Out-of-order. Re-sort” which user can click when done.</text:p>
      <text:p text:style-name="P10">Normally immediate resorting'd be awesome, instant feedback and all that. Only foreseeable problem its when <text:span text:style-name="T22">I want to fill in semantic-IDs for a bunch of reqs in a row. I'd find it really annoying to have to <text:s/>refind the next blank req I was up to before the resorting moved my cursor (if that's how it works).... then again, if resorting happened </text:span><text:span text:style-name="T12">after</text:span><text:span text:style-name="T23"> the cursor move that'd be fine.</text:span></text:p>
      <text:p text:style-name="P12"/>
      <text:p text:style-name="P19">When reqs are displayed heirarchically using their semantic-IDs, sometimes there are <text:span text:style-name="T8">rows that serve just as a header</text:span> for their children without being a req themselves. If this behaviour were not supported how would it affect you? How strongly would you feel when you realised it was missing? How would you work around it?</text:p>
      <text:p text:style-name="P27">This behaviour is recommended in More About Software Requirements in the section discussing child/parent requirements. Granted that's not exactly for semantic-IDs but it's the same principal. If it were not supported it could lead to children reqs contradicting parent reqs, or reqs that aren't actually reqs being used to hack the system and achieve the same effect.</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nos1" svg:font-family="Tino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1:12:07.474818885</meta:creation-date>
    <meta:generator>LibreOffice/4.2.4.2$Linux_X86_64 LibreOffice_project/420m0$Build-2</meta:generator>
    <dc:date>2014-05-15T11:45:14.074564581</dc:date>
    <meta:editing-duration>PT12H24M41S</meta:editing-duration>
    <meta:editing-cycles>7</meta:editing-cycles>
    <meta:document-statistic meta:table-count="0" meta:image-count="0" meta:object-count="0" meta:page-count="1" meta:paragraph-count="49" meta:word-count="1070" meta:character-count="6226" meta:non-whitespace-character-count="5211"/>
  </office:meta>
</office:document-meta>
</file>