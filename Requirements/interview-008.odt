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P1" style:family="paragraph" style:parent-style-name="Standard">
      <style:text-properties officeooo:rsid="000f7e57" officeooo:paragraph-rsid="000f7e57"/>
    </style:style>
    <style:style style:name="P2" style:family="paragraph" style:parent-style-name="Standard" style:list-style-name="L1">
      <style:text-properties officeooo:rsid="000f7e57" officeooo:paragraph-rsid="000f7e57"/>
    </style:style>
    <style:style style:name="P3" style:family="paragraph" style:parent-style-name="Standard" style:list-style-name="L1">
      <style:text-properties officeooo:rsid="000f7e57" officeooo:paragraph-rsid="000fbfca"/>
    </style:style>
    <style:style style:name="P4" style:family="paragraph" style:parent-style-name="Standard" style:list-style-name="L1">
      <style:text-properties officeooo:rsid="000fbfca" officeooo:paragraph-rsid="000fbfca"/>
    </style:style>
    <style:style style:name="P5" style:family="paragraph" style:parent-style-name="Standard">
      <style:text-properties officeooo:rsid="000fbfca" officeooo:paragraph-rsid="000fbfca"/>
    </style:style>
    <style:style style:name="P6" style:family="paragraph" style:parent-style-name="Standard">
      <style:text-properties officeooo:rsid="00102846" officeooo:paragraph-rsid="00102846"/>
    </style:style>
    <style:style style:name="P7" style:family="paragraph" style:parent-style-name="Standard">
      <style:text-properties officeooo:rsid="0010c013" officeooo:paragraph-rsid="0010c013"/>
    </style:style>
    <style:style style:name="P8" style:family="paragraph" style:parent-style-name="Standard">
      <style:text-properties officeooo:rsid="001568f1" officeooo:paragraph-rsid="001568f1"/>
    </style:style>
    <style:style style:name="P9" style:family="paragraph" style:parent-style-name="Standard">
      <style:text-properties officeooo:rsid="0019ad6e" officeooo:paragraph-rsid="0019ad6e"/>
    </style:style>
    <style:style style:name="P10" style:family="paragraph" style:parent-style-name="Standard">
      <style:text-properties officeooo:rsid="001c08d7" officeooo:paragraph-rsid="001c08d7"/>
    </style:style>
    <style:style style:name="P11" style:family="paragraph" style:parent-style-name="Standard">
      <style:text-properties officeooo:rsid="001d7227" officeooo:paragraph-rsid="001d7227"/>
    </style:style>
    <style:style style:name="P12" style:family="paragraph" style:parent-style-name="Standard">
      <style:text-properties officeooo:rsid="001f76e8" officeooo:paragraph-rsid="001f76e8"/>
    </style:style>
    <style:style style:name="T1" style:family="text">
      <style:text-properties officeooo:rsid="000fbfca"/>
    </style:style>
    <style:style style:name="T2" style:family="text">
      <style:text-properties officeooo:rsid="0010c013"/>
    </style:style>
    <style:style style:name="T3" style:family="text">
      <style:text-properties officeooo:rsid="001f4b9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oes anyone ever delete LL reqs? What else needs to happen when a req is deleted? <text:span text:style-name="T2">What about references to it?</text:span></text:p>
      <text:p text:style-name="P6"/>
      <text:p text:style-name="P7">Does anyone ever need to see what a deleted req was? Why? What happens if they can't?</text:p>
      <text:p text:style-name="P7"/>
      <text:p text:style-name="P7">Does anyone ever restore a deleted req? Why? What happens if they can't?</text:p>
      <text:p text:style-name="P1"/>
      <text:p text:style-name="P1">When removing a requirement-type, <text:span text:style-name="T1">please opine about the following effects:</text:span></text:p>
      <text:list xml:id="list2186917477442594371" text:style-name="L1">
        <text:list-item>
          <text:p text:style-name="P2"><text:span text:style-name="T1">Associated r</text:span>equirements are deleted.</text:p>
        </text:list-item>
        <text:list-item>
          <text:p text:style-name="P3"><text:span text:style-name="T1">Associated r</text:span>equirements are <text:span text:style-name="T1">moved into a different req type. If no other req types exist, prevent operation.</text:span></text:p>
        </text:list-item>
        <text:list-item>
          <text:p text:style-name="P4">If associated requirements exist, prevent operation.</text:p>
        </text:list-item>
      </text:list>
      <text:p text:style-name="P5"/>
      <text:p text:style-name="P8">Please list custom columns and attributes that LL reqs sometimes get. Please also list ones that are specific to certain requirement-types.</text:p>
      <text:p text:style-name="P8"/>
      <text:p text:style-name="P9">When would you ever want to assign a req multiple semantic-IDs? Why? What would the effect be if the system didn't allow this?</text:p>
      <text:p text:style-name="P9"/>
      <text:p text:style-name="P10">When sorting requirements, please provide sorting examples. When would you want to sort? After you accomplish your task, when would you need to sort next?</text:p>
      <text:p text:style-name="P10"/>
      <text:p text:style-name="P11">When sorting, if you were unable to select DESC order instead of ASC, how would that affect you? How important would that be to you?</text:p>
      <text:p text:style-name="P10"/>
      <text:p text:style-name="P11">When sorting is active and you change the content of a requirement which puts it out-of-order, <text:span text:style-name="T3">should the view reorder immediately?</text:span></text:p>
      <text:p text:style-name="P12">SI: It doesn't, but a little button appears saying “Out-of-order. Re-sort” which user can click when done.</text:p>
      <text:p text:style-name="P11"/>
      <text:p text:style-name="P12">When reqs are displayed heirarchically using their semantic-IDs, sometimes there are rows that serve just as a header for their children without being a req themselves. If this behaviour were not supported how would it affect you? How strongly would you feel when you realised it was missing? How would you work around it?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en" fo:country="AU" style:letter-kerning="true" style:font-name-asian="TianZhe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n" fo:country="AU" style:letter-kerning="true" style:font-name-asian="TianZhen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family="Arimo" style:font-family-generic="swiss" style:font-pitch="variable" fo:font-size="14pt" style:font-name-asian="TianZhen" style:font-family-asian="TianZhen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1:12:07.474818885</meta:creation-date>
    <meta:generator>LibreOffice/4.2.4.2$Linux_X86_64 LibreOffice_project/420m0$Build-2</meta:generator>
    <dc:date>2014-05-13T18:16:51.571008841</dc:date>
    <meta:editing-duration>PT6H27M1S</meta:editing-duration>
    <meta:editing-cycles>3</meta:editing-cycles>
    <meta:document-statistic meta:table-count="0" meta:image-count="0" meta:object-count="0" meta:page-count="1" meta:paragraph-count="14" meta:word-count="277" meta:character-count="1654" meta:non-whitespace-character-count="1394"/>
  </office:meta>
</office:document-meta>
</file>