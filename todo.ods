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3])" office:value-type="string" office:string-value="Done: 3.8" calcext:value-type="string">
            <text:p>Done: 3.8</text:p>
          </table:table-cell>
          <table:table-cell table:style-name="ce1" table:formula="of:=&quot;To Do: &quot;&amp;SUM([.B2:.B203])" office:value-type="string" office:string-value="To Do: 20.6" calcext:value-type="string">
            <text:p>To Do: 20.6</text:p>
          </table:table-cell>
          <table:table-cell table:style-name="ce1" table:formula="of:=&quot;Est days: &quot;&amp;SUM([.C2:.C203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0]-[.A20]" office:value-type="float" office:value="-0.9" calcext:value-type="float">
            <text:p>-0.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4]-[.A24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/00/0000</text:date>, <text:time style:data-style-name="N2" text:time-value="18:06:17.31542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8T18:09:28.866849423</dc:date>
    <meta:editing-duration>P1DT12H15M38S</meta:editing-duration>
    <meta:editing-cycles>16</meta:editing-cycles>
    <meta:generator>LibreOffice/5.4.1.2.0$Linux_X86_64 LibreOffice_project/40m0$Build-2</meta:generator>
    <meta:document-statistic meta:table-count="1" meta:cell-count="124" meta:object-count="0"/>
  </office:meta>
</office:document-meta>
</file>