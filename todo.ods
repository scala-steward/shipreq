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formula="of:=&quot;Done: &quot;&amp;SUM([.A2:.A203])" office:value-type="string" office:string-value="Done: 2.1" calcext:value-type="string">
            <text:p>Done: 2.1</text:p>
          </table:table-cell>
          <table:table-cell table:style-name="ce1" table:formula="of:=&quot;To Do: &quot;&amp;SUM([.B2:.B203])" office:value-type="string" office:string-value="To Do: 21.5" calcext:value-type="string">
            <text:p>To Do: 21.5</text:p>
          </table:table-cell>
          <table:table-cell table:style-name="ce1" table:formula="of:=&quot;Est days: &quot;&amp;SUM([.C2:.C203])" office:value-type="string" office:string-value="Est days: 23" calcext:value-type="string">
            <text:p>Est days: 23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.0</text:p>
          </table:table-cell>
          <table:table-cell/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</text:p>
          </table:table-cell>
          <table:table-cell table:number-columns-repeated="1019"/>
        </table:table-row>
        <table:table-row table:style-name="ro1">
          <table:table-cell/>
          <table:table-cell table:formula="of:=[.C20]-[.A20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+ap +tests)</text:p>
          </table:table-cell>
          <table:table-cell table:number-columns-repeated="1019"/>
        </table:table-row>
        <table:table-row table:style-name="ro1">
          <table:table-cell/>
          <table:table-cell table:formula="of:=[.C21]-[.A21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4]-[.A24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6">00/00/0000</text:date>, <text:time style:data-style-name="N2" text:time-value="15:42:58.511459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6T20:30:07.415528535</dc:date>
    <meta:editing-duration>P1DT12H12M27S</meta:editing-duration>
    <meta:editing-cycles>15</meta:editing-cycles>
    <meta:generator>LibreOffice/5.4.1.2.0$Linux_X86_64 LibreOffice_project/40m0$Build-2</meta:generator>
    <meta:document-statistic meta:table-count="1" meta:cell-count="123" meta:object-count="0"/>
  </office:meta>
</office:document-meta>
</file>