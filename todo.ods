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12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table:formula="of:=&quot;Done: &quot;&amp;SUM([.A2:.A203])" office:value-type="string" office:string-value="Done: 5.5" calcext:value-type="string">
            <text:p>Done: 5.5</text:p>
          </table:table-cell>
          <table:table-cell table:style-name="ce1" table:formula="of:=&quot;To Do: &quot;&amp;SUM([.B2:.B203])" office:value-type="string" office:string-value="To Do: 18.9" calcext:value-type="string">
            <text:p>To Do: 18.9</text:p>
          </table:table-cell>
          <table:table-cell table:style-name="ce1" table:formula="of:=&quot;Est days: &quot;&amp;SUM([.C2:.C203])" office:value-type="string" office:string-value="Est days: 23.6" calcext:value-type="string">
            <text:p>Est days: 23.6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Item</text:p>
          </table:table-cell>
          <table:table-cell table:style-name="ce5"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"/>
          <table:table-cell table:style-name="ce9" office:value-type="float" office:value="0.3" calcext:value-type="float">
            <text:p>0.3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Fix bug with autocompletion popup not closing on blur and then blocking the whole UI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UseCase exception levels are off-by-one. 4.E.1.a.i should be 4.E.1.1.a (should it though?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Revise default columns: on new project, only NewForm is visible; default columns are shit and can't be changed.</text:p>
          </table:table-cell>
          <table:table-cell table:number-columns-repeated="1019"/>
        </table:table-row>
        <table:table-row table:style-name="ro1">
          <table:table-cell/>
          <table:table-cell table:formula="of:=[.C5]-[.A5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vise ProjectTemplate - reduce reqtypes, BL without BR is weird</text:p>
          </table:table-cell>
          <table:table-cell table:number-columns-repeated="1019"/>
        </table:table-row>
        <table:table-row table:style-name="ro1">
          <table:table-cell/>
          <table:table-cell table:formula="of:=[.C6]-[.A6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pgrade JDK and audit crypto mechanisms (pending next Jetty release)</text:p>
          </table:table-cell>
          <table:table-cell table:number-columns-repeated="1019"/>
        </table:table-row>
        <table:table-row table:style-name="ro1">
          <table:table-cell/>
          <table:table-cell table:formula="of:=[.C7]-[.A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qDetail KB shortcuts: ↑, ↓, F2, Tab in/out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ctrl-enter in NewForm editors to create and close.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llow alt-enter in NewForm editors to create and not close.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 table:style-name="ce9"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CfgReqTypes restore button allows icon/text wrap. Fix CSS.</text:p>
          </table:table-cell>
          <table:table-cell table:number-columns-repeated="1019"/>
        </table:table-row>
        <table:table-row table:style-name="ro1">
          <table:table-cell/>
          <table:table-cell table:formula="of:=[.C11]-[.A11]" office:value-type="float" office:value="2.8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d and use RestorationForm just like the DeletionForm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NewForm is opening at the wrong row! Move up one! Should be above sort,filter,cols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1" office:value-type="string" calcext:value-type="string">
            <text:p>Misc</text:p>
          </table:table-cell>
          <table:table-cell table:style-name="ce11" office:value-type="string" calcext:value-type="string">
            <text:p>Add icons to project navbar dropdown (reqtable,impgraph etc) and sync to dashboard order (not A-Z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formula="of:=[.C15]-[.A1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Screenshot (capture, to webapp, to taskman, to FreshDesk)</text:p>
          </table:table-cell>
          <table:table-cell table:number-columns-repeated="1019"/>
        </table:table-row>
        <table:table-row table:style-name="ro1">
          <table:table-cell/>
          <table:table-cell table:formula="of:=[.C16]-[.A16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I &amp; protocol</text:p>
          </table:table-cell>
          <table:table-cell table:number-columns-repeated="1019"/>
        </table:table-row>
        <table:table-row table:style-name="ro1">
          <table:table-cell/>
          <table:table-cell table:formula="of:=[.C17]-[.A1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Webapp → Taskman → FreshDes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1" office:value-type="string" calcext:value-type="string">
            <text:p>SavedViews</text:p>
          </table:table-cell>
          <table:table-cell table:style-name="ce11" office:value-type="string" calcext:value-type="string">
            <text:p>Data model (+DataProp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[.C20]-[.A20]" office:value-type="float" office:value="-2.4" calcext:value-type="float">
            <text:p>-2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Events (bin &amp; db codecs, hash, gen(arb+RES), validation, ap, tests)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1]-[.A21]"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Logic (+tests)</text:p>
          </table:table-cell>
          <table:table-cell table:number-columns-repeated="1019"/>
        </table:table-row>
        <table:table-row table:style-name="ro1">
          <table:table-cell/>
          <table:table-cell table:formula="of:=[.C22]-[.A22]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vedViews</text:p>
          </table:table-cell>
          <table:table-cell office:value-type="string" calcext:value-type="string">
            <text:p>UI (+protoco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24]-[.A24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Update dashboard (with other UI fixes)</text:p>
          </table:table-cell>
          <table:table-cell table:number-columns-repeated="1019"/>
        </table:table-row>
        <table:table-row table:style-name="ro1">
          <table:table-cell/>
          <table:table-cell table:formula="of:=[.C25]-[.A25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rack and capture (+tests)</text:p>
          </table:table-cell>
          <table:table-cell table:number-columns-repeated="1019"/>
        </table:table-row>
        <table:table-row table:style-name="ro1">
          <table:table-cell/>
          <table:table-cell table:formula="of:=[.C26]-[.A26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dd each issue type to filter DSL (+autocomplete +interpreter)</text:p>
          </table:table-cell>
          <table:table-cell table:number-columns-repeated="1019"/>
        </table:table-row>
        <table:table-row table:style-name="ro1">
          <table:table-cell/>
          <table:table-cell table:formula="of:=[.C27]-[.A27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Highlighting everywhere</text:p>
          </table:table-cell>
          <table:table-cell table:number-columns-repeated="1019"/>
        </table:table-row>
        <table:table-row table:style-name="ro1">
          <table:table-cell/>
          <table:table-cell table:formula="of:=[.C28]-[.A28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table model</text:p>
          </table:table-cell>
          <table:table-cell table:number-columns-repeated="1019"/>
        </table:table-row>
        <table:table-row table:style-name="ro1">
          <table:table-cell/>
          <table:table-cell table:formula="of:=[.C29]-[.A29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page: gather/filter/sort/merge (+tests)</text:p>
          </table:table-cell>
          <table:table-cell table:number-columns-repeated="1019"/>
        </table:table-row>
        <table:table-row table:style-name="ro1">
          <table:table-cell/>
          <table:table-cell table:formula="of:=[.C30]-[.A30]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able column/order/sort freedom (possibly reuse from ReqTable)</text:p>
          </table:table-cell>
          <table:table-cell table:number-columns-repeated="1019"/>
        </table:table-row>
        <table:table-row table:style-name="ro1">
          <table:table-cell/>
          <table:table-cell table:formula="of:=[.C31]-[.A31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ew loose button &amp; form</text:p>
          </table:table-cell>
          <table:table-cell table:number-columns-repeated="1019"/>
        </table:table-row>
        <table:table-row table:style-name="ro1">
          <table:table-cell/>
          <table:table-cell table:formula="of:=[.C32]-[.A3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/>
          <table:table-cell table:formula="of:=[.C33]-[.A33]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nder table with editors &amp; buttons</text:p>
          </table:table-cell>
          <table:table-cell table:number-columns-repeated="1019"/>
        </table:table-row>
        <table:table-row table:style-name="ro1">
          <table:table-cell/>
          <table:table-cell table:formula="of:=[.C34]-[.A34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lternate states (empty, all filtered out)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1">00/00/0000</text:date>, <text:time style:data-style-name="N2" text:time-value="09:41:58.433385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18:12.305879112</meta:creation-date>
    <dc:date>2017-10-21T09:42:45.744312645</dc:date>
    <meta:editing-duration>P1DT12H33M27S</meta:editing-duration>
    <meta:editing-cycles>19</meta:editing-cycles>
    <meta:generator>LibreOffice/5.4.2.2.0$Linux_X86_64 LibreOffice_project/40m0$Build-2</meta:generator>
    <meta:document-statistic meta:table-count="1" meta:cell-count="125" meta:object-count="0"/>
  </office:meta>
</office:document-meta>
</file>