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65.46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59.6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17.5" calcext:value-type="float">
            <text:p>11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42518059855521" calcext:value-type="percentage">
            <text:p>24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0-27T03:16:48" calcext:value-type="date">
            <text:p>27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14.614035087719" calcext:value-type="float">
            <text:p>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1-13T17:11:34.736842" calcext:value-type="date">
            <text:p>13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263784461152882" calcext:value-type="percentage">
            <text:p>26.4%</text:p>
          </table:table-cell>
          <table:table-cell table:style-name="ce35" table:formula="of:=SUM([.B5:.B51])" office:value-type="float" office:value="159.6" calcext:value-type="float">
            <text:p>160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>
            <text:p/>
          </table:table-cell>
          <table:table-cell table:style-name="ce55" table:formula="of:=IF(SUM([.GY5:.GY51])=0;&quot;&quot;;SUM([.GY5:.GY51]))">
            <text:p/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>
            <text:p/>
          </table:table-cell>
          <table:table-cell table:style-name="ce55" table:formula="of:=IF(SUM([.HC5:.HC51])=0;&quot;&quot;;SUM([.HC5:.HC51]))">
            <text:p/>
          </table:table-cell>
          <table:table-cell table:style-name="ce55" table:formula="of:=IF(SUM([.HD5:.HD51])=0;&quot;&quot;;SUM([.HD5:.HD51]))">
            <text:p/>
          </table:table-cell>
          <table:table-cell table:style-name="ce55" table:formula="of:=IF(SUM([.HE5:.HE51])=0;&quot;&quot;;SUM([.HE5:.HE51]))">
            <text:p/>
          </table:table-cell>
          <table:table-cell table:style-name="ce55" table:formula="of:=IF(SUM([.HF5:.HF51])=0;&quot;&quot;;SUM([.HF5:.HF51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2.1" calcext:value-type="float">
            <text:p>42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1.7" calcext:value-type="float">
            <text:p>21.7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5.7" calcext:value-type="float">
            <text:p>1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1:.ZZ31])=0;&quot;&quot;;SUM([.C31:.ZZ31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2.4" calcext:value-type="float">
            <text:p>2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8:57:34.797263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9-02T19:12:32.030337964</dc:date>
    <meta:editing-duration>P11DT6H11M28S</meta:editing-duration>
    <meta:editing-cycles>108</meta:editing-cycles>
    <meta:generator>LibreOffice/4.4.5.2$Linux_X86_64 LibreOffice_project/40m0$Build-2</meta:generator>
    <meta:document-statistic meta:table-count="6" meta:cell-count="2237" meta:object-count="0"/>
  </office:meta>
</office:document-meta>
</file>