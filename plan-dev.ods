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92.4" calcext:value-type="float">
            <text:p>29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3.7" calcext:value-type="float">
            <text:p>20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20433436532508" calcext:value-type="percentage">
            <text:p>4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30T03:16:48" calcext:value-type="date">
            <text:p>30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8.696842105263" calcext:value-type="float">
            <text:p>1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22T19:30:41.684211" calcext:value-type="date">
            <text:p>22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303351573187415" calcext:value-type="percentage">
            <text:p>30.3%</text:p>
          </table:table-cell>
          <table:table-cell table:style-name="ce50" table:formula="of:=SUM([.B5:.B51])" office:value-type="float" office:value="292.4" calcext:value-type="float">
            <text:p>292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8.7" calcext:value-type="float">
            <text:p>88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7" calcext:value-type="float">
            <text:p>17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20:57:54.727241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05T20:58:12.450692226</dc:date>
    <meta:editing-duration>P11DT6H55M12S</meta:editing-duration>
    <meta:editing-cycles>157</meta:editing-cycles>
    <meta:generator>LibreOffice/5.1.1.3$Linux_X86_64 LibreOffice_project/10m0$Build-3</meta:generator>
    <meta:document-statistic meta:table-count="6" meta:cell-count="3540" meta:object-count="0"/>
  </office:meta>
</office:document-meta>
</file>