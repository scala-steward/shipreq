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toFont" svg:font-family="SetoFont" style:font-family-generic="system" style:font-pitch="variable"/>
  </office:font-face-decls>
  <office:automatic-styles>
    <style:style style:name="co1" style:family="table-column">
      <style:table-column-properties fo:break-before="auto" style:column-width="28.79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0.09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6.1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6mm"/>
    </style:style>
    <style:style style:name="co12" style:family="table-column">
      <style:table-column-properties fo:break-before="auto" style:column-width="19.44mm"/>
    </style:style>
    <style:style style:name="co13" style:family="table-column">
      <style:table-column-properties fo:break-before="auto" style:column-width="25.91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18.89mm"/>
    </style:style>
    <style:style style:name="co16" style:family="table-column">
      <style:table-column-properties fo:break-before="auto" style:column-width="5.03mm"/>
    </style:style>
    <style:style style:name="co17" style:family="table-column">
      <style:table-column-properties fo:break-before="auto" style:column-width="5.57mm"/>
    </style:style>
    <style:style style:name="co18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0" style:family="table-cell" style:parent-style-name="Default" style:data-style-name="N112">
      <style:table-cell-properties fo:background-color="#e6e6e6"/>
    </style:style>
    <style:style style:name="ce29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 style:data-style-name="N103"/>
    <style:style style:name="ce32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3"/>
    <style:style style:name="ce15" style:family="table-cell" style:parent-style-name="Default" style:data-style-name="N103">
      <style:table-cell-properties fo:background-color="#e6e6e6"/>
    </style:style>
    <style:style style:name="ce16" style:family="table-cell" style:parent-style-name="Default" style:data-style-name="N103">
      <style:text-properties fo:font-weight="bold" style:font-weight-asian="bold" style:font-weight-complex="bold"/>
    </style:style>
    <style:style style:name="ce36" style:family="table-cell" style:parent-style-name="Default" style:data-style-name="N10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fo:color="#b3b3b3"/>
    </style:style>
    <style:style style:name="ce19" style:family="table-cell" style:parent-style-name="Default" style:data-style-name="N103">
      <style:text-properties fo:font-style="italic" style:font-style-asian="italic" style:font-style-complex="italic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toFont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b3b3b3"/>
    </style:style>
    <style:style style:name="ce41" style:family="table-cell" style:parent-style-name="Default" style:data-style-name="N114"/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3" style:family="table-cell" style:parent-style-name="Default" style:data-style-name="N104"/>
    <style:style style:name="ce44" style:family="table-cell" style:parent-style-name="Default" style:data-style-name="N103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calculation-settings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RAM</text:p>
          </table:table-cell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ostgres</text:p>
          </table:table-cell>
          <table:table-cell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/>
        </table:table-row>
        <table:table-row table:style-name="ro1">
          <table:table-cell office:value-type="string" calcext:value-type="string">
            <text:p>kibana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ocker registry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it repo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/>
        </table:table-row>
      </table:table>
      <table:table table:name="Sydney pric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3" table:number-columns-repeated="1015" table:default-cell-style-name="Default"/>
        <table:table-row table:style-name="ro1">
          <table:table-cell table:number-columns-repeated="4"/>
          <table:table-cell table:style-name="ce7" office:value-type="string" calcext:value-type="string" table:number-columns-spanned="2" table:number-rows-spanned="1">
            <text:p>on-demand</text:p>
          </table:table-cell>
          <table:covered-table-cell table:style-name="ce31"/>
          <table:table-cell table:style-name="ce36" office:value-type="string" calcext:value-type="string" table:number-columns-spanned="3" table:number-rows-spanned="1">
            <text:p>std 1yr</text:p>
          </table:table-cell>
          <table:covered-table-cell table:style-name="ce36"/>
          <table:covered-table-cell table:style-name="ce32"/>
          <table:table-cell table:style-name="ce5" table:number-columns-repeated="101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vCPU</text:p>
          </table:table-cell>
          <table:table-cell table:style-name="ce5" office:value-type="string" calcext:value-type="string">
            <text:p>ECU</text:p>
          </table:table-cell>
          <table:table-cell table:style-name="ce5" office:value-type="string" calcext:value-type="string">
            <text:p>RAM</text:p>
          </table:table-cell>
          <table:table-cell table:style-name="ce8" office:value-type="string" calcext:value-type="string">
            <text:p>$/hr</text:p>
          </table:table-cell>
          <table:table-cell table:number-columns-repeated="2" table:style-name="ce32" office:value-type="string" calcext:value-type="string">
            <text:p>$/month</text:p>
          </table:table-cell>
          <table:table-cell table:style-name="ce32" office:value-type="string" calcext:value-type="string">
            <text:p>$/yr</text:p>
          </table:table-cell>
          <table:table-cell table:style-name="ce20" office:value-type="string" calcext:value-type="string">
            <text:p>all up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nano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currency" office:currency="AUD" office:value="0.0066" calcext:value-type="currency">
            <text:p>$0.0066</text:p>
          </table:table-cell>
          <table:table-cell table:formula="of:=[.E3]*24*365/12" office:value-type="currency" office:currency="AUD" office:value="4.818" calcext:value-type="currency">
            <text:p>$5</text:p>
          </table:table-cell>
          <table:table-cell office:value-type="currency" office:currency="AUD" office:value="3.28" calcext:value-type="currency">
            <text:p>$3</text:p>
          </table:table-cell>
          <table:table-cell table:formula="of:=[.G3]*12" office:value-type="currency" office:currency="AUD" office:value="39.36" calcext:value-type="currency">
            <text:p>$39</text:p>
          </table:table-cell>
          <table:table-cell office:value-type="currency" office:currency="AUD" office:value="37" calcext:value-type="currency">
            <text:p>$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micro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132" calcext:value-type="currency">
            <text:p>$0.0132</text:p>
          </table:table-cell>
          <table:table-cell table:formula="of:=[.E4]*24*365/12" office:value-type="currency" office:currency="AUD" office:value="9.636" calcext:value-type="currency">
            <text:p>$10</text:p>
          </table:table-cell>
          <table:table-cell office:value-type="currency" office:currency="AUD" office:value="6.57" calcext:value-type="currency">
            <text:p>$7</text:p>
          </table:table-cell>
          <table:table-cell table:formula="of:=[.G4]*12" office:value-type="currency" office:currency="AUD" office:value="78.84" calcext:value-type="currency">
            <text:p>$79</text:p>
          </table:table-cell>
          <table:table-cell office:value-type="currency" office:currency="AUD" office:value="73" calcext:value-type="currency">
            <text:p>$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smal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264" calcext:value-type="currency">
            <text:p>$0.0264</text:p>
          </table:table-cell>
          <table:table-cell table:formula="of:=[.E5]*24*365/12" office:value-type="currency" office:currency="AUD" office:value="19.272" calcext:value-type="currency">
            <text:p>$19</text:p>
          </table:table-cell>
          <table:table-cell office:value-type="currency" office:currency="AUD" office:value="13.07" calcext:value-type="currency">
            <text:p>$13</text:p>
          </table:table-cell>
          <table:table-cell table:formula="of:=[.G5]*12" office:value-type="currency" office:currency="AUD" office:value="156.84" calcext:value-type="currency">
            <text:p>$157</text:p>
          </table:table-cell>
          <table:table-cell office:value-type="currency" office:currency="AUD" office:value="147" calcext:value-type="currency">
            <text:p>$147</text:p>
          </table:table-cell>
          <table: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t3.medium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0528" calcext:value-type="currency">
            <text:p>$0.0528</text:p>
          </table:table-cell>
          <table:table-cell table:formula="of:=[.E6]*24*365/12" office:value-type="currency" office:currency="AUD" office:value="38.544" calcext:value-type="currency">
            <text:p>$39</text:p>
          </table:table-cell>
          <table:table-cell office:value-type="currency" office:currency="AUD" office:value="26.21" calcext:value-type="currency">
            <text:p>$26</text:p>
          </table:table-cell>
          <table:table-cell table:formula="of:=[.G6]*12" office:value-type="currency" office:currency="AUD" office:value="314.52" calcext:value-type="currency">
            <text:p>$315</text:p>
          </table:table-cell>
          <table:table-cell office:value-type="currency" office:currency="AUD" office:value="293" calcext:value-type="currency">
            <text:p>$2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5.la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AUD" office:value="0.12" calcext:value-type="currency">
            <text:p>$0.1200</text:p>
          </table:table-cell>
          <table:table-cell table:formula="of:=[.E7]*24*365/12" office:value-type="currency" office:currency="AUD" office:value="87.6" calcext:value-type="currency">
            <text:p>$88</text:p>
          </table:table-cell>
          <table:table-cell office:value-type="currency" office:currency="AUD" office:value="60.59" calcext:value-type="currency">
            <text:p>$61</text:p>
          </table:table-cell>
          <table:table-cell table:formula="of:=[.G7]*12" office:value-type="currency" office:currency="AUD" office:value="727.08" calcext:value-type="currency">
            <text:p>$727</text:p>
          </table:table-cell>
          <table:table-cell office:value-type="currency" office:currency="AUD" office:value="680" calcext:value-type="currency">
            <text:p>$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.larg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1" calcext:value-type="currency">
            <text:p>$0.1110</text:p>
          </table:table-cell>
          <table:table-cell table:formula="of:=[.E8]*24*365/12" office:value-type="currency" office:currency="AUD" office:value="81.03" calcext:value-type="currency">
            <text:p>$81</text:p>
          </table:table-cell>
          <table:table-cell office:value-type="currency" office:currency="AUD" office:value="51.83" calcext:value-type="currency">
            <text:p>$52</text:p>
          </table:table-cell>
          <table:table-cell table:formula="of:=[.G8]*12" office:value-type="currency" office:currency="AUD" office:value="621.96" calcext:value-type="currency">
            <text:p>$622</text:p>
          </table:table-cell>
          <table:table-cell office:value-type="currency" office:currency="AUD" office:value="578" calcext:value-type="currency">
            <text:p>$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.xlarg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222" calcext:value-type="currency">
            <text:p>$0.2220</text:p>
          </table:table-cell>
          <table:table-cell table:formula="of:=[.E9]*24*365/12" office:value-type="currency" office:currency="AUD" office:value="162.06" calcext:value-type="currency">
            <text:p>$162</text:p>
          </table:table-cell>
          <table:table-cell office:value-type="currency" office:currency="AUD" office:value="102.93" calcext:value-type="currency">
            <text:p>$103</text:p>
          </table:table-cell>
          <table:table-cell table:formula="of:=[.G9]*12" office:value-type="currency" office:currency="AUD" office:value="1235.16" calcext:value-type="currency">
            <text:p>$1,235</text:p>
          </table:table-cell>
          <table:table-cell office:value-type="currency" office:currency="AUD" office:value="1157" calcext:value-type="currency">
            <text:p>$1,15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db.t2.micro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8" calcext:value-type="currency">
            <text:p>$0.0280</text:p>
          </table:table-cell>
          <table:table-cell table:formula="of:=[.E12]*24*365/12" office:value-type="currency" office:currency="AUD" office:value="20.44" calcext:value-type="currency">
            <text:p>$20</text:p>
          </table:table-cell>
          <table:table-cell office:value-type="currency" office:currency="AUD" office:value="16.352" calcext:value-type="currency">
            <text:p>$16</text:p>
          </table:table-cell>
          <table:table-cell table:formula="of:=[.G12]*12" office:value-type="currency" office:currency="AUD" office:value="196.224" calcext:value-type="currency">
            <text:p>$196</text:p>
          </table:table-cell>
          <table:table-cell office:value-type="currency" office:currency="AUD" office:value="181" calcext:value-type="currency">
            <text:p>$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.t2.small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56" calcext:value-type="currency">
            <text:p>$0.0560</text:p>
          </table:table-cell>
          <table:table-cell table:formula="of:=[.E13]*24*365/12" office:value-type="currency" office:currency="AUD" office:value="40.88" calcext:value-type="currency">
            <text:p>$41</text:p>
          </table:table-cell>
          <table:table-cell office:value-type="currency" office:currency="AUD" office:value="32.704" calcext:value-type="currency">
            <text:p>$33</text:p>
          </table:table-cell>
          <table:table-cell table:formula="of:=[.G13]*12" office:value-type="currency" office:currency="AUD" office:value="392.448" calcext:value-type="currency">
            <text:p>$392</text:p>
          </table:table-cell>
          <table:table-cell office:value-type="currency" office:currency="AUD" office:value="361" calcext:value-type="currency">
            <text:p>$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.t2.medium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2" calcext:value-type="currency">
            <text:p>$0.1120</text:p>
          </table:table-cell>
          <table:table-cell table:formula="of:=[.E14]*24*365/12" office:value-type="currency" office:currency="AUD" office:value="81.76" calcext:value-type="currency">
            <text:p>$82</text:p>
          </table:table-cell>
          <table:table-cell office:value-type="currency" office:currency="AUD" office:value="65.408" calcext:value-type="currency">
            <text:p>$65</text:p>
          </table:table-cell>
          <table:table-cell table:formula="of:=[.G14]*12" office:value-type="currency" office:currency="AUD" office:value="784.896" calcext:value-type="currency">
            <text:p>$785</text:p>
          </table:table-cell>
          <table:table-cell office:value-type="currency" office:currency="AUD" office:value="722" calcext:value-type="currency">
            <text:p>$72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2.micro.elasticsearch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8" calcext:value-type="currency">
            <text:p>$0.0280</text:p>
          </table:table-cell>
          <table:table-cell table:formula="of:=[.E17]*24*365/12" office:value-type="currency" office:currency="AUD" office:value="20.44" calcext:value-type="currency">
            <text:p>$20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.small.elasticsearch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56" calcext:value-type="currency">
            <text:p>$0.0560</text:p>
          </table:table-cell>
          <table:table-cell table:formula="of:=[.E18]*24*365/12" office:value-type="currency" office:currency="AUD" office:value="40.88" calcext:value-type="currency">
            <text:p>$41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.medium.elasticsearch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2" calcext:value-type="currency">
            <text:p>$0.1120</text:p>
          </table:table-cell>
          <table:table-cell table:formula="of:=[.E19]*24*365/12" office:value-type="currency" office:currency="AUD" office:value="81.76" calcext:value-type="currency">
            <text:p>$82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4.large.elasticsearch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188" calcext:value-type="currency">
            <text:p>$0.1880</text:p>
          </table:table-cell>
          <table:table-cell table:formula="of:=[.E20]*24*365/12" office:value-type="currency" office:currency="AUD" office:value="137.24" calcext:value-type="currency">
            <text:p>$137</text:p>
          </table:table-cell>
          <table:table-cell table:formula="of:=0.13*24*365/12" office:value-type="currency" office:currency="AUD" office:value="94.9" calcext:value-type="currency">
            <text:p>$95</text:p>
          </table:table-cell>
          <table:table-cell table:formula="of:=[.G20]*12" office:value-type="currency" office:currency="AUD" office:value="1138.8" calcext:value-type="currency">
            <text:p>$1,139</text:p>
          </table:table-cell>
          <table:table-cell office:value-type="currency" office:currency="AUD" office:value="1070" calcext:value-type="currency">
            <text:p>$1,070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Fine grained (too underpowered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/>
          <table:table-cell table:style-name="ce5" office:value-type="string" calcext:value-type="string">
            <text:p>RAM</text:p>
          </table:table-cell>
          <table:table-cell table:number-columns-repeated="3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1Y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 table:number-columns-spanned="1" table:number-rows-spanned="3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29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27:.F35])" office:value-type="currency" office:currency="AUD" office:value="74.606" calcext:value-type="currency">
            <text:p>$75</text:p>
          </table:table-cell>
          <table:table-cell table:style-name="ce16" table:formula="of:=SUM([.G27:.G35])" office:value-type="currency" office:currency="AUD" office:value="59.702" calcext:value-type="currency">
            <text:p>$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ingle large (everything on one host could be dangerous; also would need cpu prioritisation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m5.large</text:p>
          </table:table-cell>
          <table:table-cell table:formula="of:=[.F7]" office:value-type="currency" office:currency="AUD" office:value="87.6" calcext:value-type="currency">
            <text:p>$88</text:p>
          </table:table-cell>
          <table:table-cell table:formula="of:=[.G7]" office:value-type="currency" office:currency="AUD" office:value="60.59" calcext:value-type="currency">
            <text:p>$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29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style-name="ce19"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39:.F47])" office:value-type="currency" office:currency="AUD" office:value="128.48" calcext:value-type="currency">
            <text:p>$128</text:p>
          </table:table-cell>
          <table:table-cell table:style-name="ce16" table:formula="of:=SUM([.G39:.G47])" office:value-type="currency" office:currency="AUD" office:value="97.382" calcext:value-type="currency">
            <text:p>$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ser-facing + other (speed still a concern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2" office:value-type="string" calcext:value-type="string" table:number-columns-spanned="1" table:number-rows-spanned="5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29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style-name="ce19"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51:.F59])" office:value-type="currency" office:currency="AUD" office:value="79.424" calcext:value-type="currency">
            <text:p>$79</text:p>
          </table:table-cell>
          <table:table-cell table:style-name="ce16" table:formula="of:=SUM([.G51:.G59])" office:value-type="currency" office:currency="AUD" office:value="62.932" calcext:value-type="currency">
            <text:p>$63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gat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/>
          <table:table-cell table:style-name="ce5" table:number-columns-repeated="2"/>
          <table:table-cell/>
          <table:table-cell table:style-name="ce5" office:value-type="string" calcext:value-type="string">
            <text:p>vCPU/hr</text:p>
          </table:table-cell>
          <table:table-cell table:style-name="ce5" office:value-type="string" calcext:value-type="string">
            <text:p>RAM/GB/hr</text:p>
          </table:table-cell>
          <table:table-cell/>
          <table:table-cell table:style-name="ce5" office:value-type="string" calcext:value-type="string">
            <text:p>vCPU/m</text:p>
          </table:table-cell>
          <table:table-cell table:style-name="ce5" office:value-type="string" calcext:value-type="string">
            <text:p>RAM/GB/m</text:p>
          </table:table-cell>
          <table:table-cell/>
        </table:table-row>
        <table:table-row table:style-name="ro1">
          <table:table-cell table:style-name="ce1" office:value-type="string" calcext:value-type="string">
            <text:p>Fargate pricing</text:p>
          </table:table-cell>
          <table:table-cell table:number-columns-repeated="3"/>
          <table:table-cell table:style-name="ce41" office:value-type="currency" office:currency="AUD" office:value="0.04856" calcext:value-type="currency">
            <text:p>$0.04856</text:p>
          </table:table-cell>
          <table:table-cell table:style-name="ce41" office:value-type="currency" office:currency="AUD" office:value="0.00532" calcext:value-type="currency">
            <text:p>$0.00532</text:p>
          </table:table-cell>
          <table:table-cell/>
          <table:table-cell table:style-name="ce43" table:formula="of:=[.E2]*24*365/12" office:value-type="currency" office:currency="AUD" office:value="35.4488" calcext:value-type="currency">
            <text:p>$35.45</text:p>
          </table:table-cell>
          <table:table-cell table:style-name="ce43" table:formula="of:=[.F2]*24*365/12" office:value-type="currency" office:currency="AUD" office:value="3.8836" calcext:value-type="currency">
            <text:p>$3.88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vCPU</text:p>
          </table:table-cell>
          <table:table-cell table:style-name="ce5" office:value-type="string" calcext:value-type="string">
            <text:p>RAM (GB)</text:p>
          </table:table-cell>
          <table:table-cell/>
          <table:table-cell table:style-name="ce5" office:value-type="string" calcext:value-type="string">
            <text:p>vCPU</text:p>
          </table:table-cell>
          <table:table-cell table:style-name="ce5" office:value-type="string" calcext:value-type="string">
            <text:p>RAM (GB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1" table:formula="of:=[.E10]*[.H$2]" office:value-type="currency" office:currency="AUD" office:value="70.8976" calcext:value-type="currency">
            <text:p>$71</text:p>
          </table:table-cell>
          <table:table-cell table:style-name="ce31" table:formula="of:=[.F10]*[.I$2]" office:value-type="currency" office:currency="AUD" office:value="7.7672" calcext:value-type="currency">
            <text:p>$8</text:p>
          </table:table-cell>
          <table:table-cell table:style-name="ce31" table:formula="of:=[.I10]+[.H10]" office:value-type="currency" office:currency="AUD" office:value="78.6648" calcext:value-type="currency">
            <text:p>$79</text:p>
          </table:table-cell>
        </table:table-row>
        <table:table-row table:style-name="ro1">
          <table:table-cell office:value-type="string" calcext:value-type="string">
            <text:p>taskma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[.E11]*[.H$2]" office:value-type="currency" office:currency="AUD" office:value="8.8622" calcext:value-type="currency">
            <text:p>$9</text:p>
          </table:table-cell>
          <table:table-cell table:style-name="ce31" table:formula="of:=[.F11]*[.I$2]" office:value-type="currency" office:currency="AUD" office:value="1.9418" calcext:value-type="currency">
            <text:p>$2</text:p>
          </table:table-cell>
          <table:table-cell table:style-name="ce31" table:formula="of:=[.I11]+[.H11]" office:value-type="currency" office:currency="AUD" office:value="10.804" calcext:value-type="currency">
            <text:p>$11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0.25" calcext:value-type="float" table:number-columns-spanned="1" table:number-rows-spanned="3">
            <text:p>0.25</text:p>
          </table:table-cell>
          <table:table-cell table:style-name="ce42" office:value-type="float" office:value="0.5" calcext:value-type="float" table:number-columns-spanned="1" table:number-rows-spanned="3">
            <text:p>0.5</text:p>
          </table:table-cell>
          <table:table-cell/>
          <table:table-cell table:style-name="ce44" table:formula="of:=[.E12]*[.H$2]" office:value-type="currency" office:currency="AUD" office:value="8.8622" calcext:value-type="currency" table:number-columns-spanned="1" table:number-rows-spanned="3">
            <text:p>$9</text:p>
          </table:table-cell>
          <table:table-cell table:style-name="ce44" table:formula="of:=[.F12]*[.I$2]" office:value-type="currency" office:currency="AUD" office:value="1.9418" calcext:value-type="currency" table:number-columns-spanned="1" table:number-rows-spanned="3">
            <text:p>$2</text:p>
          </table:table-cell>
          <table:table-cell table:style-name="ce44" table:formula="of:=[.I12]+[.H12]" office:value-type="currency" office:currency="AUD" office:value="10.804" calcext:value-type="currency" table:number-columns-spanned="1" table:number-rows-spanned="3">
            <text:p>$11</text:p>
          </table:table-cell>
        </table:table-row>
        <table:table-row table:style-name="ro1">
          <table:table-cell table:style-name="ce1" office:value-type="string" calcext:value-type="string">
            <text:p>grafana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covered-table-cell table:number-columns-repeated="2"/>
          <table:table-cell/>
          <table:covered-table-cell table:number-columns-repeated="2" table:style-name="ce31"/>
          <table:covered-table-cell table:style-name="ce31" table:formula="of:=[.I13]+[.H13]" office:value-type="currency" office:currency="AUD" office:value="0" calcext:value-type="currency">
            <text:p>$0</text:p>
          </table:covered-table-cell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covered-table-cell table:number-columns-repeated="2"/>
          <table:table-cell/>
          <table:covered-table-cell table:number-columns-repeated="2" table:style-name="ce31"/>
          <table:covered-table-cell table:style-name="ce31" table:formula="of:=[.I14]+[.H14]" office:value-type="currency" office:currency="AUD" office:value="0" calcext:value-type="currency">
            <text:p>$0</text:p>
          </table:covered-table-cell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[.E15]*[.H$2]" office:value-type="currency" office:currency="AUD" office:value="8.8622" calcext:value-type="currency">
            <text:p>$9</text:p>
          </table:table-cell>
          <table:table-cell table:style-name="ce31" table:formula="of:=[.F15]*[.I$2]" office:value-type="currency" office:currency="AUD" office:value="1.9418" calcext:value-type="currency">
            <text:p>$2</text:p>
          </table:table-cell>
          <table:table-cell table:style-name="ce31" table:formula="of:=[.I15]+[.H15]" office:value-type="currency" office:currency="AUD" office:value="10.804" calcext:value-type="currency">
            <text:p>$11</text:p>
          </table:table-cell>
        </table:table-row>
        <table:table-row table:style-name="ro1">
          <table:table-cell table:number-columns-repeated="7"/>
          <table:table-cell table:style-name="ce31" table:number-columns-repeated="3"/>
        </table:table-row>
        <table:table-row table:style-name="ro1">
          <table:table-cell table:number-columns-repeated="7"/>
          <table:table-cell table:style-name="ce16" table:formula="of:=SUM([.H10:.H15])" office:value-type="currency" office:currency="AUD" office:value="97.4842" calcext:value-type="currency">
            <text:p>$97</text:p>
          </table:table-cell>
          <table:table-cell table:style-name="ce16" table:formula="of:=SUM([.I10:.I15])" office:value-type="currency" office:currency="AUD" office:value="13.5926" calcext:value-type="currency">
            <text:p>$14</text:p>
          </table:table-cell>
          <table:table-cell table:style-name="ce16" table:formula="of:=SUM([.J10:.J15])" office:value-type="currency" office:currency="AUD" office:value="111.0768" calcext:value-type="currency">
            <text:p>$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toFont" svg:font-family="Seto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Seto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AU">$</number:currency-symbol>
      <number:number number:decimal-places="4" loext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4" loext:min-decimal-places="4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AU">$</number:currency-symbol>
      <number:number number:decimal-places="5" loext:min-decimal-places="5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5" loext:min-decimal-places="5" number:min-integer-digits="1" number:grouping="true"/>
      <style:map style:condition="value()&gt;=0" style:apply-style-name="N114P0"/>
    </number:currency-style>
    <number:number-style style:name="N115">
      <number:number number:decimal-places="1" loext:min-decimal-places="1" number:min-integer-digits="1"/>
    </number:number-style>
    <number:currency-style style:name="N117P0" style:volatile="true">
      <number:currency-symbol number:language="en" number:country="AU">$</number:currency-symbol>
      <number:number number:decimal-places="1" loext:min-decimal-places="1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1" loext:min-decimal-places="1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21:09:53.437245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33:55.746914671</meta:creation-date>
    <dc:date>2019-01-08T21:33:17.268898982</dc:date>
    <meta:editing-duration>PT19M45S</meta:editing-duration>
    <meta:editing-cycles>10</meta:editing-cycles>
    <meta:generator>LibreOffice/6.1.4.2$Linux_X86_64 LibreOffice_project/10$Build-2</meta:generator>
    <meta:document-statistic meta:table-count="3" meta:cell-count="303" meta:object-count="0"/>
  </office:meta>
</office:document-meta>
</file>