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33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3"/>
    <style:style style:name="ce17" style:family="table-cell" style:parent-style-name="Default">
      <style:text-properties fo:color="#ffffff"/>
    </style:style>
    <style:style style:name="ce6" style:family="table-cell" style:parent-style-name="Default" style:data-style-name="N121"/>
    <style:style style:name="ce7" style:family="table-cell" style:parent-style-name="Default" style:data-style-name="N120"/>
    <style:style style:name="ce8" style:family="table-cell" style:parent-style-name="Default" style:data-style-name="N103">
      <style:text-properties fo:font-weight="bold" style:font-weight-asian="bold" style:font-weight-complex="bold"/>
    </style:style>
    <style:style style:name="ce21" style:family="table-cell" style:parent-style-name="Default" style:data-style-name="N103">
      <style:table-cell-properties fo:background-color="#23ff23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104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10"/>
  </office:automatic-styles>
  <office:body>
    <office:spreadsheet>
      <table:calculation-settings table:use-regular-expressions="false" table:use-wildcards="true"/>
      <table:table table:name="Sydn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50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EBS</text:p>
          </table:table-cell>
          <table:table-cell table:style-name="ce3" office:value-type="string" calcext:value-type="string">
            <text:p>QTY</text:p>
          </table:table-cell>
          <table:table-cell/>
          <table:table-cell table:style-name="ce5" office:value-type="string" calcext:value-type="string">
            <text:p>USD/hr each</text:p>
          </table:table-cell>
          <table:table-cell table:style-name="ce3" office:value-type="string" calcext:value-type="string">
            <text:p>AUD/m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string" calcext:value-type="string">
            <text:p>AUD : 1 US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na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7" table:formula="of:=IF([.B2]=&quot;EC2&quot;;[.E2]*[.G2];0)" office:value-type="float" office:value="0.0059" calcext:value-type="float">
            <text:p>0.0059</text:p>
          </table:table-cell>
          <table:table-cell office:value-type="float" office:value="0.0059" calcext:value-type="float">
            <text:p>0.0059</text:p>
          </table:table-cell>
          <table:table-cell table:formula="of:=[.G2]*24*365/12*[.$K$1]*[.E2]" office:value-type="currency" office:currency="AUD" office:value="6.28822" calcext:value-type="currency">
            <text:p>$6</text:p>
          </table:table-cell>
          <table:table-cell table:number-columns-repeated="4"/>
          <table:table-cell table:style-name="ce10" office:value-type="string" calcext:value-type="string">
            <text:p>US/hr</text:p>
          </table:table-cell>
          <table:table-cell table:style-name="ce10" office:value-type="string" calcext:value-type="string">
            <text:p>AU/month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na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7" table:formula="of:=IF([.B3]=&quot;EC2&quot;;[.E3]*[.G3];0)" office:value-type="float" office:value="0.0059" calcext:value-type="float">
            <text:p>0.0059</text:p>
          </table:table-cell>
          <table:table-cell office:value-type="float" office:value="0.0059" calcext:value-type="float">
            <text:p>0.0059</text:p>
          </table:table-cell>
          <table:table-cell table:formula="of:=[.G3]*24*365/12*[.$K$1]*[.E3]" office:value-type="currency" office:currency="AUD" office:value="6.28822" calcext:value-type="currency">
            <text:p>$6</text:p>
          </table:table-cell>
          <table:table-cell table:number-columns-repeated="2"/>
          <table:table-cell office:value-type="string" calcext:value-type="string">
            <text:p>t3a.nano</text:p>
          </table:table-cell>
          <table:table-cell office:value-type="string" calcext:value-type="string">
            <text:p>2b + 0.5GiB</text:p>
          </table:table-cell>
          <table:table-cell table:style-name="ce7" office:value-type="float" office:value="0.0059" calcext:value-type="float">
            <text:p>0.0059</text:p>
          </table:table-cell>
          <table:table-cell table:style-name="ce25" table:formula="of:=[.M3]*24*365/12*[.$K$1]" office:value-type="currency" office:currency="AUD" office:value="6.28822" calcext:value-type="currency">
            <text:p>$6.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db.t3.mic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7" table:formula="of:=IF([.B4]=&quot;EC2&quot;;[.E4]*[.G4];0)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formula="of:=[.G4]*24*365/12*[.$K$1]*[.E4]" office:value-type="currency" office:currency="AUD" office:value="29.8424" calcext:value-type="currency">
            <text:p>$30</text:p>
          </table:table-cell>
          <table:table-cell table:number-columns-repeated="2"/>
          <table:table-cell office:value-type="string" calcext:value-type="string">
            <text:p>t3a.micro</text:p>
          </table:table-cell>
          <table:table-cell office:value-type="string" calcext:value-type="string">
            <text:p>2b + 1GiB</text:p>
          </table:table-cell>
          <table:table-cell table:style-name="ce7" office:value-type="float" office:value="0.0119" calcext:value-type="float">
            <text:p>0.0119</text:p>
          </table:table-cell>
          <table:table-cell table:style-name="ce4" table:formula="of:=[.M4]*24*365/12*[.$K$1]" office:value-type="currency" office:currency="AUD" office:value="12.68302" calcext:value-type="currency">
            <text:p>$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cache.t3.micro</text:p>
          </table:table-cell>
          <table:table-cell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7" table:formula="of:=IF([.B5]=&quot;EC2&quot;;[.E5]*[.G5];0)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formula="of:=[.G5]*24*365/12*[.$K$1]*[.E5]" office:value-type="currency" office:currency="AUD" office:value="26.645" calcext:value-type="currency">
            <text:p>$27</text:p>
          </table:table-cell>
          <table:table-cell table:number-columns-repeated="2"/>
          <table:table-cell office:value-type="string" calcext:value-type="string">
            <text:p>t3a.small</text:p>
          </table:table-cell>
          <table:table-cell office:value-type="string" calcext:value-type="string">
            <text:p>2b + 2GiB</text:p>
          </table:table-cell>
          <table:table-cell table:style-name="ce7" office:value-type="float" office:value="0.0238" calcext:value-type="float">
            <text:p>0.0238</text:p>
          </table:table-cell>
          <table:table-cell table:style-name="ce4" table:formula="of:=[.M5]*24*365/12*[.$K$1]" office:value-type="currency" office:currency="AUD" office:value="25.36604" calcext:value-type="currency">
            <text:p>$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LB</text:p>
          </table:table-cell>
          <table:table-cell/>
          <table:table-cell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7" table:formula="of:=IF([.B6]=&quot;EC2&quot;;[.E6]*[.G6];0)" office:value-type="float" office:value="0" calcext:value-type="float">
            <text:p>0</text:p>
          </table:table-cell>
          <table:table-cell office:value-type="float" office:value="0.0252" calcext:value-type="float">
            <text:p>0.0252</text:p>
          </table:table-cell>
          <table:table-cell table:formula="of:=[.G6]*24*365/12*[.$K$1]*[.E6]" office:value-type="currency" office:currency="AUD" office:value="26.85816" calcext:value-type="currency">
            <text:p>$27</text:p>
          </table:table-cell>
          <table:table-cell table:number-columns-repeated="2"/>
          <table:table-cell office:value-type="string" calcext:value-type="string">
            <text:p>t3a.medium</text:p>
          </table:table-cell>
          <table:table-cell office:value-type="string" calcext:value-type="string">
            <text:p>2b + 4GB</text:p>
          </table:table-cell>
          <table:table-cell table:style-name="ce7" office:value-type="float" office:value="0.0475" calcext:value-type="float">
            <text:p>0.0475</text:p>
          </table:table-cell>
          <table:table-cell table:style-name="ce4" table:formula="of:=[.M6]*24*365/12*[.$K$1]" office:value-type="currency" office:currency="AUD" office:value="50.6255" calcext:value-type="currency">
            <text:p>$5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small</text:p>
          </table:table-cell>
          <table:table-cell table:formula="of:=30*[.E7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17" table:formula="of:=IF([.B7]=&quot;EC2&quot;;[.E7]*[.G7];0)" office:value-type="float" office:value="0.0476" calcext:value-type="float">
            <text:p>0.0476</text:p>
          </table:table-cell>
          <table:table-cell office:value-type="float" office:value="0.0238" calcext:value-type="float">
            <text:p>0.0238</text:p>
          </table:table-cell>
          <table:table-cell table:formula="of:=[.G7]*24*365/12*[.$K$1]*[.E7]" office:value-type="currency" office:currency="AUD" office:value="50.73208" calcext:value-type="currency">
            <text:p>$51</text:p>
          </table:table-cell>
          <table:table-cell table:number-columns-repeated="2"/>
          <table:table-cell office:value-type="string" calcext:value-type="string">
            <text:p>t3a.large</text:p>
          </table:table-cell>
          <table:table-cell office:value-type="string" calcext:value-type="string">
            <text:p>2b + 8GB</text:p>
          </table:table-cell>
          <table:table-cell table:style-name="ce7" office:value-type="float" office:value="0.095" calcext:value-type="float">
            <text:p>0.0950</text:p>
          </table:table-cell>
          <table:table-cell table:style-name="ce4" table:formula="of:=[.M7]*24*365/12*[.$K$1]" office:value-type="currency" office:currency="AUD" office:value="101.251" calcext:value-type="currency">
            <text:p>$10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t3a.micro</text:p>
          </table:table-cell>
          <table:table-cell table:formula="of:=30*[.E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7" table:formula="of:=IF([.B8]=&quot;EC2&quot;;[.E8]*[.G8];0)" office:value-type="float" office:value="0.0119" calcext:value-type="float">
            <text:p>0.0119</text:p>
          </table:table-cell>
          <table:table-cell office:value-type="float" office:value="0.0119" calcext:value-type="float">
            <text:p>0.0119</text:p>
          </table:table-cell>
          <table:table-cell table:formula="of:=[.G8]*24*365/12*[.$K$1]*[.E8]" office:value-type="currency" office:currency="AUD" office:value="12.68302" calcext:value-type="currency">
            <text:p>$13</text:p>
          </table:table-cell>
          <table:table-cell table:number-columns-repeated="2"/>
          <table:table-cell office:value-type="string" calcext:value-type="string">
            <text:p>m5a.large</text:p>
          </table:table-cell>
          <table:table-cell office:value-type="string" calcext:value-type="string">
            <text:p>2 + 8GB</text:p>
          </table:table-cell>
          <table:table-cell table:style-name="ce7" office:value-type="float" office:value="0.108" calcext:value-type="float">
            <text:p>0.1080</text:p>
          </table:table-cell>
          <table:table-cell table:style-name="ce4" table:formula="of:=[.M8]*24*365/12*[.$K$1]" office:value-type="currency" office:currency="AUD" office:value="115.1064" calcext:value-type="currency">
            <text:p>$1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2.small.elasticsear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table:formula="of:=IF([.B9]=&quot;EC2&quot;;[.E9]*[.G9];0)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formula="of:=[.G9]*24*365/12*[.$K$1]*[.E9]" office:value-type="currency" office:currency="AUD" office:value="59.6848" calcext:value-type="currency">
            <text:p>$60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8" table:formula="of:=SUM([.H2:.H9])" office:value-type="currency" office:currency="AUD" office:value="219.0219" calcext:value-type="currency">
            <text:p>$219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number-columns-repeated="56"/>
        </table:table-row>
        <table:table-row table:style-name="ro1">
          <table:table-cell table:number-columns-repeated="2"/>
          <table:table-cell table:style-name="ce3" office:value-type="string" calcext:value-type="string">
            <text:p>Total EBS:</text:p>
          </table:table-cell>
          <table:table-cell table:style-name="ce3" table:formula="of:=SUM([.D2:.D9])" office:value-type="float" office:value="136" calcext:value-type="float">
            <text:p>136</text:p>
          </table:table-cell>
          <table:table-cell table:style-name="ce5" office:value-type="string" calcext:value-type="string">
            <text:p>GB</text:p>
          </table:table-cell>
          <table:table-cell table:number-columns-repeated="2"/>
          <table:table-cell table:style-name="ce8" table:formula="of:=[.D12]*0.12*[.$K$1]" office:value-type="currency" office:currency="AUD" office:value="23.8272" calcext:value-type="currency">
            <text:p>$24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number-columns-repeated="56"/>
        </table:table-row>
        <table:table-row table:style-name="ro1">
          <table:table-cell table:number-columns-repeated="7"/>
          <table:table-cell table:style-name="ce21" table:formula="of:=[.H12]+[.H10]" office:value-type="currency" office:currency="AUD" office:value="242.8491" calcext:value-type="currency">
            <text:p>$243</text:p>
          </table:table-cell>
          <table:table-cell table:style-name="ce9"/>
          <table:table-cell table:number-columns-repeated="5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3" office:value-type="string" calcext:value-type="string">
            <text:p>Total EC2 costs:</text:p>
          </table:table-cell>
          <table:table-cell table:style-name="ce3"/>
          <table:table-cell table:number-columns-repeated="2"/>
          <table:table-cell table:formula="of:=SUM([.F2:.F9])" office:value-type="float" office:value="0.0713" calcext:value-type="float">
            <text:p>0.0713</text:p>
          </table:table-cell>
          <table:table-cell table:formula="of:=[.G16]*24*365/12*[.$K$1]" office:value-type="currency" office:currency="AUD" office:value="75.99154" calcext:value-type="currency">
            <text:p>$76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1" office:value-type="string" calcext:value-type="string">
            <text:p>Saving Opportunities</text:p>
          </table:table-cell>
          <table:table-cell table:style-name="ce2" table:number-columns-repeated="6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10" office:value-type="string" calcext:value-type="string">
            <text:p>1yr</text:p>
          </table:table-cell>
          <table:table-cell table:style-name="ce10" office:value-type="string" calcext:value-type="string">
            <text:p>3y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eserve: std / 1yr / up:0</text:p>
          </table:table-cell>
          <table:table-cell/>
          <table:table-cell table:formula="of:=[.E$4]" office:value-type="float" office:value="1" calcext:value-type="float">
            <text:p>1</text:p>
          </table:table-cell>
          <table:table-cell/>
          <table:table-cell table:formula="of:=0.022" office:value-type="float" office:value="0.022" calcext:value-type="float">
            <text:p>0.022</text:p>
          </table:table-cell>
          <table:table-cell table:formula="of:=[.G20]*24*365/12*[.$K$1]*[.E20]" office:value-type="currency" office:currency="AUD" office:value="23.4476" calcext:value-type="currency">
            <text:p>$23</text:p>
          </table:table-cell>
          <table:table-cell table:style-name="ce9" table:formula="of:=[.H20]-[.H$4]" office:value-type="currency" office:currency="AUD" office:value="-6.3948" calcext:value-type="currency">
            <text:p>-$6.39</text:p>
          </table:table-cell>
          <table:table-cell/>
          <table:table-cell table:style-name="ce9" table:formula="of:=[.I20]" office:value-type="currency" office:currency="AUD" office:value="-6.3948" calcext:value-type="currency">
            <text:p>-$6.39</text:p>
          </table:table-cell>
          <table:table-cell table:style-name="ce9" table:formula="of:=[.K20]" office:value-type="currency" office:currency="AUD" office:value="-6.3948" calcext:value-type="currency">
            <text:p>-$6.39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reserve: std / 1yr / up:79</text:p>
          </table:table-cell>
          <table:table-cell/>
          <table:table-cell table:formula="of:=[.E$5]" office:value-type="float" office:value="1" calcext:value-type="float">
            <text:p>1</text:p>
          </table:table-cell>
          <table:table-cell/>
          <table:table-cell table:style-name="ce6" table:formula="of:=79/365/24+0.01" office:value-type="float" office:value="0.0190182648401826" calcext:value-type="float">
            <text:p>0.019</text:p>
          </table:table-cell>
          <table:table-cell table:formula="of:=[.G22]*24*365/12*[.$K$1]*[.E22]" office:value-type="currency" office:currency="AUD" office:value="20.2696666666666" calcext:value-type="currency">
            <text:p>$20</text:p>
          </table:table-cell>
          <table:table-cell table:style-name="ce9" table:formula="of:=[.H22]-[.H$5]" office:value-type="currency" office:currency="AUD" office:value="-6.37533333333339" calcext:value-type="currency">
            <text:p>-$6.38</text:p>
          </table:table-cell>
          <table:table-cell/>
          <table:table-cell table:style-name="ce9" table:formula="of:=[.I22]" office:value-type="currency" office:currency="AUD" office:value="-6.37533333333339" calcext:value-type="currency">
            <text:p>-$6.38</text:p>
          </table:table-cell>
          <table:table-cell table:style-name="ce9" table:formula="of:=[.K22]" office:value-type="currency" office:currency="AUD" office:value="-6.37533333333339" calcext:value-type="currency">
            <text:p>-$6.38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compute: 3yr / up: 0</text:p>
          </table:table-cell>
          <table:table-cell table:number-columns-repeated="3"/>
          <table:table-cell table:style-name="ce6" table:formula="of:=[.$G$16]*(1-0.445)" office:value-type="float" office:value="0.0395715" calcext:value-type="float">
            <text:p>0.040</text:p>
          </table:table-cell>
          <table:table-cell table:formula="of:=[.G24]*24*365/12*[.$K$1]" office:value-type="currency" office:currency="AUD" office:value="42.1753047" calcext:value-type="currency">
            <text:p>$42</text:p>
          </table:table-cell>
          <table:table-cell table:style-name="ce9" table:formula="of:=[.H24]-[.H$16]" office:value-type="currency" office:currency="AUD" office:value="-33.8162353" calcext:value-type="currency">
            <text:p>-$33.82</text:p>
          </table:table-cell>
          <table:table-cell table:style-name="ce23" office:value-type="string" calcext:value-type="string">
            <text:p>3*</text:p>
          </table:table-cell>
          <table:table-cell table:style-name="ce9" table:formula="of:=[.I24]" office:value-type="currency" office:currency="AUD" office:value="-33.8162353" calcext:value-type="currency">
            <text:p>-$33.82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6"/>
          <table:table-cell/>
          <table:table-cell table:style-name="ce9"/>
          <table:table-cell table:style-name="ce23"/>
          <table: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26]*24*365/12*[.$K$1]*[.E26]" office:value-type="currency" office:currency="AUD" office:value="6.19040000000001" calcext:value-type="currency">
            <text:p>$6</text:p>
          </table:table-cell>
          <table:table-cell table:style-name="ce9" table:formula="of:=SUM([.H26:.H27])-[.$H$16]" office:value-type="currency" office:currency="AUD" office:value="-26.678872" calcext:value-type="currency">
            <text:p>-$26.6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p &amp; 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t3a: 1yr / up: 0</text:p>
          </table:table-cell>
          <table:table-cell table:number-columns-repeated="3"/>
          <table:table-cell table:style-name="ce6" table:formula="of:=([.$G$16]-[.G$2]*2)*(1-0.32)" office:value-type="float" office:value="0.04046" calcext:value-type="float">
            <text:p>0.040</text:p>
          </table:table-cell>
          <table:table-cell table:formula="of:=[.G27]*24*365/12*[.$K$1]" office:value-type="currency" office:currency="AUD" office:value="43.122268" calcext:value-type="currency">
            <text:p>$43</text:p>
          </table:table-cell>
          <table:table-cell table:style-name="ce9"/>
          <table:table-cell table:style-name="ce24"/>
          <table:table-cell table:style-name="ce9"/>
          <table:table-cell table:number-columns-repeated="53"/>
        </table:table-row>
        <table:table-row table:style-name="ro1">
          <table:table-cell table:number-columns-repeated="6"/>
          <table:table-cell table:style-name="ce6"/>
          <table:table-cell/>
          <table:table-cell table:style-name="ce9"/>
          <table:table-cell table:style-name="ce23"/>
          <table: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t3a: 3yr / up: 0</text:p>
          </table:table-cell>
          <table:table-cell table:number-columns-repeated="3"/>
          <table:table-cell table:style-name="ce6" table:formula="of:=[.G16]*(1-0.52)" office:value-type="float" office:value="0.034224" calcext:value-type="float">
            <text:p>0.034</text:p>
          </table:table-cell>
          <table:table-cell table:formula="of:=[.G29]*24*365/12*[.$K$1]" office:value-type="currency" office:currency="AUD" office:value="36.4759392" calcext:value-type="currency">
            <text:p>$36</text:p>
          </table:table-cell>
          <table:table-cell table:style-name="ce9" table:formula="of:=[.H29]-[.$H$16]" office:value-type="currency" office:currency="AUD" office:value="-39.5156008" calcext:value-type="currency">
            <text:p>-$39.52</text:p>
          </table:table-cell>
          <table:table-cell table:style-name="ce23" office:value-type="float" office:value="3" calcext:value-type="float">
            <text:p>3</text:p>
          </table:table-cell>
          <table:table-cell table:style-name="ce9"/>
          <table:table-cell table:style-name="ce9" table:formula="of:=[.I29]" office:value-type="currency" office:currency="AUD" office:value="-39.5156008" calcext:value-type="currency">
            <text:p>-$39.5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6"/>
          <table:table-cell/>
          <table:table-cell table:style-name="ce9"/>
          <table:table-cell table:style-name="ce23"/>
          <table: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31]*24*365/12*[.$K$1]*[.E31]" office:value-type="currency" office:currency="AUD" office:value="6.19040000000001" calcext:value-type="currency">
            <text:p>$6</text:p>
          </table:table-cell>
          <table:table-cell table:style-name="ce9" table:formula="of:=SUM([.H31:.H32])-[.$H$16]" office:value-type="currency" office:currency="AUD" office:value="-39.361892" calcext:value-type="currency">
            <text:p>-$39.3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p &amp; 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t3a: 3yr / up: 0</text:p>
          </table:table-cell>
          <table:table-cell table:number-columns-repeated="3"/>
          <table:table-cell table:style-name="ce6" table:formula="of:=([.$G$16]-[.G$2]*2)*(1-0.52)" office:value-type="float" office:value="0.02856" calcext:value-type="float">
            <text:p>0.029</text:p>
          </table:table-cell>
          <table:table-cell table:formula="of:=[.G32]*24*365/12*[.$K$1]" office:value-type="currency" office:currency="AUD" office:value="30.439248" calcext:value-type="currency">
            <text:p>$30</text:p>
          </table:table-cell>
          <table:table-cell table:style-name="ce9"/>
          <table:table-cell table:style-name="ce24"/>
          <table:table-cell table:style-name="ce9" table:number-columns-repeated="2"/>
          <table:table-cell table:number-columns-repeated="5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4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34]*24*365/12*[.$K$1]*[.E34]" office:value-type="currency" office:currency="AUD" office:value="6.19040000000001" calcext:value-type="currency">
            <text:p>$6</text:p>
          </table:table-cell>
          <table:table-cell table:style-name="ce9" table:formula="of:=SUM([.H34:.H36])-[.$H$16]" office:value-type="currency" office:currency="AUD" office:value="-39.1061" calcext:value-type="currency">
            <text:p>-$39.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small: std / 3yr / up: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15" calcext:value-type="float">
            <text:p>0.0115</text:p>
          </table:table-cell>
          <table:table-cell table:formula="of:=[.G35]*24*365/12*[.$K$1]*[.E35]" office:value-type="currency" office:currency="AUD" office:value="24.5134" calcext:value-type="currency">
            <text:p>$25</text:p>
          </table:table-cell>
          <table:table-cell table:style-name="ce9"/>
          <table:table-cell table:style-name="ce24"/>
          <table:table-cell table:number-columns-repeated="54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compute: 3yr / up: 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0058" calcext:value-type="float">
            <text:p>0.0058</text:p>
          </table:table-cell>
          <table:table-cell table:formula="of:=[.G36]*24*365/12*[.$K$1]" office:value-type="currency" office:currency="AUD" office:value="6.18164" calcext:value-type="currency">
            <text:p>$6</text:p>
          </table:table-cell>
          <table:table-cell table:style-name="ce9"/>
          <table:table-cell table:style-name="ce23"/>
          <table:table-cell table:number-columns-repeated="54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4"/>
        </table:table-row>
        <table:table-row table:style-name="ro1">
          <table:table-cell office:value-type="string" calcext:value-type="string">
            <text:p>NAT &amp; Bastion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nano: std / 3yr / up:0</text:p>
          </table:table-cell>
          <table:table-cell/>
          <table:table-cell table:formula="of:=[.E$3]+[.E$2]" office:value-type="float" office:value="2" calcext:value-type="float">
            <text:p>2</text:p>
          </table:table-cell>
          <table:table-cell/>
          <table:table-cell table:style-name="ce7" table:formula="of:=2.12*12/365/24" office:value-type="float" office:value="0.0029041095890411" calcext:value-type="float">
            <text:p>0.0029</text:p>
          </table:table-cell>
          <table:table-cell table:formula="of:=[.G38]*24*365/12*[.$K$1]*[.E38]" office:value-type="currency" office:currency="AUD" office:value="6.19040000000001" calcext:value-type="currency">
            <text:p>$6</text:p>
          </table:table-cell>
          <table:table-cell table:style-name="ce9" table:formula="of:=SUM([.H38:.H40])-[.$H$16]" office:value-type="currency" office:currency="AUD" office:value="-26.8494" calcext:value-type="currency">
            <text:p>-$26.8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RI t3a.small: std / 1yr / up: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61" calcext:value-type="float">
            <text:p>0.0161</text:p>
          </table:table-cell>
          <table:table-cell table:formula="of:=[.G39]*24*365/12*[.$K$1]*[.E39]" office:value-type="currency" office:currency="AUD" office:value="34.31876" calcext:value-type="currency">
            <text:p>$34</text:p>
          </table:table-cell>
          <table:table-cell table:style-name="ce9"/>
          <table:table-cell table:style-name="ce24"/>
          <table:table-cell table:number-columns-repeated="54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SP.compute: 1yr / up: 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0081" calcext:value-type="float">
            <text:p>0.0081</text:p>
          </table:table-cell>
          <table:table-cell table:formula="of:=[.G40]*24*365/12*[.$K$1]" office:value-type="currency" office:currency="AUD" office:value="8.63298" calcext:value-type="currency">
            <text:p>$9</text:p>
          </table:table-cell>
          <table:table-cell table:style-name="ce9"/>
          <table:table-cell table:style-name="ce23"/>
          <table:table-cell table:number-columns-repeated="54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number-columns-repeated="54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3"/>
          <table:table-cell table:style-name="ce8" table:formula="of:=SUM([.K20:.K41])" office:value-type="currency" office:currency="AUD" office:value="-46.5863686333334" calcext:value-type="currency">
            <text:p>-$47</text:p>
          </table:table-cell>
          <table:table-cell table:style-name="ce8" table:formula="of:=SUM([.L20:.L41])" office:value-type="currency" office:currency="AUD" office:value="-52.2857341333334" calcext:value-type="currency">
            <text:p>-$52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AUD/month</text:p>
          </table:table-cell>
          <table:table-cell table:style-name="ce8" table:formula="of:=[.K42]+[.$H$14]" office:value-type="currency" office:currency="AUD" office:value="196.262731366667" calcext:value-type="currency">
            <text:p>$196</text:p>
          </table:table-cell>
          <table:table-cell table:style-name="ce8" table:formula="of:=[.L42]+[.$H$14]" office:value-type="currency" office:currency="AUD" office:value="190.563365866667" calcext:value-type="currency">
            <text:p>$191</text:p>
          </table:table-cell>
          <table:table-cell table:style-name="ce4" table:formula="of:=[.L43]-[.K43]" office:value-type="currency" office:currency="AUD" office:value="-5.69936550000003" calcext:value-type="currency">
            <text:p>-$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AUD/day</text:p>
          </table:table-cell>
          <table:table-cell table:style-name="ce9" table:formula="of:=[.K43]*12/365" office:value-type="currency" office:currency="AUD" office:value="6.45247336" calcext:value-type="currency">
            <text:p>$6.45</text:p>
          </table:table-cell>
          <table:table-cell table:style-name="ce9" table:formula="of:=[.L43]*12/365" office:value-type="currency" office:currency="AUD" office:value="6.26509696" calcext:value-type="currency">
            <text:p>$6.2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erve in US</text:p>
          </table:table-cell>
          <table:table-cell table:number-columns-repeated="6"/>
          <table:table-cell table:style-name="Default"/>
          <table:table-cell table:number-columns-repeated="3"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Around 80% of the price</text:p>
          </table:table-cell>
          <table:table-cell table:number-columns-repeated="3"/>
          <table:table-cell table:style-name="ce4" table:formula="of:=[.L43]" office:value-type="currency" office:currency="AUD" office:value="190.563365866667" calcext:value-type="currency">
            <text:p>$191</text:p>
          </table:table-cell>
          <table:table-cell office:value-type="string" calcext:value-type="string">
            <text:p>in AU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52"/>
        </table:table-row>
        <table:table-row table:style-name="ro1">
          <table:table-cell table:number-columns-repeated="4"/>
          <table:table-cell table:style-name="ce4" table:formula="of:=-0.2*[.E46]" office:value-type="currency" office:currency="AUD" office:value="-38.1126731733333" calcext:value-type="currency">
            <text:p>-$38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number-columns-repeated="4"/>
          <table:table-cell table:style-name="ce4" table:formula="of:=SUM([.E46:.E47])" office:value-type="currency" office:currency="AUD" office:value="152.450692693333" calcext:value-type="currency">
            <text:p>$152</text:p>
          </table:table-cell>
          <table:table-cell office:value-type="string" calcext:value-type="string">
            <text:p>in US</text:p>
          </table:table-cell>
          <table:table-cell/>
          <table:table-cell table:style-name="Default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AU">$</number:currency-symbol>
      <number:number number:decimal-places="1" loext:min-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1" loext:min-decimal-places="1" number:min-integer-digits="1" number:grouping="true"/>
      <style:map style:condition="value()&gt;=0" style:apply-style-name="N110P0"/>
    </number:currency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5:51:39.53522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9T21:38:35.300416265</meta:creation-date>
    <dc:date>2019-12-10T16:32:02.367939215</dc:date>
    <meta:editing-duration>PT29M14S</meta:editing-duration>
    <meta:editing-cycles>5</meta:editing-cycles>
    <meta:generator>LibreOffice/6.3.3.2.0$Linux_X86_64 LibreOffice_project/30$Build-2</meta:generator>
    <meta:document-statistic meta:table-count="1" meta:cell-count="223" meta:object-count="0"/>
  </office:meta>
</office:document-meta>
</file>