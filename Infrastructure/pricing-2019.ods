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06mm"/>
    </style:style>
    <style:style style:name="co3" style:family="table-column">
      <style:table-column-properties fo:break-before="auto" style:column-width="14.29mm"/>
    </style:style>
    <style:style style:name="co4" style:family="table-column">
      <style:table-column-properties fo:break-before="auto" style:column-width="12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AU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3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20"/>
    <style:style style:name="ce7" style:family="table-cell" style:parent-style-name="Default" style:data-style-name="N119"/>
    <style:style style:name="ce8" style:family="table-cell" style:parent-style-name="Default" style:data-style-name="N103">
      <style:text-properties fo:font-weight="bold" style:font-weight-asian="bold" style:font-weight-complex="bold"/>
    </style:style>
    <style:style style:name="ce9" style:family="table-cell" style:parent-style-name="Default" style:data-style-name="N104"/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use-regular-expressions="false" table:use-wildcards="true"/>
      <table:table table:name="Sydne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number-columns-repeated="1017" table:default-cell-style-name="Default"/>
        <table:table-row table:style-name="ro1">
          <table:table-cell table:number-columns-repeated="3"/>
          <table:table-cell table:style-name="ce3" office:value-type="string" calcext:value-type="string">
            <text:p>QTY</text:p>
          </table:table-cell>
          <table:table-cell/>
          <table:table-cell table:style-name="ce5" office:value-type="string" calcext:value-type="string">
            <text:p>USD/hr each</text:p>
          </table:table-cell>
          <table:table-cell table:style-name="ce3" office:value-type="string" calcext:value-type="string">
            <text:p>AUD/m</text:p>
          </table:table-cell>
          <table:table-cell table:number-columns-repeated="2"/>
          <table:table-cell office:value-type="float" office:value="1.48" calcext:value-type="float">
            <text:p>1.48</text:p>
          </table:table-cell>
          <table:table-cell office:value-type="string" calcext:value-type="string">
            <text:p>AUD : 1 US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B</text:p>
          </table:table-cell>
          <table:table-cell office:value-type="string" calcext:value-type="string">
            <text:p>Webap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252" calcext:value-type="float">
            <text:p>0.0252</text:p>
          </table:table-cell>
          <table:table-cell table:formula="of:=[.F2]*24*365/12*[.$J$1]*[.D2]" office:value-type="currency" office:currency="AUD" office:value="27.22608" calcext:value-type="currency">
            <text:p>$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2</text:p>
          </table:table-cell>
          <table:table-cell office:value-type="string" calcext:value-type="string">
            <text:p>App cluster</text:p>
          </table:table-cell>
          <table:table-cell office:value-type="string" calcext:value-type="string">
            <text:p>t3a.mediu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475" calcext:value-type="float">
            <text:p>0.0475</text:p>
          </table:table-cell>
          <table:table-cell table:formula="of:=[.F3]*24*365/12*[.$J$1]*[.D3]" office:value-type="currency" office:currency="AUD" office:value="102.638" calcext:value-type="currency">
            <text:p>$103</text:p>
          </table:table-cell>
          <table:table-cell table:number-columns-repeated="2"/>
          <table:table-cell office:value-type="string" calcext:value-type="string">
            <text:p>t3a.nano</text:p>
          </table:table-cell>
          <table:table-cell office:value-type="string" calcext:value-type="string">
            <text:p>2b + 0.5Gi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DS</text:p>
          </table:table-cell>
          <table:table-cell office:value-type="string" calcext:value-type="string">
            <text:p>Webapp</text:p>
          </table:table-cell>
          <table:table-cell office:value-type="string" calcext:value-type="string">
            <text:p>db.t3.mic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28" calcext:value-type="float">
            <text:p>0.028</text:p>
          </table:table-cell>
          <table:table-cell table:formula="of:=[.F4]*24*365/12*[.$J$1]*[.D4]" office:value-type="currency" office:currency="AUD" office:value="30.2512" calcext:value-type="currency">
            <text:p>$30</text:p>
          </table:table-cell>
          <table:table-cell table:number-columns-repeated="2"/>
          <table:table-cell office:value-type="string" calcext:value-type="string">
            <text:p>t3a.micro</text:p>
          </table:table-cell>
          <table:table-cell office:value-type="string" calcext:value-type="string">
            <text:p>2b + 1Gi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is</text:p>
          </table:table-cell>
          <table:table-cell office:value-type="string" calcext:value-type="string">
            <text:p>Webapp</text:p>
          </table:table-cell>
          <table:table-cell office:value-type="string" calcext:value-type="string">
            <text:p>cache.t2.mic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22" calcext:value-type="float">
            <text:p>0.022</text:p>
          </table:table-cell>
          <table:table-cell table:formula="of:=[.F5]*24*365/12*[.$J$1]*[.D5]" office:value-type="currency" office:currency="AUD" office:value="23.7688" calcext:value-type="currency">
            <text:p>$24</text:p>
          </table:table-cell>
          <table:table-cell table:number-columns-repeated="2"/>
          <table:table-cell office:value-type="string" calcext:value-type="string">
            <text:p>t3a.small</text:p>
          </table:table-cell>
          <table:table-cell office:value-type="string" calcext:value-type="string">
            <text:p>2b + 2Gi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C2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t3a.nan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059" calcext:value-type="float">
            <text:p>0.0059</text:p>
          </table:table-cell>
          <table:table-cell table:formula="of:=[.F6]*24*365/12*[.$J$1]*[.D6]" office:value-type="currency" office:currency="AUD" office:value="6.37436" calcext:value-type="currency">
            <text:p>$6</text:p>
          </table:table-cell>
          <table:table-cell table:number-columns-repeated="2"/>
          <table:table-cell office:value-type="string" calcext:value-type="string">
            <text:p>t3a.medium</text:p>
          </table:table-cell>
          <table:table-cell office:value-type="string" calcext:value-type="string">
            <text:p>2b + 4G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C2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t3a.nan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059" calcext:value-type="float">
            <text:p>0.0059</text:p>
          </table:table-cell>
          <table:table-cell table:formula="of:=[.F7]*24*365/12*[.$J$1]*[.D7]" office:value-type="currency" office:currency="AUD" office:value="6.37436" calcext:value-type="currency">
            <text:p>$6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t2.micro.elasticsearc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28" calcext:value-type="float">
            <text:p>0.028</text:p>
          </table:table-cell>
          <table:table-cell table:formula="of:=[.F8]*24*365/12*[.$J$1]*[.D8]" office:value-type="currency" office:currency="AUD" office:value="30.2512" calcext:value-type="currency">
            <text:p>$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2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t3a.mic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19" calcext:value-type="float">
            <text:p>0.0119</text:p>
          </table:table-cell>
          <table:table-cell table:formula="of:=[.F9]*24*365/12*[.$J$1]*[.D9]" office:value-type="currency" office:currency="AUD" office:value="12.85676" calcext:value-type="currency">
            <text:p>$13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" table:formula="of:=SUM([.G2:.G9])" office:value-type="currency" office:currency="AUD" office:value="239.74076" calcext:value-type="currency">
            <text:p>$240</text:p>
          </table:table-cell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Saving Opportunities</text:p>
          </table:table-cell>
          <table:table-cell table:style-name="ce2" table:number-columns-repeated="1023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10" office:value-type="string" calcext:value-type="string">
            <text:p>safe</text:p>
          </table:table-cell>
          <table:table-cell table:style-name="ce10" office:value-type="string" calcext:value-type="string">
            <text:p>long ter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C2</text:p>
          </table:table-cell>
          <table:table-cell office:value-type="string" calcext:value-type="string">
            <text:p>App cluster</text:p>
          </table:table-cell>
          <table:table-cell office:value-type="string" calcext:value-type="string">
            <text:p>reserve: std / 1yr / up:0</text:p>
          </table:table-cell>
          <table:table-cell table:formula="of:=[.D$3]" office:value-type="float" office:value="2" calcext:value-type="float">
            <text:p>2</text:p>
          </table:table-cell>
          <table:table-cell/>
          <table:table-cell table:formula="of:=0.032" office:value-type="float" office:value="0.032" calcext:value-type="float">
            <text:p>0.032</text:p>
          </table:table-cell>
          <table:table-cell table:formula="of:=[.F15]*24*365/12*[.$J$1]*[.D15]" office:value-type="currency" office:currency="AUD" office:value="69.1456" calcext:value-type="currency">
            <text:p>$69</text:p>
          </table:table-cell>
          <table:table-cell table:style-name="ce4" table:formula="of:=[.G15]-[.G$3]" office:value-type="currency" office:currency="AUD" office:value="-33.4924" calcext:value-type="currency">
            <text:p>-$33</text:p>
          </table:table-cell>
          <table:table-cell/>
          <table:table-cell table:style-name="ce4" table:formula="of:=[.H15]" office:value-type="currency" office:currency="AUD" office:value="-33.4924" calcext:value-type="currency">
            <text:p>-$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2</text:p>
          </table:table-cell>
          <table:table-cell office:value-type="string" calcext:value-type="string">
            <text:p>App cluster</text:p>
          </table:table-cell>
          <table:table-cell office:value-type="string" calcext:value-type="string">
            <text:p>reserve: conv / 3yr / up:0</text:p>
          </table:table-cell>
          <table:table-cell table:formula="of:=[.D$3]" office:value-type="float" office:value="2" calcext:value-type="float">
            <text:p>2</text:p>
          </table:table-cell>
          <table:table-cell/>
          <table:table-cell table:formula="of:=0.027" office:value-type="float" office:value="0.027" calcext:value-type="float">
            <text:p>0.027</text:p>
          </table:table-cell>
          <table:table-cell table:formula="of:=[.F16]*24*365/12*[.$J$1]*[.D16]" office:value-type="currency" office:currency="AUD" office:value="58.3416" calcext:value-type="currency">
            <text:p>$58</text:p>
          </table:table-cell>
          <table:table-cell table:style-name="ce4" table:formula="of:=[.G16]-[.G$3]" office:value-type="currency" office:currency="AUD" office:value="-44.2964" calcext:value-type="currency">
            <text:p>-$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2</text:p>
          </table:table-cell>
          <table:table-cell office:value-type="string" calcext:value-type="string">
            <text:p>App cluster</text:p>
          </table:table-cell>
          <table:table-cell office:value-type="string" calcext:value-type="string">
            <text:p>reserve: std / 3yr / up:0</text:p>
          </table:table-cell>
          <table:table-cell table:formula="of:=[.D$3]" office:value-type="float" office:value="2" calcext:value-type="float">
            <text:p>2</text:p>
          </table:table-cell>
          <table:table-cell/>
          <table:table-cell table:formula="of:=0.023" office:value-type="float" office:value="0.023" calcext:value-type="float">
            <text:p>0.023</text:p>
          </table:table-cell>
          <table:table-cell table:formula="of:=[.F17]*24*365/12*[.$J$1]*[.D17]" office:value-type="currency" office:currency="AUD" office:value="49.6984" calcext:value-type="currency">
            <text:p>$50</text:p>
          </table:table-cell>
          <table:table-cell table:style-name="ce4" table:formula="of:=[.G17]-[.G$3]" office:value-type="currency" office:currency="AUD" office:value="-52.9396" calcext:value-type="currency">
            <text:p>-$53</text:p>
          </table:table-cell>
          <table:table-cell/>
          <table:table-cell table:style-name="ce4"/>
          <table:table-cell table:style-name="ce4" table:formula="of:=[.H17]" office:value-type="currency" office:currency="AUD" office:value="-52.9396" calcext:value-type="currency">
            <text:p>-$53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RDS</text:p>
          </table:table-cell>
          <table:table-cell office:value-type="string" calcext:value-type="string">
            <text:p>Webapp</text:p>
          </table:table-cell>
          <table:table-cell office:value-type="string" calcext:value-type="string">
            <text:p>reserve: std / 1yr / up:0</text:p>
          </table:table-cell>
          <table:table-cell table:formula="of:=[.D$4]" office:value-type="float" office:value="1" calcext:value-type="float">
            <text:p>1</text:p>
          </table:table-cell>
          <table:table-cell/>
          <table:table-cell table:formula="of:=0.022" office:value-type="float" office:value="0.022" calcext:value-type="float">
            <text:p>0.022</text:p>
          </table:table-cell>
          <table:table-cell table:formula="of:=[.F19]*24*365/12*[.$J$1]*[.D19]" office:value-type="currency" office:currency="AUD" office:value="23.7688" calcext:value-type="currency">
            <text:p>$24</text:p>
          </table:table-cell>
          <table:table-cell table:style-name="ce9" table:formula="of:=[.G19]-[.G$4]" office:value-type="currency" office:currency="AUD" office:value="-6.4824" calcext:value-type="currency">
            <text:p>-$6.48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Redis</text:p>
          </table:table-cell>
          <table:table-cell office:value-type="string" calcext:value-type="string">
            <text:p>Webapp</text:p>
          </table:table-cell>
          <table:table-cell office:value-type="string" calcext:value-type="string">
            <text:p>reserve: std / 1yr / up:79</text:p>
          </table:table-cell>
          <table:table-cell table:formula="of:=[.D$5]" office:value-type="float" office:value="1" calcext:value-type="float">
            <text:p>1</text:p>
          </table:table-cell>
          <table:table-cell/>
          <table:table-cell table:style-name="ce6" table:formula="of:=79/365/24+0.01" office:value-type="float" office:value="0.0190182648401826" calcext:value-type="float">
            <text:p>0.019</text:p>
          </table:table-cell>
          <table:table-cell table:formula="of:=[.F21]*24*365/12*[.$J$1]*[.D21]" office:value-type="currency" office:currency="AUD" office:value="20.5473333333333" calcext:value-type="currency">
            <text:p>$21</text:p>
          </table:table-cell>
          <table:table-cell table:style-name="ce9" table:formula="of:=[.G21]-[.G$5]" office:value-type="currency" office:currency="AUD" office:value="-3.22146666666667" calcext:value-type="currency">
            <text:p>-$3.22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EC2</text:p>
          </table:table-cell>
          <table:table-cell office:value-type="string" calcext:value-type="string">
            <text:p>NAT/Bastion</text:p>
          </table:table-cell>
          <table:table-cell office:value-type="string" calcext:value-type="string">
            <text:p>reserve: std / 1yr / up:0</text:p>
          </table:table-cell>
          <table:table-cell table:formula="of:=[.D$6]+[.D$7]" office:value-type="float" office:value="2" calcext:value-type="float">
            <text:p>2</text:p>
          </table:table-cell>
          <table:table-cell/>
          <table:table-cell office:value-type="float" office:value="0.004" calcext:value-type="float">
            <text:p>0.004</text:p>
          </table:table-cell>
          <table:table-cell table:formula="of:=[.F23]*24*365/12*[.$J$1]*[.D23]" office:value-type="currency" office:currency="AUD" office:value="8.6432" calcext:value-type="currency">
            <text:p>$9</text:p>
          </table:table-cell>
          <table:table-cell table:style-name="ce9" table:formula="of:=[.G23]-[.G$6]-[.G$7]" office:value-type="currency" office:currency="AUD" office:value="-4.10552" calcext:value-type="currency">
            <text:p>-$4.11</text:p>
          </table:table-cell>
          <table:table-cell/>
          <table:table-cell table:style-name="ce9" table:formula="of:=[.H23]" office:value-type="currency" office:currency="AUD" office:value="-4.10552" calcext:value-type="currency">
            <text:p>-$4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2</text:p>
          </table:table-cell>
          <table:table-cell office:value-type="string" calcext:value-type="string">
            <text:p>NAT/Bastion</text:p>
          </table:table-cell>
          <table:table-cell office:value-type="string" calcext:value-type="string">
            <text:p>reserve: conv / 3yr / up:0</text:p>
          </table:table-cell>
          <table:table-cell table:formula="of:=[.D$6]+[.D$7]" office:value-type="float" office:value="2" calcext:value-type="float">
            <text:p>2</text:p>
          </table:table-cell>
          <table:table-cell/>
          <table:table-cell table:style-name="ce7" table:formula="of:=2.41*12/365/24" office:value-type="float" office:value="0.0033013698630137" calcext:value-type="float">
            <text:p>0.0033</text:p>
          </table:table-cell>
          <table:table-cell table:formula="of:=[.F24]*24*365/12*[.$J$1]*[.D24]" office:value-type="currency" office:currency="AUD" office:value="7.1336" calcext:value-type="currency">
            <text:p>$7</text:p>
          </table:table-cell>
          <table:table-cell table:style-name="ce9" table:formula="of:=[.G24]-[.G$6]-[.G$7]" office:value-type="currency" office:currency="AUD" office:value="-5.61512" calcext:value-type="currency">
            <text:p>-$5.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2</text:p>
          </table:table-cell>
          <table:table-cell office:value-type="string" calcext:value-type="string">
            <text:p>NAT/Bastion</text:p>
          </table:table-cell>
          <table:table-cell office:value-type="string" calcext:value-type="string">
            <text:p>reserve: std / 3yr / up:0</text:p>
          </table:table-cell>
          <table:table-cell table:formula="of:=[.D$6]+[.D$7]" office:value-type="float" office:value="2" calcext:value-type="float">
            <text:p>2</text:p>
          </table:table-cell>
          <table:table-cell/>
          <table:table-cell table:style-name="ce7" table:formula="of:=2.12*12/365/24" office:value-type="float" office:value="0.0029041095890411" calcext:value-type="float">
            <text:p>0.0029</text:p>
          </table:table-cell>
          <table:table-cell table:formula="of:=[.F25]*24*365/12*[.$J$1]*[.D25]" office:value-type="currency" office:currency="AUD" office:value="6.2752" calcext:value-type="currency">
            <text:p>$6</text:p>
          </table:table-cell>
          <table:table-cell table:style-name="ce9" table:formula="of:=[.G25]-[.G$6]-[.G$7]" office:value-type="currency" office:currency="AUD" office:value="-6.47352" calcext:value-type="currency">
            <text:p>-$6.47</text:p>
          </table:table-cell>
          <table:table-cell table:number-columns-repeated="2"/>
          <table:table-cell table:style-name="ce9" table:formula="of:=[.H25]" office:value-type="currency" office:currency="AUD" office:value="-6.47352" calcext:value-type="currency">
            <text:p>-$6.47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EC2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reserve: conv / 1yr / up:0</text:p>
          </table:table-cell>
          <table:table-cell table:formula="of:=[.D$9]" office:value-type="float" office:value="1" calcext:value-type="float">
            <text:p>1</text:p>
          </table:table-cell>
          <table:table-cell/>
          <table:table-cell table:style-name="ce7" table:formula="of:=6.79*12/365/24" office:value-type="float" office:value="0.0093013698630137" calcext:value-type="float">
            <text:p>0.0093</text:p>
          </table:table-cell>
          <table:table-cell table:formula="of:=[.F27]*24*365/12*[.$J$1]*[.D27]" office:value-type="currency" office:currency="AUD" office:value="10.0492" calcext:value-type="currency">
            <text:p>$10</text:p>
          </table:table-cell>
          <table:table-cell table:style-name="ce4" table:formula="of:=[.G27]-[.G$6]-[.G$9]" office:value-type="currency" office:currency="AUD" office:value="-9.18192" calcext:value-type="currency">
            <text:p>-$9</text:p>
          </table:table-cell>
          <table:table-cell/>
          <table:table-cell table:style-name="ce4" table:formula="of:=[.H27]" office:value-type="currency" office:currency="AUD" office:value="-9.18192" calcext:value-type="currency">
            <text:p>-$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2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reserve: conv / 3yr / up:0</text:p>
          </table:table-cell>
          <table:table-cell table:formula="of:=[.D$9]" office:value-type="float" office:value="1" calcext:value-type="float">
            <text:p>1</text:p>
          </table:table-cell>
          <table:table-cell/>
          <table:table-cell table:style-name="ce7" table:formula="of:=4.82*12/365/24" office:value-type="float" office:value="0.0066027397260274" calcext:value-type="float">
            <text:p>0.0066</text:p>
          </table:table-cell>
          <table:table-cell table:formula="of:=[.F28]*24*365/12*[.$J$1]*[.D28]" office:value-type="currency" office:currency="AUD" office:value="7.1336" calcext:value-type="currency">
            <text:p>$7</text:p>
          </table:table-cell>
          <table:table-cell table:style-name="ce4" table:formula="of:=[.G28]-[.G$6]-[.G$9]" office:value-type="currency" office:currency="AUD" office:value="-12.09752" calcext:value-type="currency">
            <text:p>-$12</text:p>
          </table:table-cell>
          <table:table-cell table:number-columns-repeated="2"/>
          <table:table-cell table:style-name="ce4" table:formula="of:=[.H28]" office:value-type="currency" office:currency="AUD" office:value="-12.09752" calcext:value-type="currency">
            <text:p>-$12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8" table:formula="of:=SUM([.J15:.J29])" office:value-type="currency" office:currency="AUD" office:value="-46.77984" calcext:value-type="currency">
            <text:p>-$47</text:p>
          </table:table-cell>
          <table:table-cell table:style-name="ce8" table:formula="of:=SUM([.K15:.K29])" office:value-type="currency" office:currency="AUD" office:value="-71.51064" calcext:value-type="currency">
            <text:p>-$72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8" table:formula="of:=[.$G$10]+[.J30]" office:value-type="currency" office:currency="AUD" office:value="192.96092" calcext:value-type="currency">
            <text:p>$193</text:p>
          </table:table-cell>
          <table:table-cell table:style-name="ce8" table:formula="of:=[.$G$10]+[.K30]" office:value-type="currency" office:currency="AUD" office:value="168.23012" calcext:value-type="currency">
            <text:p>$168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erve in US</text:p>
          </table:table-cell>
          <table:table-cell table:number-columns-repeated="5"/>
          <table:table-cell table:style-name="Default"/>
          <table:table-cell table:number-columns-repeated="3"/>
          <table:table-cell table:style-name="ce4"/>
          <table:table-cell table:number-columns-repeated="1013"/>
        </table:table-row>
        <table:table-row table:style-name="ro1">
          <table:table-cell office:value-type="string" calcext:value-type="string">
            <text:p>Around 80% of the price</text:p>
          </table:table-cell>
          <table:table-cell table:number-columns-repeated="2"/>
          <table:table-cell table:style-name="ce4" table:formula="of:=[.K31]" office:value-type="currency" office:currency="AUD" office:value="168.23012" calcext:value-type="currency">
            <text:p>$168</text:p>
          </table:table-cell>
          <table:table-cell office:value-type="string" calcext:value-type="string">
            <text:p>in AU</text:p>
          </table:table-cell>
          <table:table-cell/>
          <table:table-cell table:style-name="Default"/>
          <table:table-cell table:number-columns-repeated="3"/>
          <table:table-cell table:style-name="ce4"/>
          <table:table-cell table:number-columns-repeated="1013"/>
        </table:table-row>
        <table:table-row table:style-name="ro1">
          <table:table-cell table:number-columns-repeated="3"/>
          <table:table-cell table:style-name="ce4" table:formula="of:=-0.2*[.D34]" office:value-type="currency" office:currency="AUD" office:value="-33.646024" calcext:value-type="currency">
            <text:p>-$34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ce4" table:formula="of:=SUM([.D34:.D35])" office:value-type="currency" office:currency="AUD" office:value="134.584096" calcext:value-type="currency">
            <text:p>$135</text:p>
          </table:table-cell>
          <table:table-cell office:value-type="string" calcext:value-type="string">
            <text:p>in US</text:p>
          </table:table-cell>
          <table:table-cell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AU">$</number:currency-symbol>
      <number:number number:decimal-places="1" loext:min-decimal-places="1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AU">$</number:currency-symbol>
      <number:number number:decimal-places="1" loext:min-decimal-places="1" number:min-integer-digits="1" number:grouping="true"/>
      <style:map style:condition="value()&gt;=0" style:apply-style-name="N109P0"/>
    </number:currency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9T21:38:35.300416265</meta:creation-date>
    <dc:date>2019-10-09T22:59:17.959576330</dc:date>
    <meta:editing-duration>PT3M31S</meta:editing-duration>
    <meta:editing-cycles>2</meta:editing-cycles>
    <meta:generator>LibreOffice/6.3.2.2$Linux_X86_64 LibreOffice_project/30$Build-2</meta:generator>
    <meta:document-statistic meta:table-count="1" meta:cell-count="151" meta:object-count="0"/>
  </office:meta>
</office:document-meta>
</file>