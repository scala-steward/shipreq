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Abstract</text:p>
          </table:table-cell>
          <table:table-cell office:value-type="string" calcext:value-type="string">
            <text:p>Table/Form only</text:p>
          </table:table-cell>
          <table:table-cell table:style-name="ce3" office:value-type="string" calcext:value-type="string">
            <text:p>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Wired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½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.ui.table</text:p>
          </table:table-cell>
          <table:table-cell office:value-type="string" calcext:value-type="string">
            <text:p>Attr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 impls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 impls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Renderabl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Attr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B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delete log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pec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 va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ttrS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gle attr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<text:s text:c="2"/>SpecBuilderⁿ</text:p>
          </table:table-cell>
          <table:table-cell office:value-type="string" calcext:value-type="string">
            <text:p>Attrⁿ.RowSpec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ple attrs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<text:s text:c="4"/>SpecBuilderⁿ.B2</text:p>
          </table:table-cell>
          <table:table-cell office:value-type="string" calcext:value-type="string">
            <text:p>Attrⁿ.RowSpec.B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Multiple attrs + ID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 office:value-type="string" calcext:value-type="string">
            <text:p>AttrSpecW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ingle attr + ID</text:p>
          </table:table-cell>
          <table:table-cell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Specⁿ</text:p>
          </table:table-cell>
          <table:table-cell office:value-type="string" calcext:value-type="string">
            <text:p>RowSpecW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iple attrs + ID + table-wide validators</text:p>
          </table:table-cell>
          <table:table-cell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Renderable</text:p>
          </table:table-cell>
          <table:table-cell office:value-type="string" calcext:value-type="string">
            <text:p>RowRendere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nders a row</text:p>
          </table:table-cell>
          <table:table-cell table:number-columns-repeated="3"/>
          <table:table-cell table:style-name="ce3"/>
        </table:table-row>
        <table:table-row table:style-name="ro1">
          <table:table-cell table:style-name="ce2" office:value-type="string" calcext:value-type="string">
            <text:p>TableSpecB</text:p>
          </table:table-cell>
          <table:table-cell office:value-type="string" calcext:value-type="string">
            <text:p>TableSpec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olidated, generic. Two fns: P⇒I, render(Option id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ableSpec</text:p>
          </table:table-cell>
          <table:table-cell office:value-type="string" calcext:value-type="string">
            <text:p>TableSpec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“ + savable</text:p>
          </table:table-cell>
          <table:table-cell table:number-columns-repeated="4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6:34:54.861520597</meta:creation-date>
    <dc:date>2014-09-22T16:19:13.283681436</dc:date>
    <meta:editing-duration>PT36S</meta:editing-duration>
    <meta:editing-cycles>1</meta:editing-cycles>
    <meta:document-statistic meta:table-count="1" meta:cell-count="107" meta:object-count="0"/>
    <meta:generator>LibreOffice/4.2.6.3$Linux_X86_64 LibreOffice_project/420m0$Build-3</meta:generator>
  </office:meta>
</office:document-meta>
</file>