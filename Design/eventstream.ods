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9.484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4.376cm"/>
    </style:style>
    <style:style style:name="co11" style:family="table-column">
      <style:table-column-properties fo:break-before="auto" style:column-width="11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style:font-name="Inconsolata" fo:font-weight="normal" style:font-weight-asian="normal" style:font-weight-complex="normal"/>
    </style:style>
    <style:style style:name="ce5" style:family="table-cell" style:parent-style-name="Default">
      <style:text-properties style:font-name="Inconsolata"/>
    </style:style>
    <style:style style:name="ce6" style:family="table-cell" style:parent-style-name="Default">
      <style:text-properties fo:color="#b3b3b3" style:font-name="Inconsolata"/>
    </style:style>
    <style:style style:name="ce7" style:family="table-cell" style:parent-style-name="Default">
      <style:text-properties fo:color="#ff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 fo:font-style="italic" style:font-style-asian="italic" style:font-style-complex="italic"/>
    </style:style>
    <style:style style:name="ce13" style:family="table-cell" style:parent-style-name="Default">
      <style:text-properties fo:color="#b3b3b3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NOTE: This was for planning and should not be considered up-to-date.</text:p>
          </table:table-cell>
          <table:covered-table-cell table:number-columns-repeated="4" table:style-name="ce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TypeId</text:p>
          </table:table-cell>
          <table:table-cell table:style-name="ce1" office:value-type="string" calcext:value-type="string">
            <text:p>eventDataId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ApplyTemplate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table:style-name="ce9" office:value-type="float" office:value="126" calcext:value-type="float">
            <text:p>126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style-name="ce9" table:formula="of:=[.B4]-1" office:value-type="float" office:value="125" calcext:value-type="float">
            <text:p>125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style-name="ce9" table:formula="of:=[.B5]-1" office:value-type="float" office:value="124" calcext:value-type="float">
            <text:p>124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style-name="ce9" table:formula="of:=[.B6]-1" office:value-type="float" office:value="123" calcext:value-type="float">
            <text:p>123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style-name="ce9" table:formula="of:=[.B7]-1" office:value-type="float" office:value="122" calcext:value-type="float">
            <text:p>122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style-name="ce9" table:formula="of:=[.B8]-1" office:value-type="float" office:value="121" calcext:value-type="float">
            <text:p>121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6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style-name="ce9" table:formula="of:=[.B9]-1" office:value-type="float" office:value="120" calcext:value-type="float">
            <text:p>120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style-name="ce9" table:formula="of:=[.B10]-1" office:value-type="float" office:value="119" calcext:value-type="float">
            <text:p>119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TagGroup</text:p>
          </table:table-cell>
          <table:table-cell table:style-name="ce9" table:formula="of:=[.B11]-1" office:value-type="float" office:value="118" calcext:value-type="float">
            <text:p>118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9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style-name="ce9" table:formula="of:=[.B12]-1" office:value-type="float" office:value="117" calcext:value-type="float">
            <text:p>117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style-name="ce9" table:formula="of:=[.B13]-1" office:value-type="float" office:value="116" calcext:value-type="float">
            <text:p>116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ApplicableTag</text:p>
          </table:table-cell>
          <table:table-cell table:style-name="ce9" table:formula="of:=[.B14]-1" office:value-type="float" office:value="115" calcext:value-type="float">
            <text:p>115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14]" office:value-type="string" office:string-value="“" calcext:value-type="string">
            <text:p>“</text:p>
          </table:table-cell>
        </table:table-row>
        <table:table-row table:style-name="ro1">
          <table:table-cell table:style-name="ce6" office:value-type="string" calcext:value-type="string">
            <text:p>UpdateTagPosition</text:p>
          </table:table-cell>
          <table:table-cell table:style-name="ce10"/>
          <table:table-cell table:style-name="ce12" office:value-type="string" calcext:value-type="string">
            <text:p>&lt;id&gt;</text:p>
          </table:table-cell>
          <table:table-cell table:style-name="ce13" office:value-type="string" calcext:value-type="string">
            <text:p>{“c”:3,”p”:2}</text:p>
          </table:table-cell>
          <table:table-cell table:style-name="ce13" office:value-type="string" calcext:value-type="string">
            <text:p>dataid = parent, c = child, p = position: Option[TagId]</text:p>
          </table:table-cell>
        </table:table-row>
        <table:table-row table:style-name="ro1">
          <table:table-cell office:value-type="string" calcext:value-type="string">
            <text:p>DeleteStaticField</text:p>
          </table:table-cell>
          <table:table-cell table:style-name="ce9" table:formula="of:=[.B15]-1" office:value-type="float" office:value="114" calcext:value-type="float">
            <text:p>114</text:p>
          </table:table-cell>
          <table:table-cell table:style-name="ce11" office:value-type="string" calcext:value-type="string">
            <text:p>&lt;sf&gt;</text:p>
          </table:table-cell>
          <table:table-cell office:value-type="string" calcext:value-type="string">
            <text:p>“r”</text:p>
          </table:table-cell>
          <table:table-cell table:formula="of:=[.E12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DeleteCustomField</text:p>
          </table:table-cell>
          <table:table-cell table:style-name="ce9" table:formula="of:=[.B17]-1" office:value-type="float" office:value="113" calcext:value-type="float">
            <text:p>113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epositionField</text:p>
          </table:table-cell>
          <table:table-cell table:style-name="ce9" table:formula="of:=[.B18]-1" office:value-type="float" office:value="112" calcext:value-type="float">
            <text:p>112</text:p>
          </table:table-cell>
          <table:table-cell table:style-name="ce11"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style-name="ce9" table:formula="of:=[.B19]-1" office:value-type="float" office:value="111" calcext:value-type="float">
            <text:p>111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style-name="ce9" table:formula="of:=[.B20]-1" office:value-type="float" office:value="110" calcext:value-type="float">
            <text:p>110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style-name="ce9" table:formula="of:=[.B21]-1" office:value-type="float" office:value="109" calcext:value-type="float">
            <text:p>109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style-name="ce9" table:formula="of:=[.B22]-1" office:value-type="float" office:value="108" calcext:value-type="float">
            <text:p>108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style-name="ce9" table:formula="of:=[.B23]-1" office:value-type="float" office:value="107" calcext:value-type="float">
            <text:p>107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style-name="ce9" table:formula="of:=[.B24]-1" office:value-type="float" office:value="106" calcext:value-type="float">
            <text:p>106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style-name="ce9" table:formula="of:=[.B26]+1" office:value-type="float" office:value="2" calcext:value-type="float">
            <text:p>2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style-name="ce9" table:formula="of:=[.B27]+1" office:value-type="float" office:value="3" calcext:value-type="float">
            <text:p>3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style-name="ce9" table:formula="of:=[.B28]+1" office:value-type="float" office:value="4" calcext:value-type="float">
            <text:p>4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style-name="ce9" table:formula="of:=[.B29]+1" office:value-type="float" office:value="5" calcext:value-type="float">
            <text:p>5</text:p>
          </table:table-cell>
          <table:table-cell table:style-name="ce11" office:value-type="string" calcext:value-type="string">
            <text:p>&lt;id&gt;</text:p>
          </table:table-cell>
          <table:table-cell table:style-name="ce9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style-name="ce9" table:formula="of:=[.B30]+1" office:value-type="float" office:value="6" calcext:value-type="float">
            <text:p>6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style-name="ce9" table:formula="of:=[.B31]+1" office:value-type="float" office:value="7" calcext:value-type="float">
            <text:p>7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style-name="ce9" table:formula="of:=[.B32]+1" office:value-type="float" office:value="8" calcext:value-type="float">
            <text:p>8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style-name="ce9" table:formula="of:=[.B33]+1" office:value-type="float" office:value="9" calcext:value-type="float">
            <text:p>9</text:p>
          </table:table-cell>
          <table:table-cell table:style-name="ce11"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  <table:table-row table:style-name="ro1" table:number-rows-repeated="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chem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7" office:value-type="string" calcext:value-type="string">
            <text:p>smallint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-range integer</text:p>
          </table:table-cell>
          <table:table-cell table:style-name="ce17" office:value-type="string" calcext:value-type="string">
            <text:p>-32768 to +3276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7" office:value-type="string" calcext:value-type="string">
            <text:p>integer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typical choice for integer</text:p>
          </table:table-cell>
          <table:table-cell table:style-name="ce17" office:value-type="string" calcext:value-type="string">
            <text:p>-2147483648 to +2,147,483,64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-range integer</text:p>
          </table:table-cell>
          <table:table-cell table:style-name="ce17" office:value-type="string" calcext:value-type="string">
            <text:p>-9223372036854775808 to +9, 223,372, 036,854, 775,80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 default now()</text:p>
          </table:table-cell>
          <table:table-cell office:value-type="string" calcext:value-type="string">
            <text:p>exists already</text:p>
          </table:table-cell>
          <table:table-cell/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6 decimal digits precision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double precision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15 decimal digits precision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smallserial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 autoincrementing integer</text:p>
          </table:table-cell>
          <table:table-cell table:style-name="ce17" office:value-type="string" calcext:value-type="string">
            <text:p>1 to 32767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autoincrementing integer</text:p>
          </table:table-cell>
          <table:table-cell table:style-name="ce17" office:value-type="string" calcext:value-type="string">
            <text:p>1 to 2147483647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bigserial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 autoincrementing integer</text:p>
          </table:table-cell>
          <table:table-cell table:style-name="ce17" office:value-type="string" calcext:value-type="string">
            <text:p>1 to 9223372036854775807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= (this, seq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≥ 0. Use 0 for template, else start a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data_id</text:p>
          </table:table-cell>
          <table:table-cell table:style-name="ce16"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Upd/Del field uses &lt;sf&gt; here – store as negative numbers, ids are all &gt; 0</text:p>
            <text:p>integer is ample. ids are scoped to a project. There will never be 2 billion anythings per projec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_schem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5" office:value-type="string" calcext:value-type="string">
            <text:p>event_typ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mallint</text:p>
          </table:table-cell>
          <table:table-cell table:style-name="ce15"/>
          <table:table-cell table:style-name="ce15" office:value-type="string" calcext:value-type="string">
            <text:p>Best to make this table for info/manual purposes only.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event_typ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 ?</text:p>
          </table:table-cell>
          <table:table-cell table:style-name="ce15"/>
          <table:table-cell table:style-name="ce15" office:value-type="string" calcext:value-type="string">
            <text:p>No FK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event_type</text:p>
          </table:table-cell>
          <table:table-cell table:style-name="ce15" office:value-type="string" calcext:value-type="string">
            <text:p>policy_data_id</text:p>
          </table:table-cell>
          <table:table-cell table:style-name="ce15" office:value-type="string" calcext:value-type="string">
            <text:p>enum</text:p>
          </table:table-cell>
          <table:table-cell table:style-name="ce15"/>
          <table:table-cell table:style-name="ce15" office:value-type="string" calcext:value-type="string">
            <text:p>Always NULL, never NULL, anything, Always 0+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event_type</text:p>
          </table:table-cell>
          <table:table-cell table:style-name="ce15" office:value-type="string" calcext:value-type="string">
            <text:p>policy_data</text:p>
          </table:table-cell>
          <table:table-cell table:style-name="ce15" office:value-type="string" calcext:value-type="string">
            <text:p>enum</text:p>
          </table:table-cell>
          <table:table-cell table:style-name="ce15"/>
          <table:table-cell table:style-name="ce15" office:value-type="string" calcext:value-type="string">
            <text:p>Always NULL, never NULL, anything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09:00:37.20213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8-05T13:26:15.794828330</dc:date>
    <meta:editing-duration>PT11H30M54S</meta:editing-duration>
    <meta:editing-cycles>23</meta:editing-cycles>
    <meta:generator>LibreOffice/4.3.7.2$Linux_X86_64 LibreOffice_project/430m0$Build-2</meta:generator>
    <meta:document-statistic meta:table-count="3" meta:cell-count="318" meta:object-count="0"/>
  </office:meta>
</office:document-meta>
</file>