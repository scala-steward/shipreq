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917cm"/>
    </style:style>
    <style:style style:name="co2" style:family="table-column">
      <style:table-column-properties fo:break-before="auto" style:column-width="9.43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43cm"/>
    </style:style>
    <style:style style:name="co5" style:family="table-column">
      <style:table-column-properties fo:break-before="auto" style:column-width="3.327cm"/>
    </style:style>
    <style:style style:name="co6" style:family="table-column">
      <style:table-column-properties fo:break-before="auto" style:column-width="3.604cm"/>
    </style:style>
    <style:style style:name="co7" style:family="table-column">
      <style:table-column-properties fo:break-before="auto" style:column-width="0.612cm"/>
    </style:style>
    <style:style style:name="co8" style:family="table-column">
      <style:table-column-properties fo:break-before="auto" style:column-width="1.221cm"/>
    </style:style>
    <style:style style:name="co9" style:family="table-column">
      <style:table-column-properties fo:break-before="auto" style:column-width="1.415cm"/>
    </style:style>
    <style:style style:name="ro1" style:family="table-row">
      <style:table-row-properties style:row-height="0.533cm" fo:break-before="auto" style:use-optimal-row-height="true"/>
    </style:style>
    <style:style style:name="ro2" style:family="table-row">
      <style:table-row-properties style:row-height="0.995cm" fo:break-before="auto" style:use-optimal-row-height="true"/>
    </style:style>
    <style:style style:name="ro3" style:family="table-row">
      <style:table-row-properties style:row-height="1.494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style:vertical-align="top"/>
      <style:text-properties fo:font-size="12pt" style:font-size-asian="12pt" style:font-size-complex="12pt" fo:hyphenate="true"/>
    </style:style>
    <style:style style:name="ce2" style:family="table-cell" style:parent-style-name="Default">
      <style:table-cell-properties fo:wrap-option="no-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5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6" style:family="table-cell" style:parent-style-name="Default">
      <style:table-cell-properties fo:wrap-option="wrap" style:vertical-align="top"/>
      <style:text-properties fo:font-size="12pt" style:font-size-asian="12pt" style:font-size-complex="12pt" fo:hyphenate="true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ext-properties fo:color="#4c1900" fo:font-size="12pt" style:font-size-asian="12pt" style:font-size-complex="12pt"/>
    </style:style>
    <style:style style:name="ce11" style:family="table-cell" style:parent-style-name="Default">
      <style:text-properties fo:color="#ff00ff" fo:font-size="12pt" style:font-size-asian="12pt" style:font-size-complex="12pt"/>
    </style:style>
    <style:style style:name="ce12" style:family="table-cell" style:parent-style-name="Default">
      <style:text-properties style:font-name="Arimo" fo:font-size="12pt" style:font-name-asian="TianZhen" style:font-size-asian="12pt" style:font-name-complex="FreeSans" style:font-size-complex="12pt"/>
    </style:style>
    <style:style style:name="ce1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ext-properties fo:color="#000000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ext-properties fo:color="#000000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mo" style:font-name-asian="TianZhen" style:font-name-complex="FreeSans"/>
    </style:style>
    <style:style style:name="T3" style:family="text">
      <style:text-properties style:font-name="Arimo" fo:font-weight="bold" style:font-name-asian="TianZhen" style:font-weight-asian="bold" style:font-name-complex="FreeSans" style:font-weight-complex="bold"/>
    </style:style>
  </office:automatic-styles>
  <office:body>
    <office:spreadsheet>
      <table:table table:name="Overall" table:style-name="ta1">
        <table:table-column table:style-name="co1" table:default-cell-style-name="ce1"/>
        <table:table-column table:style-name="co2" table:number-columns-repeated="2" table:default-cell-style-name="ce6"/>
        <table:table-column table:style-name="co3" table:number-columns-repeated="1021" table:default-cell-style-name="ce6"/>
        <table:table-row table:style-name="ro1">
          <table:table-cell/>
          <table:table-cell table:style-name="ce4" office:value-type="string">
            <text:p>Approach #1</text:p>
          </table:table-cell>
          <table:table-cell table:style-name="ce4" office:value-type="string">
            <text:p>Approach #2c</text:p>
          </table:table-cell>
          <table:table-cell table:number-columns-repeated="1021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Pros</text:p>
          </table:table-cell>
          <table:table-cell table:formula="of:=['1'.A48]" office:value-type="string" office:string-value="Steps are first-class citizens.">
            <text:p>Steps are first-class citizens.</text:p>
          </table:table-cell>
          <table:table-cell table:formula="of:=[2c.A38]" office:value-type="string" office:string-value="Step tree is flat and stored with labels.">
            <text:p>Step tree is flat and stored with labels.</text:p>
          </table:table-cell>
          <table:table-cell table:number-columns-repeated="1021"/>
        </table:table-row>
        <table:table-row table:style-name="ro1">
          <table:table-cell/>
          <table:table-cell table:formula="of:=['1'.A49]" office:value-type="string" office:string-value="Partial step trees are reusable.">
            <text:p>Partial step trees are reusable.</text:p>
          </table:table-cell>
          <table:table-cell table:formula="of:=[2c.A39]" office:value-type="string" office:string-value="Steps are first-class citizens.">
            <text:p>Steps are first-class citizens.</text:p>
          </table:table-cell>
          <table:table-cell table:number-columns-repeated="1021"/>
        </table:table-row>
        <table:table-row table:style-name="ro1">
          <table:table-cell/>
          <table:table-cell table:formula="of:=['1'.A50]" office:value-type="string" office:string-value="Identity (data) separate from state (value)">
            <text:p>Identity (data) separate from state (value)</text:p>
          </table:table-cell>
          <table:table-cell table:formula="of:=[2c.A40]" office:value-type="string" office:string-value="Identity (data) separate from state (value)">
            <text:p>Identity (data) separate from state (value)</text:p>
          </table:table-cell>
          <table:table-cell table:number-columns-repeated="1021"/>
        </table:table-row>
        <table:table-row table:style-name="ro1">
          <table:table-cell/>
          <table:table-cell table:formula="of:=['1'.A51]" office:value-type="string" office:string-value="Field values are reusable.">
            <text:p>Field values are reusable.</text:p>
          </table:table-cell>
          <table:table-cell table:formula="of:=[2c.A41]" office:value-type="string" office:string-value="Each step/textfield has its own audit trail.">
            <text:p>Each step/textfield has its own audit trail.</text:p>
          </table:table-cell>
          <table:table-cell table:number-columns-repeated="1021"/>
        </table:table-row>
        <table:table-row table:style-name="ro2">
          <table:table-cell/>
          <table:table-cell table:formula="of:=['1'.A52]" office:value-type="string" office:string-value="Can add new data types and relations without schema change.">
            <text:p>Can add new data types and relations without schema change.</text:p>
          </table:table-cell>
          <table:table-cell table:formula="of:=[2c.A42]" office:value-type="string" office:string-value="Easy to inspect via SQL">
            <text:p>Easy to inspect via SQL</text:p>
          </table:table-cell>
          <table:table-cell table:number-columns-repeated="1021"/>
        </table:table-row>
        <table:table-row table:style-name="ro3">
          <table:table-cell/>
          <table:table-cell table:formula="of:=['1'.A53]" office:value-type="string" office:string-value="Each step/textfield has its own audit trail.">
            <text:p>Each step/textfield has its own audit trail.</text:p>
          </table:table-cell>
          <table:table-cell table:formula="of:=[2c.A43]" office:value-type="string" office:string-value="Structure closely matches logical UC (with the exception of FK being on the outside, ie. TEXTR→TEXT→FK)">
            <text:p>Structure closely matches logical UC (with the exception of FK being on the outside, ie. TEXTR→TEXT→FK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ons</text:p>
          </table:table-cell>
          <table:table-cell table:formula="of:=['1'.A58]" office:value-type="string" office:string-value="Very hard to inspect via SQL.">
            <text:p>Very hard to inspect via SQL.</text:p>
          </table:table-cell>
          <table:table-cell table:formula="of:=[2c.A46]" office:value-type="string" office:string-value="2 implicit RI rules.">
            <text:p>2 implicit RI rules.</text:p>
          </table:table-cell>
          <table:table-cell table:number-columns-repeated="1021"/>
        </table:table-row>
        <table:table-row table:style-name="ro2">
          <table:table-cell/>
          <table:table-cell table:formula="of:=['1'.A59]" office:value-type="string" office:string-value="ID overlap between different data types.">
            <text:p>ID overlap between different data types.</text:p>
          </table:table-cell>
          <table:table-cell table:formula="of:=[2c.A47]" office:value-type="string" office:string-value="Enforcing uc_id between uc_step → step_rev → step would need a trigger.">
            <text:p>Enforcing uc_id between uc_step → step_rev → step would need a trigger.</text:p>
          </table:table-cell>
          <table:table-cell table:number-columns-repeated="1021"/>
        </table:table-row>
        <table:table-row table:style-name="ro2">
          <table:table-cell/>
          <table:table-cell table:formula="of:=['1'.A60]" office:value-type="string" office:string-value="Cross-table data-type integrity checks missing and would need to be done via triggers (slow).">
            <text:p>Cross-table data-type integrity checks missing and would need to be done via triggers (slow).</text:p>
          </table:table-cell>
          <table:table-cell table:formula="of:=[2c.A48]" office:value-type="string" office:string-value="Enforcing uc_step &amp; uc_text match the correct type of text.FK would need a trigger.">
            <text:p>Enforcing uc_step &amp; uc_text match the correct type of text.FK would need a trigger.</text:p>
          </table:table-cell>
          <table:table-cell table:number-columns-repeated="1021"/>
        </table:table-row>
        <table:table-row table:style-name="ro2">
          <table:table-cell/>
          <table:table-cell table:formula="of:=['1'.A61]" office:value-type="string" office:string-value="Complex structure and implicit rules (meaning any sanity-check-like behaviour will also be complex)">
            <text:p>Complex structure and implicit rules (meaning any sanity-check-like behaviour will also be complex)</text:p>
          </table:table-cell>
          <table:table-cell table:formula="of:=[2c.A49]" office:value-type="string" office:string-value="Doesn't inherently support new field types.">
            <text:p>Doesn't inherently support new field types.</text:p>
          </table:table-cell>
          <table:table-cell table:number-columns-repeated="1021"/>
        </table:table-row>
        <table:table-row table:style-name="ro1">
          <table:table-cell/>
          <table:table-cell table:formula="of:=['1'.A62]" office:value-type="string" office:string-value="Can't enforce: A step belongs to a single UC.">
            <text:p>Can't enforce: A step belongs to a single UC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Need: Reference a step, being unaffected by step text/label changes. (intra-UC)</text:p>
          </table:table-cell>
          <table:table-cell table:number-columns-repeated="1023"/>
        </table:table-row>
        <table:table-row table:style-name="ro2">
          <table:table-cell/>
          <table:table-cell table:number-columns-repeated="2" office:value-type="string">
            <text:p>Normalises to use step's data id. Denormalised on loa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eed: Reference a step, being unaffected by step text/label changes. (inter-UC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Text change: fine.</text:p>
            <text:p>Label change... No way to discern without loading &amp; unpacking entire UC.</text:p>
          </table:table-cell>
          <table:table-cell office:value-type="string">
            <text:p>Fine. Denormalise via:</text:p>
            <text:p>(UC, TEXTR) → UC_FIELD</text:p>
            <text:p>or UC → UC_FIELD → TEXT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eed: Reference a UC, being unaffected by title/number changes.</text:p>
          </table:table-cell>
          <table:table-cell table:number-columns-repeated="1023"/>
        </table:table-row>
        <table:table-row table:style-name="ro1">
          <table:table-cell/>
          <table:table-cell table:number-columns-repeated="2" office:value-type="string">
            <text:p>Normalise to use UC's data id. Denormalise on loa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eed: Lookup step by label.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Can't be done. Will need to unpack UC first.</text:p>
          </table:table-cell>
          <table:table-cell office:value-type="string">
            <text:p>Easy, look up UC_FIELD.labe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Want: Audit trail for a text field.</text:p>
          </table:table-cell>
          <table:table-cell table:number-columns-repeated="1023"/>
        </table:table-row>
        <table:table-row table:style-name="ro4">
          <table:table-cell table:number-columns-repeated="2"/>
          <table:table-cell office:value-type="string">
            <text:p>Done. TEXT *-- TEXTR</text:p>
          </table:table-cell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 office:value-type="string">
            <text:p>Want: Audit trail for a step.</text:p>
          </table:table-cell>
          <table:table-cell table:number-columns-repeated="1023"/>
        </table:table-row>
        <table:table-row table:style-name="ro4">
          <table:table-cell table:number-columns-repeated="2"/>
          <table:table-cell table:formula="of:=[.C35]" office:value-type="string" office:string-value="Done. TEXT *-- TEXTR">
            <text:p>Done. TEXT *-- TEXTR</text:p>
          </table:table-cell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>
        <table:table-column table:style-name="co4" table:number-columns-repeated="5" table:default-cell-style-name="ce8"/>
        <table:table-column table:style-name="co3" table:number-columns-repeated="1019" table:default-cell-style-name="ce8"/>
        <table:table-row table:style-name="ro1">
          <table:table-cell table:style-name="ce7" office:value-type="string">
            <text:p>Approach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ta</text:p>
          </table:table-cell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string">
            <text:p>PK</text:p>
          </table:table-cell>
          <table:table-cell table:number-columns-repeated="1020"/>
        </table:table-row>
        <table:table-row table:style-name="ro1">
          <table:table-cell office:value-type="string">
            <text:p>data</text:p>
          </table:table-cell>
          <table:table-cell office:value-type="string">
            <text:p>type_id</text:p>
          </table:table-cell>
          <table:table-cell office:value-type="string">
            <text:p>INT2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ta_type</text:p>
          </table:table-cell>
          <table:table-cell office:value-type="string">
            <text:p>id</text:p>
          </table:table-cell>
          <table:table-cell office:value-type="string">
            <text:p>INT2</text:p>
          </table:table-cell>
          <table:table-cell office:value-type="string">
            <text:p>PK</text:p>
          </table:table-cell>
          <table:table-cell table:number-columns-repeated="1020"/>
        </table:table-row>
        <table:table-row table:style-name="ro1">
          <table:table-cell office:value-type="string">
            <text:p>data_type</text:p>
          </table:table-cell>
          <table:table-cell office:value-type="string">
            <text:p>name</text:p>
          </table:table-cell>
          <table:table-cell office:value-type="string">
            <text:p>VARCHAR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eld_key</text:p>
          </table:table-cell>
          <table:table-cell office:value-type="string">
            <text:p>data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1020"/>
        </table:table-row>
        <table:table-row table:style-name="ro1">
          <table:table-cell office:value-type="string">
            <text:p>field_key</text:p>
          </table:table-cell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string">
            <text:p>PK</text:p>
          </table:table-cell>
          <table:table-cell table:number-columns-repeated="1020"/>
        </table:table-row>
        <table:table-row table:style-name="ro1">
          <table:table-cell office:value-type="string">
            <text:p>field_key</text:p>
          </table:table-cell>
          <table:table-cell office:value-type="string">
            <text:p>type_id</text:p>
          </table:table-cell>
          <table:table-cell office:value-type="string">
            <text:p>INT2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eld_key_type</text:p>
          </table:table-cell>
          <table:table-cell office:value-type="string">
            <text:p>id</text:p>
          </table:table-cell>
          <table:table-cell office:value-type="string">
            <text:p>INT2</text:p>
          </table:table-cell>
          <table:table-cell office:value-type="string">
            <text:p>PK</text:p>
          </table:table-cell>
          <table:table-cell table:number-columns-repeated="1020"/>
        </table:table-row>
        <table:table-row table:style-name="ro1">
          <table:table-cell office:value-type="string">
            <text:p>field_key_type</text:p>
          </table:table-cell>
          <table:table-cell office:value-type="string">
            <text:p>name</text:p>
          </table:table-cell>
          <table:table-cell office:value-type="string">
            <text:p>VARCHAR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eld_value</text:p>
          </table:table-cell>
          <table:table-cell office:value-type="string">
            <text:p>field_key_id</text:p>
          </table:table-cell>
          <table:table-cell office:value-type="string">
            <text:p>BIGINT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>
            <text:p>field_value</text:p>
          </table:table-cell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string">
            <text:p>PK</text:p>
          </table:table-cell>
          <table:table-cell table:number-columns-repeated="1020"/>
        </table:table-row>
        <table:table-row table:style-name="ro1">
          <table:table-cell office:value-type="string">
            <text:p>field_value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</text:p>
          </table:table-cell>
          <table:table-cell office:value-type="string">
            <text:p>from_id</text:p>
          </table:table-cell>
          <table:table-cell office:value-type="string">
            <text:p>BIGINT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>
            <text:p>relation</text:p>
          </table:table-cell>
          <table:table-cell office:value-type="string">
            <text:p>index</text:p>
          </table:table-cell>
          <table:table-cell office:value-type="string">
            <text:p>INT2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>
            <text:p>relation</text:p>
          </table:table-cell>
          <table:table-cell office:value-type="string">
            <text:p>to_id</text:p>
          </table:table-cell>
          <table:table-cell office:value-type="string">
            <text:p>BIGINT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>
            <text:p>relation</text:p>
          </table:table-cell>
          <table:table-cell office:value-type="string">
            <text:p>type_id</text:p>
          </table:table-cell>
          <table:table-cell office:value-type="string">
            <text:p>INT2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_type</text:p>
          </table:table-cell>
          <table:table-cell office:value-type="string">
            <text:p>id</text:p>
          </table:table-cell>
          <table:table-cell office:value-type="string">
            <text:p>INT2</text:p>
          </table:table-cell>
          <table:table-cell office:value-type="string">
            <text:p>PK</text:p>
          </table:table-cell>
          <table:table-cell table:number-columns-repeated="1020"/>
        </table:table-row>
        <table:table-row table:style-name="ro1">
          <table:table-cell office:value-type="string">
            <text:p>relation_type</text:p>
          </table:table-cell>
          <table:table-cell office:value-type="string">
            <text:p>name</text:p>
          </table:table-cell>
          <table:table-cell office:value-type="string">
            <text:p>VARCHAR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ep</text:p>
          </table:table-cell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string">
            <text:p>PK</text:p>
          </table:table-cell>
          <table:table-cell table:number-columns-repeated="1020"/>
        </table:table-row>
        <table:table-row table:style-name="ro1">
          <table:table-cell office:value-type="string">
            <text:p>step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secase</text:p>
          </table:table-cell>
          <table:table-cell office:value-type="string">
            <text:p>field_list_id</text:p>
          </table:table-cell>
          <table:table-cell office:value-type="string">
            <text:p>BIGINT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>
            <text:p>usecase</text:p>
          </table:table-cell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string">
            <text:p>PK</text:p>
          </table:table-cell>
          <table:table-cell table:number-columns-repeated="1020"/>
        </table:table-row>
        <table:table-row table:style-name="ro1">
          <table:table-cell office:value-type="string">
            <text:p>usecase</text:p>
          </table:table-cell>
          <table:table-cell office:value-type="string">
            <text:p>number</text:p>
          </table:table-cell>
          <table:table-cell office:value-type="string">
            <text:p>INT2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>
            <text:p>usecase</text:p>
          </table:table-cell>
          <table:table-cell office:value-type="string">
            <text:p>title</text:p>
          </table:table-cell>
          <table:table-cell office:value-type="string">
            <text:p>VARCHAR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alue</text:p>
          </table:table-cell>
          <table:table-cell office:value-type="string">
            <text:p>data_id</text:p>
          </table:table-cell>
          <table:table-cell office:value-type="string">
            <text:p>BIGINT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>
            <text:p>value</text:p>
          </table:table-cell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string">
            <text:p>PK</text:p>
          </table:table-cell>
          <table:table-cell table:number-columns-repeated="1020"/>
        </table:table-row>
        <table:table-row table:style-name="ro1">
          <table:table-cell office:value-type="string">
            <text:p>value</text:p>
          </table:table-cell>
          <table:table-cell office:value-type="string">
            <text:p>rev</text:p>
          </table:table-cell>
          <table:table-cell office:value-type="string">
            <text:p>INT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>
            <text:p>value</text:p>
          </table:table-cell>
          <table:table-cell office:value-type="string">
            <text:p>updated_at</text:p>
          </table:table-cell>
          <table:table-cell office:value-type="string">
            <text:p>TIMESTAMPTZ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7" office:value-type="string">
            <text:p>Pros</text:p>
          </table:table-cell>
          <table:table-cell table:number-columns-repeated="1023"/>
        </table:table-row>
        <table:table-row table:style-name="ro1">
          <table:table-cell office:value-type="string">
            <text:p>Steps are first-class citizens.</text:p>
          </table:table-cell>
          <table:table-cell table:number-columns-repeated="1023"/>
        </table:table-row>
        <table:table-row table:style-name="ro1">
          <table:table-cell office:value-type="string">
            <text:p>Partial step trees are reusable.</text:p>
          </table:table-cell>
          <table:table-cell table:number-columns-repeated="1023"/>
        </table:table-row>
        <table:table-row table:style-name="ro1">
          <table:table-cell office:value-type="string">
            <text:p>Identity (data) separate from state (value)</text:p>
          </table:table-cell>
          <table:table-cell table:number-columns-repeated="1023"/>
        </table:table-row>
        <table:table-row table:style-name="ro1">
          <table:table-cell office:value-type="string">
            <text:p>Field values are reusable.</text:p>
          </table:table-cell>
          <table:table-cell table:number-columns-repeated="1023"/>
        </table:table-row>
        <table:table-row table:style-name="ro1">
          <table:table-cell office:value-type="string">
            <text:p>Can add new data types and relations without schema change.</text:p>
          </table:table-cell>
          <table:table-cell table:number-columns-repeated="1023"/>
        </table:table-row>
        <table:table-row table:style-name="ro1">
          <table:table-cell office:value-type="string">
            <text:p>Each step/textfield has its own audit trail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>
            <text:p>Cons</text:p>
          </table:table-cell>
          <table:table-cell table:number-columns-repeated="1023"/>
        </table:table-row>
        <table:table-row table:style-name="ro1">
          <table:table-cell office:value-type="string">
            <text:p>Very hard to inspect via SQL.</text:p>
          </table:table-cell>
          <table:table-cell table:number-columns-repeated="1023"/>
        </table:table-row>
        <table:table-row table:style-name="ro1">
          <table:table-cell office:value-type="string">
            <text:p>ID overlap between different data types.</text:p>
          </table:table-cell>
          <table:table-cell table:number-columns-repeated="1023"/>
        </table:table-row>
        <table:table-row table:style-name="ro1">
          <table:table-cell office:value-type="string">
            <text:p>Cross-table data-type integrity checks missing and would need to be done via triggers (slow).</text:p>
          </table:table-cell>
          <table:table-cell table:number-columns-repeated="1023"/>
        </table:table-row>
        <table:table-row table:style-name="ro1">
          <table:table-cell office:value-type="string">
            <text:p>Complex structure and implicit rules (meaning any sanity-check-like behaviour will also be complex)</text:p>
          </table:table-cell>
          <table:table-cell table:number-columns-repeated="1023"/>
        </table:table-row>
        <table:table-row table:style-name="ro1">
          <table:table-cell office:value-type="string">
            <text:p>Can't enforce: A step belongs to a single UC.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a" table:style-name="ta1">
        <table:table-column table:style-name="co5" table:default-cell-style-name="ce7"/>
        <table:table-column table:style-name="co5" table:default-cell-style-name="ce8"/>
        <table:table-column table:style-name="co6" table:default-cell-style-name="ce8"/>
        <table:table-column table:style-name="co5" table:number-columns-repeated="2" table:default-cell-style-name="ce8"/>
        <table:table-column table:style-name="co3" table:number-columns-repeated="1019" table:default-cell-style-name="ce8"/>
        <table:table-row table:style-name="ro3">
          <table:table-cell office:value-type="string">
            <text:p>usecase</text:p>
          </table:table-cell>
          <table:table-cell office:value-type="string">
            <text:p>id</text:p>
          </table:table-cell>
          <table:table-cell office:value-type="string">
            <text:p>← usecase_rev.ident_id</text:p>
            <text:p>← step.uc_id</text:p>
            <text:p>← text_field.uc_i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ser_id</text:p>
          </table:table-cell>
          <table:table-cell table:number-columns-repeated="2"/>
          <table:table-cell office:value-type="string">
            <text:p>??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atest_rev_id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>
            <text:p>usecase_rev</text:p>
          </table:table-cell>
          <table:table-cell office:value-type="string">
            <text:p>id</text:p>
          </table:table-cell>
          <table:table-cell table:style-name="ce12" office:value-type="string">
            <text:p>← <text:span text:style-name="T1">usecase</text:span>.latest_rev_id</text:p>
            <text:p>← <text:span text:style-name="T1">uc_step</text:span>.uc_rev_id</text:p>
            <text:p>← <text:span text:style-name="T1">uc_tf</text:span>.uc_rev_id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/>
          <table:table-cell table:style-name="ce10" office:value-type="string">
            <text:p>ident_id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>
            <text:p>rev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>
            <text:p>updated_a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umb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it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c_step</text:p>
          </table:table-cell>
          <table:table-cell office:value-type="string">
            <text:p>uc_rev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abe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eve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dex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ep_rev_i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ep</text:p>
          </table:table-cell>
          <table:table-cell office:value-type="string">
            <text:p>id</text:p>
          </table:table-cell>
          <table:table-cell table:style-name="ce12" office:value-type="string">
            <text:p>← step_rev.ident_id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>
            <text:p>uc_id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>
            <text:p>fk_id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step_rev</text:p>
          </table:table-cell>
          <table:table-cell office:value-type="string">
            <text:p>id</text:p>
          </table:table-cell>
          <table:table-cell table:style-name="ce12" office:value-type="string">
            <text:p>← <text:span text:style-name="T1">uc_step</text:span>.step_id</text:p>
          </table:table-cell>
          <table:table-cell/>
          <table:table-cell table:style-name="ce13" office:value-type="string">
            <text:p>?? delete ??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ident_id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>
            <text:p>rev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0" office:value-type="string">
            <text:p>updated_a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c_tf</text:p>
          </table:table-cell>
          <table:table-cell office:value-type="string">
            <text:p>uc_rev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f_rev_id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ext_field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>
            <text:p>uc_id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>
            <text:p>fk_id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text_field_rev</text:p>
          </table:table-cell>
          <table:table-cell office:value-type="string">
            <text:p>id</text:p>
          </table:table-cell>
          <table:table-cell table:number-columns-repeated="2"/>
          <table:table-cell table:style-name="ce13" office:value-type="string">
            <text:p>?? delete ??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10" office:value-type="string">
            <text:p>ident_id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0" office:value-type="string">
            <text:p>rev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0" office:value-type="string">
            <text:p>updated_a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eld_key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ype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field_key_type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1">
          <table:table-cell table:style-name="ce8"/>
          <table:table-cell office:value-type="string">
            <text:p>na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8 tables: UC → UCR → (UC_STEP → STEPR → STEP) + (UC_TF → TFR → TF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s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tep tree is flat and stored with labels.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Steps are first-class citizens.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8" office:value-type="string">
            <text:p>Identity (data) separate from state (value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Each step/textfield has its own audit trail.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" office:value-type="string">
            <text:p>Easy to inspect via SQL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s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chema is very repetitive.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" office:value-type="string">
            <text:p>2 implicit RI rules.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Enforcing uc_id between uc_step → step_rev → step would need a trigger.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table:style-name="ce8" office:value-type="string">
            <text:p>Enforcing text_field &amp; step fk_ids match the correct type of FK would need a trigger.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8" office:value-type="string">
            <text:p>Doesn't inherently support new field types.</text:p>
          </table:table-cell>
          <table:table-cell table:style-name="Default"/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UC loads hits 8 table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?</text:p>
          </table:table-cell>
          <table:table-cell/>
          <table:table-cell table:style-name="ce7" office:value-type="string">
            <text:p>PiT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revision has steps (specific revs)</text:p>
          </table:table-cell>
          <table:table-cell/>
          <table:table-cell office:value-type="string">
            <text:p>easy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revision has steps (global ident)</text:p>
          </table:table-cell>
          <table:table-cell/>
          <table:table-cell office:value-type="string">
            <text:p>filter by da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!</text:p>
          </table:table-cell>
          <table:table-cell table:number-columns-repeated="1023"/>
        </table:table-row>
        <table:table-row table:style-name="ro1">
          <table:table-cell office:value-type="string">
            <text:p>steps (ident) belong to a single UC</text:p>
          </table:table-cell>
          <table:table-cell table:number-columns-repeated="1023"/>
        </table:table-row>
        <table:table-row table:style-name="ro1">
          <table:table-cell office:value-type="string">
            <text:p>steps (ident) belong to a single FK</text:p>
          </table:table-cell>
          <table:table-cell table:number-columns-repeated="1023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b" table:style-name="ta1">
        <table:table-column table:style-name="co5" table:default-cell-style-name="ce7"/>
        <table:table-column table:style-name="co5" table:default-cell-style-name="ce8"/>
        <table:table-column table:style-name="co6" table:default-cell-style-name="ce8"/>
        <table:table-column table:style-name="co5" table:number-columns-repeated="2" table:default-cell-style-name="ce8"/>
        <table:table-column table:style-name="co3" table:number-columns-repeated="1019" table:default-cell-style-name="ce8"/>
        <table:table-row table:style-name="ro3">
          <table:table-cell office:value-type="string">
            <text:p>usecase</text:p>
          </table:table-cell>
          <table:table-cell office:value-type="string">
            <text:p>id</text:p>
          </table:table-cell>
          <table:table-cell office:value-type="string">
            <text:p>← usecase_rev.ident_id</text:p>
            <text:p>← step.uc_id</text:p>
            <text:p>← text_field.uc_i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ser_id</text:p>
          </table:table-cell>
          <table:table-cell table:number-columns-repeated="2"/>
          <table:table-cell office:value-type="string">
            <text:p>??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atest_rev_id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>
            <text:p>usecase_rev</text:p>
          </table:table-cell>
          <table:table-cell office:value-type="string">
            <text:p>id</text:p>
          </table:table-cell>
          <table:table-cell table:style-name="ce12" office:value-type="string">
            <text:p>← <text:span text:style-name="T1">usecase</text:span>.latest_rev_id</text:p>
            <text:p>← <text:span text:style-name="T1">uc_step</text:span>.uc_rev_id</text:p>
            <text:p>← <text:span text:style-name="T1">uc_tf</text:span>.uc_rev_id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/>
          <table:table-cell table:style-name="ce10" office:value-type="string">
            <text:p>ident_id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>
            <text:p>rev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>
            <text:p>updated_a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umb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it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c_step</text:p>
          </table:table-cell>
          <table:table-cell office:value-type="string">
            <text:p>uc_rev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abe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eve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dex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t_rev_i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c_text</text:p>
          </table:table-cell>
          <table:table-cell office:value-type="string">
            <text:p>uc_rev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t_rev_id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ext</text:p>
          </table:table-cell>
          <table:table-cell office:value-type="string">
            <text:p>id</text:p>
          </table:table-cell>
          <table:table-cell office:value-type="string">
            <text:p>← text_rev.ident_id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>
            <text:p>uc_id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>
            <text:p>fk_id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text_rev</text:p>
          </table:table-cell>
          <table:table-cell office:value-type="string">
            <text:p>id</text:p>
          </table:table-cell>
          <table:table-cell office:value-type="string">
            <text:p>← <text:span text:style-name="T1">uc_step.</text:span>text_rev_id</text:p>
            <text:p><text:span text:style-name="T2">← </text:span><text:span text:style-name="T3">uc_text.</text:span><text:span text:style-name="T2">text_rev_id</text:span>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table:style-name="Default"/>
          <table:table-cell table:style-name="ce10" office:value-type="string">
            <text:p>ident_id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0" office:value-type="string">
            <text:p>rev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0" office:value-type="string">
            <text:p>updated_a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eld_key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ype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field_key_type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1">
          <table:table-cell table:style-name="ce8"/>
          <table:table-cell office:value-type="string">
            <text:p>na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6 tables: UC → UCR → (UC_STEP | UC_TEXT) → TEXTR → TEX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s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tep tree is flat and stored with labels.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Steps are first-class citizens.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8" office:value-type="string">
            <text:p>Identity (data) separate from state (value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Each step/textfield has its own audit trail.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" office:value-type="string">
            <text:p>Easy to inspect via SQL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s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2 implicit RI rules.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8" office:value-type="string">
            <text:p>Enforcing uc_id between uc_step → step_rev → step would need a trigger.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Enforcing uc_step &amp; uc_text match the correct type of text.FK would need a trigger.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table:style-name="ce8" office:value-type="string">
            <text:p>Doesn't inherently support new field types.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495">
          <table:table-cell table:number-columns-repeated="1024"/>
        </table:table-row>
        <table:table-row table:style-name="ro5" table:number-rows-repeated="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c" table:style-name="ta1">
        <table:table-column table:style-name="co5" table:default-cell-style-name="ce7"/>
        <table:table-column table:style-name="co5" table:default-cell-style-name="ce8"/>
        <table:table-column table:style-name="co6" table:default-cell-style-name="ce8"/>
        <table:table-column table:style-name="co5" table:number-columns-repeated="2" table:default-cell-style-name="ce8"/>
        <table:table-column table:style-name="co3" table:number-columns-repeated="4" table:default-cell-style-name="ce8"/>
        <table:table-column table:style-name="co7" table:default-cell-style-name="ce8"/>
        <table:table-column table:style-name="co8" table:default-cell-style-name="ce8"/>
        <table:table-column table:style-name="co3" table:default-cell-style-name="ce8"/>
        <table:table-column table:style-name="co9" table:default-cell-style-name="ce8"/>
        <table:table-column table:style-name="co8" table:default-cell-style-name="ce8"/>
        <table:table-column table:style-name="co3" table:number-columns-repeated="1010" table:default-cell-style-name="ce8"/>
        <table:table-row table:style-name="ro3">
          <table:table-cell office:value-type="string">
            <text:p>usecase</text:p>
          </table:table-cell>
          <table:table-cell office:value-type="string">
            <text:p>id</text:p>
          </table:table-cell>
          <table:table-cell office:value-type="string">
            <text:p>← usecase_rev.ident_id</text:p>
            <text:p>← step.uc_id</text:p>
            <text:p>← text_field.uc_i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ser_id</text:p>
          </table:table-cell>
          <table:table-cell table:number-columns-repeated="2"/>
          <table:table-cell office:value-type="string">
            <text:p>??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atest_rev_id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>
            <text:p>usecase_rev</text:p>
          </table:table-cell>
          <table:table-cell office:value-type="string">
            <text:p>id</text:p>
          </table:table-cell>
          <table:table-cell table:style-name="ce12" office:value-type="string">
            <text:p>← <text:span text:style-name="T1">usecase</text:span>.latest_rev_id</text:p>
            <text:p>← <text:span text:style-name="T1">uc_step</text:span>.uc_rev_id</text:p>
            <text:p>← <text:span text:style-name="T1">uc_tf</text:span>.uc_rev_id</text:p>
          </table:table-cell>
          <table:table-cell/>
          <table:table-cell table:style-name="ce13"/>
          <table:table-cell table:number-columns-repeated="4"/>
          <table:table-cell office:value-type="string">
            <text:p>not enough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string">
            <text:p>ident_id</text:p>
          </table:table-cell>
          <table:table-cell table:number-columns-repeated="7"/>
          <table:table-cell office:value-type="string">
            <text:p>lvl</text:p>
          </table:table-cell>
          <table:table-cell office:value-type="string">
            <text:p>index</text:p>
          </table:table-cell>
          <table:table-cell/>
          <table:table-cell office:value-type="string">
            <text:p>parent</text:p>
          </table:table-cell>
          <table:table-cell office:value-type="string">
            <text:p>index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>
            <text:p>rev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string">
            <text:p>1.E.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/>
          <table:table-cell table:style-name="ce15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>
            <text:p>updated_at</text:p>
          </table:table-cell>
          <table:table-cell table:number-columns-repeated="2"/>
          <table:table-cell table:formula="of:=[.E7]+1" office:value-type="float" office:value="81">
            <text:p>81</text:p>
          </table:table-cell>
          <table:table-cell office:value-type="string">
            <text:p>1.E.2</text:p>
          </table:table-cell>
          <table:table-cell table:style-name="Default"/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5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number</text:p>
          </table:table-cell>
          <table:table-cell table:number-columns-repeated="2"/>
          <table:table-cell table:formula="of:=[.E8]+1" office:value-type="float" office:value="82">
            <text:p>82</text:p>
          </table:table-cell>
          <table:table-cell/>
          <table:table-cell office:value-type="string">
            <text:p>1.E.2.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E8]" office:value-type="float" office:value="81">
            <text:p>8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itle</text:p>
          </table:table-cell>
          <table:table-cell table:number-columns-repeated="2"/>
          <table:table-cell table:formula="of:=[.E9]+1" office:value-type="float" office:value="83">
            <text:p>83</text:p>
          </table:table-cell>
          <table:table-cell table:number-columns-repeated="2"/>
          <table:table-cell office:value-type="string">
            <text:p>1.E.2.1.a</text:p>
          </table:table-cell>
          <table:table-cell/>
          <table:table-cell table:style-name="ce14" office:value-type="float" office:value="2">
            <text:p>2</text:p>
          </table:table-cell>
          <table:table-cell table:style-name="ce14" office:value-type="float" office:value="0">
            <text:p>0</text:p>
          </table:table-cell>
          <table:table-cell table:style-name="ce14"/>
          <table:table-cell table:formula="of:=[.E9]" office:value-type="float" office:value="82">
            <text:p>82</text:p>
          </table:table-cell>
          <table:table-cell table:style-name="ce16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10]+1" office:value-type="float" office:value="84">
            <text:p>84</text:p>
          </table:table-cell>
          <table:table-cell/>
          <table:table-cell table:style-name="Default"/>
          <table:table-cell/>
          <table:table-cell office:value-type="string">
            <text:p>1.E.2.1.a.i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4"/>
          <table:table-cell table:formula="of:=[.E10]" office:value-type="float" office:value="83">
            <text:p>83</text:p>
          </table:table-cell>
          <table:table-cell table:style-name="ce1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uc_field</text:p>
          </table:table-cell>
          <table:table-cell office:value-type="string">
            <text:p>uc_rev_id</text:p>
          </table:table-cell>
          <table:table-cell table:number-columns-repeated="2"/>
          <table:table-cell table:formula="of:=[.E11]+1" office:value-type="float" office:value="85">
            <text:p>85</text:p>
          </table:table-cell>
          <table:table-cell/>
          <table:table-cell office:value-type="string">
            <text:p>1.E.2.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8]" office:value-type="float" office:value="81">
            <text:p>81</text:p>
          </table:table-cell>
          <table:table-cell table:style-name="ce17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NULL | NOT NULL</text:p>
          </table:table-cell>
          <table:table-cell/>
          <table:table-cell table:formula="of:=[.E12]+1" office:value-type="float" office:value="86">
            <text:p>86</text:p>
          </table:table-cell>
          <table:table-cell table:number-columns-repeated="2"/>
          <table:table-cell office:value-type="string">
            <text:p>1.E.2.2.a</text:p>
          </table:table-cell>
          <table:table-cell/>
          <table:table-cell table:style-name="ce14" office:value-type="float" office:value="2">
            <text:p>2</text:p>
          </table:table-cell>
          <table:table-cell table:style-name="ce14" office:value-type="float" office:value="0">
            <text:p>0</text:p>
          </table:table-cell>
          <table:table-cell table:style-name="ce14"/>
          <table:table-cell table:formula="of:=[.E12]" office:value-type="float" office:value="85">
            <text:p>85</text:p>
          </table:table-cell>
          <table:table-cell table:style-name="ce16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parent_rev_id</text:p>
          </table:table-cell>
          <table:table-cell office:value-type="string">
            <text:p>NULL | NULL</text:p>
          </table:table-cell>
          <table:table-cell/>
          <table:table-cell table:formula="of:=[.E13]+1" office:value-type="float" office:value="87">
            <text:p>87</text:p>
          </table:table-cell>
          <table:table-cell/>
          <table:table-cell table:style-name="Default"/>
          <table:table-cell/>
          <table:table-cell office:value-type="string">
            <text:p>1.E.2.2.a.i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4"/>
          <table:table-cell table:formula="of:=[.E13]" office:value-type="float" office:value="86">
            <text:p>86</text:p>
          </table:table-cell>
          <table:table-cell table:style-name="ce16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index</text:p>
          </table:table-cell>
          <table:table-cell office:value-type="string">
            <text:p>NOT NULL</text:p>
          </table:table-cell>
          <table:table-cell/>
          <table:table-cell table:formula="of:=[.E14]+1" office:value-type="float" office:value="88">
            <text:p>88</text:p>
          </table:table-cell>
          <table:table-cell office:value-type="string">
            <text:p>1.E.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ce15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ext_rev_id</text:p>
          </table:table-cell>
          <table:table-cell table:number-columns-repeated="7"/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xt</text:p>
          </table:table-cell>
          <table:table-cell office:value-type="string">
            <text:p>id</text:p>
          </table:table-cell>
          <table:table-cell office:value-type="string">
            <text:p>← text_rev.ident_id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>
            <text:p>uc_id</text:p>
          </table:table-cell>
          <table:table-cell table:number-columns-repeated="2"/>
          <table:table-cell table:style-name="ce7" office:value-type="string">
            <text:p>Problem: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fk_id</text:p>
          </table:table-cell>
          <table:table-cell table:number-columns-repeated="2"/>
          <table:table-cell office:value-type="string">
            <text:p>Text fields tied to FK rev, if FK is renamed “eg. Desc → Description” the text's audit trail will be lost.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3" office:value-type="string">
            <text:p>Acutally, only a problem if FKs are audited. Can also be updated in-place like every other DB row on Earth.</text:p>
          </table:table-cell>
          <table:table-cell table:number-columns-repeated="1019"/>
        </table:table-row>
        <table:table-row table:style-name="ro2">
          <table:table-cell office:value-type="string">
            <text:p>text_rev</text:p>
          </table:table-cell>
          <table:table-cell office:value-type="string">
            <text:p>id</text:p>
          </table:table-cell>
          <table:table-cell office:value-type="string">
            <text:p>← <text:span text:style-name="T1">uc_step.</text:span>text_rev_id</text:p>
            <text:p><text:span text:style-name="T2">← </text:span><text:span text:style-name="T3">uc_text.</text:span><text:span text:style-name="T2">text_rev_id</text:span>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table:style-name="Default"/>
          <table:table-cell table:style-name="ce10" office:value-type="string">
            <text:p>ident_id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0" office:value-type="string">
            <text:p>rev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0" office:value-type="string">
            <text:p>updated_a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eld_key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ype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field_key_type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1">
          <table:table-cell table:style-name="ce8"/>
          <table:table-cell office:value-type="string">
            <text:p>na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5 tables: UC → UCR → UC_FIELD → TEXTR → TEX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s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tep tree is flat and stored with labels.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Steps are first-class citizens.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8" office:value-type="string">
            <text:p>Identity (data) separate from state (value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Each step/textfield has its own audit trail.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" office:value-type="string">
            <text:p>Easy to inspect via SQL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Structure closely matches logical UC (with the exception of FK being on the outside, ie. TEXTR→TEXT→FK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s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2 implicit RI rules.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8" office:value-type="string">
            <text:p>Enforcing uc_id between uc_step → step_rev → step would need a trigger.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Enforcing uc_step &amp; uc_text match the correct type of text.FK would need a trigger.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table:style-name="ce8" office:value-type="string">
            <text:p>Doesn't inherently support new field types.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7T14:51:51</meta:creation-date>
    <dc:date>2013-08-08T12:23:45</dc:date>
    <meta:editing-duration>PT2H19M28S</meta:editing-duration>
    <meta:editing-cycles>5</meta:editing-cycles>
    <meta:generator>LibreOffice/4.0.4.2$Linux_X86_64 LibreOffice_project/400m0$Build-2</meta:generator>
    <meta:document-statistic meta:table-count="5" meta:cell-count="418" meta:object-count="0"/>
  </office:meta>
</office:document-meta>
</file>