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5.69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82.97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61.93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75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37" style:family="table-cell" style:parent-style-name="Default">
      <style:text-properties style:font-name="Liberation Sans" style:font-name-asian="Adobe Blank" style:font-name-complex="Ek Mukta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0" style:family="table-cell" style:parent-style-name="Default">
      <style:table-cell-properties fo:border="none"/>
      <style:text-properties fo:color="#ed1c24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b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bcc" fo:border="0.74pt solid #000000"/>
      <style:text-properties fo:color="#ed1c24"/>
    </style:style>
    <style:style style:name="ce15" style:family="table-cell" style:parent-style-name="Default">
      <style:table-cell-properties fo:background-color="#eeeeee" fo:border="0.74pt solid #000000"/>
      <style:text-properties fo:color="#ef413d"/>
    </style:style>
    <style:style style:name="ce16" style:family="table-cell" style:parent-style-name="Default">
      <style:table-cell-properties fo:background-color="#eeeeee" fo:border="0.74pt solid #000000"/>
    </style:style>
    <style:style style:name="ce17" style:family="table-cell" style:parent-style-name="Default">
      <style:table-cell-properties fo:background-color="#eeeeee" fo:border="0.74pt solid #000000"/>
      <style:text-properties fo:color="#ed1c24"/>
    </style:style>
    <style:style style:name="ce18" style:family="table-cell" style:parent-style-name="Default">
      <style:table-cell-properties fo:background-color="#fffbcc" fo:wrap-option="wrap"/>
      <style:text-properties fo:color="#1b75bc" fo:font-style="italic" style:font-style-asian="italic" style:font-style-complex="italic"/>
    </style:style>
    <style:style style:name="ce19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/>
    </style:style>
    <style:style style:name="ce20" style:family="table-cell" style:parent-style-name="Default">
      <style:table-cell-properties fo:background-color="#e0efd4" fo:border="0.74pt solid #000000"/>
      <style:text-properties style:use-window-font-color="true"/>
    </style:style>
    <style:style style:name="ce21" style:family="table-cell" style:parent-style-name="Default">
      <style:table-cell-properties fo:background-color="#bce4e5" fo:border="0.74pt solid #000000"/>
      <style:text-properties style:use-window-font-color="true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/>
    </style:style>
    <style:style style:name="ce23" style:family="table-cell" style:parent-style-name="Default">
      <style:table-cell-properties fo:border="0.74pt solid #000000"/>
      <style:text-properties fo:color="#ed1c24"/>
    </style:style>
    <style:style style:name="ce24" style:family="table-cell" style:parent-style-name="Default">
      <style:table-cell-properties fo:background-color="#fedcc6" fo:border="0.74pt solid #000000"/>
      <style:text-properties style:use-window-font-color="true"/>
    </style:style>
    <style:style style:name="ce25" style:family="table-cell" style:parent-style-name="Default">
      <style:table-cell-properties fo:background-color="#dddddd" fo:border="0.74pt solid #000000"/>
      <style:text-properties fo:color="#ed1c24"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28" style:family="table-cell" style:parent-style-name="Default">
      <style:table-cell-properties fo:border="0.74pt solid #000000"/>
      <style:text-properties fo:color="#ef413d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 fo:hyphenate="true"/>
    </style:style>
    <style:style style:name="ce31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visibility="collapse" table:default-cell-style-name="ce8"/>
        <table:table-column table:style-name="co3" table:visibility="collapse" table:default-cell-style-name="ce12"/>
        <table:table-column table:style-name="co4" table:visibility="collapse" table:default-cell-style-name="ce8"/>
        <table:table-column table:style-name="co4" table:visibility="collapse" table:default-cell-style-name="ce21"/>
        <table:table-column table:style-name="co4" table:visibility="collapse" table:number-columns-repeated="2" table:default-cell-style-name="ce13"/>
        <table:table-column table:style-name="co4" table:default-cell-style-name="ce24"/>
        <table:table-column table:style-name="co5" table:visibility="collapse" table:default-cell-style-name="ce23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13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 Type</text:p>
          </table:table-cell>
          <table:table-cell table:style-name="ce7" office:value-type="string" calcext:value-type="string">
            <text:p>Sub-Issue </text:p>
          </table:table-cell>
          <table:table-cell table:style-name="ce7" office:value-type="string" calcext:value-type="string">
            <text:p>Issue</text:p>
          </table:table-cell>
          <table:table-cell table:style-name="ce7"/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Issue</text:p>
          </table:table-cell>
          <table:table-cell table:style-name="ce25" office:value-type="string" calcext:value-type="string">
            <text:p>Scope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RCG needs children</text:p>
          </table:table-cell>
          <table:table-cell office:value-type="string" calcext:value-type="string">
            <text:p>Code group has nothing to group.</text:p>
          </table:table-cell>
          <table:table-cell office:value-type="string" calcext:value-type="string">
            <text:p>backend.tasks</text:p>
          </table:table-cell>
          <table:table-cell office:value-type="string" calcext:value-type="string">
            <text:p>Code group has nothing to group.</text:p>
          </table:table-cell>
          <table:table-cell table:formula="of:=[.B2]" office:value-type="string" office:string-value="Code group has nothing to group." calcext:value-type="string">
            <text:p>Code group has nothing to group.</text:p>
          </table:table-cell>
          <table:table-cell table:formula="of:=[.B2]&amp;&quot;: &quot;&amp;[.C2]" office:value-type="string" office:string-value="Code group has nothing to group.: backend.tasks" calcext:value-type="string">
            <text:p>Code group has nothing to group.: backend.tasks</text:p>
          </table:table-cell>
          <table:table-cell office:value-type="string" calcext:value-type="string">
            <text:p>Code group [backend.tasks] has nothing to group</text:p>
          </table:table-cell>
          <table:table-cell table:style-name="ce8" office:value-type="string" calcext:value-type="string">
            <text:p>Code group has nothing to group.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ackend.tasks</text:p>
          </table:table-cell>
          <table:table-cell table:style-name="ce13" office:value-type="string" calcext:value-type="string">
            <text:p>User actions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3]&amp;&quot;: &quot;&amp;[.C3]" office:value-type="string" office:string-value="Conflicting tags: Priority" calcext:value-type="string">
            <text:p>Conflicting tags: Priority</text:p>
          </table:table-cell>
          <table:table-cell office:value-type="string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table:style-name="ce13"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4]&amp;&quot;: &quot;&amp;[.C4]" office:value-type="string" office:string-value="Conflicting tags: Priority" calcext:value-type="string">
            <text:p>Conflicting tags: Priority</text:p>
          </table:table-cell>
          <table:table-cell table:formula="of:=[.G3]" office:value-type="string" office:string-value="UC-3 has conflicting Priority tags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Tags</text:p>
          </table:table-cell>
          <table:table-cell table:style-name="ce13"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5]" office:value-type="string" office:string-value="#PENDING{ ask Bob }" calcext:value-type="string">
            <text:p>#PENDING{ ask Bob }</text:p>
          </table:table-cell>
          <table:table-cell table:formula="of:=[.B5]&amp;&quot;: &quot;&amp;[.C5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M5]" office:value-type="string" office:string-value="#PENDING{ ask Bob }" calcext:value-type="string">
            <text:p>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6]" office:value-type="string" office:string-value="#PENDING{ ask Bob }" calcext:value-type="string">
            <text:p>#PENDING{ ask Bob }</text:p>
          </table:table-cell>
          <table:table-cell table:formula="of:=[.B6]&amp;&quot;: &quot;&amp;[.C6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K6]" office:value-type="string" office:string-value="Max login/hr = #PENDING{ ask Bob }" calcext:value-type="string">
            <text:p>Max login/hr = 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User specified</text:p>
          </table:table-cell>
          <table:table-cell table:style-name="ce14" office:value-type="string" calcext:value-type="string">
            <text:p>Revise all Major Features</text:p>
          </table:table-cell>
          <table:table-cell office:value-type="string" calcext:value-type="string">
            <text:p>User specified</text:p>
          </table:table-cell>
          <table:table-cell table:style-name="ce22" table:formula="of:=[.C7]" office:value-type="string" office:string-value="Revise all Major Features" calcext:value-type="string">
            <text:p>Revise all Major Features</text:p>
          </table:table-cell>
          <table:table-cell table:formula="of:=[.B7]&amp;&quot;: &quot;&amp;[.C7]" office:value-type="string" office:string-value="User specified: Revise all Major Features" calcext:value-type="string">
            <text:p>User specified: Revise all Major Features</text:p>
          </table:table-cell>
          <table:table-cell table:formula="of:=[.C7]" office:value-type="string" office:string-value="Revise all Major Features" calcext:value-type="string">
            <text:p>Revise all Major Features</text:p>
          </table:table-cell>
          <table:table-cell office:value-type="string" calcext:value-type="string">
            <text:p>User specified: loose</text:p>
          </table:table-cell>
          <table:table-cell office:value-type="string" calcext:value-type="string">
            <text:p>Loo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8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Blank field</text:p>
          </table:table-cell>
          <table:table-cell table:formula="of:=[.B8]" office:value-type="string" office:string-value="Blank field" calcext:value-type="string">
            <text:p>Blank field</text:p>
          </table:table-cell>
          <table:table-cell table:formula="of:=[.B8]&amp;&quot;: &quot;&amp;[.C8]" office:value-type="string" office:string-value="Blank field: Detail" calcext:value-type="string">
            <text:p>Blank field: Detail</text:p>
          </table:table-cell>
          <table:table-cell table:formula="of:=[.J8]&amp;&quot; &quot;&amp;[.L8]&amp;&quot; is blank&quot;" office:value-type="string" office:string-value="UC-3 Detail is blank" calcext:value-type="string">
            <text:p>UC-3 Detail is blank</text:p>
          </table:table-cell>
          <table:table-cell table:formula="of:=&quot;Blank field: &quot;&amp;[.L8]" office:value-type="string" office:string-value="Blank field: Detail" calcext:value-type="string">
            <text:p>Blank field: Det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qType requires implication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Blank field</text:p>
          </table:table-cell>
          <table:table-cell table:formula="of:=[.B9]" office:value-type="string" office:string-value="Blank field" calcext:value-type="string">
            <text:p>Blank field</text:p>
          </table:table-cell>
          <table:table-cell table:formula="of:=[.B9]&amp;&quot;: &quot;&amp;[.C9]" office:value-type="string" office:string-value="Blank field: Implications" calcext:value-type="string">
            <text:p>Blank field: Implications</text:p>
          </table:table-cell>
          <table:table-cell table:formula="of:=[.J9]&amp;&quot; has blank &quot;&amp;[.L9]" office:value-type="string" office:string-value="UC-3 has blank Implications" calcext:value-type="string">
            <text:p>UC-3 has blank Implications</text:p>
          </table:table-cell>
          <table:table-cell table:formula="of:=&quot;Blank field: &quot;&amp;[.L9]" office:value-type="string" office:string-value="Blank field: Implications" calcext:value-type="string">
            <text:p>Blank field: Implication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imp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Blank field</text:p>
          </table:table-cell>
          <table:table-cell table:formula="of:=[.B10]" office:value-type="string" office:string-value="Blank field" calcext:value-type="string">
            <text:p>Blank field</text:p>
          </table:table-cell>
          <table:table-cell table:formula="of:=[.B10]&amp;&quot;: &quot;&amp;[.C10]" office:value-type="string" office:string-value="Blank field: Major Feature" calcext:value-type="string">
            <text:p>Blank field: Major Feature</text:p>
          </table:table-cell>
          <table:table-cell/>
          <table:table-cell table:formula="of:=&quot;Blank field: &quot;&amp;[.L10]" office:value-type="string" office:string-value="Blank field: Major Feature" calcext:value-type="string">
            <text:p>Blank field: Major Featur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ag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Blank field</text:p>
          </table:table-cell>
          <table:table-cell table:formula="of:=[.B11]" office:value-type="string" office:string-value="Blank field" calcext:value-type="string">
            <text:p>Blank field</text:p>
          </table:table-cell>
          <table:table-cell table:formula="of:=[.B11]&amp;&quot;: &quot;&amp;[.C11]" office:value-type="string" office:string-value="Blank field: Priority" calcext:value-type="string">
            <text:p>Blank field: Priority</text:p>
          </table:table-cell>
          <table:table-cell/>
          <table:table-cell table:formula="of:=&quot;Blank field: &quot;&amp;[.L11]" office:value-type="string" office:string-value="Blank field: Priority" calcext:value-type="string">
            <text:p>Blank field: Prior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UC step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Blank field</text:p>
          </table:table-cell>
          <table:table-cell table:formula="of:=[.B12]" office:value-type="string" office:string-value="Blank field" calcext:value-type="string">
            <text:p>Blank field</text:p>
          </table:table-cell>
          <table:table-cell table:formula="of:=[.B12]&amp;&quot;: &quot;&amp;[.C12]" office:value-type="string" office:string-value="Blank field: Step 3.E.1" calcext:value-type="string">
            <text:p>Blank field: Step 3.E.1</text:p>
          </table:table-cell>
          <table:table-cell/>
          <table:table-cell office:value-type="string" calcext:value-type="string">
            <text:p>Blank field: UC step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req title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lank field</text:p>
          </table:table-cell>
          <table:table-cell table:formula="of:=[.B13]" office:value-type="string" office:string-value="Blank field" calcext:value-type="string">
            <text:p>Blank field</text:p>
          </table:table-cell>
          <table:table-cell table:formula="of:=[.B13]&amp;&quot;: &quot;&amp;[.C13]" office:value-type="string" office:string-value="Blank field: Title" calcext:value-type="string">
            <text:p>Blank field: Title</text:p>
          </table:table-cell>
          <table:table-cell/>
          <table:table-cell table:formula="of:=&quot;Blank field: &quot;&amp;[.L13]" office:value-type="string" office:string-value="Blank field: Title" calcext:value-type="string">
            <text:p>Blank field: 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number-columns-repeated="2" table:style-name="ce20" office:value-type="string" calcext:value-type="string">
            <text:p>Deleted issue tag #PENDING in use</text:p>
          </table:table-cell>
          <table:table-cell table:formula="of:=[.B14]&amp;&quot;: &quot;&amp;[.C14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style-name="ce20" table:formula="of:=[.D14]" office:value-type="string" office:string-value="Deleted issue tag #PENDING in use" calcext:value-type="string">
            <text:p>Deleted issue tag #PENDING in use</text:p>
          </table:table-cell>
          <table:table-cell table:style-name="ce20" table:formula="of:=[.E14]" office:value-type="string" office:string-value="Deleted issue tag #PENDING in use" calcext:value-type="string">
            <text:p>Deleted issue tag #PENDING in use</text:p>
          </table:table-cell>
          <table:table-cell table:formula="of:=[.B15]&amp;&quot;: &quot;&amp;[.C15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number-columns-repeated="2" table:style-name="ce20" office:value-type="string" calcext:value-type="string">
            <text:p>Deleted tag #backend in use</text:p>
          </table:table-cell>
          <table:table-cell table:formula="of:=[.B16]&amp;&quot;: &quot;&amp;[.C16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style-name="ce20" table:formula="of:=[.D16]" office:value-type="string" office:string-value="Deleted tag #backend in use" calcext:value-type="string">
            <text:p>Deleted tag #backend in use</text:p>
          </table:table-cell>
          <table:table-cell table:style-name="ce20" table:formula="of:=[.E16]" office:value-type="string" office:string-value="Deleted tag #backend in use" calcext:value-type="string">
            <text:p>Deleted tag #backend in use</text:p>
          </table:table-cell>
          <table:table-cell table:formula="of:=[.B17]&amp;&quot;: &quot;&amp;[.C17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#backend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8]" office:value-type="string" office:string-value="Reference to deleted data" calcext:value-type="string">
            <text:p>Reference to deleted data</text:p>
          </table:table-cell>
          <table:table-cell table:formula="of:=[.B18]&amp;&quot;: &quot;&amp;[.C18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9]" office:value-type="string" office:string-value="Reference to deleted data" calcext:value-type="string">
            <text:p>Reference to deleted data</text:p>
          </table:table-cell>
          <table:table-cell table:formula="of:=[.B19]&amp;&quot;: &quot;&amp;[.C19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</text:p>
          </table:table-cell>
          <table:table-cell table:style-name="ce16" office:value-type="string" calcext:value-type="string">
            <text:p>Step 2.E.5.a</text:p>
          </table:table-cell>
          <table:table-cell office:value-type="string" calcext:value-type="string">
            <text:p>Reference to deleted data</text:p>
          </table:table-cell>
          <table:table-cell table:formula="of:=[.B20]" office:value-type="string" office:string-value="Reference to deleted data" calcext:value-type="string">
            <text:p>Reference to deleted data</text:p>
          </table:table-cell>
          <table:table-cell table:formula="of:=[.B20]&amp;&quot;: &quot;&amp;[.C20]" office:value-type="string" office:string-value="Reference to deleted data: Step 2.E.5.a" calcext:value-type="string">
            <text:p>Reference to deleted data: Step 2.E.5.a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.E.5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1]" office:value-type="string" office:string-value="Reference to deleted data" calcext:value-type="string">
            <text:p>Reference to deleted data</text:p>
          </table:table-cell>
          <table:table-cell table:formula="of:=[.B21]&amp;&quot;: &quot;&amp;[.C21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2]" office:value-type="string" office:string-value="Reference to deleted data" calcext:value-type="string">
            <text:p>Reference to deleted data</text:p>
          </table:table-cell>
          <table:table-cell table:formula="of:=[.B22]&amp;&quot;: &quot;&amp;[.C22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has no tags</text:p>
          </table:table-cell>
          <table:table-cell table:style-name="ce13" office:value-type="string" calcext:value-type="string">
            <text:p>Status</text:p>
          </table:table-cell>
          <table:table-cell table:number-columns-repeated="2" table:style-name="ce20" office:value-type="string" calcext:value-type="string">
            <text:p>Status field has no tags</text:p>
          </table:table-cell>
          <table:table-cell table:formula="of:=[.B23]&amp;&quot;: &quot;&amp;[.C23]" office:value-type="string" office:string-value="Tag field has no tags: Status" calcext:value-type="string">
            <text:p>Tag field has no tags: Status</text:p>
          </table:table-cell>
          <table:table-cell/>
          <table:table-cell table:style-name="ce20" office:value-type="string" calcext:value-type="string">
            <text:p>Status field has no ta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18" office:value-type="string" calcext:value-type="string">
            <text:p>this background means same cell elsewhere</text:p>
          </table:table-cell>
          <table:table-cell table:style-name="ce18" table:number-columns-repeated="2"/>
          <table:table-cell table:style-name="ce3" table:number-columns-repeated="2"/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26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0" office:value-type="string" calcext:value-type="string">
            <text:p>this bkgd means unnecessary</text:p>
          </table:table-cell>
          <table:table-cell table:style-name="ce3" table:number-columns-repeated="1009"/>
        </table:table-row>
        <table:table-row table:style-name="ro3"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19" office:value-type="string" calcext:value-type="string">
            <text:p>this background means not important</text:p>
          </table:table-cell>
          <table:table-cell table:style-name="ce19" table:number-columns-repeated="2"/>
          <table:table-cell table:style-name="ce3" table:number-columns-repeated="2"/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1013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blank.</text:p>
          </table:table-cell>
          <table:table-cell table:style-name="ce10" office:value-type="string" calcext:value-type="string">
            <text:p>Code group has nothing to group.</text:p>
          </table:table-cell>
          <table:table-cell table:style-name="ce5" office:value-type="string" calcext:value-type="string">
            <text:p>General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Blank field.</text:p>
          </table:table-cell>
          <table:table-cell table:style-name="Default"/>
          <table:table-cell table:style-name="ce5" office:value-type="string" calcext:value-type="string">
            <text:p>Custom issue { … }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37" office:value-type="string" calcext:value-type="string">
            <text:p>“All implying reqs are dead” omitted in favour of “Blank field: Implications”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023"/>
        </table:table-row>
      </table:table>
      <table:named-expressions/>
      <table:database-ranges>
        <table:database-range table:name="__Anonymous_Sheet_DB__0" table:target-range-address="Sheet1.A1:Sheet1.O23">
          <table:sort>
            <table:sort-by table:field-number="7" table:data-type="automatic"/>
            <table:sort-by table:field-number="9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4P0" style:volatile="true">
      <style:text-properties fo:color="#ff0000"/>
      <number:number number:decimal-places="0" loext:min-decimal-places="0" number:min-integer-digits="1"/>
    </number:number-style>
    <number:number-style style:name="N124"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09:58:50.56576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8-01-12T10:05:28.993978871</dc:date>
    <meta:editing-duration>PT4H52M45S</meta:editing-duration>
    <meta:editing-cycles>23</meta:editing-cycles>
    <meta:generator>LibreOffice/5.4.4.2$Linux_X86_64 LibreOffice_project/40m0$Build-2</meta:generator>
    <meta:document-statistic meta:table-count="1" meta:cell-count="359" meta:object-count="0"/>
  </office:meta>
</office:document-meta>
</file>