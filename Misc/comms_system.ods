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684cm"/>
    </style:style>
    <style:style style:name="co2" style:family="table-column">
      <style:table-column-properties fo:break-before="auto" style:column-width="10.605cm"/>
    </style:style>
    <style:style style:name="co3" style:family="table-column">
      <style:table-column-properties fo:break-before="auto" style:column-width="10.557cm"/>
    </style:style>
    <style:style style:name="co4" style:family="table-column">
      <style:table-column-properties fo:break-before="auto" style:column-width="14.2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7.078cm"/>
    </style:style>
    <style:style style:name="co9" style:family="table-column">
      <style:table-column-properties fo:break-before="auto" style:column-width="6.445cm"/>
    </style:style>
    <style:style style:name="co10" style:family="table-column">
      <style:table-column-properties fo:break-before="auto" style:column-width="5.181cm"/>
    </style:style>
    <style:style style:name="co11" style:family="table-column">
      <style:table-column-properties fo:break-before="auto" style:column-width="3.283cm"/>
    </style:style>
    <style:style style:name="co12" style:family="table-column">
      <style:table-column-properties fo:break-before="auto" style:column-width="2.898cm"/>
    </style:style>
    <style:style style:name="co13" style:family="table-column">
      <style:table-column-properties fo:break-before="auto" style:column-width="5.405cm"/>
    </style:style>
    <style:style style:name="co14" style:family="table-column">
      <style:table-column-properties fo:break-before="auto" style:column-width="4.066cm"/>
    </style:style>
    <style:style style:name="co15" style:family="table-column">
      <style:table-column-properties fo:break-before="auto" style:column-width="4.64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background-color="#e6e6e6"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quirement</text:p>
          </table:table-cell>
          <table:table-cell table:style-name="ce4" office:value-type="string" calcext:value-type="string">
            <text:p>Driver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ee all CUs related to a CM or I.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er someone to a specific CU or I.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gess unresolved Is.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age support staff time.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e privately with CM(s).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d CU to intensional set of CMs.</text:p>
          </table:table-cell>
          <table:table-cell table:style-name="ce8" office:value-type="string" calcext:value-type="string">
            <text:p>Newsletter, notices to all active users, appeal for feedback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e intensional set of CMs.</text:p>
          </table:table-cell>
          <table:table-cell table:style-name="ce8" office:value-type="string" calcext:value-type="string">
            <text:p>Marketing, lead conversion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ord and index arbitrary CM attributes.</text:p>
          </table:table-cell>
          <table:table-cell table:style-name="ce8" office:value-type="string" calcext:value-type="string">
            <text:p>6, 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asure performance of support staff.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Is from incoming emails.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k CUs to CMs or Is.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tract a reference that is unique and stable.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ew a CU or I using a reference.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e what's unresolved.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 what's unassigned.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e what's pending external data/action.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sign I.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olve I.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Manage priority of Is.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ort Is by priority.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View Is assigned to staff.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end an email to CM(s).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Mailing list that handles intensionial sets based on arbitrary criteria.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Default" office:value-type="string" calcext:value-type="string">
            <text:p>Manage mailing list contacts' attributes programatically.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View CMs based on arbitrary criteria.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View leads after period without communication.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Push arbitrary CM attributes to CS programmatically.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ew CUs sent by staff.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ew changes to Is made by staff.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tegorise Is by type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Glossar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CS = comms system = combinations of technology that provides in-scope comms functionali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 = community member = related legal entity, contact, lead, user, ex-user, vendor, partne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 = communication unit = an email, an IM, a phone call, notes from a mee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= Issue = feedback, support, lead, other.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ft1" table:style-name="ta1">
        <table:table-column table:style-name="co6" table:default-cell-style-name="Default"/>
        <table:table-column table:style-name="co7" table:default-cell-style-name="ce12"/>
        <table:table-column table:style-name="co8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3" table:default-cell-style-name="Default"/>
        <table:table-row table:style-name="ro2">
          <table:table-cell table:style-name="ce10" office:value-type="string" calcext:value-type="string">
            <text:p>Channel</text:p>
          </table:table-cell>
          <table:table-cell table:style-name="ce11" office:value-type="string" calcext:value-type="string">
            <text:p>Step</text:p>
          </table:table-cell>
          <table:table-cell table:style-name="ce13" office:value-type="string" calcext:value-type="string">
            <text:p>Trigger</text:p>
          </table:table-cell>
          <table:table-cell table:style-name="ce13" office:value-type="string" calcext:value-type="string">
            <text:p>Description</text:p>
          </table:table-cell>
          <table:table-cell table:style-name="ce10" office:value-type="string" calcext:value-type="string">
            <text:p>Route</text:p>
            <text:p>(WB = Webapp Backend)</text:p>
          </table:table-cell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CRM gets email how?</text:p>
          </table:table-cell>
          <table:table-cell table:style-name="ce10" office:value-type="string" calcext:value-type="string">
            <text:p>Staff Burden</text:p>
          </table:table-cell>
          <table:table-cell table:style-name="ce10" office:value-type="string" calcext:value-type="string">
            <text:p>Notes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requests a password reset.</text:p>
            <text:p>User attempts to register an account.</text:p>
          </table:table-cell>
          <table:table-cell/>
          <table:table-cell office:value-type="string" calcext:value-type="string">
            <text:p>WB → Mandrill → user</text:p>
          </table:table-cell>
          <table:table-cell office:value-type="string" calcext:value-type="string">
            <text:p>noreply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WB sets BC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xpression of Inte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ubmits info at landing page.</text:p>
          </table:table-cell>
          <table:table-cell office:value-type="string" calcext:value-type="string">
            <text:p>User expresses interest, opens dialogue.</text:p>
          </table:table-cell>
          <table:table-cell office:value-type="string" calcext:value-type="string">
            <text:p>WB → Mandrill → Gmail</text:p>
          </table:table-cell>
          <table:table-cell office:value-type="string" calcext:value-type="string">
            <text:p>noreply@shipreq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WB sets BCC</text:p>
            <text:p>Staff fwds.</text:p>
            <text:p>Staff uses gmail plugin.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Expression of Inte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onitors shipreq mailbox.</text:p>
          </table:table-cell>
          <table:table-cell office:value-type="string" calcext:value-type="string">
            <text:p>Staff reads msg and responds to User.</text:p>
          </table:table-cell>
          <table:table-cell office:value-type="string" calcext:value-type="string">
            <text:p>Gmail → Mandrill (?) → user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ff sets BCC</text:p>
            <text:p>Staff fwds.</text:p>
            <text:p>Staff uses gmail plugin.</text:p>
          </table:table-cell>
          <table:table-cell office:value-type="string" calcext:value-type="string">
            <text:p>Check mailbox.</text:p>
            <text:p>Update CRM.</text:p>
            <text:p>Maybe open opportunity.</text:p>
            <text:p>Respon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xpression of Inte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to Staff.</text:p>
          </table:table-cell>
          <table:table-cell office:value-type="string" calcext:value-type="string">
            <text:p>user → Gandi → Gmail</text:p>
          </table:table-cell>
          <table:table-cell office:value-type="string" calcext:value-type="string">
            <text:p>user</text:p>
          </table:table-cell>
          <table:table-cell table:formula="of:=[.$F$4]" office:value-type="string" office:string-value="contact@shipreq" calcext:value-type="string">
            <text:p>contact@shipreq</text:p>
          </table:table-cell>
          <table:table-cell office:value-type="string" calcext:value-type="string">
            <text:p>Staff fwds.</text:p>
            <text:p>Staff uses gmail plugin.</text:p>
          </table:table-cell>
          <table:table-cell office:value-type="string" calcext:value-type="string">
            <text:p>Check mailbox.</text:p>
            <text:p>Update CRM.</text:p>
            <text:p>Respon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ews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ecides to share news.</text:p>
          </table:table-cell>
          <table:table-cell/>
          <table:table-cell office:value-type="string" calcext:value-type="string">
            <text:p>MailChimp (→ Mandrill) → user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ff uses custom tool, then fwds.</text:p>
          </table:table-cell>
          <table:table-cell office:value-type="string" calcext:value-type="string">
            <text:p>Check mailbox.</text:p>
            <text:p>Use some tool.</text:p>
            <text:p>Update CRM.</text:p>
          </table:table-cell>
          <table:table-cell table:style-name="ce15" office:value-type="string" calcext:value-type="string">
            <text:p>No easy way to get boradcast email into CRM.</text:p>
            <text:p>Instead: send to ?@shipreq.com, extract list email addresses from mailchimp, combine and send to CRM.</text:p>
            <text:p>contact@ instead of news@ means user &amp; CRM cannot easily filter.</text:p>
            <text:p>Gmail still says “via”. SMTP sync won't solve, needs DNS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ews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with query or comment.</text:p>
          </table:table-cell>
          <table:table-cell table:formula="of:=[.E$5]" office:value-type="string" office:string-value="user → Gandi → Gmail" calcext:value-type="string">
            <text:p>user → Gandi → Gmail</text:p>
          </table:table-cell>
          <table:table-cell table:formula="of:=[.F$5]" office:value-type="string" office:string-value="user" calcext:value-type="string">
            <text:p>user</text:p>
          </table:table-cell>
          <table:table-cell table:formula="of:=[.G$5]" office:value-type="string" office:string-value="contact@shipreq" calcext:value-type="string">
            <text:p>contact@shipreq</text:p>
          </table:table-cell>
          <table:table-cell table:formula="of:=[.H$5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$5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ewsletter</text:p>
          </table:table-cell>
          <table:table-cell office:value-type="float" office:value="3" calcext:value-type="float">
            <text:p>3</text:p>
          </table:table-cell>
          <table:table-cell table:style-name="Default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$4]" office:value-type="string" office:string-value="Gmail → Mandrill (?) → user" calcext:value-type="string">
            <text:p>Gmail → Mandrill (?) → user</text:p>
          </table:table-cell>
          <table:table-cell table:formula="of:=[.$G$7]" office:value-type="string" office:string-value="contact@shipreq" calcext:value-type="string">
            <text:p>contact@shipreq</text:p>
          </table:table-cell>
          <table:table-cell table:formula="of:=[.G$4]" office:value-type="string" office:string-value="user" calcext:value-type="string">
            <text:p>user</text:p>
          </table:table-cell>
          <table:table-cell table:formula="of:=[.H$4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office:value-type="string" calcext:value-type="string">
            <text:p>Check mailbox.</text:p>
            <text:p>Update CRM.</text:p>
            <text:p>Maybe open project.</text:p>
            <text:p>Respon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otify active u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ecides to notify active users.</text:p>
          </table:table-cell>
          <table:table-cell office:value-type="string" calcext:value-type="string">
            <text:p>Could be a distruption to availability, a discontinuation of a feature, etc.</text:p>
          </table:table-cell>
          <table:table-cell table:formula="of:=[.E6]" office:value-type="string" office:string-value="MailChimp (→ Mandrill) → user" calcext:value-type="string">
            <text:p>MailChimp (→ Mandrill) → user</text:p>
          </table:table-cell>
          <table:table-cell table:formula="of:=[.F6]" office:value-type="string" office:string-value="contact@shipreq" calcext:value-type="string">
            <text:p>contact@shipreq</text:p>
          </table:table-cell>
          <table:table-cell table:formula="of:=[.G6]" office:value-type="string" office:string-value="user" calcext:value-type="string">
            <text:p>user</text:p>
          </table:table-cell>
          <table:table-cell table:formula="of:=[.H6]" office:value-type="string" office:string-value="Staff uses custom tool, then fwds." calcext:value-type="string">
            <text:p>Staff uses custom tool, then fwds.</text:p>
          </table:table-cell>
          <table:table-cell table:formula="of:=[.I6]" office:value-type="string" office:string-value="Check mailbox.&#10;Use some tool.&#10;Update CRM." calcext:value-type="string">
            <text:p>Check mailbox.<text:line-break/>Use some tool.<text:line-break/>Update CRM.</text:p>
          </table:table-cell>
          <table:table-cell table:style-name="ce15" table:formula="of:=[.J6]" office:value-type="string" office:string-value="No easy way to get boradcast email into CRM.&#10;Instead: send to ?@shipreq.com, extract list email addresses from mailchimp, combine and send to CRM.&#10;contact@ instead of news@ means user &amp; CRM cannot easily filter.&#10;Gmail still says “via”. SMTP sync won't solve, needs DNS." calcext:value-type="string">
            <text:p>No easy way to get boradcast email into CRM.<text:line-break/>Instead: send to ?@shipreq.com, extract list email addresses from mailchimp, combine and send to CRM.<text:line-break/>contact@ instead of news@ means user &amp; CRM cannot easily filter.<text:line-break/>Gmail still says “via”. SMTP sync won't solve, needs DNS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tify active us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with query or comment.</text:p>
          </table:table-cell>
          <table:table-cell table:formula="of:=[.E7]" office:value-type="string" office:string-value="user → Gandi → Gmail" calcext:value-type="string">
            <text:p>user → Gandi → Gmail</text:p>
          </table:table-cell>
          <table:table-cell table:formula="of:=[.F7]" office:value-type="string" office:string-value="user" calcext:value-type="string">
            <text:p>user</text:p>
          </table:table-cell>
          <table:table-cell table:formula="of:=[.G7]" office:value-type="string" office:string-value="contact@shipreq" calcext:value-type="string">
            <text:p>contact@shipreq</text:p>
          </table:table-cell>
          <table:table-cell table:formula="of:=[.H7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7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style-name="ce15"/>
          <table:table-cell table:number-columns-repeated="1013"/>
        </table:table-row>
        <table:table-row table:style-name="ro4">
          <table:table-cell office:value-type="string" calcext:value-type="string">
            <text:p>Notify active users</text:p>
          </table:table-cell>
          <table:table-cell office:value-type="float" office:value="3" calcext:value-type="float">
            <text:p>3</text:p>
          </table:table-cell>
          <table:table-cell table:style-name="Default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8]" office:value-type="string" office:string-value="Gmail → Mandrill (?) → user" calcext:value-type="string">
            <text:p>Gmail → Mandrill (?) → user</text:p>
          </table:table-cell>
          <table:table-cell table:formula="of:=[.F8]" office:value-type="string" office:string-value="contact@shipreq" calcext:value-type="string">
            <text:p>contact@shipreq</text:p>
          </table:table-cell>
          <table:table-cell table:formula="of:=[.G8]" office:value-type="string" office:string-value="user" calcext:value-type="string">
            <text:p>user</text:p>
          </table:table-cell>
          <table:table-cell table:formula="of:=[.H8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table:formula="of:=[.I8]" office:value-type="string" office:string-value="Check mailbox.&#10;Update CRM.&#10;Maybe open project.&#10;Respond." calcext:value-type="string">
            <text:p>Check mailbox.<text:line-break/>Update CRM.<text:line-break/>Maybe open project.<text:line-break/>Respond.</text:p>
          </table:table-cell>
          <table:table-cell table:style-name="ce15"/>
          <table:table-cell table:number-columns-repeated="1013"/>
        </table:table-row>
        <table:table-row table:style-name="ro3">
          <table:table-cell office:value-type="string" calcext:value-type="string">
            <text:p>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decides to contact Staff.</text:p>
          </table:table-cell>
          <table:table-cell/>
          <table:table-cell table:formula="of:=[.E$5]" office:value-type="string" office:string-value="user → Gandi → Gmail" calcext:value-type="string">
            <text:p>user → Gandi → Gmail</text:p>
          </table:table-cell>
          <table:table-cell table:formula="of:=[.F$5]" office:value-type="string" office:string-value="user" calcext:value-type="string">
            <text:p>user</text:p>
          </table:table-cell>
          <table:table-cell table:formula="of:=[.G$5]" office:value-type="string" office:string-value="contact@shipreq" calcext:value-type="string">
            <text:p>contact@shipreq</text:p>
          </table:table-cell>
          <table:table-cell table:formula="of:=[.H$5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$5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Feedback</text:p>
          </table:table-cell>
          <table:table-cell office:value-type="float" office:value="2" calcext:value-type="float">
            <text:p>2</text:p>
          </table:table-cell>
          <table:table-cell table:style-name="Default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$4]" office:value-type="string" office:string-value="Gmail → Mandrill (?) → user" calcext:value-type="string">
            <text:p>Gmail → Mandrill (?) → user</text:p>
          </table:table-cell>
          <table:table-cell table:formula="of:=[.F$4]" office:value-type="string" office:string-value="contact@shipreq" calcext:value-type="string">
            <text:p>contact@shipreq</text:p>
          </table:table-cell>
          <table:table-cell table:formula="of:=[.G$4]" office:value-type="string" office:string-value="user" calcext:value-type="string">
            <text:p>user</text:p>
          </table:table-cell>
          <table:table-cell table:formula="of:=[.H$4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office:value-type="string" calcext:value-type="string">
            <text:p>Check mailbox.</text:p>
            <text:p>Update CRM.</text:p>
            <text:p>Flag as feedback (?)</text:p>
            <text:p>Respond.</text:p>
          </table:table-cell>
          <table:table-cell table:style-name="ce15" office:value-type="string" calcext:value-type="string">
            <text:p>How will feedback be track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es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 style:data-style-name="N2" text:time-value="0000-00-00T12:24:57.291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09:33:11.946916495</meta:creation-date>
    <dc:date>2014-03-02T13:54:38.444187645</dc:date>
    <meta:editing-duration>PT1H37M29S</meta:editing-duration>
    <meta:editing-cycles>4</meta:editing-cycles>
    <meta:generator>LibreOffice/4.1.5.3$Linux_X86_64 LibreOffice_project/410m0$Build-3</meta:generator>
    <meta:document-statistic meta:table-count="2" meta:cell-count="207" meta:object-count="0"/>
  </office:meta>
</office:document-meta>
</file>