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mo" svg:font-family="Arimo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.833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3.281cm"/>
    </style:style>
    <style:style style:name="co5" style:family="table-column">
      <style:table-column-properties fo:break-before="auto" style:column-width="4.868cm"/>
    </style:style>
    <style:style style:name="co6" style:family="table-column">
      <style:table-column-properties fo:break-before="auto" style:column-width="6.458cm"/>
    </style:style>
    <style:style style:name="co7" style:family="table-column">
      <style:table-column-properties fo:break-before="auto" style:column-width="14.042cm"/>
    </style:style>
    <style:style style:name="co8" style:family="table-column">
      <style:table-column-properties fo:break-before="auto" style:column-width="2.118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3deb3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3deb3d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5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6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08">
      <style:table-cell-properties fo:background-color="#3deb3d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09">
      <style:table-cell-properties fo:background-color="#3deb3d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2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x Encryption</text:p>
          </table:table-cell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Green address bar</text:p>
          </table:table-cell>
          <table:table-cell table:style-name="ce6" office:value-type="string" calcext:value-type="string">
            <text:p>1 year</text:p>
          </table:table-cell>
          <table:table-cell table:style-name="ce6" office:value-type="string" calcext:value-type="string">
            <text:p>2 years</text:p>
          </table:table-cell>
          <table:table-cell table:style-name="ce9" office:value-type="string" calcext:value-type="string">
            <text:p>Insurance Amount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Address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Comodo Positive SSL (reseller)</text:p>
          </table:table-cell>
          <table:table-cell table:style-name="ce3" office:value-type="string" calcext:value-type="string">
            <text:p>256-bit</text:p>
          </table:table-cell>
          <table:table-cell table:style-name="ce3" office:value-type="string" calcext:value-type="string">
            <text:p>DSA</text:p>
          </table:table-cell>
          <table:table-cell table:style-name="ce3" office:value-type="string" calcext:value-type="string">
            <text:p>no</text:p>
          </table:table-cell>
          <table:table-cell table:style-name="ce7" office:value-type="float" office:value="8.5" calcext:value-type="float">
            <text:p>$8.50</text:p>
          </table:table-cell>
          <table:table-cell table:style-name="ce7" table:formula="of:=8*2" office:value-type="float" office:value="16" calcext:value-type="float">
            <text:p>$16.00</text:p>
          </table:table-cell>
          <table:table-cell table:style-name="ce10" office:value-type="float" office:value="10000" calcext:value-type="float">
            <text:p>$10,000</text:p>
          </table:table-cell>
          <table:table-cell table:style-name="ce3" office:value-type="string" calcext:value-type="string">
            <text:p>domain validated</text:p>
          </table:table-cell>
          <table:table-cell table:style-name="ce5" office:value-type="string" calcext:value-type="string">
            <text:p><text:a xlink:href="https://comodosslstore.com/comodo-ssl-certificates.aspx" xlink:type="simple">https://comodosslstore.com/comodo-ssl-certificates.aspx</text:a>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do InstantSSL Premium (reseller)</text:p>
          </table:table-cell>
          <table:table-cell table:style-name="ce4" office:value-type="string" calcext:value-type="string">
            <text:p>256-bit</text:p>
          </table:table-cell>
          <table:table-cell table:style-name="ce4" office:value-type="string" calcext:value-type="string">
            <text:p>DSA</text:p>
          </table:table-cell>
          <table:table-cell table:style-name="ce4" office:value-type="string" calcext:value-type="string">
            <text:p>no</text:p>
          </table:table-cell>
          <table:table-cell table:style-name="ce8" office:value-type="float" office:value="74" calcext:value-type="float">
            <text:p>$74.00</text:p>
          </table:table-cell>
          <table:table-cell table:style-name="ce8" table:formula="of:=72*2" office:value-type="float" office:value="144" calcext:value-type="float">
            <text:p>$144.00</text:p>
          </table:table-cell>
          <table:table-cell table:style-name="ce11" office:value-type="float" office:value="250000" calcext:value-type="float">
            <text:p>$250,000</text:p>
          </table:table-cell>
          <table:table-cell table:style-name="ce4" office:value-type="string" calcext:value-type="string">
            <text:p>organisation validated</text:p>
          </table:table-cell>
          <table:table-cell table:style-name="ce12" office:value-type="string" calcext:value-type="string">
            <text:p><text:a xlink:href="https://comodosslstore.com/comodo-ssl-certificates.aspx" xlink:type="simple">https://comodosslstore.com/comodo-ssl-certificates.aspx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odo Essential SSL</text:p>
          </table:table-cell>
          <table:table-cell table:style-name="ce3" office:value-type="string" calcext:value-type="string">
            <text:p>256-bit</text:p>
          </table:table-cell>
          <table:table-cell table:style-name="ce3" office:value-type="string" calcext:value-type="string">
            <text:p>DSA</text:p>
          </table:table-cell>
          <table:table-cell table:style-name="ce3" office:value-type="string" calcext:value-type="string">
            <text:p>no</text:p>
          </table:table-cell>
          <table:table-cell table:style-name="ce7" office:value-type="float" office:value="79.95" calcext:value-type="float">
            <text:p>$79.95</text:p>
          </table:table-cell>
          <table:table-cell table:style-name="ce7" table:formula="of:=70.95*2" office:value-type="float" office:value="141.9" calcext:value-type="float">
            <text:p>$141.90</text:p>
          </table:table-cell>
          <table:table-cell table:style-name="ce10" office:value-type="float" office:value="10000" calcext:value-type="float">
            <text:p>$10,000</text:p>
          </table:table-cell>
          <table:table-cell table:style-name="ce3" office:value-type="string" calcext:value-type="string">
            <text:p>domain validated</text:p>
          </table:table-cell>
          <table:table-cell office:value-type="string" calcext:value-type="string">
            <text:p>https://www.instantssl.com/ssl-certificate-products/all-ssl-certificates.html?key5sk1=2bd79d434d9f02f72d6ea3e68ec6b21a361c7063&amp;key5sk2=2128&amp;key5sk3=1385258670000&amp;key5sk4=2128&amp;key5sk5=1385258676000&amp;key5sk6=1907&amp;key5sk7=1385258765000&amp;key5sk8=&amp;key5sk9=1385258800000&amp;key5sk10=2292&amp;key5sk11=1385258813000&amp;key5sk12=2292&amp;key5sk13=1385260675000&amp;key5sk14=2292&amp;key5sk15=1385260676000&amp;key5sk16=2292&amp;key5sk17=1385260676000&amp;key5sk18=1907&amp;key5sk19=1385260720000&amp;key5sk20=1911&amp;key5sk21=1385260730000&amp;key5sk22=1901&amp;key5sk23=1385260960000&amp;key5sk24=1904&amp;key5sk25=1385260997000&amp;key5sk26=2302?key5sk1&amp;key5sk27=1385261138000&amp;key5sk28=2301&amp;key5sk29=1385261253000&amp;key5sk30=2301&amp;key5sk31=1385261544000&amp;key6sk1=&amp;key6sk2=CH310165057&amp;key6sk3=7&amp;key6sk4=en-us&amp;key6sk5=AU&amp;key6sk6=0&amp;key6sk7=Google&amp;key6sk8=119900&amp;key6sk9=1366768&amp;key6sk10=true&amp;key6sk11=ad14d74c882993fa3c341486d3077882a1b2dea4&amp;key6sk12=2034&amp;key7sk1=2&amp;key7sk2=196123&amp;key7sk3=206815&amp;key7sk4=196132&amp;key7sk5=209358&amp;key7sk6=203344&amp;key7sk7=200650&amp;key7sk8=207412&amp;key7sk9=196132&amp;key7sk10=207412&amp;key7sk11=204176&amp;key7sk12=16903&amp;key7sk13=153090&amp;key1sk1=ors&amp;key1sk2=Goog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daddy Standard SSL</text:p>
          </table:table-cell>
          <table:table-cell table:style-name="ce3" office:value-type="string" calcext:value-type="string">
            <text:p>256-bit</text:p>
          </table:table-cell>
          <table:table-cell table:style-name="ce3" office:value-type="string" calcext:value-type="string">
            <text:p>SHA-1, SHA-2</text:p>
          </table:table-cell>
          <table:table-cell table:style-name="ce3" office:value-type="string" calcext:value-type="string">
            <text:p>no</text:p>
          </table:table-cell>
          <table:table-cell table:style-name="ce7" office:value-type="float" office:value="79.99" calcext:value-type="float">
            <text:p>$79.99</text:p>
          </table:table-cell>
          <table:table-cell table:style-name="ce7" table:formula="of:=79.22*2" office:value-type="float" office:value="158.44" calcext:value-type="float">
            <text:p>$158.44</text:p>
          </table:table-cell>
          <table:table-cell table:style-name="ce10" office:value-type="float" office:value="112095" calcext:value-type="float">
            <text:p>$112,095</text:p>
          </table:table-cell>
          <table:table-cell table:style-name="ce3" office:value-type="string" calcext:value-type="string">
            <text:p>domain validated</text:p>
          </table:table-cell>
          <table:table-cell table:style-name="ce5" office:value-type="string" calcext:value-type="string">
            <text:p><text:a xlink:href="http://au.godaddy.com/ssl/ssl-certificates.aspx?gclid=CM7e6Lup_LoCFQlZpQodF1cA1Q&amp;isc=ssl6au02&amp;currencytype=AUD&amp;ef_id=UKAnmgAAQ95Vifru:20131124015903:s" xlink:type="simple">http://au.godaddy.com/ssl/ssl-certificates.aspx?gclid=CM7e6Lup_LoCFQlZpQodF1cA1Q&amp;isc=ssl6au02&amp;currencytype=AUD&amp;ef_id=UKAnmgAAQ95Vifru:20131124015903:s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odo Instant SSL</text:p>
          </table:table-cell>
          <table:table-cell table:style-name="ce3" office:value-type="string" calcext:value-type="string">
            <text:p>256-bit</text:p>
          </table:table-cell>
          <table:table-cell table:style-name="ce3" office:value-type="string" calcext:value-type="string">
            <text:p>DSA</text:p>
          </table:table-cell>
          <table:table-cell table:style-name="ce3" office:value-type="string" calcext:value-type="string">
            <text:p>no</text:p>
          </table:table-cell>
          <table:table-cell table:style-name="ce7" office:value-type="float" office:value="99.95" calcext:value-type="float">
            <text:p>$99.95</text:p>
          </table:table-cell>
          <table:table-cell table:style-name="ce7" table:formula="of:=88.95*2" office:value-type="float" office:value="177.9" calcext:value-type="float">
            <text:p>$177.90</text:p>
          </table:table-cell>
          <table:table-cell table:style-name="ce10" office:value-type="string" calcext:value-type="string">
            <text:p>$10,000 - $250,000</text:p>
          </table:table-cell>
          <table:table-cell table:style-name="ce3" office:value-type="string" calcext:value-type="string">
            <text:p>organisation validated</text:p>
          </table:table-cell>
          <table:table-cell office:value-type="string" calcext:value-type="string">
            <text:p>https://www.instantssl.com/ssl-certificate-products/all-ssl-certificates.html?key5sk1=2bd79d434d9f02f72d6ea3e68ec6b21a361c7063&amp;key5sk2=2128&amp;key5sk3=1385258670000&amp;key5sk4=2128&amp;key5sk5=1385258676000&amp;key5sk6=1907&amp;key5sk7=1385258765000&amp;key5sk8=&amp;key5sk9=1385258800000&amp;key5sk10=2292&amp;key5sk11=1385258813000&amp;key5sk12=2292&amp;key5sk13=1385260675000&amp;key5sk14=2292&amp;key5sk15=1385260676000&amp;key5sk16=2292&amp;key5sk17=1385260676000&amp;key5sk18=1907&amp;key5sk19=1385260720000&amp;key5sk20=1911&amp;key5sk21=1385260730000&amp;key5sk22=1901&amp;key5sk23=1385260960000&amp;key5sk24=1904&amp;key5sk25=1385260997000&amp;key5sk26=2302?key5sk1&amp;key5sk27=1385261138000&amp;key5sk28=2301&amp;key5sk29=1385261253000&amp;key5sk30=2301&amp;key5sk31=1385261544000&amp;key6sk1=&amp;key6sk2=CH310165057&amp;key6sk3=7&amp;key6sk4=en-us&amp;key6sk5=AU&amp;key6sk6=0&amp;key6sk7=Google&amp;key6sk8=119900&amp;key6sk9=1366768&amp;key6sk10=true&amp;key6sk11=ad14d74c882993fa3c341486d3077882a1b2dea4&amp;key6sk12=2034&amp;key7sk1=2&amp;key7sk2=196123&amp;key7sk3=206815&amp;key7sk4=196132&amp;key7sk5=209358&amp;key7sk6=203344&amp;key7sk7=200650&amp;key7sk8=207412&amp;key7sk9=196132&amp;key7sk10=207412&amp;key7sk11=204176&amp;key7sk12=16903&amp;key7sk13=153090&amp;key1sk1=ors&amp;key1sk2=Goog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modo EV from reseller</text:p>
          </table:table-cell>
          <table:table-cell table:style-name="ce3" office:value-type="string" calcext:value-type="string">
            <text:p>256-bit</text:p>
          </table:table-cell>
          <table:table-cell table:style-name="ce3" office:value-type="string" calcext:value-type="string">
            <text:p>DSA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float" office:value="130" calcext:value-type="float">
            <text:p>$130.00</text:p>
          </table:table-cell>
          <table:table-cell table:style-name="ce7" table:formula="of:=130*2" office:value-type="float" office:value="260" calcext:value-type="float">
            <text:p>$260.00</text:p>
          </table:table-cell>
          <table:table-cell table:style-name="ce10" office:value-type="float" office:value="250000" calcext:value-type="float">
            <text:p>$250,000</text:p>
          </table:table-cell>
          <table:table-cell table:style-name="ce3" office:value-type="string" calcext:value-type="string">
            <text:p>organisation validated</text:p>
          </table:table-cell>
          <table:table-cell table:style-name="ce5" office:value-type="string" calcext:value-type="string">
            <text:p><text:a xlink:href="https://comodosslstore.com/comodo-ssl-certificates.aspx" xlink:type="simple">https://comodosslstore.com/comodo-ssl-certificates.aspx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daddy Premium SSL (EV)</text:p>
          </table:table-cell>
          <table:table-cell table:style-name="ce3" office:value-type="string" calcext:value-type="string">
            <text:p>256-bit</text:p>
          </table:table-cell>
          <table:table-cell table:style-name="ce3" office:value-type="string" calcext:value-type="string">
            <text:p>SHA-1, SHA-2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float" office:value="160.99" calcext:value-type="float">
            <text:p>$160.99</text:p>
          </table:table-cell>
          <table:table-cell table:style-name="ce7" table:formula="of:=144.89*2" office:value-type="float" office:value="289.78" calcext:value-type="float">
            <text:p>$289.78</text:p>
          </table:table-cell>
          <table:table-cell table:style-name="ce10" office:value-type="float" office:value="1120951" calcext:value-type="float">
            <text:p>$1,120,951</text:p>
          </table:table-cell>
          <table:table-cell table:style-name="ce3" office:value-type="string" calcext:value-type="string">
            <text:p>organisation validated</text:p>
          </table:table-cell>
          <table:table-cell table:style-name="ce5" office:value-type="string" calcext:value-type="string">
            <text:p><text:a xlink:href="http://au.godaddy.com/ssl/ssl-certificates.aspx?gclid=CM7e6Lup_LoCFQlZpQodF1cA1Q&amp;isc=ssl6au02&amp;currencytype=AUD&amp;ef_id=UKAnmgAAQ95Vifru:20131124015903:s" xlink:type="simple">http://au.godaddy.com/ssl/ssl-certificates.aspx?gclid=CM7e6Lup_LoCFQlZpQodF1cA1Q&amp;isc=ssl6au02&amp;currencytype=AUD&amp;ef_id=UKAnmgAAQ95Vifru:20131124015903:s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iCert SSL Plus</text:p>
          </table:table-cell>
          <table:table-cell table:style-name="ce3" office:value-type="string" calcext:value-type="string">
            <text:p>256-bit</text:p>
          </table:table-cell>
          <table:table-cell table:style-name="ce3" office:value-type="string" calcext:value-type="string">
            <text:p>SHA-1, SHA-2</text:p>
          </table:table-cell>
          <table:table-cell table:style-name="ce3" office:value-type="string" calcext:value-type="string">
            <text:p>no</text:p>
          </table:table-cell>
          <table:table-cell table:style-name="ce7" office:value-type="float" office:value="175" calcext:value-type="float">
            <text:p>$175.00</text:p>
          </table:table-cell>
          <table:table-cell table:style-name="ce7" table:formula="of:=157*2" office:value-type="float" office:value="314" calcext:value-type="float">
            <text:p>$314.00</text:p>
          </table:table-cell>
          <table:table-cell table:style-name="ce10" office:value-type="float" office:value="1000000" calcext:value-type="float">
            <text:p>$1,000,000</text:p>
          </table:table-cell>
          <table:table-cell table:style-name="ce3" office:value-type="string" calcext:value-type="string">
            <text:p>organisation validated</text:p>
          </table:table-cell>
          <table:table-cell table:style-name="ce5" office:value-type="string" calcext:value-type="string">
            <text:p><text:a xlink:href="http://www.digicert.com/ssl-certificate-comparison.htm" xlink:type="simple">http://www.digicert.com/ssl-certificate-comparison.htm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iCert EV</text:p>
          </table:table-cell>
          <table:table-cell table:style-name="ce3" office:value-type="string" calcext:value-type="string">
            <text:p>256-bit</text:p>
          </table:table-cell>
          <table:table-cell table:style-name="ce3" office:value-type="string" calcext:value-type="string">
            <text:p>SHA-1, SHA-2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float" office:value="295" calcext:value-type="float">
            <text:p>$295.00</text:p>
          </table:table-cell>
          <table:table-cell table:style-name="ce7" table:formula="of:=234*2" office:value-type="float" office:value="468" calcext:value-type="float">
            <text:p>$468.00</text:p>
          </table:table-cell>
          <table:table-cell table:style-name="ce10" office:value-type="float" office:value="1000000" calcext:value-type="float">
            <text:p>$1,000,000</text:p>
          </table:table-cell>
          <table:table-cell table:style-name="ce3" office:value-type="string" calcext:value-type="string">
            <text:p>organisation validated</text:p>
          </table:table-cell>
          <table:table-cell table:style-name="ce5" office:value-type="string" calcext:value-type="string">
            <text:p><text:a xlink:href="http://www.digicert.com/ssl-certificate-comparison.htm" xlink:type="simple">http://www.digicert.com/ssl-certificate-comparison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odo EV</text:p>
          </table:table-cell>
          <table:table-cell table:style-name="ce3" office:value-type="string" calcext:value-type="string">
            <text:p>265-bit</text:p>
          </table:table-cell>
          <table:table-cell table:style-name="ce3" office:value-type="string" calcext:value-type="string">
            <text:p>DSA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float" office:value="449" calcext:value-type="float">
            <text:p>$449.00</text:p>
          </table:table-cell>
          <table:table-cell table:style-name="ce7" office:value-type="float" office:value="718" calcext:value-type="float">
            <text:p>$718.00</text:p>
          </table:table-cell>
          <table:table-cell table:style-name="ce10" office:value-type="float" office:value="250000" calcext:value-type="float">
            <text:p>$250,000</text:p>
          </table:table-cell>
          <table:table-cell table:style-name="ce3" office:value-type="string" calcext:value-type="string">
            <text:p>organisation validated</text:p>
          </table:table-cell>
          <table:table-cell office:value-type="string" calcext:value-type="string">
            <text:p>https://www.instantssl.com/ssl-certificate-products/all-ssl-certificates.html?key5sk1=2bd79d434d9f02f72d6ea3e68ec6b21a361c7063&amp;key5sk2=2128&amp;key5sk3=1385258670000&amp;key5sk4=2128&amp;key5sk5=1385258676000&amp;key5sk6=1907&amp;key5sk7=1385258765000&amp;key5sk8=&amp;key5sk9=1385258800000&amp;key5sk10=2292&amp;key5sk11=1385258813000&amp;key5sk12=2292&amp;key5sk13=1385260675000&amp;key5sk14=2292&amp;key5sk15=1385260676000&amp;key5sk16=2292&amp;key5sk17=1385260676000&amp;key5sk18=1907&amp;key5sk19=1385260720000&amp;key5sk20=1911&amp;key5sk21=1385260730000&amp;key5sk22=1901&amp;key5sk23=1385260960000&amp;key5sk24=1904&amp;key5sk25=1385260997000&amp;key5sk26=2302?key5sk1&amp;key5sk27=1385261138000&amp;key5sk28=2301&amp;key5sk29=1385261253000&amp;key5sk30=2301&amp;key5sk31=1385261544000&amp;key6sk1=&amp;key6sk2=CH310165057&amp;key6sk3=7&amp;key6sk4=en-us&amp;key6sk5=AU&amp;key6sk6=0&amp;key6sk7=Google&amp;key6sk8=119900&amp;key6sk9=1366768&amp;key6sk10=true&amp;key6sk11=ad14d74c882993fa3c341486d3077882a1b2dea4&amp;key6sk12=2034&amp;key7sk1=2&amp;key7sk2=196123&amp;key7sk3=206815&amp;key7sk4=196132&amp;key7sk5=209358&amp;key7sk6=203344&amp;key7sk7=200650&amp;key7sk8=207412&amp;key7sk9=196132&amp;key7sk10=207412&amp;key7sk11=204176&amp;key7sk12=16903&amp;key7sk13=153090&amp;key1sk1=ors&amp;key1sk2=Goog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ymantic Secure Site</text:p>
          </table:table-cell>
          <table:table-cell table:style-name="ce3" office:value-type="string" calcext:value-type="string">
            <text:p>256-bit</text:p>
          </table:table-cell>
          <table:table-cell table:style-name="ce3" office:value-type="string" calcext:value-type="string">
            <text:p>RSA &amp; DSA</text:p>
          </table:table-cell>
          <table:table-cell table:style-name="ce3" office:value-type="string" calcext:value-type="string">
            <text:p>no</text:p>
          </table:table-cell>
          <table:table-cell table:style-name="ce7" office:value-type="float" office:value="740" calcext:value-type="float">
            <text:p>$740.00</text:p>
          </table:table-cell>
          <table:table-cell table:style-name="ce7" office:value-type="float" office:value="1275" calcext:value-type="float">
            <text:p>$1,275.00</text:p>
          </table:table-cell>
          <table:table-cell table:style-name="ce10" office:value-type="float" office:value="1000000" calcext:value-type="float">
            <text:p>$1,000,000</text:p>
          </table:table-cell>
          <table:table-cell table:style-name="ce3" office:value-type="string" calcext:value-type="string">
            <text:p>organisation validated</text:p>
          </table:table-cell>
          <table:table-cell table:style-name="ce5" office:value-type="string" calcext:value-type="string">
            <text:p><text:a xlink:href="https://www.symantec.com/en/au/theme.jsp?themeid=compare-ssl-certificates" xlink:type="simple">https://www.symantec.com/en/au/theme.jsp?themeid=compare-ssl-certificates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ymantic Secure Site - EV</text:p>
          </table:table-cell>
          <table:table-cell table:style-name="ce3" office:value-type="string" calcext:value-type="string">
            <text:p>256-bit</text:p>
          </table:table-cell>
          <table:table-cell table:style-name="ce3" office:value-type="string" calcext:value-type="string">
            <text:p>RSA &amp; DSA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float" office:value="1590" calcext:value-type="float">
            <text:p>$1,590.00</text:p>
          </table:table-cell>
          <table:table-cell table:style-name="ce7" office:value-type="float" office:value="2790" calcext:value-type="float">
            <text:p>$2,790.00</text:p>
          </table:table-cell>
          <table:table-cell table:style-name="ce10" office:value-type="float" office:value="1500000" calcext:value-type="float">
            <text:p>$1,500,000</text:p>
          </table:table-cell>
          <table:table-cell table:style-name="ce3" office:value-type="string" calcext:value-type="string">
            <text:p>organisation validated</text:p>
          </table:table-cell>
          <table:table-cell table:style-name="ce5" office:value-type="string" calcext:value-type="string">
            <text:p><text:a xlink:href="https://www.symantec.com/en/au/theme.jsp?themeid=compare-ssl-certificates" xlink:type="simple">https://www.symantec.com/en/au/theme.jsp?themeid=compare-ssl-certificates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ymantic Secure Site Pro</text:p>
          </table:table-cell>
          <table:table-cell table:style-name="ce3" office:value-type="string" calcext:value-type="string">
            <text:p>256-bit</text:p>
          </table:table-cell>
          <table:table-cell table:style-name="ce3" office:value-type="string" calcext:value-type="string">
            <text:p>ECC, RSA &amp; DSA</text:p>
          </table:table-cell>
          <table:table-cell table:style-name="ce3" office:value-type="string" calcext:value-type="string">
            <text:p>no</text:p>
          </table:table-cell>
          <table:table-cell table:style-name="ce7" office:value-type="float" office:value="1590" calcext:value-type="float">
            <text:p>$1,590.00</text:p>
          </table:table-cell>
          <table:table-cell table:style-name="ce7" office:value-type="float" office:value="2790" calcext:value-type="float">
            <text:p>$2,790.00</text:p>
          </table:table-cell>
          <table:table-cell table:style-name="ce10" office:value-type="float" office:value="1250000" calcext:value-type="float">
            <text:p>$1,250,000</text:p>
          </table:table-cell>
          <table:table-cell table:style-name="ce3" office:value-type="string" calcext:value-type="string">
            <text:p>organisation validated</text:p>
          </table:table-cell>
          <table:table-cell table:style-name="ce5" office:value-type="string" calcext:value-type="string">
            <text:p><text:a xlink:href="https://www.symantec.com/en/au/theme.jsp?themeid=compare-ssl-certificates" xlink:type="simple">https://www.symantec.com/en/au/theme.jsp?themeid=compare-ssl-certificates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ymantic Secure Site Pro - EV</text:p>
          </table:table-cell>
          <table:table-cell table:style-name="ce3" office:value-type="string" calcext:value-type="string">
            <text:p>256-bit</text:p>
          </table:table-cell>
          <table:table-cell table:style-name="ce3" office:value-type="string" calcext:value-type="string">
            <text:p>ECC, RSA &amp; DSA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float" office:value="2490" calcext:value-type="float">
            <text:p>$2,490.00</text:p>
          </table:table-cell>
          <table:table-cell table:style-name="ce7" office:value-type="float" office:value="4390" calcext:value-type="float">
            <text:p>$4,390.00</text:p>
          </table:table-cell>
          <table:table-cell table:style-name="ce10" office:value-type="float" office:value="1500000" calcext:value-type="float">
            <text:p>$1,500,000</text:p>
          </table:table-cell>
          <table:table-cell table:style-name="ce3" office:value-type="string" calcext:value-type="string">
            <text:p>organisation validated</text:p>
          </table:table-cell>
          <table:table-cell table:style-name="ce5" office:value-type="string" calcext:value-type="string">
            <text:p><text:a xlink:href="https://www.symantec.com/en/au/theme.jsp?themeid=compare-ssl-certificates" xlink:type="simple">https://www.symantec.com/en/au/theme.jsp?themeid=compare-ssl-certificates</text:a>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Nice explanation: </text:p>
          </table:table-cell>
          <table:table-cell table:style-name="ce5" office:value-type="string" calcext:value-type="string">
            <text:p><text:a xlink:href="http://wpengine.com/support/how-does-all-this-work-https-ssl-certificates-ca-public-and-private-keys-csrs/" xlink:type="simple">http://wpengine.com/support/how-does-all-this-work-https-ssl-certificates-ca-public-and-private-keys-csrs/</text:a></text:p>
          </table:table-cell>
          <table:table-cell table:style-name="ce5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15">
          <table:sort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mo" svg:font-family="Arimo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AU">
      <number:number number:min-integer-digits="1"/>
    </number:number-style>
    <number:number-style style:name="N108">
      <number:text>$</number:text>
      <number:number number:decimal-places="2" number:min-integer-digits="1" number:grouping="true"/>
    </number:number-style>
    <number:number-style style:name="N109">
      <number:text>$</number:text>
      <number:number number:decimal-places="0" number:min-integer-digits="1" number:grouping="true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AU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AU">
      <number:text> </number:text>
      <number:fill-character> </number:fill-character>
      <number:text>- </number:text>
    </number:number-style>
    <number:text-style style:name="N10121" number:language="en" number:country="A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AU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AU">
      <number:text>-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AU">
      <number:text> </number:text>
      <number:currency-symbol/>
      <number:fill-character> </number:fill-character>
      <number:text>- </number:text>
    </number:currency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AU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AU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AU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AU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AU">
      <number:text>-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AU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en" number:country="AU">
      <number:minutes number:style="long"/>
      <number:text>:</number:text>
      <number:seconds number:style="long"/>
    </number:time-style>
    <number:time-style style:name="N1012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AU">
      <number:minutes number:style="long"/>
      <number:text>:</number:text>
      <number:seconds number:style="long" number:decimal-places="1"/>
    </number:time-style>
    <number:number-style style:name="N10128" number:language="en" number:country="AU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TianZhen" style:font-family-asian="TianZhen" style:font-family-generic-asian="system" style:font-pitch-asian="variable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ti</meta:initial-creator>
    <meta:creation-date>2013-11-24T02:23:23</meta:creation-date>
    <dc:date>2013-11-24T23:51:53.484175699</dc:date>
    <meta:generator>LibreOffice/4.1.3.2$Linux_X86_64 LibreOffice_project/410m0$Build-2</meta:generator>
    <meta:editing-duration>PT6H25M26S</meta:editing-duration>
    <meta:editing-cycles>2</meta:editing-cycles>
    <meta:document-statistic meta:table-count="1" meta:cell-count="13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