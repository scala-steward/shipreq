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6.713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0.9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314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1.1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" style:family="table-cell" style:parent-style-name="Default">
      <style:text-properties style:font-name="Consolas" fo:font-size="10pt" style:font-size-asian="10pt" style:font-size-complex="10pt"/>
    </style:style>
    <style:style style:name="ce7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T1" style:family="text"/>
    <style:style style:name="T2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9" office:value-type="string" calcext:value-type="string">
            <text:p>LL req</text:p>
          </table:table-cell>
          <table:table-cell table:style-name="ce10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ep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L = /[A-Za-z]+|\d+/</text:p>
            <text:p>\[L(\.L)+\??\]</text:p>
          </table:table-cell>
          <table:table-cell table:style-name="ce5" office:value-type="string" calcext:value-type="string">
            <text:p>[1.2.4.a]</text:p>
            <text:p>[1.2.4.a?]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UC-?\d+\??(:.+)?/i</text:p>
          </table:table-cell>
          <table:table-cell table:style-name="ce5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remove the :.+ p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\[DELETED\]</text:p>
          </table:table-cell>
          <table:table-cell table:style-name="ce5" office:value-type="string" calcext:value-type="string">
            <text:p>[DELETED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retain old valu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\{\|math:.+\|\}/i</text:p>
          </table:table-cell>
          <table:table-cell table:style-name="ce5" office:value-type="string" calcext:value-type="string">
            <text:p>{|math: a^2=b^2 \over 3 |}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{| |} isn't uniform. Not [] is probably ok cos it's not a link/ref.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LL req ref via uniq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\[[A-Z]{1,5}-\d+\??\]</text:p>
          </table:table-cell>
          <table:table-cell table:style-name="ce6" office:value-type="string" calcext:value-type="string">
            <text:p>[FR-23]</text:p>
            <text:p>[FR-23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be synced with UC ref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LL req ref via semantic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T = /[a-z0-9][_a-z0-9-]*/</text:p>
            <text:p>\[((\.T)+|T(\.T)*)\??]</text:p>
          </table:table-cell>
          <table:table-cell table:style-name="ce6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Conflicts with [deleted] if case-insensit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completion tag (-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TODO</text:p>
            <text:p><text:span text:style-name="T1">(?) {TODO}</text:span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ompletion tag (+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{|TODO: fix later|}</text:p>
            <text:p><text:span text:style-name="T1">(?) {TODO: fix later}</text:span></text:p>
            <text:p><text:span text:style-name="T1">(?) {TODO: overlap with [FR-48]? }</text:span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ouping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frontend #v1.0 <text:span text:style-name="T2">#pri=high</text:span></text:p>
            <text:p><text:span text:style-name="T1">(?) {frontend} {v1.0} {pri=high}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<text:span text:style-name="T1">$can</text:span></text:p>
          </table:table-cell>
          <table:table-cell table:number-columns-repeated="1020"/>
        </table:table-row>
        <table:table-row table:style-name="ro1" table:number-rows-repeated="3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4:45:59.680700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5-23T14:52:41.789915910</dc:date>
    <meta:editing-duration>PT47M3S</meta:editing-duration>
    <meta:editing-cycles>7</meta:editing-cycles>
    <meta:generator>LibreOffice/4.2.3.3$Linux_X86_64 LibreOffice_project/420m0$Build-3</meta:generator>
    <meta:document-statistic meta:table-count="1" meta:cell-count="67" meta:object-count="0"/>
  </office:meta>
</office:document-meta>
</file>