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1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Usage 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Usag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Prevent in use de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Remove restore/soft-del functionalit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Usage 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Usag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Remove hard-del function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delete to child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restore to child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+ Field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delete to fiel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Usage 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Usag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Remove hard-del function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Delete makes reqs seem deleted t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Restore restores seemingly-deleted reqs t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Read view setting from 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Hide deleted tags in tag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how deleted tags in text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Render red deleted tags in live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Hide reqs seemingly-deleted due to req type de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Add selection (checkbox) col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election column ignores filt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Include selection in status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ew column: reason de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how deleted RCGs unless RC in us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Allow subset selection of solely implied re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Allow reason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Cascade to RCG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Prevent if req type is de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Allow subset selection of implied re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Show deletion reason when selecting restoration cas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Cascade to RC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De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Codes + RCG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Merge equal RC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Prompt user for resol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Resolve by tree 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Resolve by node rena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deletion</text:p>
          </table:table-cell>
          <table:table-cell office:value-type="string" calcext:value-type="string">
            <text:p>Soft-delete if non-empty, hard-del if empt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creation</text:p>
          </table:table-cell>
          <table:table-cell office:value-type="string" calcext:value-type="string">
            <text:p>Suggest last-used valu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creation</text:p>
          </table:table-cell>
          <table:table-cell office:value-type="string" calcext:value-type="string">
            <text:p>Restor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09-10T10:39:39.546030268</dc:date>
    <meta:editing-duration>PT5M59S</meta:editing-duration>
    <meta:editing-cycles>1</meta:editing-cycles>
    <meta:document-statistic meta:table-count="1" meta:cell-count="123" meta:object-count="0"/>
    <meta:generator>LibreOffice/4.4.5.2$Linux_X86_64 LibreOffice_project/40m0$Build-2</meta:generator>
  </office:meta>
</office:document-meta>
</file>