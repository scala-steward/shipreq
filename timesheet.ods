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432330827067669" calcext:value-type="percentage">
            <text:p>43.2%</text:p>
          </table:table-cell>
          <table:table-cell table:style-name="ce2" table:formula="of:=SUM([.B5:.B30])" office:value-type="float" office:value="79.8" calcext:value-type="float">
            <text:p>80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>
            <text:p/>
          </table:table-cell>
          <table:table-cell table:style-name="ce22" table:formula="of:=IF(SUM([.DW5:.DW30])=0;&quot;&quot;;SUM([.DW5:.DW30]))">
            <text:p/>
          </table:table-cell>
          <table:table-cell table:style-name="ce22" table:formula="of:=IF(SUM([.DX5:.DX30])=0;&quot;&quot;;SUM([.DX5:.DX30]))">
            <text:p/>
          </table:table-cell>
          <table:table-cell table:style-name="ce22" table:formula="of:=IF(SUM([.DY5:.DY30])=0;&quot;&quot;;SUM([.DY5:.DY30]))">
            <text:p/>
          </table:table-cell>
          <table:table-cell table:style-name="ce16" table:formula="of:=IF(SUM([.DZ5:.DZ30])=0;&quot;&quot;;SUM([.DZ5:.DZ30]))">
            <text:p/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>
            <text:p/>
          </table:table-cell>
          <table:table-cell table:style-name="ce22" table:formula="of:=IF(SUM([.EI5:.EI30])=0;&quot;&quot;;SUM([.EI5:.EI30]))">
            <text:p/>
          </table:table-cell>
          <table:table-cell table:style-name="ce22" table:formula="of:=IF(SUM([.EJ5:.EJ30])=0;&quot;&quot;;SUM([.EJ5:.EJ30]))">
            <text:p/>
          </table:table-cell>
          <table:table-cell table:style-name="ce22" table:formula="of:=IF(SUM([.EK5:.EK30])=0;&quot;&quot;;SUM([.EK5:.EK30]))">
            <text:p/>
          </table:table-cell>
          <table:table-cell table:style-name="ce22" table:formula="of:=IF(SUM([.EL5:.EL30])=0;&quot;&quot;;SUM([.EL5:.EL30]))">
            <text:p/>
          </table:table-cell>
          <table:table-cell table:style-name="ce22" table:formula="of:=IF(SUM([.EM5:.EM30])=0;&quot;&quot;;SUM([.EM5:.EM30]))">
            <text:p/>
          </table:table-cell>
          <table:table-cell table:style-name="ce16" table:formula="of:=IF(SUM([.EN5:.EN30])=0;&quot;&quot;;SUM([.EN5:.EN30]))">
            <text:p/>
          </table:table-cell>
          <table:table-cell table:style-name="ce16" table:formula="of:=IF(SUM([.EO5:.EO30])=0;&quot;&quot;;SUM([.EO5:.EO30]))">
            <text:p/>
          </table:table-cell>
          <table:table-cell table:style-name="ce22" table:formula="of:=IF(SUM([.EP5:.EP30])=0;&quot;&quot;;SUM([.EP5:.EP30]))">
            <text:p/>
          </table:table-cell>
          <table:table-cell table:style-name="ce22" table:formula="of:=IF(SUM([.EQ5:.EQ30])=0;&quot;&quot;;SUM([.EQ5:.EQ30]))">
            <text:p/>
          </table:table-cell>
          <table:table-cell table:style-name="ce22" table:formula="of:=IF(SUM([.ER5:.ER30])=0;&quot;&quot;;SUM([.ER5:.ER30]))">
            <text:p/>
          </table:table-cell>
          <table:table-cell table:style-name="ce22" table:formula="of:=IF(SUM([.ES5:.ES30])=0;&quot;&quot;;SUM([.ES5:.ES30]))">
            <text:p/>
          </table:table-cell>
          <table:table-cell table:style-name="ce22" table:formula="of:=IF(SUM([.ET5:.ET30])=0;&quot;&quot;;SUM([.ET5:.ET30]))">
            <text:p/>
          </table:table-cell>
          <table:table-cell table:style-name="ce16" table:formula="of:=IF(SUM([.EU5:.EU30])=0;&quot;&quot;;SUM([.EU5:.EU30]))">
            <text:p/>
          </table:table-cell>
          <table:table-cell table:style-name="ce16" table:formula="of:=IF(SUM([.EV5:.EV30])=0;&quot;&quot;;SUM([.EV5:.EV30]))">
            <text:p/>
          </table:table-cell>
          <table:table-cell table:style-name="ce22" table:formula="of:=IF(SUM([.EW5:.EW30])=0;&quot;&quot;;SUM([.EW5:.EW30]))">
            <text:p/>
          </table:table-cell>
          <table:table-cell table:style-name="ce22" table:formula="of:=IF(SUM([.EX5:.EX30])=0;&quot;&quot;;SUM([.EX5:.EX30]))">
            <text:p/>
          </table:table-cell>
          <table:table-cell table:style-name="ce22" table:formula="of:=IF(SUM([.EY5:.EY30])=0;&quot;&quot;;SUM([.EY5:.EY30]))">
            <text:p/>
          </table:table-cell>
          <table:table-cell table:style-name="ce22" table:formula="of:=IF(SUM([.EZ5:.EZ30])=0;&quot;&quot;;SUM([.EZ5:.EZ30]))">
            <text:p/>
          </table:table-cell>
          <table:table-cell table:style-name="ce22" table:formula="of:=IF(SUM([.FA5:.FA30])=0;&quot;&quot;;SUM([.FA5:.FA30]))">
            <text:p/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34.5" calcext:value-type="float">
            <text:p>34.5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5.4" calcext:value-type="float">
            <text:p>5.4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3.5" calcext:value-type="float">
            <text:p>3.5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11:.NO11])=0;&quot;&quot;;SUM([.C11:.NO11]))">
            <text:p/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/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3.7" calcext:value-type="float">
            <text:p>3.7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544"/>
        </table:table-row>
        <table:table-row table:style-name="ro1" table:number-rows-repeated="1048562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22:30:42.573330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5-02T22:30:48.488717757</dc:date>
    <meta:editing-duration>P11DT7H4M59S</meta:editing-duration>
    <meta:editing-cycles>167</meta:editing-cycles>
    <meta:generator>LibreOffice/5.1.2.2.0$Linux_X86_64 LibreOffice_project/10m0$Build-2</meta:generator>
    <meta:document-statistic meta:table-count="2" meta:cell-count="2534" meta:object-count="0"/>
  </office:meta>
</office:document-meta>
</file>