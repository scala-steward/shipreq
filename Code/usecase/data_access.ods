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3.464cm"/>
    </style:style>
    <style:style style:name="co2" style:family="table-column">
      <style:table-column-properties fo:break-before="auto" style:column-width="3.427cm"/>
    </style:style>
    <style:style style:name="co3" style:family="table-column">
      <style:table-column-properties fo:break-before="auto" style:column-width="1.494cm"/>
    </style:style>
    <style:style style:name="co4" style:family="table-column">
      <style:table-column-properties fo:break-before="auto" style:column-width="1.97cm"/>
    </style:style>
    <style:style style:name="co5" style:family="table-column">
      <style:table-column-properties fo:break-before="auto" style:column-width="11.6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1.84cm" fo:break-before="auto" style:use-optimal-row-height="true"/>
    </style:style>
    <style:style style:name="ro4" style:family="table-row">
      <style:table-row-properties style:row-height="2.1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value-type" style:repeat-content="false" style:vertical-align="middle"/>
      <style:text-properties style:font-name="Inconsolata"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7" table:default-cell-style-name="ce4"/>
        <table:table-column table:style-name="co5" table:default-cell-style-name="ce5"/>
        <table:table-column table:style-name="co6" table:number-columns-repeated="1013" table:default-cell-style-name="ce2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Action</text:p>
          </table:table-cell>
          <table:table-cell table:style-name="ce3" office:value-type="string">
            <text:p>Trans?</text:p>
          </table:table-cell>
          <table:table-cell table:style-name="ce3" office:value-type="string">
            <text:p>data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usecase</text:p>
          </table:table-cell>
          <table:table-cell table:style-name="ce3" office:value-type="string">
            <text:p>field_key</text:p>
          </table:table-cell>
          <table:table-cell table:style-name="ce3" office:value-type="string">
            <text:p>field_value</text:p>
          </table:table-cell>
          <table:table-cell table:style-name="ce3" office:value-type="string">
            <text:p>step</text:p>
          </table:table-cell>
          <table:table-cell table:style-name="ce3" office:value-type="string">
            <text:p>relation</text:p>
          </table:table-cell>
          <table:table-cell table:style-name="ce3" office:value-type="string">
            <text:p>SQL</text:p>
          </table:table-cell>
          <table:table-cell table:number-columns-repeated="1013"/>
        </table:table-row>
        <table:table-row table:style-name="ro1">
          <table:table-cell office:value-type="string">
            <text:p>list.html</text:p>
          </table:table-cell>
          <table:table-cell office:value-type="string">
            <text:p>Load UC summaries</text:p>
          </table:table-cell>
          <table:table-cell office:value-type="string">
            <text:p>n</text:p>
          </table:table-cell>
          <table:table-cell office:value-type="string">
            <text:p>R: type_id</text:p>
          </table:table-cell>
          <table:table-cell office:value-type="string">
            <text:p>R: data_id</text:p>
          </table:table-cell>
          <table:table-cell office:value-type="string">
            <text:p>R: id</text:p>
          </table:table-cell>
          <table:table-cell table:number-columns-repeated="4"/>
          <table:table-cell office:value-type="string">
            <text:p>WITH t AS (SELECT id, row_number() OVER (PARTITION BY data_id ORDER BY rev DESC) rn FROM value WHERE data_id in (select id from data where type_id = 100)) select data_id, v.id, number, title, to_iso8601_str(updated_at) from usecase u, value v where u.id in (select id from t where rn = 1) and u.id=v.id order by number</text:p>
          </table:table-cell>
          <table:table-cell table:number-columns-repeated="1013"/>
        </table:table-row>
        <table:table-row table:style-name="ro2">
          <table:table-cell office:value-type="string">
            <text:p>list.html</text:p>
          </table:table-cell>
          <table:table-cell office:value-type="string">
            <text:p>New UC</text:p>
          </table:table-cell>
          <table:table-cell office:value-type="string">
            <text:p>jsCb(y)</text:p>
          </table:table-cell>
          <table:table-cell table:number-columns-repeated="2" office:value-type="string">
            <text:p>I</text:p>
          </table:table-cell>
          <table:table-cell office:value-type="string">
            <text:p>I</text:p>
            <text:p>R: *</text:p>
          </table:table-cell>
          <table:table-cell table:number-columns-repeated="4"/>
          <table:table-cell office:value-type="string">
            <text:p>INSERT INTO data(type_id) VALUES(?) RETURNING id</text:p>
            <text:p>INSERT INTO value(data_id, rev) VALUES(?,?) RETURNING id</text:p>
            <text:p>INSERT INTO usecase VALUES(?,?,(select coalesce(max(number),0)+1 from usecase),?) RETURNING number</text:p>
          </table:table-cell>
          <table:table-cell table:number-columns-repeated="1013"/>
        </table:table-row>
        <table:table-row table:style-name="ro3">
          <table:table-cell office:value-type="string">
            <text:p>PUT /api/usecase/ID</text:p>
          </table:table-cell>
          <table:table-cell office:value-type="string">
            <text:p>Save UC header</text:p>
          </table:table-cell>
          <table:table-cell office:value-type="string">
            <text:p>y</text:p>
          </table:table-cell>
          <table:table-cell/>
          <table:table-cell office:value-type="string">
            <text:p>R: id</text:p>
            <text:p>R: data_id</text:p>
          </table:table-cell>
          <table:table-cell office:value-type="string">
            <text:p>R: id</text:p>
            <text:p>U: id</text:p>
            <text:p>I</text:p>
          </table:table-cell>
          <table:table-cell table:number-columns-repeated="3"/>
          <table:table-cell office:value-type="string">
            <text:p>R: from_id</text:p>
            <text:p>I</text:p>
          </table:table-cell>
          <table:table-cell office:value-type="string">
            <text:p>SELECT v.id, data_id, rev, title, number, field_list_id FROM value v, usecase u WHERE u.id=? AND v.id = u.id</text:p>
            <text:p>with history as ( select id, rev, data_id, row_number() over (order by rev desc) rn from value where data_id = ? ) select v.id, data_id, rev, title, number, field_list_id from history v, usecase u where v.id = u.id and v.rn = 1</text:p>
            <text:p>1) UPDATE usecase SET title=? WHERE id=?</text:p>
            <text:p>2) INSERT INTO usecase VALUES(?,?,?,?)</text:p>
            <text:p>2) insert into relation select ?, type_id, index, to_id from relation where from_id = ?</text:p>
            <text:p>WITH t AS (SELECT id, row_number() OVER (PARTITION BY data_id ORDER BY rev DESC) rn FROM value WHERE data_id=?) select data_id, v.id, number, title, to_iso8601_str(updated_at) from usecase u, value v where u.id in (select id from t where rn = 1) and u.id=v.id order by number</text:p>
          </table:table-cell>
          <table:table-cell table:number-columns-repeated="1013"/>
        </table:table-row>
        <table:table-row table:style-name="ro3">
          <table:table-cell office:value-type="string">
            <text:p>uce.html</text:p>
          </table:table-cell>
          <table:table-cell office:value-type="string">
            <text:p>Load UC</text:p>
          </table:table-cell>
          <table:table-cell office:value-type="string">
            <text:p>y</text:p>
          </table:table-cell>
          <table:table-cell/>
          <table:table-cell office:value-type="string">
            <text:p>R: data_id</text:p>
          </table:table-cell>
          <table:table-cell office:value-type="string">
            <text:p>R: id</text:p>
          </table:table-cell>
          <table:table-cell/>
          <table:table-cell table:number-columns-repeated="2" office:value-type="string">
            <text:p>R: id</text:p>
          </table:table-cell>
          <table:table-cell office:value-type="string">
            <text:p>R: from_id,</text:p>
            <text:p>type_id</text:p>
          </table:table-cell>
          <table:table-cell office:value-type="string">
            <text:p>with history as ( select id, rev, data_id, row_number() over (order by rev desc) rn from value where data_id = ? ) select v.id, data_id, rev, title, number, field_list_id from history v, usecase u where v.id = u.id and v.rn = 1</text:p>
            <text:p>select fv.id, fv.field_key_id, fv.text from field_value fv, relation r where fv.id = r.to_id and r.type_id = 200 and r.from_id = ?</text:p>
            <text:p>CREATE TEMP TABLE tmp WITH (OIDS=FALSE) ON COMMIT DROP AS WITH RECURSIVE tmp2(from_id, type_id, index, to_id, path, cycle) AS ( SELECT r.from_id, r.type_id, r.index, r.to_id, ARRAY[r.from_id], false FROM relation r WHERE r.from_id = ? and r.type_id = 200 UNION ALL SELECT r.from_id, r.type_id, r.index, r.to_id, path || r.from_id, r.from_id = ANY(path) FROM relation r, tmp2 WHERE tmp2.to_id = r.from_id and r.type_id = 200 and not cycle ) SELECT from_id, index, to_id FROM tmp2</text:p>
            <text:p>SELECT from_id, to_id FROM tmp ORDER BY index</text:p>
            <text:p>SELECT v.id, data_id, rev, text FROM step s INNER JOIN value v on v.id=s.id WHERE s.id IN (SELECT to_id FROM tmp)</text:p>
            <text:p>DROP TABLE tmp</text:p>
          </table:table-cell>
          <table:table-cell table:number-columns-repeated="1013"/>
        </table:table-row>
        <table:table-row table:style-name="ro4">
          <table:table-cell office:value-type="string">
            <text:p>uce.html</text:p>
          </table:table-cell>
          <table:table-cell office:value-type="string">
            <text:p>Save UC</text:p>
          </table:table-cell>
          <table:table-cell office:value-type="string">
            <text:p>y</text:p>
          </table:table-cell>
          <table:table-cell office:value-type="string">
            <text:p>I</text:p>
          </table:table-cell>
          <table:table-cell office:value-type="string">
            <text:p>R: data_id</text:p>
            <text:p>I</text:p>
          </table:table-cell>
          <table:table-cell office:value-type="string">
            <text:p>I</text:p>
          </table:table-cell>
          <table:table-cell/>
          <table:table-cell table:number-columns-repeated="3" office:value-type="string">
            <text:p>I</text:p>
          </table:table-cell>
          <table:table-cell office:value-type="string">
            <text:p>INSERT INTO data(type_id) VALUES(?) RETURNING id</text:p>
            <text:p>insert into value(data_id,rev) select ?,coalesce(max(rev)+1,1) from value where data_id=? returning id, rev</text:p>
            <text:p>INSERT INTO value(data_id, rev) VALUES(?,?) RETURNING id</text:p>
            <text:p>INSERT INTO usecase VALUES(?,?,?,?)</text:p>
            <text:p>INSERT INTO field_value VALUES(?,?,?)</text:p>
            <text:p>INSERT INTO step VALUES(?,?)</text:p>
            <text:p>INSERT INTO relation VALUES(?,?,?,?)</text:p>
          </table:table-cell>
          <table:table-cell table:number-columns-repeated="101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" svg:font-family="Inconsolata" style:font-pitch="fixed"/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10:02:26</meta:creation-date>
    <dc:date>2013-06-20T10:41:01</dc:date>
    <meta:editing-duration>PT2M2S</meta:editing-duration>
    <meta:editing-cycles>1</meta:editing-cycles>
    <meta:document-statistic meta:table-count="1" meta:cell-count="51" meta:object-count="0"/>
    <meta:generator>LibreOffice/4.0.4.2$Linux_X86_64 LibreOffice_project/400m0$Build-2</meta:generator>
  </office:meta>
</office:document-meta>
</file>