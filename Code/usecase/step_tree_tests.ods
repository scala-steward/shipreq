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4.464cm"/>
    </style:style>
    <style:style style:name="co2" style:family="table-column">
      <style:table-column-properties fo:break-before="auto" style:column-width="4.8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cccccc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ext-properties fo:color="#b3b3b3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ff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4586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8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insertStep()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visibility="collapse" table:default-cell-style-name="Default"/>
        <table:table-column table:style-name="co1" table:number-columns-repeated="4" table:default-cell-style-name="Default"/>
        <table:table-column table:style-name="co3" table:number-columns-repeated="1010" table:default-cell-style-name="Default"/>
        <table:table-row table:style-name="ro1">
          <table:table-cell table:style-name="ce1" office:value-type="string">
            <text:p>ORIG</text:p>
          </table:table-cell>
          <table:table-cell table:style-name="ce1" office:value-type="string">
            <text:p>1.0</text:p>
          </table:table-cell>
          <table:table-cell table:style-name="ce1" office:value-type="string">
            <text:p>1.1</text:p>
          </table:table-cell>
          <table:table-cell table:style-name="ce1" office:value-type="string">
            <text:p>1.0.2</text:p>
          </table:table-cell>
          <table:table-cell table:style-name="ce1" office:value-type="string">
            <text:p>1.1.2</text:p>
          </table:table-cell>
          <table:table-cell table:style-name="ce1" office:value-type="string">
            <text:p>1.0.2.a</text:p>
          </table:table-cell>
          <table:table-cell table:style-name="ce1" office:value-type="string">
            <text:p>1.0.2.a.i</text:p>
          </table:table-cell>
          <table:table-cell table:style-name="ce1" office:value-type="string">
            <text:p>1.0.2.c.ii</text:p>
          </table:table-cell>
          <table:table-cell table:number-columns-repeated="2" table:style-name="ce1"/>
          <table:table-cell table:style-name="ce1" table:number-columns-repeated="1014"/>
        </table:table-row>
        <table:table-row table:style-name="ro1">
          <table:table-cell table:style-name="ce2" office:value-type="string">
            <text:p>1.0. Step:1.0</text:p>
          </table:table-cell>
          <table:table-cell table:number-columns-repeated="7" table:style-name="ce5" office:value-type="string">
            <text:p>1.0. Step:1.0</text:p>
          </table:table-cell>
          <table:table-cell table:style-name="ce5"/>
          <table:table-cell table:style-name="ce8"/>
          <table:table-cell table:number-columns-repeated="1014"/>
        </table:table-row>
        <table:table-row table:style-name="ro1">
          <table:table-cell table:style-name="ce2" office:value-type="string">
            <text:p><text:s text:c="2"/>1. Step:1</text:p>
          </table:table-cell>
          <table:table-cell table:style-name="ce6" office:value-type="string">
            <text:p><text:s text:c="2"/>1. N</text:p>
          </table:table-cell>
          <table:table-cell table:number-columns-repeated="6" table:style-name="ce5" office:value-type="string">
            <text:p><text:s text:c="2"/>1. Step:1</text:p>
          </table:table-cell>
          <table:table-cell table:number-columns-repeated="2" table:style-name="ce5"/>
          <table:table-cell table:number-columns-repeated="1014"/>
        </table:table-row>
        <table:table-row table:style-name="ro1">
          <table:table-cell table:style-name="ce2" office:value-type="string">
            <text:p><text:s text:c="2"/>2. Step:2</text:p>
          </table:table-cell>
          <table:table-cell table:style-name="ce7" office:value-type="string">
            <text:p><text:s text:c="2"/>2. Step:1</text:p>
          </table:table-cell>
          <table:table-cell table:number-columns-repeated="6" table:style-name="ce5" office:value-type="string">
            <text:p><text:s text:c="2"/>2. Step:2</text:p>
          </table:table-cell>
          <table:table-cell table:number-columns-repeated="2" table:style-name="ce5"/>
          <table:table-cell table:number-columns-repeated="1014"/>
        </table:table-row>
        <table:table-row table:style-name="ro1">
          <table:table-cell table:style-name="ce2" office:value-type="string">
            <text:p><text:s text:c="4"/>a. Step:a</text:p>
          </table:table-cell>
          <table:table-cell table:style-name="ce7" office:value-type="string">
            <text:p><text:s text:c="2"/>3. Step:2</text:p>
          </table:table-cell>
          <table:table-cell table:style-name="ce5" office:value-type="string">
            <text:p><text:s text:c="4"/>a. Step:a</text:p>
          </table:table-cell>
          <table:table-cell table:style-name="ce6" office:value-type="string">
            <text:p><text:s text:c="4"/>a. N</text:p>
          </table:table-cell>
          <table:table-cell table:number-columns-repeated="4" table:style-name="ce5" office:value-type="string">
            <text:p><text:s text:c="4"/>a. Step:a</text:p>
          </table:table-cell>
          <table:table-cell table:number-columns-repeated="2" table:style-name="ce5"/>
          <table:table-cell table:number-columns-repeated="1014"/>
        </table:table-row>
        <table:table-row table:style-name="ro1">
          <table:table-cell table:style-name="ce2" office:value-type="string">
            <text:p><text:s text:c="6"/>i. Step:i</text:p>
          </table:table-cell>
          <table:table-cell table:style-name="ce5" office:value-type="string">
            <text:p><text:s text:c="4"/>a. Step:a</text:p>
          </table:table-cell>
          <table:table-cell table:style-name="ce5" office:value-type="string">
            <text:p><text:s text:c="6"/>i. Step:i</text:p>
          </table:table-cell>
          <table:table-cell table:style-name="ce7" office:value-type="string">
            <text:p><text:s text:c="4"/>b. Step:a</text:p>
          </table:table-cell>
          <table:table-cell table:style-name="ce5" office:value-type="string">
            <text:p><text:s text:c="6"/>i. Step:i</text:p>
          </table:table-cell>
          <table:table-cell table:style-name="ce6" office:value-type="string">
            <text:p><text:s text:c="6"/>i. N</text:p>
          </table:table-cell>
          <table:table-cell table:number-columns-repeated="2" table:style-name="ce5" office:value-type="string">
            <text:p><text:s text:c="6"/>i. Step:i</text:p>
          </table:table-cell>
          <table:table-cell table:number-columns-repeated="2" table:style-name="ce5"/>
          <table:table-cell table:number-columns-repeated="1014"/>
        </table:table-row>
        <table:table-row table:style-name="ro1">
          <table:table-cell table:style-name="ce2" office:value-type="string">
            <text:p><text:s text:c="6"/>ii. Step:ii</text:p>
          </table:table-cell>
          <table:table-cell table:style-name="ce5" office:value-type="string">
            <text:p><text:s text:c="6"/>i. Step:i</text:p>
          </table:table-cell>
          <table:table-cell table:style-name="ce5" office:value-type="string">
            <text:p><text:s text:c="6"/>ii. Step:ii</text:p>
          </table:table-cell>
          <table:table-cell table:style-name="ce5" office:value-type="string">
            <text:p><text:s text:c="6"/>i. Step:i</text:p>
          </table:table-cell>
          <table:table-cell table:style-name="ce5" office:value-type="string">
            <text:p><text:s text:c="6"/>ii. Step:ii</text:p>
          </table:table-cell>
          <table:table-cell table:style-name="ce7" office:value-type="string">
            <text:p><text:s text:c="6"/>ii. Step:i</text:p>
          </table:table-cell>
          <table:table-cell table:style-name="ce6" office:value-type="string">
            <text:p><text:s text:c="6"/>ii. N</text:p>
          </table:table-cell>
          <table:table-cell table:style-name="ce5" office:value-type="string">
            <text:p><text:s text:c="6"/>ii. Step:ii</text:p>
          </table:table-cell>
          <table:table-cell table:number-columns-repeated="2" table:style-name="ce5"/>
          <table:table-cell table:number-columns-repeated="1014"/>
        </table:table-row>
        <table:table-row table:style-name="ro1">
          <table:table-cell table:style-name="ce2" office:value-type="string">
            <text:p><text:s text:c="6"/>iii. Step:iii</text:p>
          </table:table-cell>
          <table:table-cell table:style-name="ce5" office:value-type="string">
            <text:p><text:s text:c="6"/>ii. Step:ii</text:p>
          </table:table-cell>
          <table:table-cell table:style-name="ce5" office:value-type="string">
            <text:p><text:s text:c="6"/>iii. Step:iii</text:p>
          </table:table-cell>
          <table:table-cell table:style-name="ce5" office:value-type="string">
            <text:p><text:s text:c="6"/>ii. Step:ii</text:p>
          </table:table-cell>
          <table:table-cell table:style-name="ce5" office:value-type="string">
            <text:p><text:s text:c="6"/>iii. Step:iii</text:p>
          </table:table-cell>
          <table:table-cell table:number-columns-repeated="2" table:style-name="ce7" office:value-type="string">
            <text:p><text:s text:c="6"/>iii. Step:ii</text:p>
          </table:table-cell>
          <table:table-cell table:style-name="ce5" office:value-type="string">
            <text:p><text:s text:c="6"/>iii. Step:iii</text:p>
          </table:table-cell>
          <table:table-cell table:number-columns-repeated="2" table:style-name="ce5"/>
          <table:table-cell table:number-columns-repeated="1014"/>
        </table:table-row>
        <table:table-row table:style-name="ro1">
          <table:table-cell table:style-name="ce2" office:value-type="string">
            <text:p><text:s text:c="4"/>b. Step:b</text:p>
          </table:table-cell>
          <table:table-cell table:style-name="ce5" office:value-type="string">
            <text:p><text:s text:c="6"/>iii. Step:iii</text:p>
          </table:table-cell>
          <table:table-cell table:style-name="ce5" office:value-type="string">
            <text:p><text:s text:c="4"/>b. Step:b</text:p>
          </table:table-cell>
          <table:table-cell table:style-name="ce5" office:value-type="string">
            <text:p><text:s text:c="6"/>iii. Step:iii</text:p>
          </table:table-cell>
          <table:table-cell table:style-name="ce5" office:value-type="string">
            <text:p><text:s text:c="4"/>b. Step:b</text:p>
          </table:table-cell>
          <table:table-cell table:number-columns-repeated="2" table:style-name="ce7" office:value-type="string">
            <text:p><text:s text:c="6"/>iv. Step:iii</text:p>
          </table:table-cell>
          <table:table-cell table:style-name="ce5" office:value-type="string">
            <text:p><text:s text:c="4"/>b. Step:b</text:p>
          </table:table-cell>
          <table:table-cell table:style-name="ce5"/>
          <table:table-cell table:style-name="ce6"/>
          <table:table-cell table:number-columns-repeated="1014"/>
        </table:table-row>
        <table:table-row table:style-name="ro1">
          <table:table-cell table:style-name="ce2" office:value-type="string">
            <text:p><text:s text:c="4"/>c. Step:c</text:p>
          </table:table-cell>
          <table:table-cell table:style-name="ce5" office:value-type="string">
            <text:p><text:s text:c="4"/>b. Step:b</text:p>
          </table:table-cell>
          <table:table-cell table:style-name="ce5" office:value-type="string">
            <text:p><text:s text:c="4"/>c. Step:c</text:p>
          </table:table-cell>
          <table:table-cell table:style-name="ce7" office:value-type="string">
            <text:p><text:s text:c="4"/>c. Step:b</text:p>
          </table:table-cell>
          <table:table-cell table:style-name="ce5" office:value-type="string">
            <text:p><text:s text:c="4"/>c. Step:c</text:p>
          </table:table-cell>
          <table:table-cell table:number-columns-repeated="2" table:style-name="ce5" office:value-type="string">
            <text:p><text:s text:c="4"/>b. Step:b</text:p>
          </table:table-cell>
          <table:table-cell table:style-name="ce5" office:value-type="string">
            <text:p><text:s text:c="4"/>c. Step:c</text:p>
          </table:table-cell>
          <table:table-cell table:style-name="ce5"/>
          <table:table-cell table:style-name="ce7"/>
          <table:table-cell table:number-columns-repeated="1014"/>
        </table:table-row>
        <table:table-row table:style-name="ro1">
          <table:table-cell table:style-name="ce2" office:value-type="string">
            <text:p><text:s text:c="6"/>i. Step:i</text:p>
          </table:table-cell>
          <table:table-cell table:style-name="ce5" office:value-type="string">
            <text:p><text:s text:c="4"/>c. Step:c</text:p>
          </table:table-cell>
          <table:table-cell table:style-name="ce5" office:value-type="string">
            <text:p><text:s text:c="6"/>i. Step:i</text:p>
          </table:table-cell>
          <table:table-cell table:style-name="ce7" office:value-type="string">
            <text:p><text:s text:c="4"/>d. Step:c</text:p>
          </table:table-cell>
          <table:table-cell table:style-name="ce5" office:value-type="string">
            <text:p><text:s text:c="6"/>i. Step:i</text:p>
          </table:table-cell>
          <table:table-cell table:number-columns-repeated="2" table:style-name="ce5" office:value-type="string">
            <text:p><text:s text:c="4"/>c. Step:c</text:p>
          </table:table-cell>
          <table:table-cell table:style-name="ce5" office:value-type="string">
            <text:p><text:s text:c="6"/>i. Step:i</text:p>
          </table:table-cell>
          <table:table-cell table:number-columns-repeated="2" table:style-name="ce5"/>
          <table:table-cell table:number-columns-repeated="1014"/>
        </table:table-row>
        <table:table-row table:style-name="ro1">
          <table:table-cell table:style-name="ce2" office:value-type="string">
            <text:p><text:s text:c="6"/>ii. Step:ii</text:p>
          </table:table-cell>
          <table:table-cell table:style-name="ce5" office:value-type="string">
            <text:p><text:s text:c="6"/>i. Step:i</text:p>
          </table:table-cell>
          <table:table-cell table:style-name="ce5" office:value-type="string">
            <text:p><text:s text:c="6"/>ii. Step:ii</text:p>
          </table:table-cell>
          <table:table-cell table:style-name="ce5" office:value-type="string">
            <text:p><text:s text:c="6"/>i. Step:i</text:p>
          </table:table-cell>
          <table:table-cell table:style-name="ce5" office:value-type="string">
            <text:p><text:s text:c="6"/>ii. Step:ii</text:p>
          </table:table-cell>
          <table:table-cell table:number-columns-repeated="2" table:style-name="ce5" office:value-type="string">
            <text:p><text:s text:c="6"/>i. Step:i</text:p>
          </table:table-cell>
          <table:table-cell table:style-name="ce5" office:value-type="string">
            <text:p><text:s text:c="6"/>ii. Step:ii</text:p>
          </table:table-cell>
          <table:table-cell table:number-columns-repeated="2" table:style-name="ce5"/>
          <table:table-cell table:number-columns-repeated="1014"/>
        </table:table-row>
        <table:table-row table:style-name="ro1">
          <table:table-cell table:style-name="ce2" office:value-type="string">
            <text:p><text:s text:c="2"/>3. Step:3</text:p>
          </table:table-cell>
          <table:table-cell table:style-name="ce5" office:value-type="string">
            <text:p><text:s text:c="6"/>ii. Step:ii</text:p>
          </table:table-cell>
          <table:table-cell table:style-name="ce5" office:value-type="string">
            <text:p><text:s text:c="2"/>3. Step:3</text:p>
          </table:table-cell>
          <table:table-cell table:style-name="ce5" office:value-type="string">
            <text:p><text:s text:c="6"/>ii. Step:ii</text:p>
          </table:table-cell>
          <table:table-cell table:style-name="ce5" office:value-type="string">
            <text:p><text:s text:c="2"/>3. Step:3</text:p>
          </table:table-cell>
          <table:table-cell table:number-columns-repeated="2" table:style-name="ce5" office:value-type="string">
            <text:p><text:s text:c="6"/>ii. Step:ii</text:p>
          </table:table-cell>
          <table:table-cell table:style-name="ce6" office:value-type="string">
            <text:p><text:s text:c="6"/>iii. N</text:p>
          </table:table-cell>
          <table:table-cell table:style-name="ce5"/>
          <table:table-cell table:style-name="ce7"/>
          <table:table-cell table:number-columns-repeated="1014"/>
        </table:table-row>
        <table:table-row table:style-name="ro1">
          <table:table-cell table:style-name="ce2" office:value-type="string">
            <text:p><text:s text:c="4"/>a. Step:a</text:p>
          </table:table-cell>
          <table:table-cell table:style-name="ce7" office:value-type="string">
            <text:p><text:s text:c="2"/>4. Step:3</text:p>
          </table:table-cell>
          <table:table-cell table:style-name="ce5" office:value-type="string">
            <text:p><text:s text:c="4"/>a. Step:a</text:p>
          </table:table-cell>
          <table:table-cell table:style-name="ce5" office:value-type="string">
            <text:p><text:s text:c="2"/>3. Step:3</text:p>
          </table:table-cell>
          <table:table-cell table:style-name="ce5" office:value-type="string">
            <text:p><text:s text:c="4"/>a. Step:a</text:p>
          </table:table-cell>
          <table:table-cell table:number-columns-repeated="3" table:style-name="ce5" office:value-type="string">
            <text:p><text:s text:c="2"/>3. Step:3</text:p>
          </table:table-cell>
          <table:table-cell table:number-columns-repeated="2" table:style-name="ce5"/>
          <table:table-cell table:number-columns-repeated="1014"/>
        </table:table-row>
        <table:table-row table:style-name="ro1">
          <table:table-cell table:style-name="ce2" office:value-type="string">
            <text:p><text:s text:c="6"/>i. Step:i</text:p>
          </table:table-cell>
          <table:table-cell table:style-name="ce5" office:value-type="string">
            <text:p><text:s text:c="4"/>a. Step:a</text:p>
          </table:table-cell>
          <table:table-cell table:style-name="ce5" office:value-type="string">
            <text:p><text:s text:c="6"/>i. Step:i</text:p>
          </table:table-cell>
          <table:table-cell table:style-name="ce5" office:value-type="string">
            <text:p><text:s text:c="4"/>a. Step:a</text:p>
          </table:table-cell>
          <table:table-cell table:style-name="ce5" office:value-type="string">
            <text:p><text:s text:c="6"/>i. Step:i</text:p>
          </table:table-cell>
          <table:table-cell table:number-columns-repeated="3" table:style-name="ce5" office:value-type="string">
            <text:p><text:s text:c="4"/>a. Step:a</text:p>
          </table:table-cell>
          <table:table-cell table:number-columns-repeated="2" table:style-name="ce5"/>
          <table:table-cell table:number-columns-repeated="1014"/>
        </table:table-row>
        <table:table-row table:style-name="ro1">
          <table:table-cell table:style-name="ce2" office:value-type="string">
            <text:p><text:s text:c="4"/>b. Step:b</text:p>
          </table:table-cell>
          <table:table-cell table:style-name="ce5" office:value-type="string">
            <text:p><text:s text:c="6"/>i. Step:i</text:p>
          </table:table-cell>
          <table:table-cell table:style-name="ce5" office:value-type="string">
            <text:p><text:s text:c="4"/>b. Step:b</text:p>
          </table:table-cell>
          <table:table-cell table:style-name="ce5" office:value-type="string">
            <text:p><text:s text:c="6"/>i. Step:i</text:p>
          </table:table-cell>
          <table:table-cell table:style-name="ce5" office:value-type="string">
            <text:p><text:s text:c="4"/>b. Step:b</text:p>
          </table:table-cell>
          <table:table-cell table:number-columns-repeated="3" table:style-name="ce5" office:value-type="string">
            <text:p><text:s text:c="6"/>i. Step:i</text:p>
          </table:table-cell>
          <table:table-cell table:number-columns-repeated="2" table:style-name="ce5"/>
          <table:table-cell table:number-columns-repeated="1014"/>
        </table:table-row>
        <table:table-row table:style-name="ro1">
          <table:table-cell table:style-name="ce2" office:value-type="string">
            <text:p><text:s text:c="2"/>4. Step:4</text:p>
          </table:table-cell>
          <table:table-cell table:style-name="ce5" office:value-type="string">
            <text:p><text:s text:c="4"/>b. Step:b</text:p>
          </table:table-cell>
          <table:table-cell table:style-name="ce5" office:value-type="string">
            <text:p><text:s text:c="2"/>4. Step:4</text:p>
          </table:table-cell>
          <table:table-cell table:style-name="ce5" office:value-type="string">
            <text:p><text:s text:c="4"/>b. Step:b</text:p>
          </table:table-cell>
          <table:table-cell table:style-name="ce5" office:value-type="string">
            <text:p><text:s text:c="2"/>4. Step:4</text:p>
          </table:table-cell>
          <table:table-cell table:number-columns-repeated="3" table:style-name="ce5" office:value-type="string">
            <text:p><text:s text:c="4"/>b. Step:b</text:p>
          </table:table-cell>
          <table:table-cell table:style-name="ce5"/>
          <table:table-cell table:style-name="ce7"/>
          <table:table-cell table:number-columns-repeated="1014"/>
        </table:table-row>
        <table:table-row table:style-name="ro1">
          <table:table-cell table:style-name="ce2" office:value-type="string">
            <text:p>1.1. Step:1.1</text:p>
          </table:table-cell>
          <table:table-cell table:style-name="ce7" office:value-type="string">
            <text:p><text:s text:c="2"/>5. Step:4</text:p>
          </table:table-cell>
          <table:table-cell table:style-name="ce5" office:value-type="string">
            <text:p>1.1. Step:1.1</text:p>
          </table:table-cell>
          <table:table-cell table:style-name="ce5" office:value-type="string">
            <text:p><text:s text:c="2"/>4. Step:4</text:p>
          </table:table-cell>
          <table:table-cell table:style-name="ce5" office:value-type="string">
            <text:p>1.1. Step:1.1</text:p>
          </table:table-cell>
          <table:table-cell table:number-columns-repeated="3" table:style-name="ce5" office:value-type="string">
            <text:p><text:s text:c="2"/>4. Step:4</text:p>
          </table:table-cell>
          <table:table-cell table:number-columns-repeated="2" table:style-name="ce5"/>
          <table:table-cell table:number-columns-repeated="1014"/>
        </table:table-row>
        <table:table-row table:style-name="ro1">
          <table:table-cell table:style-name="ce2" office:value-type="string">
            <text:p><text:s text:c="2"/>1. Step:1</text:p>
          </table:table-cell>
          <table:table-cell table:style-name="ce5" office:value-type="string">
            <text:p>1.1. Step:1.1</text:p>
          </table:table-cell>
          <table:table-cell table:style-name="ce6" office:value-type="string">
            <text:p><text:s text:c="2"/>1. N</text:p>
          </table:table-cell>
          <table:table-cell table:style-name="ce5" office:value-type="string">
            <text:p>1.1. Step:1.1</text:p>
          </table:table-cell>
          <table:table-cell table:style-name="ce5" office:value-type="string">
            <text:p><text:s text:c="2"/>1. Step:1</text:p>
          </table:table-cell>
          <table:table-cell table:number-columns-repeated="3" table:style-name="ce5" office:value-type="string">
            <text:p>1.1. Step:1.1</text:p>
          </table:table-cell>
          <table:table-cell table:number-columns-repeated="2" table:style-name="ce5"/>
          <table:table-cell table:number-columns-repeated="1014"/>
        </table:table-row>
        <table:table-row table:style-name="ro1">
          <table:table-cell table:style-name="ce2" office:value-type="string">
            <text:p><text:s text:c="2"/>2. Step:2</text:p>
          </table:table-cell>
          <table:table-cell table:style-name="ce5" office:value-type="string">
            <text:p><text:s text:c="2"/>1. Step:1</text:p>
          </table:table-cell>
          <table:table-cell table:style-name="ce7" office:value-type="string">
            <text:p><text:s text:c="2"/>2. Step:1</text:p>
          </table:table-cell>
          <table:table-cell table:style-name="ce5" office:value-type="string">
            <text:p><text:s text:c="2"/>1. Step:1</text:p>
          </table:table-cell>
          <table:table-cell table:style-name="ce5" office:value-type="string">
            <text:p><text:s text:c="2"/>2. Step:2</text:p>
          </table:table-cell>
          <table:table-cell table:number-columns-repeated="3" table:style-name="ce5" office:value-type="string">
            <text:p><text:s text:c="2"/>1. Step:1</text:p>
          </table:table-cell>
          <table:table-cell table:style-name="ce6"/>
          <table:table-cell table:style-name="ce5"/>
          <table:table-cell table:number-columns-repeated="1014"/>
        </table:table-row>
        <table:table-row table:style-name="ro1">
          <table:table-cell table:style-name="ce2" office:value-type="string">
            <text:p><text:s text:c="2"/>3. Step:3</text:p>
          </table:table-cell>
          <table:table-cell table:style-name="ce5" office:value-type="string">
            <text:p><text:s text:c="2"/>2. Step:2</text:p>
          </table:table-cell>
          <table:table-cell table:style-name="ce7" office:value-type="string">
            <text:p><text:s text:c="2"/>3. Step:2</text:p>
          </table:table-cell>
          <table:table-cell table:style-name="ce5" office:value-type="string">
            <text:p><text:s text:c="2"/>2. Step:2</text:p>
          </table:table-cell>
          <table:table-cell table:style-name="ce6" office:value-type="string">
            <text:p><text:s text:c="2"/>3. N</text:p>
          </table:table-cell>
          <table:table-cell table:number-columns-repeated="3" table:style-name="ce5" office:value-type="string">
            <text:p><text:s text:c="2"/>2. Step:2</text:p>
          </table:table-cell>
          <table:table-cell table:style-name="ce7"/>
          <table:table-cell table:style-name="ce5"/>
          <table:table-cell table:number-columns-repeated="1014"/>
        </table:table-row>
        <table:table-row table:style-name="ro1">
          <table:table-cell table:style-name="ce2" office:value-type="string">
            <text:p>1.2. Step:1.2</text:p>
          </table:table-cell>
          <table:table-cell table:style-name="ce5" office:value-type="string">
            <text:p><text:s text:c="2"/>3. Step:3</text:p>
          </table:table-cell>
          <table:table-cell table:style-name="ce7" office:value-type="string">
            <text:p><text:s text:c="2"/>4. Step:3</text:p>
          </table:table-cell>
          <table:table-cell table:style-name="ce5" office:value-type="string">
            <text:p><text:s text:c="2"/>3. Step:3</text:p>
          </table:table-cell>
          <table:table-cell table:style-name="ce7" office:value-type="string">
            <text:p><text:s text:c="2"/>4. Step:3</text:p>
          </table:table-cell>
          <table:table-cell table:number-columns-repeated="3" table:style-name="ce5" office:value-type="string">
            <text:p><text:s text:c="2"/>3. Step:3</text:p>
          </table:table-cell>
          <table:table-cell table:style-name="ce7"/>
          <table:table-cell table:style-name="ce5"/>
          <table:table-cell table:number-columns-repeated="1014"/>
        </table:table-row>
        <table:table-row table:style-name="ro1">
          <table:table-cell table:style-name="ce2" office:value-type="string">
            <text:p><text:s text:c="2"/>1. Step:1</text:p>
          </table:table-cell>
          <table:table-cell table:number-columns-repeated="7" table:style-name="ce5" office:value-type="string">
            <text:p>1.2. Step:1.2</text:p>
          </table:table-cell>
          <table:table-cell table:number-columns-repeated="2" table:style-name="ce5"/>
          <table:table-cell table:number-columns-repeated="1014"/>
        </table:table-row>
        <table:table-row table:style-name="ro1">
          <table:table-cell table:style-name="ce2" office:value-type="string">
            <text:p><text:s text:c="2"/>2. Step:2</text:p>
          </table:table-cell>
          <table:table-cell table:number-columns-repeated="7" table:style-name="ce5" office:value-type="string">
            <text:p><text:s text:c="2"/>1. Step:1</text:p>
          </table:table-cell>
          <table:table-cell table:number-columns-repeated="2" table:style-name="ce5"/>
          <table:table-cell table:number-columns-repeated="1014"/>
        </table:table-row>
        <table:table-row table:style-name="ro1">
          <table:table-cell/>
          <table:table-cell table:number-columns-repeated="7" table:style-name="ce5" office:value-type="string">
            <text:p><text:s text:c="2"/>2. Step:2</text:p>
          </table:table-cell>
          <table:table-cell table:number-columns-repeated="2"/>
          <table:table-cell table:number-columns-repeated="1014"/>
        </table:table-row>
        <table:table-row table:style-name="ro2" table:number-rows-repeated="5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style-name="ce3"/>
          <table:table-cell table:style-name="ce3" table:formula="of:=&quot;&quot;&quot;decreasing &quot;&amp;[.B$1]&amp;&quot;&quot;&quot; in { test(&quot;&quot;&quot;&amp;[.B$1]&amp;&quot;&quot;&quot;, &quot;&quot;&quot;&quot;&quot;&quot;&quot;" office:value-type="string" office:string-value="&quot;decreasing 1.0&quot; in { test(&quot;1.0&quot;, &quot;&quot;&quot;">
            <text:p>"decreasing 1.0" in { test("1.0", """</text:p>
          </table:table-cell>
          <table:table-cell table:style-name="ce3" table:formula="of:=&quot;&quot;&quot;decreasing &quot;&amp;[.C$1]&amp;&quot;&quot;&quot; in { test(&quot;&quot;&quot;&amp;[.C$1]&amp;&quot;&quot;&quot;, &quot;&quot;&quot;&quot;&quot;&quot;&quot;" office:value-type="string" office:string-value="&quot;decreasing 1.1&quot; in { test(&quot;1.1&quot;, &quot;&quot;&quot;">
            <text:p>"decreasing 1.1" in { test("1.1", """</text:p>
          </table:table-cell>
          <table:table-cell table:style-name="ce3" table:formula="of:=&quot;&quot;&quot;decreasing &quot;&amp;[.D$1]&amp;&quot;&quot;&quot; in { test(&quot;&quot;&quot;&amp;[.D$1]&amp;&quot;&quot;&quot;, &quot;&quot;&quot;&quot;&quot;&quot;&quot;" office:value-type="string" office:string-value="&quot;decreasing 1.0.2&quot; in { test(&quot;1.0.2&quot;, &quot;&quot;&quot;">
            <text:p>"decreasing 1.0.2" in { test("1.0.2", """</text:p>
          </table:table-cell>
          <table:table-cell table:style-name="ce3" table:formula="of:=&quot;&quot;&quot;decreasing &quot;&amp;[.E$1]&amp;&quot;&quot;&quot; in { test(&quot;&quot;&quot;&amp;[.E$1]&amp;&quot;&quot;&quot;, &quot;&quot;&quot;&quot;&quot;&quot;&quot;" office:value-type="string" office:string-value="&quot;decreasing 1.1.2&quot; in { test(&quot;1.1.2&quot;, &quot;&quot;&quot;">
            <text:p>"decreasing 1.1.2" in { test("1.1.2", """</text:p>
          </table:table-cell>
          <table:table-cell table:style-name="ce3" table:formula="of:=&quot;&quot;&quot;decreasing &quot;&amp;[.F$1]&amp;&quot;&quot;&quot; in { test(&quot;&quot;&quot;&amp;[.F$1]&amp;&quot;&quot;&quot;, &quot;&quot;&quot;&quot;&quot;&quot;&quot;" office:value-type="string" office:string-value="&quot;decreasing 1.0.2.a&quot; in { test(&quot;1.0.2.a&quot;, &quot;&quot;&quot;">
            <text:p>"decreasing 1.0.2.a" in { test("1.0.2.a", """</text:p>
          </table:table-cell>
          <table:table-cell table:style-name="ce3" table:formula="of:=&quot;&quot;&quot;decreasing &quot;&amp;[.G$1]&amp;&quot;&quot;&quot; in { test(&quot;&quot;&quot;&amp;[.G$1]&amp;&quot;&quot;&quot;, &quot;&quot;&quot;&quot;&quot;&quot;&quot;" office:value-type="string" office:string-value="&quot;decreasing 1.0.2.a.i&quot; in { test(&quot;1.0.2.a.i&quot;, &quot;&quot;&quot;">
            <text:p>"decreasing 1.0.2.a.i" in { test("1.0.2.a.i", """</text:p>
          </table:table-cell>
          <table:table-cell table:style-name="ce3" table:formula="of:=&quot;&quot;&quot;decreasing &quot;&amp;[.H$1]&amp;&quot;&quot;&quot; in { test(&quot;&quot;&quot;&amp;[.H$1]&amp;&quot;&quot;&quot;, &quot;&quot;&quot;&quot;&quot;&quot;&quot;" office:value-type="string" office:string-value="&quot;decreasing 1.0.2.c.ii&quot; in { test(&quot;1.0.2.c.ii&quot;, &quot;&quot;&quot;">
            <text:p>"decreasing 1.0.2.c.ii" in { test("1.0.2.c.ii", """</text:p>
          </table:table-cell>
          <table:table-cell table:style-name="ce3" table:formula="of:=&quot;&quot;&quot;decreasing &quot;&amp;[.I$1]&amp;&quot;&quot;&quot; in { test(&quot;&quot;&quot;&amp;[.I$1]&amp;&quot;&quot;&quot;, &quot;&quot;&quot;&quot;&quot;&quot;&quot;" office:value-type="string" office:string-value="&quot;decreasing &quot; in { test(&quot;&quot;, &quot;&quot;&quot;">
            <text:p>"decreasing " in { test("", """</text:p>
          </table:table-cell>
          <table:table-cell table:style-name="ce3" table:formula="of:=&quot;&quot;&quot;decreasing &quot;&amp;[.J$1]&amp;&quot;&quot;&quot; in { test(&quot;&quot;&quot;&amp;[.J$1]&amp;&quot;&quot;&quot;, &quot;&quot;&quot;&quot;&quot;&quot;&quot;" office:value-type="string" office:string-value="&quot;decreasing &quot; in { test(&quot;&quot;, &quot;&quot;&quot;">
            <text:p>"decreasing " in { test("", """</text:p>
          </table:table-cell>
          <table:table-cell table:style-name="ce3" office:value-type="string">
            <text:p><text:s/></text:p>
          </table:table-cell>
          <table:table-cell table:style-name="ce3" table:number-columns-repeated="1013"/>
        </table:table-row>
        <table:table-row table:style-name="ro1">
          <table:table-cell table:style-name="ce3" table:formula="of:=CHAR(13)&amp;&quot;          &quot;" office:value-type="string" office:string-value="&#13;          ">
            <text:p> <text:s text:c="9"/></text:p>
          </table:table-cell>
          <table:table-cell table:style-name="ce3" table:formula="of:=[.$A34]&amp;[.B$2]&amp;[.$A34]&amp;[.B$3]&amp;[.$A34]&amp;[.B$4]&amp;[.$A34]&amp;[.B$5]&amp;[.$A34]&amp;[.B$6]&amp;[.$A34]&amp;[.B$7]&amp;[.$A34]&amp;[.B$8]&amp;[.$A34]&amp;[.B$9]&amp;[.$A34]&amp;[.B$10]&amp;[.$A34]&amp;[.B$11]&amp;[.$A34]&amp;[.B$12]&amp;[.$A34]&amp;[.B$13]&amp;[.$A34]&amp;[.B$14]&amp;[.$A34]&amp;[.B$15]&amp;[.$A34]&amp;[.B$16]&amp;[.$A34]&amp;[.B$17]&amp;[.$A34]&amp;[.B$18]&amp;[.$A34]&amp;[.B$19]&amp;[.$A34]&amp;[.B$20]&amp;[.$A34]&amp;[.B$21]&amp;[.$A34]&amp;[.B$22]&amp;[.$A34]&amp;[.B$23]&amp;[.$A34]&amp;[.B$24]&amp;[.$A34]&amp;[.B$25]" office:value-type="string" office:string-value="&#13;          1.0. Step:1.0&#13;            1. N&#13;            2. Step:1&#13;            3. Step:2&#13;              a. Step:a&#13;                i. Step:i&#13;                ii. Step:ii&#13;                iii. Step:iii&#13;              b. Step:b&#13;              c. Step:c&#13;                i. Step:i&#13;                ii. Step:ii&#13;            4. Step:3&#13;              a. Step:a&#13;                i. Step:i&#13;              b. Step:b&#13;            5. Step:4&#13;          1.1. Step:1.1&#13;            1. Step:1&#13;            2. Step:2&#13;            3. Step:3&#13;          1.2. Step:1.2&#13;            1. Step:1&#13;            2. Step:2">
            <text:p> <text:s text:c="9"/>1.0. Step:1.0 <text:s text:c="11"/>1. N <text:s text:c="11"/>2. Step:1 <text:s text:c="11"/>3. Step:2 <text:s text:c="13"/>a. Step:a <text:s text:c="15"/>i. Step:i <text:s text:c="15"/>ii. Step:ii <text:s text:c="15"/>iii. Step:iii <text:s text:c="13"/>b. Step:b <text:s text:c="13"/>c. Step:c <text:s text:c="15"/>i. Step:i <text:s text:c="15"/>ii. Step:ii <text:s text:c="11"/>4. Step:3 <text:s text:c="13"/>a. Step:a <text:s text:c="15"/>i. Step:i <text:s text:c="13"/>b. Step:b <text:s text:c="11"/>5. Step:4 <text:s text:c="9"/>1.1. Step:1.1 <text:s text:c="11"/>1. Step:1 <text:s text:c="11"/>2. Step:2 <text:s text:c="11"/>3. Step:3 <text:s text:c="9"/>1.2. Step:1.2 <text:s text:c="11"/>1. Step:1 <text:s text:c="11"/>2. Step:2</text:p>
          </table:table-cell>
          <table:table-cell table:style-name="ce3" table:formula="of:=[.$A34]&amp;[.C$2]&amp;[.$A34]&amp;[.C$3]&amp;[.$A34]&amp;[.C$4]&amp;[.$A34]&amp;[.C$5]&amp;[.$A34]&amp;[.C$6]&amp;[.$A34]&amp;[.C$7]&amp;[.$A34]&amp;[.C$8]&amp;[.$A34]&amp;[.C$9]&amp;[.$A34]&amp;[.C$10]&amp;[.$A34]&amp;[.C$11]&amp;[.$A34]&amp;[.C$12]&amp;[.$A34]&amp;[.C$13]&amp;[.$A34]&amp;[.C$14]&amp;[.$A34]&amp;[.C$15]&amp;[.$A34]&amp;[.C$16]&amp;[.$A34]&amp;[.C$17]&amp;[.$A34]&amp;[.C$18]&amp;[.$A34]&amp;[.C$19]&amp;[.$A34]&amp;[.C$20]&amp;[.$A34]&amp;[.C$21]&amp;[.$A34]&amp;[.C$22]&amp;[.$A34]&amp;[.C$23]&amp;[.$A34]&amp;[.C$24]&amp;[.$A34]&amp;[.C$25]" office:value-type="string" office:string-value="&#13;          1.0. Step:1.0&#13;            1. Step:1&#13;            2. Step:2&#13;              a. Step:a&#13;                i. Step:i&#13;                ii. Step:ii&#13;                iii. Step:iii&#13;              b. Step:b&#13;              c. Step:c&#13;                i. Step:i&#13;                ii. Step:ii&#13;            3. Step:3&#13;              a. Step:a&#13;                i. Step:i&#13;              b. Step:b&#13;            4. Step:4&#13;          1.1. Step:1.1&#13;            1. N&#13;            2. Step:1&#13;            3. Step:2&#13;            4. Step:3&#13;          1.2. Step:1.2&#13;            1. Step:1&#13;            2. Step:2">
            <text:p> <text:s text:c="9"/>1.0. Step:1.0 <text:s text:c="11"/>1. Step:1 <text:s text:c="11"/>2. Step:2 <text:s text:c="13"/>a. Step:a <text:s text:c="15"/>i. Step:i <text:s text:c="15"/>ii. Step:ii <text:s text:c="15"/>iii. Step:iii <text:s text:c="13"/>b. Step:b <text:s text:c="13"/>c. Step:c <text:s text:c="15"/>i. Step:i <text:s text:c="15"/>ii. Step:ii <text:s text:c="11"/>3. Step:3 <text:s text:c="13"/>a. Step:a <text:s text:c="15"/>i. Step:i <text:s text:c="13"/>b. Step:b <text:s text:c="11"/>4. Step:4 <text:s text:c="9"/>1.1. Step:1.1 <text:s text:c="11"/>1. N <text:s text:c="11"/>2. Step:1 <text:s text:c="11"/>3. Step:2 <text:s text:c="11"/>4. Step:3 <text:s text:c="9"/>1.2. Step:1.2 <text:s text:c="11"/>1. Step:1 <text:s text:c="11"/>2. Step:2</text:p>
          </table:table-cell>
          <table:table-cell table:style-name="ce3" table:formula="of:=[.$A34]&amp;[.D$2]&amp;[.$A34]&amp;[.D$3]&amp;[.$A34]&amp;[.D$4]&amp;[.$A34]&amp;[.D$5]&amp;[.$A34]&amp;[.D$6]&amp;[.$A34]&amp;[.D$7]&amp;[.$A34]&amp;[.D$8]&amp;[.$A34]&amp;[.D$9]&amp;[.$A34]&amp;[.D$10]&amp;[.$A34]&amp;[.D$11]&amp;[.$A34]&amp;[.D$12]&amp;[.$A34]&amp;[.D$13]&amp;[.$A34]&amp;[.D$14]&amp;[.$A34]&amp;[.D$15]&amp;[.$A34]&amp;[.D$16]&amp;[.$A34]&amp;[.D$17]&amp;[.$A34]&amp;[.D$18]&amp;[.$A34]&amp;[.D$19]&amp;[.$A34]&amp;[.D$20]&amp;[.$A34]&amp;[.D$21]&amp;[.$A34]&amp;[.D$22]&amp;[.$A34]&amp;[.D$23]&amp;[.$A34]&amp;[.D$24]&amp;[.$A34]&amp;[.D$25]" office:value-type="string" office:string-value="&#13;          1.0. Step:1.0&#13;            1. Step:1&#13;            2. Step:2&#13;              a. N&#13;              b. Step:a&#13;                i. Step:i&#13;                ii. Step:ii&#13;                iii. Step:iii&#13;              c. Step:b&#13;              d. Step:c&#13;                i. Step:i&#13;                ii. Step:ii&#13;            3. Step:3&#13;              a. Step:a&#13;                i. Step:i&#13;              b. Step:b&#13;            4. Step:4&#13;          1.1. Step:1.1&#13;            1. Step:1&#13;            2. Step:2&#13;            3. Step:3&#13;          1.2. Step:1.2&#13;            1. Step:1&#13;            2. Step:2">
            <text:p> <text:s text:c="9"/>1.0. Step:1.0 <text:s text:c="11"/>1. Step:1 <text:s text:c="11"/>2. Step:2 <text:s text:c="13"/>a. N <text:s text:c="13"/>b. Step:a <text:s text:c="15"/>i. Step:i <text:s text:c="15"/>ii. Step:ii <text:s text:c="15"/>iii. Step:iii <text:s text:c="13"/>c. Step:b <text:s text:c="13"/>d. Step:c <text:s text:c="15"/>i. Step:i <text:s text:c="15"/>ii. Step:ii <text:s text:c="11"/>3. Step:3 <text:s text:c="13"/>a. Step:a <text:s text:c="15"/>i. Step:i <text:s text:c="13"/>b. Step:b <text:s text:c="11"/>4. Step:4 <text:s text:c="9"/>1.1. Step:1.1 <text:s text:c="11"/>1. Step:1 <text:s text:c="11"/>2. Step:2 <text:s text:c="11"/>3. Step:3 <text:s text:c="9"/>1.2. Step:1.2 <text:s text:c="11"/>1. Step:1 <text:s text:c="11"/>2. Step:2</text:p>
          </table:table-cell>
          <table:table-cell table:style-name="ce3" table:formula="of:=[.$A34]&amp;[.E$2]&amp;[.$A34]&amp;[.E$3]&amp;[.$A34]&amp;[.E$4]&amp;[.$A34]&amp;[.E$5]&amp;[.$A34]&amp;[.E$6]&amp;[.$A34]&amp;[.E$7]&amp;[.$A34]&amp;[.E$8]&amp;[.$A34]&amp;[.E$9]&amp;[.$A34]&amp;[.E$10]&amp;[.$A34]&amp;[.E$11]&amp;[.$A34]&amp;[.E$12]&amp;[.$A34]&amp;[.E$13]&amp;[.$A34]&amp;[.E$14]&amp;[.$A34]&amp;[.E$15]&amp;[.$A34]&amp;[.E$16]&amp;[.$A34]&amp;[.E$17]&amp;[.$A34]&amp;[.E$18]&amp;[.$A34]&amp;[.E$19]&amp;[.$A34]&amp;[.E$20]&amp;[.$A34]&amp;[.E$21]&amp;[.$A34]&amp;[.E$22]&amp;[.$A34]&amp;[.E$23]&amp;[.$A34]&amp;[.E$24]&amp;[.$A34]&amp;[.E$25]" office:value-type="string" office:string-value="&#13;          1.0. Step:1.0&#13;            1. Step:1&#13;            2. Step:2&#13;              a. Step:a&#13;                i. Step:i&#13;                ii. Step:ii&#13;                iii. Step:iii&#13;              b. Step:b&#13;              c. Step:c&#13;                i. Step:i&#13;                ii. Step:ii&#13;            3. Step:3&#13;              a. Step:a&#13;                i. Step:i&#13;              b. Step:b&#13;            4. Step:4&#13;          1.1. Step:1.1&#13;            1. Step:1&#13;            2. Step:2&#13;            3. N&#13;            4. Step:3&#13;          1.2. Step:1.2&#13;            1. Step:1&#13;            2. Step:2">
            <text:p> <text:s text:c="9"/>1.0. Step:1.0 <text:s text:c="11"/>1. Step:1 <text:s text:c="11"/>2. Step:2 <text:s text:c="13"/>a. Step:a <text:s text:c="15"/>i. Step:i <text:s text:c="15"/>ii. Step:ii <text:s text:c="15"/>iii. Step:iii <text:s text:c="13"/>b. Step:b <text:s text:c="13"/>c. Step:c <text:s text:c="15"/>i. Step:i <text:s text:c="15"/>ii. Step:ii <text:s text:c="11"/>3. Step:3 <text:s text:c="13"/>a. Step:a <text:s text:c="15"/>i. Step:i <text:s text:c="13"/>b. Step:b <text:s text:c="11"/>4. Step:4 <text:s text:c="9"/>1.1. Step:1.1 <text:s text:c="11"/>1. Step:1 <text:s text:c="11"/>2. Step:2 <text:s text:c="11"/>3. N <text:s text:c="11"/>4. Step:3 <text:s text:c="9"/>1.2. Step:1.2 <text:s text:c="11"/>1. Step:1 <text:s text:c="11"/>2. Step:2</text:p>
          </table:table-cell>
          <table:table-cell table:style-name="ce3" table:formula="of:=[.$A34]&amp;[.F$2]&amp;[.$A34]&amp;[.F$3]&amp;[.$A34]&amp;[.F$4]&amp;[.$A34]&amp;[.F$5]&amp;[.$A34]&amp;[.F$6]&amp;[.$A34]&amp;[.F$7]&amp;[.$A34]&amp;[.F$8]&amp;[.$A34]&amp;[.F$9]&amp;[.$A34]&amp;[.F$10]&amp;[.$A34]&amp;[.F$11]&amp;[.$A34]&amp;[.F$12]&amp;[.$A34]&amp;[.F$13]&amp;[.$A34]&amp;[.F$14]&amp;[.$A34]&amp;[.F$15]&amp;[.$A34]&amp;[.F$16]&amp;[.$A34]&amp;[.F$17]&amp;[.$A34]&amp;[.F$18]&amp;[.$A34]&amp;[.F$19]&amp;[.$A34]&amp;[.F$20]&amp;[.$A34]&amp;[.F$21]&amp;[.$A34]&amp;[.F$22]&amp;[.$A34]&amp;[.F$23]&amp;[.$A34]&amp;[.F$24]&amp;[.$A34]&amp;[.F$25]" office:value-type="string" office:string-value="&#13;          1.0. Step:1.0&#13;            1. Step:1&#13;            2. Step:2&#13;              a. Step:a&#13;                i. N&#13;                ii. Step:i&#13;                iii. Step:ii&#13;                iv. Step:iii&#13;              b. Step:b&#13;              c. Step:c&#13;                i. Step:i&#13;                ii. Step:ii&#13;            3. Step:3&#13;              a. Step:a&#13;                i. Step:i&#13;              b. Step:b&#13;            4. Step:4&#13;          1.1. Step:1.1&#13;            1. Step:1&#13;            2. Step:2&#13;            3. Step:3&#13;          1.2. Step:1.2&#13;            1. Step:1&#13;            2. Step:2">
            <text:p> <text:s text:c="9"/>1.0. Step:1.0 <text:s text:c="11"/>1. Step:1 <text:s text:c="11"/>2. Step:2 <text:s text:c="13"/>a. Step:a <text:s text:c="15"/>i. N <text:s text:c="15"/>ii. Step:i <text:s text:c="15"/>iii. Step:ii <text:s text:c="15"/>iv. Step:iii <text:s text:c="13"/>b. Step:b <text:s text:c="13"/>c. Step:c <text:s text:c="15"/>i. Step:i <text:s text:c="15"/>ii. Step:ii <text:s text:c="11"/>3. Step:3 <text:s text:c="13"/>a. Step:a <text:s text:c="15"/>i. Step:i <text:s text:c="13"/>b. Step:b <text:s text:c="11"/>4. Step:4 <text:s text:c="9"/>1.1. Step:1.1 <text:s text:c="11"/>1. Step:1 <text:s text:c="11"/>2. Step:2 <text:s text:c="11"/>3. Step:3 <text:s text:c="9"/>1.2. Step:1.2 <text:s text:c="11"/>1. Step:1 <text:s text:c="11"/>2. Step:2</text:p>
          </table:table-cell>
          <table:table-cell table:style-name="ce3" table:formula="of:=[.$A34]&amp;[.G$2]&amp;[.$A34]&amp;[.G$3]&amp;[.$A34]&amp;[.G$4]&amp;[.$A34]&amp;[.G$5]&amp;[.$A34]&amp;[.G$6]&amp;[.$A34]&amp;[.G$7]&amp;[.$A34]&amp;[.G$8]&amp;[.$A34]&amp;[.G$9]&amp;[.$A34]&amp;[.G$10]&amp;[.$A34]&amp;[.G$11]&amp;[.$A34]&amp;[.G$12]&amp;[.$A34]&amp;[.G$13]&amp;[.$A34]&amp;[.G$14]&amp;[.$A34]&amp;[.G$15]&amp;[.$A34]&amp;[.G$16]&amp;[.$A34]&amp;[.G$17]&amp;[.$A34]&amp;[.G$18]&amp;[.$A34]&amp;[.G$19]&amp;[.$A34]&amp;[.G$20]&amp;[.$A34]&amp;[.G$21]&amp;[.$A34]&amp;[.G$22]&amp;[.$A34]&amp;[.G$23]&amp;[.$A34]&amp;[.G$24]&amp;[.$A34]&amp;[.G$25]" office:value-type="string" office:string-value="&#13;          1.0. Step:1.0&#13;            1. Step:1&#13;            2. Step:2&#13;              a. Step:a&#13;                i. Step:i&#13;                ii. N&#13;                iii. Step:ii&#13;                iv. Step:iii&#13;              b. Step:b&#13;              c. Step:c&#13;                i. Step:i&#13;                ii. Step:ii&#13;            3. Step:3&#13;              a. Step:a&#13;                i. Step:i&#13;              b. Step:b&#13;            4. Step:4&#13;          1.1. Step:1.1&#13;            1. Step:1&#13;            2. Step:2&#13;            3. Step:3&#13;          1.2. Step:1.2&#13;            1. Step:1&#13;            2. Step:2">
            <text:p> <text:s text:c="9"/>1.0. Step:1.0 <text:s text:c="11"/>1. Step:1 <text:s text:c="11"/>2. Step:2 <text:s text:c="13"/>a. Step:a <text:s text:c="15"/>i. Step:i <text:s text:c="15"/>ii. N <text:s text:c="15"/>iii. Step:ii <text:s text:c="15"/>iv. Step:iii <text:s text:c="13"/>b. Step:b <text:s text:c="13"/>c. Step:c <text:s text:c="15"/>i. Step:i <text:s text:c="15"/>ii. Step:ii <text:s text:c="11"/>3. Step:3 <text:s text:c="13"/>a. Step:a <text:s text:c="15"/>i. Step:i <text:s text:c="13"/>b. Step:b <text:s text:c="11"/>4. Step:4 <text:s text:c="9"/>1.1. Step:1.1 <text:s text:c="11"/>1. Step:1 <text:s text:c="11"/>2. Step:2 <text:s text:c="11"/>3. Step:3 <text:s text:c="9"/>1.2. Step:1.2 <text:s text:c="11"/>1. Step:1 <text:s text:c="11"/>2. Step:2</text:p>
          </table:table-cell>
          <table:table-cell table:style-name="ce3" table:formula="of:=[.$A34]&amp;[.H$2]&amp;[.$A34]&amp;[.H$3]&amp;[.$A34]&amp;[.H$4]&amp;[.$A34]&amp;[.H$5]&amp;[.$A34]&amp;[.H$6]&amp;[.$A34]&amp;[.H$7]&amp;[.$A34]&amp;[.H$8]&amp;[.$A34]&amp;[.H$9]&amp;[.$A34]&amp;[.H$10]&amp;[.$A34]&amp;[.H$11]&amp;[.$A34]&amp;[.H$12]&amp;[.$A34]&amp;[.H$13]&amp;[.$A34]&amp;[.H$14]&amp;[.$A34]&amp;[.H$15]&amp;[.$A34]&amp;[.H$16]&amp;[.$A34]&amp;[.H$17]&amp;[.$A34]&amp;[.H$18]&amp;[.$A34]&amp;[.H$19]&amp;[.$A34]&amp;[.H$20]&amp;[.$A34]&amp;[.H$21]&amp;[.$A34]&amp;[.H$22]&amp;[.$A34]&amp;[.H$23]&amp;[.$A34]&amp;[.H$24]&amp;[.$A34]&amp;[.H$25]" office:value-type="string" office:string-value="&#13;          1.0. Step:1.0&#13;            1. Step:1&#13;            2. Step:2&#13;              a. Step:a&#13;                i. Step:i&#13;                ii. Step:ii&#13;                iii. Step:iii&#13;              b. Step:b&#13;              c. Step:c&#13;                i. Step:i&#13;                ii. Step:ii&#13;                iii. N&#13;            3. Step:3&#13;              a. Step:a&#13;                i. Step:i&#13;              b. Step:b&#13;            4. Step:4&#13;          1.1. Step:1.1&#13;            1. Step:1&#13;            2. Step:2&#13;            3. Step:3&#13;          1.2. Step:1.2&#13;            1. Step:1&#13;            2. Step:2">
            <text:p> <text:s text:c="9"/>1.0. Step:1.0 <text:s text:c="11"/>1. Step:1 <text:s text:c="11"/>2. Step:2 <text:s text:c="13"/>a. Step:a <text:s text:c="15"/>i. Step:i <text:s text:c="15"/>ii. Step:ii <text:s text:c="15"/>iii. Step:iii <text:s text:c="13"/>b. Step:b <text:s text:c="13"/>c. Step:c <text:s text:c="15"/>i. Step:i <text:s text:c="15"/>ii. Step:ii <text:s text:c="15"/>iii. N <text:s text:c="11"/>3. Step:3 <text:s text:c="13"/>a. Step:a <text:s text:c="15"/>i. Step:i <text:s text:c="13"/>b. Step:b <text:s text:c="11"/>4. Step:4 <text:s text:c="9"/>1.1. Step:1.1 <text:s text:c="11"/>1. Step:1 <text:s text:c="11"/>2. Step:2 <text:s text:c="11"/>3. Step:3 <text:s text:c="9"/>1.2. Step:1.2 <text:s text:c="11"/>1. Step:1 <text:s text:c="11"/>2. Step:2</text:p>
          </table:table-cell>
          <table:table-cell table:style-name="ce3" table:formula="of:=[.$A34]&amp;[.I$2]&amp;[.$A34]&amp;[.I$3]&amp;[.$A34]&amp;[.I$4]&amp;[.$A34]&amp;[.I$5]&amp;[.$A34]&amp;[.I$6]&amp;[.$A34]&amp;[.I$7]&amp;[.$A34]&amp;[.I$8]&amp;[.$A34]&amp;[.I$9]&amp;[.$A34]&amp;[.I$10]&amp;[.$A34]&amp;[.I$11]&amp;[.$A34]&amp;[.I$12]&amp;[.$A34]&amp;[.I$13]&amp;[.$A34]&amp;[.I$14]&amp;[.$A34]&amp;[.I$15]&amp;[.$A34]&amp;[.I$16]&amp;[.$A34]&amp;[.I$17]&amp;[.$A34]&amp;[.I$18]&amp;[.$A34]&amp;[.I$19]&amp;[.$A34]&amp;[.I$20]&amp;[.$A34]&amp;[.I$21]&amp;[.$A34]&amp;[.I$22]&amp;[.$A34]&amp;[.I$23]&amp;[.$A34]&amp;[.I$24]&amp;[.$A34]&amp;[.I$25]" office:value-type="string" office:string-value="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">
            <text:p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</text:p>
          </table:table-cell>
          <table:table-cell table:style-name="ce3" table:formula="of:=[.$A34]&amp;[.J$2]&amp;[.$A34]&amp;[.J$3]&amp;[.$A34]&amp;[.J$4]&amp;[.$A34]&amp;[.J$5]&amp;[.$A34]&amp;[.J$6]&amp;[.$A34]&amp;[.J$7]&amp;[.$A34]&amp;[.J$8]&amp;[.$A34]&amp;[.J$9]&amp;[.$A34]&amp;[.J$10]&amp;[.$A34]&amp;[.J$11]&amp;[.$A34]&amp;[.J$12]&amp;[.$A34]&amp;[.J$13]&amp;[.$A34]&amp;[.J$14]&amp;[.$A34]&amp;[.J$15]&amp;[.$A34]&amp;[.J$16]&amp;[.$A34]&amp;[.J$17]&amp;[.$A34]&amp;[.J$18]&amp;[.$A34]&amp;[.J$19]&amp;[.$A34]&amp;[.J$20]&amp;[.$A34]&amp;[.J$21]&amp;[.$A34]&amp;[.J$22]&amp;[.$A34]&amp;[.J$23]&amp;[.$A34]&amp;[.J$24]&amp;[.$A34]&amp;[.J$25]" office:value-type="string" office:string-value="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">
            <text:p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</text:p>
          </table:table-cell>
          <table:table-cell table:style-name="ce3" office:value-type="string">
            <text:p><text:s/></text:p>
          </table:table-cell>
          <table:table-cell table:style-name="ce3" table:number-columns-repeated="1013"/>
        </table:table-row>
        <table:table-row table:style-name="ro1">
          <table:table-cell table:style-name="ce3"/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office:value-type="string">
            <text:p><text:s/></text:p>
          </table:table-cell>
          <table:table-cell table:style-name="ce3" table:number-columns-repeated="1013"/>
        </table:table-row>
        <table:table-row table:style-name="ro1">
          <table:table-cell table:style-name="ce4" office:value-type="string">
            <text:p>Full Test →</text:p>
          </table:table-cell>
          <table:table-cell table:formula="of:=[.B33]&amp;[.B34]&amp;CHAR(13)&amp;[.B35]" office:value-type="string" office:string-value="&quot;decreasing 1.0&quot; in { test(&quot;1.0&quot;, &quot;&quot;&quot;&#13;          1.0. Step:1.0&#13;            1. N&#13;            2. Step:1&#13;            3. Step:2&#13;              a. Step:a&#13;                i. Step:i&#13;                ii. Step:ii&#13;                iii. Step:iii&#13;              b. Step:b&#13;              c. Step:c&#13;                i. Step:i&#13;                ii. Step:ii&#13;            4. Step:3&#13;              a. Step:a&#13;                i. Step:i&#13;              b. Step:b&#13;            5. Step:4&#13;          1.1. Step:1.1&#13;            1. Step:1&#13;            2. Step:2&#13;            3. Step:3&#13;          1.2. Step:1.2&#13;            1. Step:1&#13;            2. Step:2&#13;    &quot;&quot;&quot;)}&#13;&#13;">
            <text:p>"decreasing 1.0" in { test("1.0", """ <text:s text:c="9"/>1.0. Step:1.0 <text:s text:c="11"/>1. N <text:s text:c="11"/>2. Step:1 <text:s text:c="11"/>3. Step:2 <text:s text:c="13"/>a. Step:a <text:s text:c="15"/>i. Step:i <text:s text:c="15"/>ii. Step:ii <text:s text:c="15"/>iii. Step:iii <text:s text:c="13"/>b. Step:b <text:s text:c="13"/>c. Step:c <text:s text:c="15"/>i. Step:i <text:s text:c="15"/>ii. Step:ii <text:s text:c="11"/>4. Step:3 <text:s text:c="13"/>a. Step:a <text:s text:c="15"/>i. Step:i <text:s text:c="13"/>b. Step:b <text:s text:c="11"/>5. Step:4 <text:s text:c="9"/>1.1. Step:1.1 <text:s text:c="11"/>1. Step:1 <text:s text:c="11"/>2. Step:2 <text:s text:c="11"/>3. Step:3 <text:s text:c="9"/>1.2. Step:1.2 <text:s text:c="11"/>1. Step:1 <text:s text:c="11"/>2. Step:2 <text:s text:c="3"/>""")}</text:p>
          </table:table-cell>
          <table:table-cell table:formula="of:=[.C33]&amp;[.C34]&amp;CHAR(13)&amp;[.C35]" office:value-type="string" office:string-value="&quot;decreasing 1.1&quot; in { test(&quot;1.1&quot;, &quot;&quot;&quot;&#13;          1.0. Step:1.0&#13;            1. Step:1&#13;            2. Step:2&#13;              a. Step:a&#13;                i. Step:i&#13;                ii. Step:ii&#13;                iii. Step:iii&#13;              b. Step:b&#13;              c. Step:c&#13;                i. Step:i&#13;                ii. Step:ii&#13;            3. Step:3&#13;              a. Step:a&#13;                i. Step:i&#13;              b. Step:b&#13;            4. Step:4&#13;          1.1. Step:1.1&#13;            1. N&#13;            2. Step:1&#13;            3. Step:2&#13;            4. Step:3&#13;          1.2. Step:1.2&#13;            1. Step:1&#13;            2. Step:2&#13;    &quot;&quot;&quot;)}&#13;&#13;">
            <text:p>"decreasing 1.1" in { test("1.1", """ <text:s text:c="9"/>1.0. Step:1.0 <text:s text:c="11"/>1. Step:1 <text:s text:c="11"/>2. Step:2 <text:s text:c="13"/>a. Step:a <text:s text:c="15"/>i. Step:i <text:s text:c="15"/>ii. Step:ii <text:s text:c="15"/>iii. Step:iii <text:s text:c="13"/>b. Step:b <text:s text:c="13"/>c. Step:c <text:s text:c="15"/>i. Step:i <text:s text:c="15"/>ii. Step:ii <text:s text:c="11"/>3. Step:3 <text:s text:c="13"/>a. Step:a <text:s text:c="15"/>i. Step:i <text:s text:c="13"/>b. Step:b <text:s text:c="11"/>4. Step:4 <text:s text:c="9"/>1.1. Step:1.1 <text:s text:c="11"/>1. N <text:s text:c="11"/>2. Step:1 <text:s text:c="11"/>3. Step:2 <text:s text:c="11"/>4. Step:3 <text:s text:c="9"/>1.2. Step:1.2 <text:s text:c="11"/>1. Step:1 <text:s text:c="11"/>2. Step:2 <text:s text:c="3"/>""")}</text:p>
          </table:table-cell>
          <table:table-cell table:formula="of:=[.D33]&amp;[.D34]&amp;CHAR(13)&amp;[.D35]" office:value-type="string" office:string-value="&quot;decreasing 1.0.2&quot; in { test(&quot;1.0.2&quot;, &quot;&quot;&quot;&#13;          1.0. Step:1.0&#13;            1. Step:1&#13;            2. Step:2&#13;              a. N&#13;              b. Step:a&#13;                i. Step:i&#13;                ii. Step:ii&#13;                iii. Step:iii&#13;              c. Step:b&#13;              d. Step:c&#13;                i. Step:i&#13;                ii. Step:ii&#13;            3. Step:3&#13;              a. Step:a&#13;                i. Step:i&#13;              b. Step:b&#13;            4. Step:4&#13;          1.1. Step:1.1&#13;            1. Step:1&#13;            2. Step:2&#13;            3. Step:3&#13;          1.2. Step:1.2&#13;            1. Step:1&#13;            2. Step:2&#13;    &quot;&quot;&quot;)}&#13;&#13;">
            <text:p>"decreasing 1.0.2" in { test("1.0.2", """ <text:s text:c="9"/>1.0. Step:1.0 <text:s text:c="11"/>1. Step:1 <text:s text:c="11"/>2. Step:2 <text:s text:c="13"/>a. N <text:s text:c="13"/>b. Step:a <text:s text:c="15"/>i. Step:i <text:s text:c="15"/>ii. Step:ii <text:s text:c="15"/>iii. Step:iii <text:s text:c="13"/>c. Step:b <text:s text:c="13"/>d. Step:c <text:s text:c="15"/>i. Step:i <text:s text:c="15"/>ii. Step:ii <text:s text:c="11"/>3. Step:3 <text:s text:c="13"/>a. Step:a <text:s text:c="15"/>i. Step:i <text:s text:c="13"/>b. Step:b <text:s text:c="11"/>4. Step:4 <text:s text:c="9"/>1.1. Step:1.1 <text:s text:c="11"/>1. Step:1 <text:s text:c="11"/>2. Step:2 <text:s text:c="11"/>3. Step:3 <text:s text:c="9"/>1.2. Step:1.2 <text:s text:c="11"/>1. Step:1 <text:s text:c="11"/>2. Step:2 <text:s text:c="3"/>""")}</text:p>
          </table:table-cell>
          <table:table-cell table:formula="of:=[.E33]&amp;[.E34]&amp;CHAR(13)&amp;[.E35]" office:value-type="string" office:string-value="&quot;decreasing 1.1.2&quot; in { test(&quot;1.1.2&quot;, &quot;&quot;&quot;&#13;          1.0. Step:1.0&#13;            1. Step:1&#13;            2. Step:2&#13;              a. Step:a&#13;                i. Step:i&#13;                ii. Step:ii&#13;                iii. Step:iii&#13;              b. Step:b&#13;              c. Step:c&#13;                i. Step:i&#13;                ii. Step:ii&#13;            3. Step:3&#13;              a. Step:a&#13;                i. Step:i&#13;              b. Step:b&#13;            4. Step:4&#13;          1.1. Step:1.1&#13;            1. Step:1&#13;            2. Step:2&#13;            3. N&#13;            4. Step:3&#13;          1.2. Step:1.2&#13;            1. Step:1&#13;            2. Step:2&#13;    &quot;&quot;&quot;)}&#13;&#13;">
            <text:p>"decreasing 1.1.2" in { test("1.1.2", """ <text:s text:c="9"/>1.0. Step:1.0 <text:s text:c="11"/>1. Step:1 <text:s text:c="11"/>2. Step:2 <text:s text:c="13"/>a. Step:a <text:s text:c="15"/>i. Step:i <text:s text:c="15"/>ii. Step:ii <text:s text:c="15"/>iii. Step:iii <text:s text:c="13"/>b. Step:b <text:s text:c="13"/>c. Step:c <text:s text:c="15"/>i. Step:i <text:s text:c="15"/>ii. Step:ii <text:s text:c="11"/>3. Step:3 <text:s text:c="13"/>a. Step:a <text:s text:c="15"/>i. Step:i <text:s text:c="13"/>b. Step:b <text:s text:c="11"/>4. Step:4 <text:s text:c="9"/>1.1. Step:1.1 <text:s text:c="11"/>1. Step:1 <text:s text:c="11"/>2. Step:2 <text:s text:c="11"/>3. N <text:s text:c="11"/>4. Step:3 <text:s text:c="9"/>1.2. Step:1.2 <text:s text:c="11"/>1. Step:1 <text:s text:c="11"/>2. Step:2 <text:s text:c="3"/>""")}</text:p>
          </table:table-cell>
          <table:table-cell table:formula="of:=[.F33]&amp;[.F34]&amp;CHAR(13)&amp;[.F35]" office:value-type="string" office:string-value="&quot;decreasing 1.0.2.a&quot; in { test(&quot;1.0.2.a&quot;, &quot;&quot;&quot;&#13;          1.0. Step:1.0&#13;            1. Step:1&#13;            2. Step:2&#13;              a. Step:a&#13;                i. N&#13;                ii. Step:i&#13;                iii. Step:ii&#13;                iv. Step:iii&#13;              b. Step:b&#13;              c. Step:c&#13;                i. Step:i&#13;                ii. Step:ii&#13;            3. Step:3&#13;              a. Step:a&#13;                i. Step:i&#13;              b. Step:b&#13;            4. Step:4&#13;          1.1. Step:1.1&#13;            1. Step:1&#13;            2. Step:2&#13;            3. Step:3&#13;          1.2. Step:1.2&#13;            1. Step:1&#13;            2. Step:2&#13;    &quot;&quot;&quot;)}&#13;&#13;">
            <text:p>"decreasing 1.0.2.a" in { test("1.0.2.a", """ <text:s text:c="9"/>1.0. Step:1.0 <text:s text:c="11"/>1. Step:1 <text:s text:c="11"/>2. Step:2 <text:s text:c="13"/>a. Step:a <text:s text:c="15"/>i. N <text:s text:c="15"/>ii. Step:i <text:s text:c="15"/>iii. Step:ii <text:s text:c="15"/>iv. Step:iii <text:s text:c="13"/>b. Step:b <text:s text:c="13"/>c. Step:c <text:s text:c="15"/>i. Step:i <text:s text:c="15"/>ii. Step:ii <text:s text:c="11"/>3. Step:3 <text:s text:c="13"/>a. Step:a <text:s text:c="15"/>i. Step:i <text:s text:c="13"/>b. Step:b <text:s text:c="11"/>4. Step:4 <text:s text:c="9"/>1.1. Step:1.1 <text:s text:c="11"/>1. Step:1 <text:s text:c="11"/>2. Step:2 <text:s text:c="11"/>3. Step:3 <text:s text:c="9"/>1.2. Step:1.2 <text:s text:c="11"/>1. Step:1 <text:s text:c="11"/>2. Step:2 <text:s text:c="3"/>""")}</text:p>
          </table:table-cell>
          <table:table-cell table:formula="of:=[.G33]&amp;[.G34]&amp;CHAR(13)&amp;[.G35]" office:value-type="string" office:string-value="&quot;decreasing 1.0.2.a.i&quot; in { test(&quot;1.0.2.a.i&quot;, &quot;&quot;&quot;&#13;          1.0. Step:1.0&#13;            1. Step:1&#13;            2. Step:2&#13;              a. Step:a&#13;                i. Step:i&#13;                ii. N&#13;                iii. Step:ii&#13;                iv. Step:iii&#13;              b. Step:b&#13;              c. Step:c&#13;                i. Step:i&#13;                ii. Step:ii&#13;            3. Step:3&#13;              a. Step:a&#13;                i. Step:i&#13;              b. Step:b&#13;            4. Step:4&#13;          1.1. Step:1.1&#13;            1. Step:1&#13;            2. Step:2&#13;            3. Step:3&#13;          1.2. Step:1.2&#13;            1. Step:1&#13;            2. Step:2&#13;    &quot;&quot;&quot;)}&#13;&#13;">
            <text:p>"decreasing 1.0.2.a.i" in { test("1.0.2.a.i", """ <text:s text:c="9"/>1.0. Step:1.0 <text:s text:c="11"/>1. Step:1 <text:s text:c="11"/>2. Step:2 <text:s text:c="13"/>a. Step:a <text:s text:c="15"/>i. Step:i <text:s text:c="15"/>ii. N <text:s text:c="15"/>iii. Step:ii <text:s text:c="15"/>iv. Step:iii <text:s text:c="13"/>b. Step:b <text:s text:c="13"/>c. Step:c <text:s text:c="15"/>i. Step:i <text:s text:c="15"/>ii. Step:ii <text:s text:c="11"/>3. Step:3 <text:s text:c="13"/>a. Step:a <text:s text:c="15"/>i. Step:i <text:s text:c="13"/>b. Step:b <text:s text:c="11"/>4. Step:4 <text:s text:c="9"/>1.1. Step:1.1 <text:s text:c="11"/>1. Step:1 <text:s text:c="11"/>2. Step:2 <text:s text:c="11"/>3. Step:3 <text:s text:c="9"/>1.2. Step:1.2 <text:s text:c="11"/>1. Step:1 <text:s text:c="11"/>2. Step:2 <text:s text:c="3"/>""")}</text:p>
          </table:table-cell>
          <table:table-cell table:formula="of:=[.H33]&amp;[.H34]&amp;CHAR(13)&amp;[.H35]" office:value-type="string" office:string-value="&quot;decreasing 1.0.2.c.ii&quot; in { test(&quot;1.0.2.c.ii&quot;, &quot;&quot;&quot;&#13;          1.0. Step:1.0&#13;            1. Step:1&#13;            2. Step:2&#13;              a. Step:a&#13;                i. Step:i&#13;                ii. Step:ii&#13;                iii. Step:iii&#13;              b. Step:b&#13;              c. Step:c&#13;                i. Step:i&#13;                ii. Step:ii&#13;                iii. N&#13;            3. Step:3&#13;              a. Step:a&#13;                i. Step:i&#13;              b. Step:b&#13;            4. Step:4&#13;          1.1. Step:1.1&#13;            1. Step:1&#13;            2. Step:2&#13;            3. Step:3&#13;          1.2. Step:1.2&#13;            1. Step:1&#13;            2. Step:2&#13;    &quot;&quot;&quot;)}&#13;&#13;">
            <text:p>"decreasing 1.0.2.c.ii" in { test("1.0.2.c.ii", """ <text:s text:c="9"/>1.0. Step:1.0 <text:s text:c="11"/>1. Step:1 <text:s text:c="11"/>2. Step:2 <text:s text:c="13"/>a. Step:a <text:s text:c="15"/>i. Step:i <text:s text:c="15"/>ii. Step:ii <text:s text:c="15"/>iii. Step:iii <text:s text:c="13"/>b. Step:b <text:s text:c="13"/>c. Step:c <text:s text:c="15"/>i. Step:i <text:s text:c="15"/>ii. Step:ii <text:s text:c="15"/>iii. N <text:s text:c="11"/>3. Step:3 <text:s text:c="13"/>a. Step:a <text:s text:c="15"/>i. Step:i <text:s text:c="13"/>b. Step:b <text:s text:c="11"/>4. Step:4 <text:s text:c="9"/>1.1. Step:1.1 <text:s text:c="11"/>1. Step:1 <text:s text:c="11"/>2. Step:2 <text:s text:c="11"/>3. Step:3 <text:s text:c="9"/>1.2. Step:1.2 <text:s text:c="11"/>1. Step:1 <text:s text:c="11"/>2. Step:2 <text:s text:c="3"/>""")}</text:p>
          </table:table-cell>
          <table:table-cell table:formula="of:=[.I33]&amp;[.I34]&amp;CHAR(13)&amp;[.I35]" office:value-type="string" office:string-value="&quot;decreasing &quot; in { test(&quot;&quot;, &quot;&quot;&quot;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&quot;&quot;&quot;)}&#13;&#13;">
            <text:p>"decreasing " in { test("", """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3"/>""")}</text:p>
          </table:table-cell>
          <table:table-cell table:formula="of:=[.J33]&amp;[.J34]&amp;CHAR(13)&amp;[.J35]" office:value-type="string" office:string-value="&quot;decreasing &quot; in { test(&quot;&quot;, &quot;&quot;&quot;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&quot;&quot;&quot;)}&#13;&#13;">
            <text:p>"decreasing " in { test("", """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3"/>""")}</text:p>
          </table:table-cell>
          <table:table-cell office:value-type="string">
            <text:p><text:s/>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All Tests →</text:p>
          </table:table-cell>
          <table:table-cell table:formula="of:=[.B36]&amp;[.C36]&amp;[.D36]&amp;[.E36]&amp;[.F36]&amp;[.G36]&amp;[.H36]&amp;[.I36]&amp;[.J36]" office:value-type="string" office:string-value="&quot;decreasing 1.0&quot; in { test(&quot;1.0&quot;, &quot;&quot;&quot;&#13;          1.0. Step:1.0&#13;            1. N&#13;            2. Step:1&#13;            3. Step:2&#13;              a. Step:a&#13;                i. Step:i&#13;                ii. Step:ii&#13;                iii. Step:iii&#13;              b. Step:b&#13;              c. Step:c&#13;                i. Step:i&#13;                ii. Step:ii&#13;            4. Step:3&#13;              a. Step:a&#13;                i. Step:i&#13;              b. Step:b&#13;            5. Step:4&#13;          1.1. Step:1.1&#13;            1. Step:1&#13;            2. Step:2&#13;            3. Step:3&#13;          1.2. Step:1.2&#13;            1. Step:1&#13;            2. Step:2&#13;    &quot;&quot;&quot;)}&#13;&#13;&quot;decreasing 1.1&quot; in { test(&quot;1.1&quot;, &quot;&quot;&quot;&#13;          1.0. Step:1.0&#13;            1. Step:1&#13;            2. Step:2&#13;              a. Step:a&#13;                i. Step:i&#13;                ii. Step:ii&#13;                iii. Step:iii&#13;              b. Step:b&#13;              c. Step:c&#13;                i. Step:i&#13;                ii. Step:ii&#13;            3. Step:3&#13;              a. Step:a&#13;                i. Step:i&#13;              b. Step:b&#13;            4. Step:4&#13;          1.1. Step:1.1&#13;            1. N&#13;            2. Step:1&#13;            3. Step:2&#13;            4. Step:3&#13;          1.2. Step:1.2&#13;            1. Step:1&#13;            2. Step:2&#13;    &quot;&quot;&quot;)}&#13;&#13;&quot;decreasing 1.0.2&quot; in { test(&quot;1.0.2&quot;, &quot;&quot;&quot;&#13;          1.0. Step:1.0&#13;            1. Step:1&#13;            2. Step:2&#13;              a. N&#13;              b. Step:a&#13;                i. Step:i&#13;                ii. Step:ii&#13;                iii. Step:iii&#13;              c. Step:b&#13;              d. Step:c&#13;                i. Step:i&#13;                ii. Step:ii&#13;            3. Step:3&#13;              a. Step:a&#13;                i. Step:i&#13;              b. Step:b&#13;            4. Step:4&#13;          1.1. Step:1.1&#13;            1. Step:1&#13;            2. Step:2&#13;            3. Step:3&#13;          1.2. Step:1.2&#13;            1. Step:1&#13;            2. Step:2&#13;    &quot;&quot;&quot;)}&#13;&#13;&quot;decreasing 1.1.2&quot; in { test(&quot;1.1.2&quot;, &quot;&quot;&quot;&#13;          1.0. Step:1.0&#13;            1. Step:1&#13;            2. Step:2&#13;              a. Step:a&#13;                i. Step:i&#13;                ii. Step:ii&#13;                iii. Step:iii&#13;              b. Step:b&#13;              c. Step:c&#13;                i. Step:i&#13;                ii. Step:ii&#13;            3. Step:3&#13;              a. Step:a&#13;                i. Step:i&#13;              b. Step:b&#13;            4. Step:4&#13;          1.1. Step:1.1&#13;            1. Step:1&#13;            2. Step:2&#13;            3. N&#13;            4. Step:3&#13;          1.2. Step:1.2&#13;            1. Step:1&#13;            2. Step:2&#13;    &quot;&quot;&quot;)}&#13;&#13;&quot;decreasing 1.0.2.a&quot; in { test(&quot;1.0.2.a&quot;, &quot;&quot;&quot;&#13;          1.0. Step:1.0&#13;            1. Step:1&#13;            2. Step:2&#13;              a. Step:a&#13;                i. N&#13;                ii. Step:i&#13;                iii. Step:ii&#13;                iv. Step:iii&#13;              b. Step:b&#13;              c. Step:c&#13;                i. Step:i&#13;                ii. Step:ii&#13;            3. Step:3&#13;              a. Step:a&#13;                i. Step:i&#13;              b. Step:b&#13;            4. Step:4&#13;          1.1. Step:1.1&#13;            1. Step:1&#13;            2. Step:2&#13;            3. Step:3&#13;          1.2. Step:1.2&#13;            1. Step:1&#13;            2. Step:2&#13;    &quot;&quot;&quot;)}&#13;&#13;&quot;decreasing 1.0.2.a.i&quot; in { test(&quot;1.0.2.a.i&quot;, &quot;&quot;&quot;&#13;          1.0. Step:1.0&#13;            1. Step:1&#13;            2. Step:2&#13;              a. Step:a&#13;                i. Step:i&#13;                ii. N&#13;                iii. Step:ii&#13;                iv. Step:iii&#13;              b. Step:b&#13;              c. Step:c&#13;                i. Step:i&#13;                ii. Step:ii&#13;            3. Step:3&#13;              a. Step:a&#13;                i. Step:i&#13;              b. Step:b&#13;            4. Step:4&#13;          1.1. Step:1.1&#13;            1. Step:1&#13;            2. Step:2&#13;            3. Step:3&#13;          1.2. Step:1.2&#13;            1. Step:1&#13;            2. Step:2&#13;    &quot;&quot;&quot;)}&#13;&#13;&quot;decreasing 1.0.2.c.ii&quot; in { test(&quot;1.0.2.c.ii&quot;, &quot;&quot;&quot;&#13;          1.0. Step:1.0&#13;            1. Step:1&#13;            2. Step:2&#13;              a. Step:a&#13;                i. Step:i&#13;                ii. Step:ii&#13;                iii. Step:iii&#13;              b. Step:b&#13;              c. Step:c&#13;                i. Step:i&#13;                ii. Step:ii&#13;                iii. N&#13;            3. Step:3&#13;              a. Step:a&#13;                i. Step:i&#13;              b. Step:b&#13;            4. Step:4&#13;          1.1. Step:1.1&#13;            1. Step:1&#13;            2. Step:2&#13;            3. Step:3&#13;          1.2. Step:1.2&#13;            1. Step:1&#13;            2. Step:2&#13;    &quot;&quot;&quot;)}&#13;&#13;&quot;decreasing &quot; in { test(&quot;&quot;, &quot;&quot;&quot;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&quot;&quot;&quot;)}&#13;&#13;&quot;decreasing &quot; in { test(&quot;&quot;, &quot;&quot;&quot;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      &#13;    &quot;&quot;&quot;)}&#13;&#13;">
            <text:p>"decreasing 1.0" in { test("1.0", """ <text:s text:c="9"/>1.0. Step:1.0 <text:s text:c="11"/>1. N <text:s text:c="11"/>2. Step:1 <text:s text:c="11"/>3. Step:2 <text:s text:c="13"/>a. Step:a <text:s text:c="15"/>i. Step:i <text:s text:c="15"/>ii. Step:ii <text:s text:c="15"/>iii. Step:iii <text:s text:c="13"/>b. Step:b <text:s text:c="13"/>c. Step:c <text:s text:c="15"/>i. Step:i <text:s text:c="15"/>ii. Step:ii <text:s text:c="11"/>4. Step:3 <text:s text:c="13"/>a. Step:a <text:s text:c="15"/>i. Step:i <text:s text:c="13"/>b. Step:b <text:s text:c="11"/>5. Step:4 <text:s text:c="9"/>1.1. Step:1.1 <text:s text:c="11"/>1. Step:1 <text:s text:c="11"/>2. Step:2 <text:s text:c="11"/>3. Step:3 <text:s text:c="9"/>1.2. Step:1.2 <text:s text:c="11"/>1. Step:1 <text:s text:c="11"/>2. Step:2 <text:s text:c="3"/>""")}"decreasing 1.1" in { test("1.1", """ <text:s text:c="9"/>1.0. Step:1.0 <text:s text:c="11"/>1. Step:1 <text:s text:c="11"/>2. Step:2 <text:s text:c="13"/>a. Step:a <text:s text:c="15"/>i. Step:i <text:s text:c="15"/>ii. Step:ii <text:s text:c="15"/>iii. Step:iii <text:s text:c="13"/>b. Step:b <text:s text:c="13"/>c. Step:c <text:s text:c="15"/>i. Step:i <text:s text:c="15"/>ii. Step:ii <text:s text:c="11"/>3. Step:3 <text:s text:c="13"/>a. Step:a <text:s text:c="15"/>i. Step:i <text:s text:c="13"/>b. Step:b <text:s text:c="11"/>4. Step:4 <text:s text:c="9"/>1.1. Step:1.1 <text:s text:c="11"/>1. N <text:s text:c="11"/>2. Step:1 <text:s text:c="11"/>3. Step:2 <text:s text:c="11"/>4. Step:3 <text:s text:c="9"/>1.2. Step:1.2 <text:s text:c="11"/>1. Step:1 <text:s text:c="11"/>2. Step:2 <text:s text:c="3"/>""")}"decreasing 1.0.2" in { test("1.0.2", """ <text:s text:c="9"/>1.0. Step:1.0 <text:s text:c="11"/>1. Step:1 <text:s text:c="11"/>2. Step:2 <text:s text:c="13"/>a. N <text:s text:c="13"/>b. Step:a <text:s text:c="15"/>i. Step:i <text:s text:c="15"/>ii. Step:ii <text:s text:c="15"/>iii. Step:iii <text:s text:c="13"/>c. Step:b <text:s text:c="13"/>d. Step:c <text:s text:c="15"/>i. Step:i <text:s text:c="15"/>ii. Step:ii <text:s text:c="11"/>3. Step:3 <text:s text:c="13"/>a. Step:a <text:s text:c="15"/>i. Step:i <text:s text:c="13"/>b. Step:b <text:s text:c="11"/>4. Step:4 <text:s text:c="9"/>1.1. Step:1.1 <text:s text:c="11"/>1. Step:1 <text:s text:c="11"/>2. Step:2 <text:s text:c="11"/>3. Step:3 <text:s text:c="9"/>1.2. Step:1.2 <text:s text:c="11"/>1. Step:1 <text:s text:c="11"/>2. Step:2 <text:s text:c="3"/>""")}"decreasing 1.1.2" in { test("1.1.2", """ <text:s text:c="9"/>1.0. Step:1.0 <text:s text:c="11"/>1. Step:1 <text:s text:c="11"/>2. Step:2 <text:s text:c="13"/>a. Step:a <text:s text:c="15"/>i. Step:i <text:s text:c="15"/>ii. Step:ii <text:s text:c="15"/>iii. Step:iii <text:s text:c="13"/>b. Step:b <text:s text:c="13"/>c. Step:c <text:s text:c="15"/>i. Step:i <text:s text:c="15"/>ii. Step:ii <text:s text:c="11"/>3. Step:3 <text:s text:c="13"/>a. Step:a <text:s text:c="15"/>i. Step:i <text:s text:c="13"/>b. Step:b <text:s text:c="11"/>4. Step:4 <text:s text:c="9"/>1.1. Step:1.1 <text:s text:c="11"/>1. Step:1 <text:s text:c="11"/>2. Step:2 <text:s text:c="11"/>3. N <text:s text:c="11"/>4. Step:3 <text:s text:c="9"/>1.2. Step:1.2 <text:s text:c="11"/>1. Step:1 <text:s text:c="11"/>2. Step:2 <text:s text:c="3"/>""")}"decreasing 1.0.2.a" in { test("1.0.2.a", """ <text:s text:c="9"/>1.0. Step:1.0 <text:s text:c="11"/>1. Step:1 <text:s text:c="11"/>2. Step:2 <text:s text:c="13"/>a. Step:a <text:s text:c="15"/>i. N <text:s text:c="15"/>ii. Step:i <text:s text:c="15"/>iii. Step:ii <text:s text:c="15"/>iv. Step:iii <text:s text:c="13"/>b. Step:b <text:s text:c="13"/>c. Step:c <text:s text:c="15"/>i. Step:i <text:s text:c="15"/>ii. Step:ii <text:s text:c="11"/>3. Step:3 <text:s text:c="13"/>a. Step:a <text:s text:c="15"/>i. Step:i <text:s text:c="13"/>b. Step:b <text:s text:c="11"/>4. Step:4 <text:s text:c="9"/>1.1. Step:1.1 <text:s text:c="11"/>1. Step:1 <text:s text:c="11"/>2. Step:2 <text:s text:c="11"/>3. Step:3 <text:s text:c="9"/>1.2. Step:1.2 <text:s text:c="11"/>1. Step:1 <text:s text:c="11"/>2. Step:2 <text:s text:c="3"/>""")}"decreasing 1.0.2.a.i" in { test("1.0.2.a.i", """ <text:s text:c="9"/>1.0. Step:1.0 <text:s text:c="11"/>1. Step:1 <text:s text:c="11"/>2. Step:2 <text:s text:c="13"/>a. Step:a <text:s text:c="15"/>i. Step:i <text:s text:c="15"/>ii. N <text:s text:c="15"/>iii. Step:ii <text:s text:c="15"/>iv. Step:iii <text:s text:c="13"/>b. Step:b <text:s text:c="13"/>c. Step:c <text:s text:c="15"/>i. Step:i <text:s text:c="15"/>ii. Step:ii <text:s text:c="11"/>3. Step:3 <text:s text:c="13"/>a. Step:a <text:s text:c="15"/>i. Step:i <text:s text:c="13"/>b. Step:b <text:s text:c="11"/>4. Step:4 <text:s text:c="9"/>1.1. Step:1.1 <text:s text:c="11"/>1. Step:1 <text:s text:c="11"/>2. Step:2 <text:s text:c="11"/>3. Step:3 <text:s text:c="9"/>1.2. Step:1.2 <text:s text:c="11"/>1. Step:1 <text:s text:c="11"/>2. Step:2 <text:s text:c="3"/>""")}"decreasing 1.0.2.c.ii" in { test("1.0.2.c.ii", """ <text:s text:c="9"/>1.0. Step:1.0 <text:s text:c="11"/>1. Step:1 <text:s text:c="11"/>2. Step:2 <text:s text:c="13"/>a. Step:a <text:s text:c="15"/>i. Step:i <text:s text:c="15"/>ii. Step:ii <text:s text:c="15"/>iii. Step:iii <text:s text:c="13"/>b. Step:b <text:s text:c="13"/>c. Step:c <text:s text:c="15"/>i. Step:i <text:s text:c="15"/>ii. Step:ii <text:s text:c="15"/>iii. N <text:s text:c="11"/>3. Step:3 <text:s text:c="13"/>a. Step:a <text:s text:c="15"/>i. Step:i <text:s text:c="13"/>b. Step:b <text:s text:c="11"/>4. Step:4 <text:s text:c="9"/>1.1. Step:1.1 <text:s text:c="11"/>1. Step:1 <text:s text:c="11"/>2. Step:2 <text:s text:c="11"/>3. Step:3 <text:s text:c="9"/>1.2. Step:1.2 <text:s text:c="11"/>1. Step:1 <text:s text:c="11"/>2. Step:2 <text:s text:c="3"/>""")}"decreasing " in { test("", """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3"/>""")}"decreasing " in { test("", """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9"/> <text:s text:c="3"/>""")}</text:p>
          </table:table-cell>
          <table:table-cell office:value-type="string">
            <text:p><text:s/></text:p>
          </table:table-cell>
          <table:table-cell table:number-columns-repeated="1021"/>
        </table:table-row>
        <table:table-row table:style-name="ro2" table:number-rows-repeated="7">
          <table:table-cell table:number-columns-repeated="1024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dentDecrease()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3" table:number-columns-repeated="1010" table:default-cell-style-name="Default"/>
        <table:table-row table:style-name="ro1">
          <table:table-cell table:style-name="ce1" office:value-type="string">
            <text:p>ORIG</text:p>
          </table:table-cell>
          <table:table-cell table:style-name="ce1" office:value-type="string">
            <text:p>1.0.3.b</text:p>
          </table:table-cell>
          <table:table-cell table:style-name="ce1" office:value-type="string">
            <text:p>1.0.3.a</text:p>
          </table:table-cell>
          <table:table-cell table:style-name="ce1" office:value-type="string">
            <text:p>1.0.3.a.i</text:p>
          </table:table-cell>
          <table:table-cell table:style-name="ce1" office:value-type="string">
            <text:p>1.0.2.a</text:p>
          </table:table-cell>
          <table:table-cell table:style-name="ce1" office:value-type="string">
            <text:p>1.0.2.a.i</text:p>
          </table:table-cell>
          <table:table-cell table:style-name="ce1" office:value-type="string">
            <text:p>1.0.2.a.ii</text:p>
          </table:table-cell>
          <table:table-cell table:style-name="ce1" office:value-type="string">
            <text:p>1.0.2.a.iii</text:p>
          </table:table-cell>
          <table:table-cell table:style-name="ce1" office:value-type="string">
            <text:p>1.1.2</text:p>
          </table:table-cell>
          <table:table-cell table:style-name="ce1" office:value-type="string">
            <text:p>1.0.2.b</text:p>
          </table:table-cell>
          <table:table-cell table:style-name="ce1" office:value-type="string">
            <text:p>1.0.2</text:p>
          </table:table-cell>
          <table:table-cell table:style-name="ce1" table:number-columns-repeated="1013"/>
        </table:table-row>
        <table:table-row table:style-name="ro1">
          <table:table-cell table:style-name="ce2" office:value-type="string">
            <text:p>1.0. Step:1.0</text:p>
          </table:table-cell>
          <table:table-cell table:number-columns-repeated="2" table:style-name="ce8" office:value-type="string">
            <text:p>1.0. Step:1.0</text:p>
          </table:table-cell>
          <table:table-cell table:style-name="ce5" office:value-type="string">
            <text:p>1.0. Step:1.0</text:p>
          </table:table-cell>
          <table:table-cell table:style-name="ce8" office:value-type="string">
            <text:p>1.0. Step:1.0</text:p>
          </table:table-cell>
          <table:table-cell table:number-columns-repeated="4" table:style-name="ce5" office:value-type="string">
            <text:p>1.0. Step:1.0</text:p>
          </table:table-cell>
          <table:table-cell table:style-name="ce8" office:value-type="string">
            <text:p>1.0. Step:1.0</text:p>
          </table:table-cell>
          <table:table-cell table:style-name="ce5" office:value-type="string">
            <text:p>1.0. Step:1.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2"/>1. Step:1</text:p>
          </table:table-cell>
          <table:table-cell table:number-columns-repeated="10" table:style-name="ce5" office:value-type="string">
            <text:p><text:s text:c="2"/>1. Step: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2"/>2. Step:2</text:p>
          </table:table-cell>
          <table:table-cell table:number-columns-repeated="4" table:style-name="ce5" office:value-type="string">
            <text:p><text:s text:c="2"/>2. Step:2</text:p>
          </table:table-cell>
          <table:table-cell table:number-columns-repeated="3" table:style-name="ce8" office:value-type="string">
            <text:p><text:s text:c="2"/>2. Step:2</text:p>
          </table:table-cell>
          <table:table-cell table:number-columns-repeated="2" table:style-name="ce5" office:value-type="string">
            <text:p><text:s text:c="2"/>2. Step:2</text:p>
          </table:table-cell>
          <table:table-cell table:style-name="ce6" office:value-type="string">
            <text:p>1.1. Step: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4"/>a. Step:a</text:p>
          </table:table-cell>
          <table:table-cell table:number-columns-repeated="3" table:style-name="ce5" office:value-type="string">
            <text:p><text:s text:c="4"/>a. Step:a</text:p>
          </table:table-cell>
          <table:table-cell table:style-name="ce6" office:value-type="string">
            <text:p><text:s text:c="2"/>3. Step:a</text:p>
          </table:table-cell>
          <table:table-cell table:number-columns-repeated="5" table:style-name="ce5" office:value-type="string">
            <text:p><text:s text:c="4"/>a. Step:a</text:p>
          </table:table-cell>
          <table:table-cell table:style-name="ce6" office:value-type="string">
            <text:p><text:s text:c="2"/>1. Step:a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6"/>i. Step:i</text:p>
          </table:table-cell>
          <table:table-cell table:number-columns-repeated="3" table:style-name="ce5" office:value-type="string">
            <text:p><text:s text:c="6"/>i. Step:i</text:p>
          </table:table-cell>
          <table:table-cell table:style-name="ce6" office:value-type="string">
            <text:p><text:s text:c="4"/>a. Step:i</text:p>
          </table:table-cell>
          <table:table-cell table:style-name="ce6" office:value-type="string">
            <text:p><text:s text:c="4"/>b. Step:i</text:p>
          </table:table-cell>
          <table:table-cell table:number-columns-repeated="4" table:style-name="ce5" office:value-type="string">
            <text:p><text:s text:c="6"/>i. Step:i</text:p>
          </table:table-cell>
          <table:table-cell table:style-name="ce6" office:value-type="string">
            <text:p><text:s text:c="4"/>a. Step:i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6"/>ii. Step:ii</text:p>
          </table:table-cell>
          <table:table-cell table:number-columns-repeated="3" table:style-name="ce5" office:value-type="string">
            <text:p><text:s text:c="6"/>ii. Step:ii</text:p>
          </table:table-cell>
          <table:table-cell table:style-name="ce6" office:value-type="string">
            <text:p><text:s text:c="4"/>b. Step:ii</text:p>
          </table:table-cell>
          <table:table-cell table:style-name="ce7" office:value-type="string">
            <text:p><text:s text:c="6"/>i. Step:ii</text:p>
          </table:table-cell>
          <table:table-cell table:style-name="ce6" office:value-type="string">
            <text:p><text:s text:c="4"/>b. Step:ii</text:p>
          </table:table-cell>
          <table:table-cell table:number-columns-repeated="3" table:style-name="ce5" office:value-type="string">
            <text:p><text:s text:c="6"/>ii. Step:ii</text:p>
          </table:table-cell>
          <table:table-cell table:style-name="ce6" office:value-type="string">
            <text:p><text:s text:c="4"/>b. Step:ii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6"/>iii. Step:iii</text:p>
          </table:table-cell>
          <table:table-cell table:number-columns-repeated="3" table:style-name="ce5" office:value-type="string">
            <text:p><text:s text:c="6"/>iii. Step:iii</text:p>
          </table:table-cell>
          <table:table-cell table:style-name="ce6" office:value-type="string">
            <text:p><text:s text:c="4"/>c. Step:iii</text:p>
          </table:table-cell>
          <table:table-cell table:style-name="ce7" office:value-type="string">
            <text:p><text:s text:c="6"/>ii. Step:iii</text:p>
          </table:table-cell>
          <table:table-cell table:style-name="ce7" office:value-type="string">
            <text:p><text:s text:c="6"/>i. Step:iii</text:p>
          </table:table-cell>
          <table:table-cell table:style-name="ce6" office:value-type="string">
            <text:p><text:s text:c="4"/>b. Step:iii</text:p>
          </table:table-cell>
          <table:table-cell table:number-columns-repeated="2" table:style-name="ce5" office:value-type="string">
            <text:p><text:s text:c="6"/>iii. Step:iii</text:p>
          </table:table-cell>
          <table:table-cell table:style-name="ce6" office:value-type="string">
            <text:p><text:s text:c="4"/>c. Step:iii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4"/>b. Step:b</text:p>
          </table:table-cell>
          <table:table-cell table:number-columns-repeated="3" table:style-name="ce5" office:value-type="string">
            <text:p><text:s text:c="4"/>b. Step:b</text:p>
          </table:table-cell>
          <table:table-cell table:style-name="ce7" office:value-type="string">
            <text:p><text:s text:c="4"/>d. Step:b</text:p>
          </table:table-cell>
          <table:table-cell table:number-columns-repeated="3" table:style-name="ce7" office:value-type="string">
            <text:p><text:s text:c="4"/>c. Step:b</text:p>
          </table:table-cell>
          <table:table-cell table:style-name="ce5" office:value-type="string">
            <text:p><text:s text:c="4"/>b. Step:b</text:p>
          </table:table-cell>
          <table:table-cell table:style-name="ce6" office:value-type="string">
            <text:p><text:s text:c="2"/>3. Step:b</text:p>
          </table:table-cell>
          <table:table-cell table:style-name="ce6" office:value-type="string">
            <text:p><text:s text:c="2"/>2. Step:b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4"/>c. Step:c</text:p>
          </table:table-cell>
          <table:table-cell table:number-columns-repeated="3" table:style-name="ce5" office:value-type="string">
            <text:p><text:s text:c="4"/>c. Step:c</text:p>
          </table:table-cell>
          <table:table-cell table:style-name="ce7" office:value-type="string">
            <text:p><text:s text:c="4"/>e. Step:c</text:p>
          </table:table-cell>
          <table:table-cell table:number-columns-repeated="3" table:style-name="ce7" office:value-type="string">
            <text:p><text:s text:c="4"/>d. Step:c</text:p>
          </table:table-cell>
          <table:table-cell table:style-name="ce5" office:value-type="string">
            <text:p><text:s text:c="4"/>c. Step:c</text:p>
          </table:table-cell>
          <table:table-cell table:style-name="ce7" office:value-type="string">
            <text:p><text:s text:c="4"/>a. Step:c</text:p>
          </table:table-cell>
          <table:table-cell table:style-name="ce6" office:value-type="string">
            <text:p><text:s text:c="2"/>3. Step:c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6"/>i. Step:i</text:p>
          </table:table-cell>
          <table:table-cell table:number-columns-repeated="9" table:style-name="ce5" office:value-type="string">
            <text:p><text:s text:c="6"/>i. Step:i</text:p>
          </table:table-cell>
          <table:table-cell table:style-name="ce6" office:value-type="string">
            <text:p><text:s text:c="4"/>a. Step:i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6"/>ii. Step:ii</text:p>
          </table:table-cell>
          <table:table-cell table:number-columns-repeated="9" table:style-name="ce5" office:value-type="string">
            <text:p><text:s text:c="6"/>ii. Step:ii</text:p>
          </table:table-cell>
          <table:table-cell table:style-name="ce6" office:value-type="string">
            <text:p><text:s text:c="4"/>b. Step:ii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2"/>3. Step:3</text:p>
          </table:table-cell>
          <table:table-cell table:number-columns-repeated="2" table:style-name="ce5" office:value-type="string">
            <text:p><text:s text:c="2"/>3. Step:3</text:p>
          </table:table-cell>
          <table:table-cell table:style-name="ce8" office:value-type="string">
            <text:p><text:s text:c="2"/>3. Step:3</text:p>
          </table:table-cell>
          <table:table-cell table:style-name="ce7" office:value-type="string">
            <text:p><text:s text:c="2"/>4. Step:3</text:p>
          </table:table-cell>
          <table:table-cell table:number-columns-repeated="4" table:style-name="ce5" office:value-type="string">
            <text:p><text:s text:c="2"/>3. Step:3</text:p>
          </table:table-cell>
          <table:table-cell table:number-columns-repeated="2" table:style-name="ce7" office:value-type="string">
            <text:p><text:s text:c="2"/>4. Step: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4"/>a. Step:a</text:p>
          </table:table-cell>
          <table:table-cell table:style-name="ce5" office:value-type="string">
            <text:p><text:s text:c="4"/>a. Step:a</text:p>
          </table:table-cell>
          <table:table-cell table:style-name="ce6" office:value-type="string">
            <text:p><text:s text:c="2"/>4. Step:a</text:p>
          </table:table-cell>
          <table:table-cell table:number-columns-repeated="8" table:style-name="ce5" office:value-type="string">
            <text:p><text:s text:c="4"/>a. Step:a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6"/>i. Step:i</text:p>
          </table:table-cell>
          <table:table-cell table:style-name="ce5" office:value-type="string">
            <text:p><text:s text:c="6"/>i. Step:i</text:p>
          </table:table-cell>
          <table:table-cell table:style-name="ce6" office:value-type="string">
            <text:p><text:s text:c="4"/>a. Step:i</text:p>
          </table:table-cell>
          <table:table-cell table:style-name="ce6" office:value-type="string">
            <text:p><text:s text:c="4"/>b. Step:i</text:p>
          </table:table-cell>
          <table:table-cell table:number-columns-repeated="7" table:style-name="ce5" office:value-type="string">
            <text:p><text:s text:c="6"/>i. Step:i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4"/>b. Step:b</text:p>
          </table:table-cell>
          <table:table-cell table:style-name="ce6" office:value-type="string">
            <text:p><text:s text:c="2"/>4. Step:b</text:p>
          </table:table-cell>
          <table:table-cell table:style-name="ce7" office:value-type="string">
            <text:p><text:s text:c="4"/>b. Step:b</text:p>
          </table:table-cell>
          <table:table-cell table:style-name="ce7" office:value-type="string">
            <text:p><text:s text:c="4"/>c. Step:b</text:p>
          </table:table-cell>
          <table:table-cell table:number-columns-repeated="7" table:style-name="ce5" office:value-type="string">
            <text:p><text:s text:c="4"/>b. Step:b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2"/>4. Step:4</text:p>
          </table:table-cell>
          <table:table-cell table:number-columns-repeated="2" table:style-name="ce7" office:value-type="string">
            <text:p><text:s text:c="2"/>5. Step:4</text:p>
          </table:table-cell>
          <table:table-cell table:style-name="ce5" office:value-type="string">
            <text:p><text:s text:c="2"/>4. Step:4</text:p>
          </table:table-cell>
          <table:table-cell table:style-name="ce7" office:value-type="string">
            <text:p><text:s text:c="2"/>5. Step:4</text:p>
          </table:table-cell>
          <table:table-cell table:number-columns-repeated="4" table:style-name="ce5" office:value-type="string">
            <text:p><text:s text:c="2"/>4. Step:4</text:p>
          </table:table-cell>
          <table:table-cell table:number-columns-repeated="2" table:style-name="ce7" office:value-type="string">
            <text:p><text:s text:c="2"/>5. Step: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1.1. Step:1.1</text:p>
          </table:table-cell>
          <table:table-cell table:number-columns-repeated="9" table:style-name="ce5" office:value-type="string">
            <text:p>1.1. Step:1.1</text:p>
          </table:table-cell>
          <table:table-cell table:style-name="ce7" office:value-type="string">
            <text:p>1.2. Step:1.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2"/>1. Step:1</text:p>
          </table:table-cell>
          <table:table-cell table:number-columns-repeated="10" table:style-name="ce5" office:value-type="string">
            <text:p><text:s text:c="2"/>1. Step: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2"/>2. Step:2</text:p>
          </table:table-cell>
          <table:table-cell table:number-columns-repeated="7" table:style-name="ce5" office:value-type="string">
            <text:p><text:s text:c="2"/>2. Step:2</text:p>
          </table:table-cell>
          <table:table-cell table:style-name="ce6" office:value-type="string">
            <text:p>1.2. Step:2</text:p>
          </table:table-cell>
          <table:table-cell table:number-columns-repeated="2" table:style-name="ce5" office:value-type="string">
            <text:p><text:s text:c="2"/>2. Step: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2"/>3. Step:3</text:p>
          </table:table-cell>
          <table:table-cell table:number-columns-repeated="7" table:style-name="ce5" office:value-type="string">
            <text:p><text:s text:c="2"/>3. Step:3</text:p>
          </table:table-cell>
          <table:table-cell table:style-name="ce7" office:value-type="string">
            <text:p><text:s text:c="2"/>1. Step:3</text:p>
          </table:table-cell>
          <table:table-cell table:number-columns-repeated="2" table:style-name="ce5" office:value-type="string">
            <text:p><text:s text:c="2"/>3. Step: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1.2. Step:1.2</text:p>
          </table:table-cell>
          <table:table-cell table:number-columns-repeated="7" table:style-name="ce5" office:value-type="string">
            <text:p>1.2. Step:1.2</text:p>
          </table:table-cell>
          <table:table-cell table:style-name="ce7" office:value-type="string">
            <text:p>1.3. Step:1.2</text:p>
          </table:table-cell>
          <table:table-cell table:style-name="ce5" office:value-type="string">
            <text:p>1.2. Step:1.2</text:p>
          </table:table-cell>
          <table:table-cell table:style-name="ce7" office:value-type="string">
            <text:p>1.3. Step:1.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2"/>1. Step:1</text:p>
          </table:table-cell>
          <table:table-cell table:number-columns-repeated="10" table:style-name="ce5" office:value-type="string">
            <text:p><text:s text:c="2"/>1. Step: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2"/>2. Step:2</text:p>
          </table:table-cell>
          <table:table-cell table:number-columns-repeated="10" table:style-name="ce5" office:value-type="string">
            <text:p><text:s text:c="2"/>2. Step:2</text:p>
          </table:table-cell>
          <table:table-cell table:number-columns-repeated="1013"/>
        </table:table-row>
        <table:table-row table:style-name="ro2" table:number-rows-repeated="6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style-name="ce3"/>
          <table:table-cell table:style-name="ce3" table:formula="of:=&quot;&quot;&quot;decreasing &quot;&amp;[.B$1]&amp;&quot;&quot;&quot; in { test(&quot;&quot;&quot;&amp;[.B$1]&amp;&quot;&quot;&quot;, &quot;&quot;&quot;&quot;&quot;&quot;&quot;" office:value-type="string" office:string-value="&quot;decreasing 1.0.3.b&quot; in { test(&quot;1.0.3.b&quot;, &quot;&quot;&quot;">
            <text:p>"decreasing 1.0.3.b" in { test("1.0.3.b", """</text:p>
          </table:table-cell>
          <table:table-cell table:style-name="ce3" table:formula="of:=&quot;&quot;&quot;decreasing &quot;&amp;[.C$1]&amp;&quot;&quot;&quot; in { test(&quot;&quot;&quot;&amp;[.C$1]&amp;&quot;&quot;&quot;, &quot;&quot;&quot;&quot;&quot;&quot;&quot;" office:value-type="string" office:string-value="&quot;decreasing 1.0.3.a&quot; in { test(&quot;1.0.3.a&quot;, &quot;&quot;&quot;">
            <text:p>"decreasing 1.0.3.a" in { test("1.0.3.a", """</text:p>
          </table:table-cell>
          <table:table-cell table:style-name="ce3" table:formula="of:=&quot;&quot;&quot;decreasing &quot;&amp;[.D$1]&amp;&quot;&quot;&quot; in { test(&quot;&quot;&quot;&amp;[.D$1]&amp;&quot;&quot;&quot;, &quot;&quot;&quot;&quot;&quot;&quot;&quot;" office:value-type="string" office:string-value="&quot;decreasing 1.0.3.a.i&quot; in { test(&quot;1.0.3.a.i&quot;, &quot;&quot;&quot;">
            <text:p>"decreasing 1.0.3.a.i" in { test("1.0.3.a.i", """</text:p>
          </table:table-cell>
          <table:table-cell table:style-name="ce3" table:formula="of:=&quot;&quot;&quot;decreasing &quot;&amp;[.E$1]&amp;&quot;&quot;&quot; in { test(&quot;&quot;&quot;&amp;[.E$1]&amp;&quot;&quot;&quot;, &quot;&quot;&quot;&quot;&quot;&quot;&quot;" office:value-type="string" office:string-value="&quot;decreasing 1.0.2.a&quot; in { test(&quot;1.0.2.a&quot;, &quot;&quot;&quot;">
            <text:p>"decreasing 1.0.2.a" in { test("1.0.2.a", """</text:p>
          </table:table-cell>
          <table:table-cell table:style-name="ce3" table:formula="of:=&quot;&quot;&quot;decreasing &quot;&amp;[.F$1]&amp;&quot;&quot;&quot; in { test(&quot;&quot;&quot;&amp;[.F$1]&amp;&quot;&quot;&quot;, &quot;&quot;&quot;&quot;&quot;&quot;&quot;" office:value-type="string" office:string-value="&quot;decreasing 1.0.2.a.i&quot; in { test(&quot;1.0.2.a.i&quot;, &quot;&quot;&quot;">
            <text:p>"decreasing 1.0.2.a.i" in { test("1.0.2.a.i", """</text:p>
          </table:table-cell>
          <table:table-cell table:style-name="ce3" table:formula="of:=&quot;&quot;&quot;decreasing &quot;&amp;[.G$1]&amp;&quot;&quot;&quot; in { test(&quot;&quot;&quot;&amp;[.G$1]&amp;&quot;&quot;&quot;, &quot;&quot;&quot;&quot;&quot;&quot;&quot;" office:value-type="string" office:string-value="&quot;decreasing 1.0.2.a.ii&quot; in { test(&quot;1.0.2.a.ii&quot;, &quot;&quot;&quot;">
            <text:p>"decreasing 1.0.2.a.ii" in { test("1.0.2.a.ii", """</text:p>
          </table:table-cell>
          <table:table-cell table:style-name="ce3" table:formula="of:=&quot;&quot;&quot;decreasing &quot;&amp;[.H$1]&amp;&quot;&quot;&quot; in { test(&quot;&quot;&quot;&amp;[.H$1]&amp;&quot;&quot;&quot;, &quot;&quot;&quot;&quot;&quot;&quot;&quot;" office:value-type="string" office:string-value="&quot;decreasing 1.0.2.a.iii&quot; in { test(&quot;1.0.2.a.iii&quot;, &quot;&quot;&quot;">
            <text:p>"decreasing 1.0.2.a.iii" in { test("1.0.2.a.iii", """</text:p>
          </table:table-cell>
          <table:table-cell table:style-name="ce3" table:formula="of:=&quot;&quot;&quot;decreasing &quot;&amp;[.I$1]&amp;&quot;&quot;&quot; in { test(&quot;&quot;&quot;&amp;[.I$1]&amp;&quot;&quot;&quot;, &quot;&quot;&quot;&quot;&quot;&quot;&quot;" office:value-type="string" office:string-value="&quot;decreasing 1.1.2&quot; in { test(&quot;1.1.2&quot;, &quot;&quot;&quot;">
            <text:p>"decreasing 1.1.2" in { test("1.1.2", """</text:p>
          </table:table-cell>
          <table:table-cell table:style-name="ce3" table:formula="of:=&quot;&quot;&quot;decreasing &quot;&amp;[.J$1]&amp;&quot;&quot;&quot; in { test(&quot;&quot;&quot;&amp;[.J$1]&amp;&quot;&quot;&quot;, &quot;&quot;&quot;&quot;&quot;&quot;&quot;" office:value-type="string" office:string-value="&quot;decreasing 1.0.2.b&quot; in { test(&quot;1.0.2.b&quot;, &quot;&quot;&quot;">
            <text:p>"decreasing 1.0.2.b" in { test("1.0.2.b", """</text:p>
          </table:table-cell>
          <table:table-cell table:style-name="ce3" table:formula="of:=&quot;&quot;&quot;decreasing &quot;&amp;[.K$1]&amp;&quot;&quot;&quot; in { test(&quot;&quot;&quot;&amp;[.K$1]&amp;&quot;&quot;&quot;, &quot;&quot;&quot;&quot;&quot;&quot;&quot;" office:value-type="string" office:string-value="&quot;decreasing 1.0.2&quot; in { test(&quot;1.0.2&quot;, &quot;&quot;&quot;">
            <text:p>"decreasing 1.0.2" in { test("1.0.2", """</text:p>
          </table:table-cell>
          <table:table-cell table:style-name="ce3" office:value-type="string">
            <text:p><text:s/></text:p>
          </table:table-cell>
          <table:table-cell table:style-name="ce3" table:number-columns-repeated="1012"/>
        </table:table-row>
        <table:table-row table:style-name="ro1">
          <table:table-cell table:style-name="ce3" table:formula="of:=CHAR(13)&amp;&quot;        &quot;" office:value-type="string" office:string-value="&#13;        ">
            <text:p> <text:s text:c="7"/></text:p>
          </table:table-cell>
          <table:table-cell table:style-name="ce3" table:formula="of:=[.$A34]&amp;[.B$2]&amp;[.$A34]&amp;[.B$3]&amp;[.$A34]&amp;[.B$4]&amp;[.$A34]&amp;[.B$5]&amp;[.$A34]&amp;[.B$6]&amp;[.$A34]&amp;[.B$7]&amp;[.$A34]&amp;[.B$8]&amp;[.$A34]&amp;[.B$9]&amp;[.$A34]&amp;[.B$10]&amp;[.$A34]&amp;[.B$11]&amp;[.$A34]&amp;[.B$12]&amp;[.$A34]&amp;[.B$13]&amp;[.$A34]&amp;[.B$14]&amp;[.$A34]&amp;[.B$15]&amp;[.$A34]&amp;[.B$16]&amp;[.$A34]&amp;[.B$17]&amp;[.$A34]&amp;[.B$18]&amp;[.$A34]&amp;[.B$19]&amp;[.$A34]&amp;[.B$20]&amp;[.$A34]&amp;[.B$21]&amp;[.$A34]&amp;[.B$22]&amp;[.$A34]&amp;[.B$23]&amp;[.$A34]&amp;[.B$24]" office:value-type="string" office:string-value="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4. Step:b&#13;          5. Step:4&#13;        1.1. Step:1.1&#13;          1. Step:1&#13;          2. Step:2&#13;          3. Step:3&#13;        1.2. Step:1.2&#13;          1. Step:1&#13;          2. Step:2">
            <text:p>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9"/>4. Step:b <text:s text:c="9"/>5. Step:4 <text:s text:c="7"/>1.1. Step:1.1 <text:s text:c="9"/>1. Step:1 <text:s text:c="9"/>2. Step:2 <text:s text:c="9"/>3. Step:3 <text:s text:c="7"/>1.2. Step:1.2 <text:s text:c="9"/>1. Step:1 <text:s text:c="9"/>2. Step:2</text:p>
          </table:table-cell>
          <table:table-cell table:style-name="ce3" table:formula="of:=[.$A34]&amp;[.C$2]&amp;[.$A34]&amp;[.C$3]&amp;[.$A34]&amp;[.C$4]&amp;[.$A34]&amp;[.C$5]&amp;[.$A34]&amp;[.C$6]&amp;[.$A34]&amp;[.C$7]&amp;[.$A34]&amp;[.C$8]&amp;[.$A34]&amp;[.C$9]&amp;[.$A34]&amp;[.C$10]&amp;[.$A34]&amp;[.C$11]&amp;[.$A34]&amp;[.C$12]&amp;[.$A34]&amp;[.C$13]&amp;[.$A34]&amp;[.C$14]&amp;[.$A34]&amp;[.C$15]&amp;[.$A34]&amp;[.C$16]&amp;[.$A34]&amp;[.C$17]&amp;[.$A34]&amp;[.C$18]&amp;[.$A34]&amp;[.C$19]&amp;[.$A34]&amp;[.C$20]&amp;[.$A34]&amp;[.C$21]&amp;[.$A34]&amp;[.C$22]&amp;[.$A34]&amp;[.C$23]&amp;[.$A34]&amp;[.C$24]" office:value-type="string" office:string-value="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4. Step:a&#13;            a. Step:i&#13;            b. Step:b&#13;          5. Step:4&#13;        1.1. Step:1.1&#13;          1. Step:1&#13;          2. Step:2&#13;          3. Step:3&#13;        1.2. Step:1.2&#13;          1. Step:1&#13;          2. Step:2">
            <text:p>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9"/>4. Step:a <text:s text:c="11"/>a. Step:i <text:s text:c="11"/>b. Step:b <text:s text:c="9"/>5. Step:4 <text:s text:c="7"/>1.1. Step:1.1 <text:s text:c="9"/>1. Step:1 <text:s text:c="9"/>2. Step:2 <text:s text:c="9"/>3. Step:3 <text:s text:c="7"/>1.2. Step:1.2 <text:s text:c="9"/>1. Step:1 <text:s text:c="9"/>2. Step:2</text:p>
          </table:table-cell>
          <table:table-cell table:style-name="ce3" table:formula="of:=[.$A34]&amp;[.D$2]&amp;[.$A34]&amp;[.D$3]&amp;[.$A34]&amp;[.D$4]&amp;[.$A34]&amp;[.D$5]&amp;[.$A34]&amp;[.D$6]&amp;[.$A34]&amp;[.D$7]&amp;[.$A34]&amp;[.D$8]&amp;[.$A34]&amp;[.D$9]&amp;[.$A34]&amp;[.D$10]&amp;[.$A34]&amp;[.D$11]&amp;[.$A34]&amp;[.D$12]&amp;[.$A34]&amp;[.D$13]&amp;[.$A34]&amp;[.D$14]&amp;[.$A34]&amp;[.D$15]&amp;[.$A34]&amp;[.D$16]&amp;[.$A34]&amp;[.D$17]&amp;[.$A34]&amp;[.D$18]&amp;[.$A34]&amp;[.D$19]&amp;[.$A34]&amp;[.D$20]&amp;[.$A34]&amp;[.D$21]&amp;[.$A34]&amp;[.D$22]&amp;[.$A34]&amp;[.D$23]&amp;[.$A34]&amp;[.D$24]" office:value-type="string" office:string-value="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b. Step:i&#13;            c. Step:b&#13;          4. Step:4&#13;        1.1. Step:1.1&#13;          1. Step:1&#13;          2. Step:2&#13;          3. Step:3&#13;        1.2. Step:1.2&#13;          1. Step:1&#13;          2. Step:2">
            <text:p>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1"/>b. Step:i <text:s text:c="11"/>c. Step:b <text:s text:c="9"/>4. Step:4 <text:s text:c="7"/>1.1. Step:1.1 <text:s text:c="9"/>1. Step:1 <text:s text:c="9"/>2. Step:2 <text:s text:c="9"/>3. Step:3 <text:s text:c="7"/>1.2. Step:1.2 <text:s text:c="9"/>1. Step:1 <text:s text:c="9"/>2. Step:2</text:p>
          </table:table-cell>
          <table:table-cell table:style-name="ce3" table:formula="of:=[.$A34]&amp;[.E$2]&amp;[.$A34]&amp;[.E$3]&amp;[.$A34]&amp;[.E$4]&amp;[.$A34]&amp;[.E$5]&amp;[.$A34]&amp;[.E$6]&amp;[.$A34]&amp;[.E$7]&amp;[.$A34]&amp;[.E$8]&amp;[.$A34]&amp;[.E$9]&amp;[.$A34]&amp;[.E$10]&amp;[.$A34]&amp;[.E$11]&amp;[.$A34]&amp;[.E$12]&amp;[.$A34]&amp;[.E$13]&amp;[.$A34]&amp;[.E$14]&amp;[.$A34]&amp;[.E$15]&amp;[.$A34]&amp;[.E$16]&amp;[.$A34]&amp;[.E$17]&amp;[.$A34]&amp;[.E$18]&amp;[.$A34]&amp;[.E$19]&amp;[.$A34]&amp;[.E$20]&amp;[.$A34]&amp;[.E$21]&amp;[.$A34]&amp;[.E$22]&amp;[.$A34]&amp;[.E$23]&amp;[.$A34]&amp;[.E$24]" office:value-type="string" office:string-value="&#13;        1.0. Step:1.0&#13;          1. Step:1&#13;          2. Step:2&#13;          3. Step:a&#13;            a. Step:i&#13;            b. Step:ii&#13;            c. Step:iii&#13;            d. Step:b&#13;            e. Step:c&#13;              i. Step:i&#13;              ii. Step:ii&#13;          4. Step:3&#13;            a. Step:a&#13;              i. Step:i&#13;            b. Step:b&#13;          5. Step:4&#13;        1.1. Step:1.1&#13;          1. Step:1&#13;          2. Step:2&#13;          3. Step:3&#13;        1.2. Step:1.2&#13;          1. Step:1&#13;          2. Step:2">
            <text:p> <text:s text:c="7"/>1.0. Step:1.0 <text:s text:c="9"/>1. Step:1 <text:s text:c="9"/>2. Step:2 <text:s text:c="9"/>3. Step:a <text:s text:c="11"/>a. Step:i <text:s text:c="11"/>b. Step:ii <text:s text:c="11"/>c. Step:iii <text:s text:c="11"/>d. Step:b <text:s text:c="11"/>e. Step:c <text:s text:c="13"/>i. Step:i <text:s text:c="13"/>ii. Step:ii <text:s text:c="9"/>4. Step:3 <text:s text:c="11"/>a. Step:a <text:s text:c="13"/>i. Step:i <text:s text:c="11"/>b. Step:b <text:s text:c="9"/>5. Step:4 <text:s text:c="7"/>1.1. Step:1.1 <text:s text:c="9"/>1. Step:1 <text:s text:c="9"/>2. Step:2 <text:s text:c="9"/>3. Step:3 <text:s text:c="7"/>1.2. Step:1.2 <text:s text:c="9"/>1. Step:1 <text:s text:c="9"/>2. Step:2</text:p>
          </table:table-cell>
          <table:table-cell table:style-name="ce3" table:formula="of:=[.$A34]&amp;[.F$2]&amp;[.$A34]&amp;[.F$3]&amp;[.$A34]&amp;[.F$4]&amp;[.$A34]&amp;[.F$5]&amp;[.$A34]&amp;[.F$6]&amp;[.$A34]&amp;[.F$7]&amp;[.$A34]&amp;[.F$8]&amp;[.$A34]&amp;[.F$9]&amp;[.$A34]&amp;[.F$10]&amp;[.$A34]&amp;[.F$11]&amp;[.$A34]&amp;[.F$12]&amp;[.$A34]&amp;[.F$13]&amp;[.$A34]&amp;[.F$14]&amp;[.$A34]&amp;[.F$15]&amp;[.$A34]&amp;[.F$16]&amp;[.$A34]&amp;[.F$17]&amp;[.$A34]&amp;[.F$18]&amp;[.$A34]&amp;[.F$19]&amp;[.$A34]&amp;[.F$20]&amp;[.$A34]&amp;[.F$21]&amp;[.$A34]&amp;[.F$22]&amp;[.$A34]&amp;[.F$23]&amp;[.$A34]&amp;[.F$24]" office:value-type="string" office:string-value="&#13;        1.0. Step:1.0&#13;          1. Step:1&#13;          2. Step:2&#13;            a. Step:a&#13;            b. Step:i&#13;              i. Step:ii&#13;              ii. Step:iii&#13;            c. Step:b&#13;            d. Step:c&#13;              i. Step:i&#13;              ii. Step:ii&#13;          3. Step:3&#13;            a. Step:a&#13;              i. Step:i&#13;            b. Step:b&#13;          4. Step:4&#13;        1.1. Step:1.1&#13;          1. Step:1&#13;          2. Step:2&#13;          3. Step:3&#13;        1.2. Step:1.2&#13;          1. Step:1&#13;          2. Step:2">
            <text:p> <text:s text:c="7"/>1.0. Step:1.0 <text:s text:c="9"/>1. Step:1 <text:s text:c="9"/>2. Step:2 <text:s text:c="11"/>a. Step:a <text:s text:c="11"/>b. Step:i <text:s text:c="13"/>i. Step:ii <text:s text:c="13"/>ii. Step:iii <text:s text:c="11"/>c. Step:b <text:s text:c="11"/>d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9"/>2. Step:2 <text:s text:c="9"/>3. Step:3 <text:s text:c="7"/>1.2. Step:1.2 <text:s text:c="9"/>1. Step:1 <text:s text:c="9"/>2. Step:2</text:p>
          </table:table-cell>
          <table:table-cell table:style-name="ce3" table:formula="of:=[.$A34]&amp;[.G$2]&amp;[.$A34]&amp;[.G$3]&amp;[.$A34]&amp;[.G$4]&amp;[.$A34]&amp;[.G$5]&amp;[.$A34]&amp;[.G$6]&amp;[.$A34]&amp;[.G$7]&amp;[.$A34]&amp;[.G$8]&amp;[.$A34]&amp;[.G$9]&amp;[.$A34]&amp;[.G$10]&amp;[.$A34]&amp;[.G$11]&amp;[.$A34]&amp;[.G$12]&amp;[.$A34]&amp;[.G$13]&amp;[.$A34]&amp;[.G$14]&amp;[.$A34]&amp;[.G$15]&amp;[.$A34]&amp;[.G$16]&amp;[.$A34]&amp;[.G$17]&amp;[.$A34]&amp;[.G$18]&amp;[.$A34]&amp;[.G$19]&amp;[.$A34]&amp;[.G$20]&amp;[.$A34]&amp;[.G$21]&amp;[.$A34]&amp;[.G$22]&amp;[.$A34]&amp;[.G$23]&amp;[.$A34]&amp;[.G$24]" office:value-type="string" office:string-value="&#13;        1.0. Step:1.0&#13;          1. Step:1&#13;          2. Step:2&#13;            a. Step:a&#13;              i. Step:i&#13;            b. Step:ii&#13;              i. Step:iii&#13;            c. Step:b&#13;            d. Step:c&#13;              i. Step:i&#13;              ii. Step:ii&#13;          3. Step:3&#13;            a. Step:a&#13;              i. Step:i&#13;            b. Step:b&#13;          4. Step:4&#13;        1.1. Step:1.1&#13;          1. Step:1&#13;          2. Step:2&#13;          3. Step:3&#13;        1.2. Step:1.2&#13;          1. Step:1&#13;          2. Step:2">
            <text:p> <text:s text:c="7"/>1.0. Step:1.0 <text:s text:c="9"/>1. Step:1 <text:s text:c="9"/>2. Step:2 <text:s text:c="11"/>a. Step:a <text:s text:c="13"/>i. Step:i <text:s text:c="11"/>b. Step:ii <text:s text:c="13"/>i. Step:iii <text:s text:c="11"/>c. Step:b <text:s text:c="11"/>d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9"/>2. Step:2 <text:s text:c="9"/>3. Step:3 <text:s text:c="7"/>1.2. Step:1.2 <text:s text:c="9"/>1. Step:1 <text:s text:c="9"/>2. Step:2</text:p>
          </table:table-cell>
          <table:table-cell table:style-name="ce3" table:formula="of:=[.$A34]&amp;[.H$2]&amp;[.$A34]&amp;[.H$3]&amp;[.$A34]&amp;[.H$4]&amp;[.$A34]&amp;[.H$5]&amp;[.$A34]&amp;[.H$6]&amp;[.$A34]&amp;[.H$7]&amp;[.$A34]&amp;[.H$8]&amp;[.$A34]&amp;[.H$9]&amp;[.$A34]&amp;[.H$10]&amp;[.$A34]&amp;[.H$11]&amp;[.$A34]&amp;[.H$12]&amp;[.$A34]&amp;[.H$13]&amp;[.$A34]&amp;[.H$14]&amp;[.$A34]&amp;[.H$15]&amp;[.$A34]&amp;[.H$16]&amp;[.$A34]&amp;[.H$17]&amp;[.$A34]&amp;[.H$18]&amp;[.$A34]&amp;[.H$19]&amp;[.$A34]&amp;[.H$20]&amp;[.$A34]&amp;[.H$21]&amp;[.$A34]&amp;[.H$22]&amp;[.$A34]&amp;[.H$23]&amp;[.$A34]&amp;[.H$24]" office:value-type="string" office:string-value="&#13;        1.0. Step:1.0&#13;          1. Step:1&#13;          2. Step:2&#13;            a. Step:a&#13;              i. Step:i&#13;              ii. Step:ii&#13;            b. Step:iii&#13;            c. Step:b&#13;            d. Step:c&#13;              i. Step:i&#13;              ii. Step:ii&#13;          3. Step:3&#13;            a. Step:a&#13;              i. Step:i&#13;            b. Step:b&#13;          4. Step:4&#13;        1.1. Step:1.1&#13;          1. Step:1&#13;          2. Step:2&#13;          3. Step:3&#13;        1.2. Step:1.2&#13;          1. Step:1&#13;          2. Step:2">
            <text:p> <text:s text:c="7"/>1.0. Step:1.0 <text:s text:c="9"/>1. Step:1 <text:s text:c="9"/>2. Step:2 <text:s text:c="11"/>a. Step:a <text:s text:c="13"/>i. Step:i <text:s text:c="13"/>ii. Step:ii <text:s text:c="11"/>b. Step:iii <text:s text:c="11"/>c. Step:b <text:s text:c="11"/>d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9"/>2. Step:2 <text:s text:c="9"/>3. Step:3 <text:s text:c="7"/>1.2. Step:1.2 <text:s text:c="9"/>1. Step:1 <text:s text:c="9"/>2. Step:2</text:p>
          </table:table-cell>
          <table:table-cell table:style-name="ce3" table:formula="of:=[.$A34]&amp;[.I$2]&amp;[.$A34]&amp;[.I$3]&amp;[.$A34]&amp;[.I$4]&amp;[.$A34]&amp;[.I$5]&amp;[.$A34]&amp;[.I$6]&amp;[.$A34]&amp;[.I$7]&amp;[.$A34]&amp;[.I$8]&amp;[.$A34]&amp;[.I$9]&amp;[.$A34]&amp;[.I$10]&amp;[.$A34]&amp;[.I$11]&amp;[.$A34]&amp;[.I$12]&amp;[.$A34]&amp;[.I$13]&amp;[.$A34]&amp;[.I$14]&amp;[.$A34]&amp;[.I$15]&amp;[.$A34]&amp;[.I$16]&amp;[.$A34]&amp;[.I$17]&amp;[.$A34]&amp;[.I$18]&amp;[.$A34]&amp;[.I$19]&amp;[.$A34]&amp;[.I$20]&amp;[.$A34]&amp;[.I$21]&amp;[.$A34]&amp;[.I$22]&amp;[.$A34]&amp;[.I$23]&amp;[.$A34]&amp;[.I$24]" office:value-type="string" office:string-value="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  b. Step:b&#13;          4. Step:4&#13;        1.1. Step:1.1&#13;          1. Step:1&#13;        1.2. Step:2&#13;          1. Step:3&#13;        1.3. Step:1.2&#13;          1. Step:1&#13;          2. Step:2">
            <text:p>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7"/>1.2. Step:2 <text:s text:c="9"/>1. Step:3 <text:s text:c="7"/>1.3. Step:1.2 <text:s text:c="9"/>1. Step:1 <text:s text:c="9"/>2. Step:2</text:p>
          </table:table-cell>
          <table:table-cell table:style-name="ce3" table:formula="of:=[.$A34]&amp;[.J$2]&amp;[.$A34]&amp;[.J$3]&amp;[.$A34]&amp;[.J$4]&amp;[.$A34]&amp;[.J$5]&amp;[.$A34]&amp;[.J$6]&amp;[.$A34]&amp;[.J$7]&amp;[.$A34]&amp;[.J$8]&amp;[.$A34]&amp;[.J$9]&amp;[.$A34]&amp;[.J$10]&amp;[.$A34]&amp;[.J$11]&amp;[.$A34]&amp;[.J$12]&amp;[.$A34]&amp;[.J$13]&amp;[.$A34]&amp;[.J$14]&amp;[.$A34]&amp;[.J$15]&amp;[.$A34]&amp;[.J$16]&amp;[.$A34]&amp;[.J$17]&amp;[.$A34]&amp;[.J$18]&amp;[.$A34]&amp;[.J$19]&amp;[.$A34]&amp;[.J$20]&amp;[.$A34]&amp;[.J$21]&amp;[.$A34]&amp;[.J$22]&amp;[.$A34]&amp;[.J$23]&amp;[.$A34]&amp;[.J$24]" office:value-type="string" office:string-value="&#13;        1.0. Step:1.0&#13;          1. Step:1&#13;          2. Step:2&#13;            a. Step:a&#13;              i. Step:i&#13;              ii. Step:ii&#13;              iii. Step:iii&#13;          3. Step:b&#13;            a. Step:c&#13;              i. Step:i&#13;              ii. Step:ii&#13;          4. Step:3&#13;            a. Step:a&#13;              i. Step:i&#13;            b. Step:b&#13;          5. Step:4&#13;        1.1. Step:1.1&#13;          1. Step:1&#13;          2. Step:2&#13;          3. Step:3&#13;        1.2. Step:1.2&#13;          1. Step:1&#13;          2. Step:2">
            <text:p> <text:s text:c="7"/>1.0. Step:1.0 <text:s text:c="9"/>1. Step:1 <text:s text:c="9"/>2. Step:2 <text:s text:c="11"/>a. Step:a <text:s text:c="13"/>i. Step:i <text:s text:c="13"/>ii. Step:ii <text:s text:c="13"/>iii. Step:iii <text:s text:c="9"/>3. Step:b <text:s text:c="11"/>a. Step:c <text:s text:c="13"/>i. Step:i <text:s text:c="13"/>ii. Step:ii <text:s text:c="9"/>4. Step:3 <text:s text:c="11"/>a. Step:a <text:s text:c="13"/>i. Step:i <text:s text:c="11"/>b. Step:b <text:s text:c="9"/>5. Step:4 <text:s text:c="7"/>1.1. Step:1.1 <text:s text:c="9"/>1. Step:1 <text:s text:c="9"/>2. Step:2 <text:s text:c="9"/>3. Step:3 <text:s text:c="7"/>1.2. Step:1.2 <text:s text:c="9"/>1. Step:1 <text:s text:c="9"/>2. Step:2</text:p>
          </table:table-cell>
          <table:table-cell table:style-name="ce3" table:formula="of:=[.$A34]&amp;[.K$2]&amp;[.$A34]&amp;[.K$3]&amp;[.$A34]&amp;[.K$4]&amp;[.$A34]&amp;[.K$5]&amp;[.$A34]&amp;[.K$6]&amp;[.$A34]&amp;[.K$7]&amp;[.$A34]&amp;[.K$8]&amp;[.$A34]&amp;[.K$9]&amp;[.$A34]&amp;[.K$10]&amp;[.$A34]&amp;[.K$11]&amp;[.$A34]&amp;[.K$12]&amp;[.$A34]&amp;[.K$13]&amp;[.$A34]&amp;[.K$14]&amp;[.$A34]&amp;[.K$15]&amp;[.$A34]&amp;[.K$16]&amp;[.$A34]&amp;[.K$17]&amp;[.$A34]&amp;[.K$18]&amp;[.$A34]&amp;[.K$19]&amp;[.$A34]&amp;[.K$20]&amp;[.$A34]&amp;[.K$21]&amp;[.$A34]&amp;[.K$22]&amp;[.$A34]&amp;[.K$23]&amp;[.$A34]&amp;[.K$24]" office:value-type="string" office:string-value="&#13;        1.0. Step:1.0&#13;          1. Step:1&#13;        1.1. Step:2&#13;          1. Step:a&#13;            a. Step:i&#13;            b. Step:ii&#13;            c. Step:iii&#13;          2. Step:b&#13;          3. Step:c&#13;            a. Step:i&#13;            b. Step:ii&#13;          4. Step:3&#13;            a. Step:a&#13;              i. Step:i&#13;            b. Step:b&#13;          5. Step:4&#13;        1.2. Step:1.1&#13;          1. Step:1&#13;          2. Step:2&#13;          3. Step:3&#13;        1.3. Step:1.2&#13;          1. Step:1&#13;          2. Step:2">
            <text:p> <text:s text:c="7"/>1.0. Step:1.0 <text:s text:c="9"/>1. Step:1 <text:s text:c="7"/>1.1. Step:2 <text:s text:c="9"/>1. Step:a <text:s text:c="11"/>a. Step:i <text:s text:c="11"/>b. Step:ii <text:s text:c="11"/>c. Step:iii <text:s text:c="9"/>2. Step:b <text:s text:c="9"/>3. Step:c <text:s text:c="11"/>a. Step:i <text:s text:c="11"/>b. Step:ii <text:s text:c="9"/>4. Step:3 <text:s text:c="11"/>a. Step:a <text:s text:c="13"/>i. Step:i <text:s text:c="11"/>b. Step:b <text:s text:c="9"/>5. Step:4 <text:s text:c="7"/>1.2. Step:1.1 <text:s text:c="9"/>1. Step:1 <text:s text:c="9"/>2. Step:2 <text:s text:c="9"/>3. Step:3 <text:s text:c="7"/>1.3. Step:1.2 <text:s text:c="9"/>1. Step:1 <text:s text:c="9"/>2. Step:2</text:p>
          </table:table-cell>
          <table:table-cell table:style-name="ce3" office:value-type="string">
            <text:p><text:s/></text:p>
          </table:table-cell>
          <table:table-cell table:style-name="ce3" table:number-columns-repeated="1012"/>
        </table:table-row>
        <table:table-row table:style-name="ro1">
          <table:table-cell table:style-name="ce3"/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office:value-type="string">
            <text:p><text:s/></text:p>
          </table:table-cell>
          <table:table-cell table:style-name="ce3" table:number-columns-repeated="1012"/>
        </table:table-row>
        <table:table-row table:style-name="ro1">
          <table:table-cell table:style-name="ce4" office:value-type="string">
            <text:p>Full Test →</text:p>
          </table:table-cell>
          <table:table-cell table:formula="of:=[.B33]&amp;[.B34]&amp;CHAR(13)&amp;[.B35]" office:value-type="string" office:string-value="&quot;decreasing 1.0.3.b&quot; in { test(&quot;1.0.3.b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4. Step:b&#13;          5. Step:4&#13;        1.1. Step:1.1&#13;          1. Step:1&#13;          2. Step:2&#13;          3. Step:3&#13;        1.2. Step:1.2&#13;          1. Step:1&#13;          2. Step:2&#13;    &quot;&quot;&quot;)}&#13;&#13;">
            <text:p>"decreasing 1.0.3.b" in { test("1.0.3.b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9"/>4. Step:b <text:s text:c="9"/>5. Step:4 <text:s text:c="7"/>1.1. Step:1.1 <text:s text:c="9"/>1. Step:1 <text:s text:c="9"/>2. Step:2 <text:s text:c="9"/>3. Step:3 <text:s text:c="7"/>1.2. Step:1.2 <text:s text:c="9"/>1. Step:1 <text:s text:c="9"/>2. Step:2 <text:s text:c="3"/>""")}</text:p>
          </table:table-cell>
          <table:table-cell table:formula="of:=[.C33]&amp;[.C34]&amp;CHAR(13)&amp;[.C35]" office:value-type="string" office:string-value="&quot;decreasing 1.0.3.a&quot; in { test(&quot;1.0.3.a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4. Step:a&#13;            a. Step:i&#13;            b. Step:b&#13;          5. Step:4&#13;        1.1. Step:1.1&#13;          1. Step:1&#13;          2. Step:2&#13;          3. Step:3&#13;        1.2. Step:1.2&#13;          1. Step:1&#13;          2. Step:2&#13;    &quot;&quot;&quot;)}&#13;&#13;">
            <text:p>"decreasing 1.0.3.a" in { test("1.0.3.a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9"/>4. Step:a <text:s text:c="11"/>a. Step:i <text:s text:c="11"/>b. Step:b <text:s text:c="9"/>5. Step:4 <text:s text:c="7"/>1.1. Step:1.1 <text:s text:c="9"/>1. Step:1 <text:s text:c="9"/>2. Step:2 <text:s text:c="9"/>3. Step:3 <text:s text:c="7"/>1.2. Step:1.2 <text:s text:c="9"/>1. Step:1 <text:s text:c="9"/>2. Step:2 <text:s text:c="3"/>""")}</text:p>
          </table:table-cell>
          <table:table-cell table:formula="of:=[.D33]&amp;[.D34]&amp;CHAR(13)&amp;[.D35]" office:value-type="string" office:string-value="&quot;decreasing 1.0.3.a.i&quot; in { test(&quot;1.0.3.a.i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b. Step:i&#13;            c. Step:b&#13;          4. Step:4&#13;        1.1. Step:1.1&#13;          1. Step:1&#13;          2. Step:2&#13;          3. Step:3&#13;        1.2. Step:1.2&#13;          1. Step:1&#13;          2. Step:2&#13;    &quot;&quot;&quot;)}&#13;&#13;">
            <text:p>"decreasing 1.0.3.a.i" in { test("1.0.3.a.i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1"/>b. Step:i <text:s text:c="11"/>c. Step:b <text:s text:c="9"/>4. Step:4 <text:s text:c="7"/>1.1. Step:1.1 <text:s text:c="9"/>1. Step:1 <text:s text:c="9"/>2. Step:2 <text:s text:c="9"/>3. Step:3 <text:s text:c="7"/>1.2. Step:1.2 <text:s text:c="9"/>1. Step:1 <text:s text:c="9"/>2. Step:2 <text:s text:c="3"/>""")}</text:p>
          </table:table-cell>
          <table:table-cell table:formula="of:=[.E33]&amp;[.E34]&amp;CHAR(13)&amp;[.E35]" office:value-type="string" office:string-value="&quot;decreasing 1.0.2.a&quot; in { test(&quot;1.0.2.a&quot;, &quot;&quot;&quot;&#13;        1.0. Step:1.0&#13;          1. Step:1&#13;          2. Step:2&#13;          3. Step:a&#13;            a. Step:i&#13;            b. Step:ii&#13;            c. Step:iii&#13;            d. Step:b&#13;            e. Step:c&#13;              i. Step:i&#13;              ii. Step:ii&#13;          4. Step:3&#13;            a. Step:a&#13;              i. Step:i&#13;            b. Step:b&#13;          5. Step:4&#13;        1.1. Step:1.1&#13;          1. Step:1&#13;          2. Step:2&#13;          3. Step:3&#13;        1.2. Step:1.2&#13;          1. Step:1&#13;          2. Step:2&#13;    &quot;&quot;&quot;)}&#13;&#13;">
            <text:p>"decreasing 1.0.2.a" in { test("1.0.2.a", """ <text:s text:c="7"/>1.0. Step:1.0 <text:s text:c="9"/>1. Step:1 <text:s text:c="9"/>2. Step:2 <text:s text:c="9"/>3. Step:a <text:s text:c="11"/>a. Step:i <text:s text:c="11"/>b. Step:ii <text:s text:c="11"/>c. Step:iii <text:s text:c="11"/>d. Step:b <text:s text:c="11"/>e. Step:c <text:s text:c="13"/>i. Step:i <text:s text:c="13"/>ii. Step:ii <text:s text:c="9"/>4. Step:3 <text:s text:c="11"/>a. Step:a <text:s text:c="13"/>i. Step:i <text:s text:c="11"/>b. Step:b <text:s text:c="9"/>5. Step:4 <text:s text:c="7"/>1.1. Step:1.1 <text:s text:c="9"/>1. Step:1 <text:s text:c="9"/>2. Step:2 <text:s text:c="9"/>3. Step:3 <text:s text:c="7"/>1.2. Step:1.2 <text:s text:c="9"/>1. Step:1 <text:s text:c="9"/>2. Step:2 <text:s text:c="3"/>""")}</text:p>
          </table:table-cell>
          <table:table-cell table:formula="of:=[.F33]&amp;[.F34]&amp;CHAR(13)&amp;[.F35]" office:value-type="string" office:string-value="&quot;decreasing 1.0.2.a.i&quot; in { test(&quot;1.0.2.a.i&quot;, &quot;&quot;&quot;&#13;        1.0. Step:1.0&#13;          1. Step:1&#13;          2. Step:2&#13;            a. Step:a&#13;            b. Step:i&#13;              i. Step:ii&#13;              ii. Step:iii&#13;            c. Step:b&#13;            d. Step:c&#13;              i. Step:i&#13;              ii. Step:ii&#13;          3. Step:3&#13;            a. Step:a&#13;              i. Step:i&#13;            b. Step:b&#13;          4. Step:4&#13;        1.1. Step:1.1&#13;          1. Step:1&#13;          2. Step:2&#13;          3. Step:3&#13;        1.2. Step:1.2&#13;          1. Step:1&#13;          2. Step:2&#13;    &quot;&quot;&quot;)}&#13;&#13;">
            <text:p>"decreasing 1.0.2.a.i" in { test("1.0.2.a.i", """ <text:s text:c="7"/>1.0. Step:1.0 <text:s text:c="9"/>1. Step:1 <text:s text:c="9"/>2. Step:2 <text:s text:c="11"/>a. Step:a <text:s text:c="11"/>b. Step:i <text:s text:c="13"/>i. Step:ii <text:s text:c="13"/>ii. Step:iii <text:s text:c="11"/>c. Step:b <text:s text:c="11"/>d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9"/>2. Step:2 <text:s text:c="9"/>3. Step:3 <text:s text:c="7"/>1.2. Step:1.2 <text:s text:c="9"/>1. Step:1 <text:s text:c="9"/>2. Step:2 <text:s text:c="3"/>""")}</text:p>
          </table:table-cell>
          <table:table-cell table:formula="of:=[.G33]&amp;[.G34]&amp;CHAR(13)&amp;[.G35]" office:value-type="string" office:string-value="&quot;decreasing 1.0.2.a.ii&quot; in { test(&quot;1.0.2.a.ii&quot;, &quot;&quot;&quot;&#13;        1.0. Step:1.0&#13;          1. Step:1&#13;          2. Step:2&#13;            a. Step:a&#13;              i. Step:i&#13;            b. Step:ii&#13;              i. Step:iii&#13;            c. Step:b&#13;            d. Step:c&#13;              i. Step:i&#13;              ii. Step:ii&#13;          3. Step:3&#13;            a. Step:a&#13;              i. Step:i&#13;            b. Step:b&#13;          4. Step:4&#13;        1.1. Step:1.1&#13;          1. Step:1&#13;          2. Step:2&#13;          3. Step:3&#13;        1.2. Step:1.2&#13;          1. Step:1&#13;          2. Step:2&#13;    &quot;&quot;&quot;)}&#13;&#13;">
            <text:p>"decreasing 1.0.2.a.ii" in { test("1.0.2.a.ii", """ <text:s text:c="7"/>1.0. Step:1.0 <text:s text:c="9"/>1. Step:1 <text:s text:c="9"/>2. Step:2 <text:s text:c="11"/>a. Step:a <text:s text:c="13"/>i. Step:i <text:s text:c="11"/>b. Step:ii <text:s text:c="13"/>i. Step:iii <text:s text:c="11"/>c. Step:b <text:s text:c="11"/>d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9"/>2. Step:2 <text:s text:c="9"/>3. Step:3 <text:s text:c="7"/>1.2. Step:1.2 <text:s text:c="9"/>1. Step:1 <text:s text:c="9"/>2. Step:2 <text:s text:c="3"/>""")}</text:p>
          </table:table-cell>
          <table:table-cell table:formula="of:=[.H33]&amp;[.H34]&amp;CHAR(13)&amp;[.H35]" office:value-type="string" office:string-value="&quot;decreasing 1.0.2.a.iii&quot; in { test(&quot;1.0.2.a.iii&quot;, &quot;&quot;&quot;&#13;        1.0. Step:1.0&#13;          1. Step:1&#13;          2. Step:2&#13;            a. Step:a&#13;              i. Step:i&#13;              ii. Step:ii&#13;            b. Step:iii&#13;            c. Step:b&#13;            d. Step:c&#13;              i. Step:i&#13;              ii. Step:ii&#13;          3. Step:3&#13;            a. Step:a&#13;              i. Step:i&#13;            b. Step:b&#13;          4. Step:4&#13;        1.1. Step:1.1&#13;          1. Step:1&#13;          2. Step:2&#13;          3. Step:3&#13;        1.2. Step:1.2&#13;          1. Step:1&#13;          2. Step:2&#13;    &quot;&quot;&quot;)}&#13;&#13;">
            <text:p>"decreasing 1.0.2.a.iii" in { test("1.0.2.a.iii", """ <text:s text:c="7"/>1.0. Step:1.0 <text:s text:c="9"/>1. Step:1 <text:s text:c="9"/>2. Step:2 <text:s text:c="11"/>a. Step:a <text:s text:c="13"/>i. Step:i <text:s text:c="13"/>ii. Step:ii <text:s text:c="11"/>b. Step:iii <text:s text:c="11"/>c. Step:b <text:s text:c="11"/>d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9"/>2. Step:2 <text:s text:c="9"/>3. Step:3 <text:s text:c="7"/>1.2. Step:1.2 <text:s text:c="9"/>1. Step:1 <text:s text:c="9"/>2. Step:2 <text:s text:c="3"/>""")}</text:p>
          </table:table-cell>
          <table:table-cell table:formula="of:=[.I33]&amp;[.I34]&amp;CHAR(13)&amp;[.I35]" office:value-type="string" office:string-value="&quot;decreasing 1.1.2&quot; in { test(&quot;1.1.2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  b. Step:b&#13;          4. Step:4&#13;        1.1. Step:1.1&#13;          1. Step:1&#13;        1.2. Step:2&#13;          1. Step:3&#13;        1.3. Step:1.2&#13;          1. Step:1&#13;          2. Step:2&#13;    &quot;&quot;&quot;)}&#13;&#13;">
            <text:p>"decreasing 1.1.2" in { test("1.1.2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7"/>1.2. Step:2 <text:s text:c="9"/>1. Step:3 <text:s text:c="7"/>1.3. Step:1.2 <text:s text:c="9"/>1. Step:1 <text:s text:c="9"/>2. Step:2 <text:s text:c="3"/>""")}</text:p>
          </table:table-cell>
          <table:table-cell table:formula="of:=[.J33]&amp;[.J34]&amp;CHAR(13)&amp;[.J35]" office:value-type="string" office:string-value="&quot;decreasing 1.0.2.b&quot; in { test(&quot;1.0.2.b&quot;, &quot;&quot;&quot;&#13;        1.0. Step:1.0&#13;          1. Step:1&#13;          2. Step:2&#13;            a. Step:a&#13;              i. Step:i&#13;              ii. Step:ii&#13;              iii. Step:iii&#13;          3. Step:b&#13;            a. Step:c&#13;              i. Step:i&#13;              ii. Step:ii&#13;          4. Step:3&#13;            a. Step:a&#13;              i. Step:i&#13;            b. Step:b&#13;          5. Step:4&#13;        1.1. Step:1.1&#13;          1. Step:1&#13;          2. Step:2&#13;          3. Step:3&#13;        1.2. Step:1.2&#13;          1. Step:1&#13;          2. Step:2&#13;    &quot;&quot;&quot;)}&#13;&#13;">
            <text:p>"decreasing 1.0.2.b" in { test("1.0.2.b", """ <text:s text:c="7"/>1.0. Step:1.0 <text:s text:c="9"/>1. Step:1 <text:s text:c="9"/>2. Step:2 <text:s text:c="11"/>a. Step:a <text:s text:c="13"/>i. Step:i <text:s text:c="13"/>ii. Step:ii <text:s text:c="13"/>iii. Step:iii <text:s text:c="9"/>3. Step:b <text:s text:c="11"/>a. Step:c <text:s text:c="13"/>i. Step:i <text:s text:c="13"/>ii. Step:ii <text:s text:c="9"/>4. Step:3 <text:s text:c="11"/>a. Step:a <text:s text:c="13"/>i. Step:i <text:s text:c="11"/>b. Step:b <text:s text:c="9"/>5. Step:4 <text:s text:c="7"/>1.1. Step:1.1 <text:s text:c="9"/>1. Step:1 <text:s text:c="9"/>2. Step:2 <text:s text:c="9"/>3. Step:3 <text:s text:c="7"/>1.2. Step:1.2 <text:s text:c="9"/>1. Step:1 <text:s text:c="9"/>2. Step:2 <text:s text:c="3"/>""")}</text:p>
          </table:table-cell>
          <table:table-cell table:formula="of:=[.K33]&amp;[.K34]&amp;CHAR(13)&amp;[.K35]" office:value-type="string" office:string-value="&quot;decreasing 1.0.2&quot; in { test(&quot;1.0.2&quot;, &quot;&quot;&quot;&#13;        1.0. Step:1.0&#13;          1. Step:1&#13;        1.1. Step:2&#13;          1. Step:a&#13;            a. Step:i&#13;            b. Step:ii&#13;            c. Step:iii&#13;          2. Step:b&#13;          3. Step:c&#13;            a. Step:i&#13;            b. Step:ii&#13;          4. Step:3&#13;            a. Step:a&#13;              i. Step:i&#13;            b. Step:b&#13;          5. Step:4&#13;        1.2. Step:1.1&#13;          1. Step:1&#13;          2. Step:2&#13;          3. Step:3&#13;        1.3. Step:1.2&#13;          1. Step:1&#13;          2. Step:2&#13;    &quot;&quot;&quot;)}&#13;&#13;">
            <text:p>"decreasing 1.0.2" in { test("1.0.2", """ <text:s text:c="7"/>1.0. Step:1.0 <text:s text:c="9"/>1. Step:1 <text:s text:c="7"/>1.1. Step:2 <text:s text:c="9"/>1. Step:a <text:s text:c="11"/>a. Step:i <text:s text:c="11"/>b. Step:ii <text:s text:c="11"/>c. Step:iii <text:s text:c="9"/>2. Step:b <text:s text:c="9"/>3. Step:c <text:s text:c="11"/>a. Step:i <text:s text:c="11"/>b. Step:ii <text:s text:c="9"/>4. Step:3 <text:s text:c="11"/>a. Step:a <text:s text:c="13"/>i. Step:i <text:s text:c="11"/>b. Step:b <text:s text:c="9"/>5. Step:4 <text:s text:c="7"/>1.2. Step:1.1 <text:s text:c="9"/>1. Step:1 <text:s text:c="9"/>2. Step:2 <text:s text:c="9"/>3. Step:3 <text:s text:c="7"/>1.3. Step:1.2 <text:s text:c="9"/>1. Step:1 <text:s text:c="9"/>2. Step:2 <text:s text:c="3"/>""")}</text:p>
          </table:table-cell>
          <table:table-cell office:value-type="string">
            <text:p><text:s/></text:p>
          </table:table-cell>
          <table:table-cell table:number-columns-repeated="1012"/>
        </table:table-row>
        <table:table-row table:style-name="ro1">
          <table:table-cell table:style-name="ce4" office:value-type="string">
            <text:p>All Tests →</text:p>
          </table:table-cell>
          <table:table-cell table:formula="of:=[.B36]&amp;[.C36]&amp;[.D36]&amp;[.E36]&amp;[.F36]&amp;[.G36]&amp;[.H36]&amp;[.I36]&amp;[.J36]&amp;[.K36]" office:value-type="string" office:string-value="&quot;decreasing 1.0.3.b&quot; in { test(&quot;1.0.3.b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4. Step:b&#13;          5. Step:4&#13;        1.1. Step:1.1&#13;          1. Step:1&#13;          2. Step:2&#13;          3. Step:3&#13;        1.2. Step:1.2&#13;          1. Step:1&#13;          2. Step:2&#13;    &quot;&quot;&quot;)}&#13;&#13;&quot;decreasing 1.0.3.a&quot; in { test(&quot;1.0.3.a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4. Step:a&#13;            a. Step:i&#13;            b. Step:b&#13;          5. Step:4&#13;        1.1. Step:1.1&#13;          1. Step:1&#13;          2. Step:2&#13;          3. Step:3&#13;        1.2. Step:1.2&#13;          1. Step:1&#13;          2. Step:2&#13;    &quot;&quot;&quot;)}&#13;&#13;&quot;decreasing 1.0.3.a.i&quot; in { test(&quot;1.0.3.a.i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b. Step:i&#13;            c. Step:b&#13;          4. Step:4&#13;        1.1. Step:1.1&#13;          1. Step:1&#13;          2. Step:2&#13;          3. Step:3&#13;        1.2. Step:1.2&#13;          1. Step:1&#13;          2. Step:2&#13;    &quot;&quot;&quot;)}&#13;&#13;&quot;decreasing 1.0.2.a&quot; in { test(&quot;1.0.2.a&quot;, &quot;&quot;&quot;&#13;        1.0. Step:1.0&#13;          1. Step:1&#13;          2. Step:2&#13;          3. Step:a&#13;            a. Step:i&#13;            b. Step:ii&#13;            c. Step:iii&#13;            d. Step:b&#13;            e. Step:c&#13;              i. Step:i&#13;              ii. Step:ii&#13;          4. Step:3&#13;            a. Step:a&#13;              i. Step:i&#13;            b. Step:b&#13;          5. Step:4&#13;        1.1. Step:1.1&#13;          1. Step:1&#13;          2. Step:2&#13;          3. Step:3&#13;        1.2. Step:1.2&#13;          1. Step:1&#13;          2. Step:2&#13;    &quot;&quot;&quot;)}&#13;&#13;&quot;decreasing 1.0.2.a.i&quot; in { test(&quot;1.0.2.a.i&quot;, &quot;&quot;&quot;&#13;        1.0. Step:1.0&#13;          1. Step:1&#13;          2. Step:2&#13;            a. Step:a&#13;            b. Step:i&#13;              i. Step:ii&#13;              ii. Step:iii&#13;            c. Step:b&#13;            d. Step:c&#13;              i. Step:i&#13;              ii. Step:ii&#13;          3. Step:3&#13;            a. Step:a&#13;              i. Step:i&#13;            b. Step:b&#13;          4. Step:4&#13;        1.1. Step:1.1&#13;          1. Step:1&#13;          2. Step:2&#13;          3. Step:3&#13;        1.2. Step:1.2&#13;          1. Step:1&#13;          2. Step:2&#13;    &quot;&quot;&quot;)}&#13;&#13;&quot;decreasing 1.0.2.a.ii&quot; in { test(&quot;1.0.2.a.ii&quot;, &quot;&quot;&quot;&#13;        1.0. Step:1.0&#13;          1. Step:1&#13;          2. Step:2&#13;            a. Step:a&#13;              i. Step:i&#13;            b. Step:ii&#13;              i. Step:iii&#13;            c. Step:b&#13;            d. Step:c&#13;              i. Step:i&#13;              ii. Step:ii&#13;          3. Step:3&#13;            a. Step:a&#13;              i. Step:i&#13;            b. Step:b&#13;          4. Step:4&#13;        1.1. Step:1.1&#13;          1. Step:1&#13;          2. Step:2&#13;          3. Step:3&#13;        1.2. Step:1.2&#13;          1. Step:1&#13;          2. Step:2&#13;    &quot;&quot;&quot;)}&#13;&#13;&quot;decreasing 1.0.2.a.iii&quot; in { test(&quot;1.0.2.a.iii&quot;, &quot;&quot;&quot;&#13;        1.0. Step:1.0&#13;          1. Step:1&#13;          2. Step:2&#13;            a. Step:a&#13;              i. Step:i&#13;              ii. Step:ii&#13;            b. Step:iii&#13;            c. Step:b&#13;            d. Step:c&#13;              i. Step:i&#13;              ii. Step:ii&#13;          3. Step:3&#13;            a. Step:a&#13;              i. Step:i&#13;            b. Step:b&#13;          4. Step:4&#13;        1.1. Step:1.1&#13;          1. Step:1&#13;          2. Step:2&#13;          3. Step:3&#13;        1.2. Step:1.2&#13;          1. Step:1&#13;          2. Step:2&#13;    &quot;&quot;&quot;)}&#13;&#13;&quot;decreasing 1.1.2&quot; in { test(&quot;1.1.2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  b. Step:b&#13;          4. Step:4&#13;        1.1. Step:1.1&#13;          1. Step:1&#13;        1.2. Step:2&#13;          1. Step:3&#13;        1.3. Step:1.2&#13;          1. Step:1&#13;          2. Step:2&#13;    &quot;&quot;&quot;)}&#13;&#13;&quot;decreasing 1.0.2.b&quot; in { test(&quot;1.0.2.b&quot;, &quot;&quot;&quot;&#13;        1.0. Step:1.0&#13;          1. Step:1&#13;          2. Step:2&#13;            a. Step:a&#13;              i. Step:i&#13;              ii. Step:ii&#13;              iii. Step:iii&#13;          3. Step:b&#13;            a. Step:c&#13;              i. Step:i&#13;              ii. Step:ii&#13;          4. Step:3&#13;            a. Step:a&#13;              i. Step:i&#13;            b. Step:b&#13;          5. Step:4&#13;        1.1. Step:1.1&#13;          1. Step:1&#13;          2. Step:2&#13;          3. Step:3&#13;        1.2. Step:1.2&#13;          1. Step:1&#13;          2. Step:2&#13;    &quot;&quot;&quot;)}&#13;&#13;&quot;decreasing 1.0.2&quot; in { test(&quot;1.0.2&quot;, &quot;&quot;&quot;&#13;        1.0. Step:1.0&#13;          1. Step:1&#13;        1.1. Step:2&#13;          1. Step:a&#13;            a. Step:i&#13;            b. Step:ii&#13;            c. Step:iii&#13;          2. Step:b&#13;          3. Step:c&#13;            a. Step:i&#13;            b. Step:ii&#13;          4. Step:3&#13;            a. Step:a&#13;              i. Step:i&#13;            b. Step:b&#13;          5. Step:4&#13;        1.2. Step:1.1&#13;          1. Step:1&#13;          2. Step:2&#13;          3. Step:3&#13;        1.3. Step:1.2&#13;          1. Step:1&#13;          2. Step:2&#13;    &quot;&quot;&quot;)}&#13;&#13;">
            <text:p>"decreasing 1.0.3.b" in { test("1.0.3.b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9"/>4. Step:b <text:s text:c="9"/>5. Step:4 <text:s text:c="7"/>1.1. Step:1.1 <text:s text:c="9"/>1. Step:1 <text:s text:c="9"/>2. Step:2 <text:s text:c="9"/>3. Step:3 <text:s text:c="7"/>1.2. Step:1.2 <text:s text:c="9"/>1. Step:1 <text:s text:c="9"/>2. Step:2 <text:s text:c="3"/>""")}"decreasing 1.0.3.a" in { test("1.0.3.a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9"/>4. Step:a <text:s text:c="11"/>a. Step:i <text:s text:c="11"/>b. Step:b <text:s text:c="9"/>5. Step:4 <text:s text:c="7"/>1.1. Step:1.1 <text:s text:c="9"/>1. Step:1 <text:s text:c="9"/>2. Step:2 <text:s text:c="9"/>3. Step:3 <text:s text:c="7"/>1.2. Step:1.2 <text:s text:c="9"/>1. Step:1 <text:s text:c="9"/>2. Step:2 <text:s text:c="3"/>""")}"decreasing 1.0.3.a.i" in { test("1.0.3.a.i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1"/>b. Step:i <text:s text:c="11"/>c. Step:b <text:s text:c="9"/>4. Step:4 <text:s text:c="7"/>1.1. Step:1.1 <text:s text:c="9"/>1. Step:1 <text:s text:c="9"/>2. Step:2 <text:s text:c="9"/>3. Step:3 <text:s text:c="7"/>1.2. Step:1.2 <text:s text:c="9"/>1. Step:1 <text:s text:c="9"/>2. Step:2 <text:s text:c="3"/>""")}"decreasing 1.0.2.a" in { test("1.0.2.a", """ <text:s text:c="7"/>1.0. Step:1.0 <text:s text:c="9"/>1. Step:1 <text:s text:c="9"/>2. Step:2 <text:s text:c="9"/>3. Step:a <text:s text:c="11"/>a. Step:i <text:s text:c="11"/>b. Step:ii <text:s text:c="11"/>c. Step:iii <text:s text:c="11"/>d. Step:b <text:s text:c="11"/>e. Step:c <text:s text:c="13"/>i. Step:i <text:s text:c="13"/>ii. Step:ii <text:s text:c="9"/>4. Step:3 <text:s text:c="11"/>a. Step:a <text:s text:c="13"/>i. Step:i <text:s text:c="11"/>b. Step:b <text:s text:c="9"/>5. Step:4 <text:s text:c="7"/>1.1. Step:1.1 <text:s text:c="9"/>1. Step:1 <text:s text:c="9"/>2. Step:2 <text:s text:c="9"/>3. Step:3 <text:s text:c="7"/>1.2. Step:1.2 <text:s text:c="9"/>1. Step:1 <text:s text:c="9"/>2. Step:2 <text:s text:c="3"/>""")}"decreasing 1.0.2.a.i" in { test("1.0.2.a.i", """ <text:s text:c="7"/>1.0. Step:1.0 <text:s text:c="9"/>1. Step:1 <text:s text:c="9"/>2. Step:2 <text:s text:c="11"/>a. Step:a <text:s text:c="11"/>b. Step:i <text:s text:c="13"/>i. Step:ii <text:s text:c="13"/>ii. Step:iii <text:s text:c="11"/>c. Step:b <text:s text:c="11"/>d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9"/>2. Step:2 <text:s text:c="9"/>3. Step:3 <text:s text:c="7"/>1.2. Step:1.2 <text:s text:c="9"/>1. Step:1 <text:s text:c="9"/>2. Step:2 <text:s text:c="3"/>""")}"decreasing 1.0.2.a.ii" in { test("1.0.2.a.ii", """ <text:s text:c="7"/>1.0. Step:1.0 <text:s text:c="9"/>1. Step:1 <text:s text:c="9"/>2. Step:2 <text:s text:c="11"/>a. Step:a <text:s text:c="13"/>i. Step:i <text:s text:c="11"/>b. Step:ii <text:s text:c="13"/>i. Step:iii <text:s text:c="11"/>c. Step:b <text:s text:c="11"/>d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9"/>2. Step:2 <text:s text:c="9"/>3. Step:3 <text:s text:c="7"/>1.2. Step:1.2 <text:s text:c="9"/>1. Step:1 <text:s text:c="9"/>2. Step:2 <text:s text:c="3"/>""")}"decreasing 1.0.2.a.iii" in { test("1.0.2.a.iii", """ <text:s text:c="7"/>1.0. Step:1.0 <text:s text:c="9"/>1. Step:1 <text:s text:c="9"/>2. Step:2 <text:s text:c="11"/>a. Step:a <text:s text:c="13"/>i. Step:i <text:s text:c="13"/>ii. Step:ii <text:s text:c="11"/>b. Step:iii <text:s text:c="11"/>c. Step:b <text:s text:c="11"/>d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9"/>2. Step:2 <text:s text:c="9"/>3. Step:3 <text:s text:c="7"/>1.2. Step:1.2 <text:s text:c="9"/>1. Step:1 <text:s text:c="9"/>2. Step:2 <text:s text:c="3"/>""")}"decreasing 1.1.2" in { test("1.1.2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7"/>1.2. Step:2 <text:s text:c="9"/>1. Step:3 <text:s text:c="7"/>1.3. Step:1.2 <text:s text:c="9"/>1. Step:1 <text:s text:c="9"/>2. Step:2 <text:s text:c="3"/>""")}"decreasing 1.0.2.b" in { test("1.0.2.b", """ <text:s text:c="7"/>1.0. Step:1.0 <text:s text:c="9"/>1. Step:1 <text:s text:c="9"/>2. Step:2 <text:s text:c="11"/>a. Step:a <text:s text:c="13"/>i. Step:i <text:s text:c="13"/>ii. Step:ii <text:s text:c="13"/>iii. Step:iii <text:s text:c="9"/>3. Step:b <text:s text:c="11"/>a. Step:c <text:s text:c="13"/>i. Step:i <text:s text:c="13"/>ii. Step:ii <text:s text:c="9"/>4. Step:3 <text:s text:c="11"/>a. Step:a <text:s text:c="13"/>i. Step:i <text:s text:c="11"/>b. Step:b <text:s text:c="9"/>5. Step:4 <text:s text:c="7"/>1.1. Step:1.1 <text:s text:c="9"/>1. Step:1 <text:s text:c="9"/>2. Step:2 <text:s text:c="9"/>3. Step:3 <text:s text:c="7"/>1.2. Step:1.2 <text:s text:c="9"/>1. Step:1 <text:s text:c="9"/>2. Step:2 <text:s text:c="3"/>""")}"decreasing 1.0.2" in { test("1.0.2", """ <text:s text:c="7"/>1.0. Step:1.0 <text:s text:c="9"/>1. Step:1 <text:s text:c="7"/>1.1. Step:2 <text:s text:c="9"/>1. Step:a <text:s text:c="11"/>a. Step:i <text:s text:c="11"/>b. Step:ii <text:s text:c="11"/>c. Step:iii <text:s text:c="9"/>2. Step:b <text:s text:c="9"/>3. Step:c <text:s text:c="11"/>a. Step:i <text:s text:c="11"/>b. Step:ii <text:s text:c="9"/>4. Step:3 <text:s text:c="11"/>a. Step:a <text:s text:c="13"/>i. Step:i <text:s text:c="11"/>b. Step:b <text:s text:c="9"/>5. Step:4 <text:s text:c="7"/>1.2. Step:1.1 <text:s text:c="9"/>1. Step:1 <text:s text:c="9"/>2. Step:2 <text:s text:c="9"/>3. Step:3 <text:s text:c="7"/>1.3. Step:1.2 <text:s text:c="9"/>1. Step:1 <text:s text:c="9"/>2. Step:2 <text:s text:c="3"/>""")}</text:p>
          </table:table-cell>
          <table:table-cell office:value-type="string">
            <text:p><text:s/></text:p>
          </table:table-cell>
          <table:table-cell table:number-columns-repeated="1021"/>
        </table:table-row>
        <table:table-row table:style-name="ro2" table:number-rows-repeated="7">
          <table:table-cell table:number-columns-repeated="1024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dentIncrease()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3" table:number-columns-repeated="1010" table:default-cell-style-name="Default"/>
        <table:table-row table:style-name="ro1">
          <table:table-cell table:style-name="ce1" office:value-type="string">
            <text:p>ORIG</text:p>
          </table:table-cell>
          <table:table-cell table:style-name="ce1" office:value-type="string">
            <text:p>1.0.2</text:p>
          </table:table-cell>
          <table:table-cell table:style-name="ce1" office:value-type="string">
            <text:p>1.0.3</text:p>
          </table:table-cell>
          <table:table-cell table:style-name="ce1" office:value-type="string">
            <text:p>1.0.3.b</text:p>
          </table:table-cell>
          <table:table-cell table:style-name="ce1" office:value-type="string">
            <text:p>1.0.4</text:p>
          </table:table-cell>
          <table:table-cell table:style-name="ce1" office:value-type="float" office:value="1.1">
            <text:p>1.1</text:p>
          </table:table-cell>
          <table:table-cell table:style-name="ce1" office:value-type="string">
            <text:p>1.1.2</text:p>
          </table:table-cell>
          <table:table-cell table:style-name="ce1" office:value-type="string">
            <text:p>1.1.3</text:p>
          </table:table-cell>
          <table:table-cell table:style-name="ce1" table:number-columns-repeated="1016"/>
        </table:table-row>
        <table:table-row table:style-name="ro1">
          <table:table-cell table:style-name="ce2" office:value-type="string">
            <text:p>1.0. Step:1.0</text:p>
          </table:table-cell>
          <table:table-cell table:number-columns-repeated="7" table:style-name="ce5" office:value-type="string">
            <text:p>1.0. Step:1.0</text:p>
          </table:table-cell>
          <table:table-cell table:style-name="ce5"/>
          <table:table-cell table:style-name="ce8"/>
          <table:table-cell table:number-columns-repeated="1014"/>
        </table:table-row>
        <table:table-row table:style-name="ro1">
          <table:table-cell table:style-name="ce2" office:value-type="string">
            <text:p><text:s text:c="2"/>1. Step:1</text:p>
          </table:table-cell>
          <table:table-cell table:number-columns-repeated="7" table:style-name="ce5" office:value-type="string">
            <text:p><text:s text:c="2"/>1. Step:1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<text:s text:c="2"/>2. Step:2</text:p>
          </table:table-cell>
          <table:table-cell table:style-name="ce6" office:value-type="string">
            <text:p><text:s text:c="4"/>a. Step:2</text:p>
          </table:table-cell>
          <table:table-cell table:number-columns-repeated="6" table:style-name="ce5" office:value-type="string">
            <text:p><text:s text:c="2"/>2. Step:2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<text:s text:c="4"/>a. Step:a</text:p>
          </table:table-cell>
          <table:table-cell table:style-name="ce6" office:value-type="string">
            <text:p><text:s text:c="6"/>i. Step:a</text:p>
          </table:table-cell>
          <table:table-cell table:number-columns-repeated="6" table:style-name="ce5" office:value-type="string">
            <text:p><text:s text:c="4"/>a. Step:a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<text:s text:c="6"/>i. Step:i</text:p>
          </table:table-cell>
          <table:table-cell table:style-name="ce6" office:value-type="string">
            <text:p><text:s text:c="8"/>1. Step:i</text:p>
          </table:table-cell>
          <table:table-cell table:number-columns-repeated="6" table:style-name="ce5" office:value-type="string">
            <text:p><text:s text:c="6"/>i. Step:i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<text:s text:c="6"/>ii. Step:ii</text:p>
          </table:table-cell>
          <table:table-cell table:style-name="ce6" office:value-type="string">
            <text:p><text:s text:c="8"/>2. Step:ii</text:p>
          </table:table-cell>
          <table:table-cell table:number-columns-repeated="6" table:style-name="ce5" office:value-type="string">
            <text:p><text:s text:c="6"/>ii. Step:ii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<text:s text:c="6"/>iii. Step:iii</text:p>
          </table:table-cell>
          <table:table-cell table:style-name="ce6" office:value-type="string">
            <text:p><text:s text:c="8"/>3. Step:iii</text:p>
          </table:table-cell>
          <table:table-cell table:number-columns-repeated="6" table:style-name="ce5" office:value-type="string">
            <text:p><text:s text:c="6"/>iii. Step:iii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<text:s text:c="4"/>b. Step:b</text:p>
          </table:table-cell>
          <table:table-cell table:style-name="ce6" office:value-type="string">
            <text:p><text:s text:c="6"/>ii. Step:b</text:p>
          </table:table-cell>
          <table:table-cell table:number-columns-repeated="6" table:style-name="ce5" office:value-type="string">
            <text:p><text:s text:c="4"/>b. Step:b</text:p>
          </table:table-cell>
          <table:table-cell table:style-name="ce5"/>
          <table:table-cell table:style-name="ce6"/>
          <table:table-cell table:number-columns-repeated="1014"/>
        </table:table-row>
        <table:table-row table:style-name="ro1">
          <table:table-cell table:style-name="ce2" office:value-type="string">
            <text:p><text:s text:c="4"/>c. Step:c</text:p>
          </table:table-cell>
          <table:table-cell table:style-name="ce6" office:value-type="string">
            <text:p><text:s text:c="6"/>iii. Step:c</text:p>
          </table:table-cell>
          <table:table-cell table:number-columns-repeated="6" table:style-name="ce5" office:value-type="string">
            <text:p><text:s text:c="4"/>c. Step:c</text:p>
          </table:table-cell>
          <table:table-cell table:style-name="ce5"/>
          <table:table-cell table:style-name="ce7"/>
          <table:table-cell table:number-columns-repeated="1014"/>
        </table:table-row>
        <table:table-row table:style-name="ro1">
          <table:table-cell table:style-name="ce2" office:value-type="string">
            <text:p><text:s text:c="6"/>i. Step:i</text:p>
          </table:table-cell>
          <table:table-cell table:style-name="ce6" office:value-type="string">
            <text:p><text:s text:c="8"/>1. Step:i</text:p>
          </table:table-cell>
          <table:table-cell table:number-columns-repeated="6" table:style-name="ce5" office:value-type="string">
            <text:p><text:s text:c="6"/>i. Step:i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<text:s text:c="6"/>ii. Step:ii</text:p>
          </table:table-cell>
          <table:table-cell table:style-name="ce6" office:value-type="string">
            <text:p><text:s text:c="8"/>2. Step:ii</text:p>
          </table:table-cell>
          <table:table-cell table:number-columns-repeated="6" table:style-name="ce5" office:value-type="string">
            <text:p><text:s text:c="6"/>ii. Step:ii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<text:s text:c="2"/>3. Step:3</text:p>
          </table:table-cell>
          <table:table-cell table:style-name="ce7" office:value-type="string">
            <text:p><text:s text:c="2"/>2. Step:3</text:p>
          </table:table-cell>
          <table:table-cell table:style-name="ce6" office:value-type="string">
            <text:p><text:s text:c="4"/>d. Step:3</text:p>
          </table:table-cell>
          <table:table-cell table:number-columns-repeated="5" table:style-name="ce5" office:value-type="string">
            <text:p><text:s text:c="2"/>3. Step:3</text:p>
          </table:table-cell>
          <table:table-cell table:style-name="ce5"/>
          <table:table-cell table:style-name="ce7"/>
          <table:table-cell table:number-columns-repeated="1014"/>
        </table:table-row>
        <table:table-row table:style-name="ro1">
          <table:table-cell table:style-name="ce2" office:value-type="string">
            <text:p><text:s text:c="4"/>a. Step:a</text:p>
          </table:table-cell>
          <table:table-cell table:style-name="ce5" office:value-type="string">
            <text:p><text:s text:c="4"/>a. Step:a</text:p>
          </table:table-cell>
          <table:table-cell table:style-name="ce6" office:value-type="string">
            <text:p><text:s text:c="6"/>i. Step:a</text:p>
          </table:table-cell>
          <table:table-cell table:number-columns-repeated="5" table:style-name="ce5" office:value-type="string">
            <text:p><text:s text:c="4"/>a. Step:a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<text:s text:c="6"/>i. Step:i</text:p>
          </table:table-cell>
          <table:table-cell table:style-name="ce5" office:value-type="string">
            <text:p><text:s text:c="6"/>i. Step:i</text:p>
          </table:table-cell>
          <table:table-cell table:style-name="ce6" office:value-type="string">
            <text:p><text:s text:c="8"/>1. Step:i</text:p>
          </table:table-cell>
          <table:table-cell table:number-columns-repeated="5" table:style-name="ce5" office:value-type="string">
            <text:p><text:s text:c="6"/>i. Step:i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<text:s text:c="4"/>b. Step:b</text:p>
          </table:table-cell>
          <table:table-cell table:style-name="ce5" office:value-type="string">
            <text:p><text:s text:c="4"/>b. Step:b</text:p>
          </table:table-cell>
          <table:table-cell table:number-columns-repeated="2" table:style-name="ce6" office:value-type="string">
            <text:p><text:s text:c="6"/>ii. Step:b</text:p>
          </table:table-cell>
          <table:table-cell table:number-columns-repeated="4" table:style-name="ce5" office:value-type="string">
            <text:p><text:s text:c="4"/>b. Step:b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<text:s text:c="2"/>4. Step:4</text:p>
          </table:table-cell>
          <table:table-cell table:number-columns-repeated="2" table:style-name="ce7" office:value-type="string">
            <text:p><text:s text:c="2"/>3. Step:4</text:p>
          </table:table-cell>
          <table:table-cell table:style-name="ce5" office:value-type="string">
            <text:p><text:s text:c="2"/>4. Step:4</text:p>
          </table:table-cell>
          <table:table-cell table:style-name="ce6" office:value-type="string">
            <text:p><text:s text:c="4"/>c. Step:4</text:p>
          </table:table-cell>
          <table:table-cell table:number-columns-repeated="3" table:style-name="ce5" office:value-type="string">
            <text:p><text:s text:c="2"/>4. Step:4</text:p>
          </table:table-cell>
          <table:table-cell table:style-name="ce5"/>
          <table:table-cell table:style-name="ce7"/>
          <table:table-cell table:number-columns-repeated="1014"/>
        </table:table-row>
        <table:table-row table:style-name="ro1">
          <table:table-cell table:style-name="ce2" office:value-type="string">
            <text:p>1.1. Step:1.1</text:p>
          </table:table-cell>
          <table:table-cell table:number-columns-repeated="4" table:style-name="ce5" office:value-type="string">
            <text:p>1.1. Step:1.1</text:p>
          </table:table-cell>
          <table:table-cell table:style-name="ce6" office:value-type="string">
            <text:p><text:s text:c="2"/>5. Step:1.1</text:p>
          </table:table-cell>
          <table:table-cell table:number-columns-repeated="2" table:style-name="ce5" office:value-type="string">
            <text:p>1.1. Step:1.1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<text:s text:c="2"/>1. Step:1</text:p>
          </table:table-cell>
          <table:table-cell table:number-columns-repeated="4" table:style-name="ce5" office:value-type="string">
            <text:p><text:s text:c="2"/>1. Step:1</text:p>
          </table:table-cell>
          <table:table-cell table:style-name="ce6" office:value-type="string">
            <text:p><text:s text:c="4"/>a. Step:1</text:p>
          </table:table-cell>
          <table:table-cell table:number-columns-repeated="2" table:style-name="ce5" office:value-type="string">
            <text:p><text:s text:c="2"/>1. Step:1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<text:s text:c="2"/>2. Step:2</text:p>
          </table:table-cell>
          <table:table-cell table:number-columns-repeated="4" table:style-name="ce5" office:value-type="string">
            <text:p><text:s text:c="2"/>2. Step:2</text:p>
          </table:table-cell>
          <table:table-cell table:style-name="ce6" office:value-type="string">
            <text:p><text:s text:c="4"/>b. Step:2</text:p>
          </table:table-cell>
          <table:table-cell table:style-name="ce6" office:value-type="string">
            <text:p><text:s text:c="4"/>a. Step:2</text:p>
          </table:table-cell>
          <table:table-cell table:style-name="ce5" office:value-type="string">
            <text:p><text:s text:c="2"/>2. Step:2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<text:s text:c="2"/>3. Step:3</text:p>
          </table:table-cell>
          <table:table-cell table:number-columns-repeated="4" table:style-name="ce5" office:value-type="string">
            <text:p><text:s text:c="2"/>3. Step:3</text:p>
          </table:table-cell>
          <table:table-cell table:style-name="ce6" office:value-type="string">
            <text:p><text:s text:c="4"/>c. Step:3</text:p>
          </table:table-cell>
          <table:table-cell table:style-name="ce7" office:value-type="string">
            <text:p><text:s text:c="2"/>2. Step:3</text:p>
          </table:table-cell>
          <table:table-cell table:style-name="ce6" office:value-type="string">
            <text:p><text:s text:c="4"/>a. Step:3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1.2. Step:1.2</text:p>
          </table:table-cell>
          <table:table-cell table:number-columns-repeated="4" table:style-name="ce5" office:value-type="string">
            <text:p>1.2. Step:1.2</text:p>
          </table:table-cell>
          <table:table-cell table:style-name="ce7" office:value-type="string">
            <text:p>1.1. Step:1.2</text:p>
          </table:table-cell>
          <table:table-cell table:number-columns-repeated="2" table:style-name="ce5" office:value-type="string">
            <text:p>1.2. Step:1.2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<text:s text:c="2"/>1. Step:1</text:p>
          </table:table-cell>
          <table:table-cell table:number-columns-repeated="7" table:style-name="ce5" office:value-type="string">
            <text:p><text:s text:c="2"/>1. Step:1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<text:s text:c="2"/>2. Step:2</text:p>
          </table:table-cell>
          <table:table-cell table:number-columns-repeated="7" table:style-name="ce5" office:value-type="string">
            <text:p><text:s text:c="2"/>2. Step:2</text:p>
          </table:table-cell>
          <table:table-cell table:style-name="ce5" table:number-columns-repeated="2"/>
          <table:table-cell table:number-columns-repeated="1014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3"/>
          <table:table-cell table:style-name="ce3" table:formula="of:=&quot;&quot;&quot;increasing &quot;&amp;[.B$1]&amp;&quot;&quot;&quot; in { test(&quot;&quot;&quot;&amp;[.B$1]&amp;&quot;&quot;&quot;, &quot;&quot;&quot;&quot;&quot;&quot;&quot;" office:value-type="string" office:string-value="&quot;increasing 1.0.2&quot; in { test(&quot;1.0.2&quot;, &quot;&quot;&quot;">
            <text:p>"increasing 1.0.2" in { test("1.0.2", """</text:p>
          </table:table-cell>
          <table:table-cell table:style-name="ce3" table:formula="of:=&quot;&quot;&quot;increasing &quot;&amp;[.C$1]&amp;&quot;&quot;&quot; in { test(&quot;&quot;&quot;&amp;[.C$1]&amp;&quot;&quot;&quot;, &quot;&quot;&quot;&quot;&quot;&quot;&quot;" office:value-type="string" office:string-value="&quot;increasing 1.0.3&quot; in { test(&quot;1.0.3&quot;, &quot;&quot;&quot;">
            <text:p>"increasing 1.0.3" in { test("1.0.3", """</text:p>
          </table:table-cell>
          <table:table-cell table:style-name="ce3" table:formula="of:=&quot;&quot;&quot;increasing &quot;&amp;[.D$1]&amp;&quot;&quot;&quot; in { test(&quot;&quot;&quot;&amp;[.D$1]&amp;&quot;&quot;&quot;, &quot;&quot;&quot;&quot;&quot;&quot;&quot;" office:value-type="string" office:string-value="&quot;increasing 1.0.3.b&quot; in { test(&quot;1.0.3.b&quot;, &quot;&quot;&quot;">
            <text:p>"increasing 1.0.3.b" in { test("1.0.3.b", """</text:p>
          </table:table-cell>
          <table:table-cell table:style-name="ce3" table:formula="of:=&quot;&quot;&quot;increasing &quot;&amp;[.E$1]&amp;&quot;&quot;&quot; in { test(&quot;&quot;&quot;&amp;[.E$1]&amp;&quot;&quot;&quot;, &quot;&quot;&quot;&quot;&quot;&quot;&quot;" office:value-type="string" office:string-value="&quot;increasing 1.0.4&quot; in { test(&quot;1.0.4&quot;, &quot;&quot;&quot;">
            <text:p>"increasing 1.0.4" in { test("1.0.4", """</text:p>
          </table:table-cell>
          <table:table-cell table:style-name="ce3" table:formula="of:=&quot;&quot;&quot;increasing &quot;&amp;[.F$1]&amp;&quot;&quot;&quot; in { test(&quot;&quot;&quot;&amp;[.F$1]&amp;&quot;&quot;&quot;, &quot;&quot;&quot;&quot;&quot;&quot;&quot;" office:value-type="string" office:string-value="&quot;increasing 1.1&quot; in { test(&quot;1.1&quot;, &quot;&quot;&quot;">
            <text:p>"increasing 1.1" in { test("1.1", """</text:p>
          </table:table-cell>
          <table:table-cell table:style-name="ce3" table:formula="of:=&quot;&quot;&quot;increasing &quot;&amp;[.G$1]&amp;&quot;&quot;&quot; in { test(&quot;&quot;&quot;&amp;[.G$1]&amp;&quot;&quot;&quot;, &quot;&quot;&quot;&quot;&quot;&quot;&quot;" office:value-type="string" office:string-value="&quot;increasing 1.1.2&quot; in { test(&quot;1.1.2&quot;, &quot;&quot;&quot;">
            <text:p>"increasing 1.1.2" in { test("1.1.2", """</text:p>
          </table:table-cell>
          <table:table-cell table:style-name="ce3" table:formula="of:=&quot;&quot;&quot;increasing &quot;&amp;[.H$1]&amp;&quot;&quot;&quot; in { test(&quot;&quot;&quot;&amp;[.H$1]&amp;&quot;&quot;&quot;, &quot;&quot;&quot;&quot;&quot;&quot;&quot;" office:value-type="string" office:string-value="&quot;increasing 1.1.3&quot; in { test(&quot;1.1.3&quot;, &quot;&quot;&quot;">
            <text:p>"increasing 1.1.3" in { test("1.1.3", """</text:p>
          </table:table-cell>
          <table:table-cell table:style-name="ce3" office:value-type="string">
            <text:p><text:s/></text:p>
          </table:table-cell>
          <table:table-cell table:style-name="ce3"/>
          <table:table-cell table:style-name="ce3" office:value-type="string">
            <text:p><text:s/></text:p>
          </table:table-cell>
          <table:table-cell table:style-name="ce3" table:number-columns-repeated="1013"/>
        </table:table-row>
        <table:table-row table:style-name="ro1">
          <table:table-cell table:style-name="ce3" table:formula="of:=CHAR(13)&amp;&quot;        &quot;" office:value-type="string" office:string-value="&#13;        ">
            <text:p> <text:s text:c="7"/></text:p>
          </table:table-cell>
          <table:table-cell table:style-name="ce3" table:formula="of:=[.$A34]&amp;[.B$2]&amp;[.$A34]&amp;[.B$3]&amp;[.$A34]&amp;[.B$4]&amp;[.$A34]&amp;[.B$5]&amp;[.$A34]&amp;[.B$6]&amp;[.$A34]&amp;[.B$7]&amp;[.$A34]&amp;[.B$8]&amp;[.$A34]&amp;[.B$9]&amp;[.$A34]&amp;[.B$10]&amp;[.$A34]&amp;[.B$11]&amp;[.$A34]&amp;[.B$12]&amp;[.$A34]&amp;[.B$13]&amp;[.$A34]&amp;[.B$14]&amp;[.$A34]&amp;[.B$15]&amp;[.$A34]&amp;[.B$16]&amp;[.$A34]&amp;[.B$17]&amp;[.$A34]&amp;[.B$18]&amp;[.$A34]&amp;[.B$19]&amp;[.$A34]&amp;[.B$20]&amp;[.$A34]&amp;[.B$21]&amp;[.$A34]&amp;[.B$22]&amp;[.$A34]&amp;[.B$23]&amp;[.$A34]&amp;[.B$24]" office:value-type="string" office:string-value="&#13;        1.0. Step:1.0&#13;          1. Step:1&#13;            a. Step:2&#13;              i. Step:a&#13;                1. Step:i&#13;                2. Step:ii&#13;                3. Step:iii&#13;              ii. Step:b&#13;              iii. Step:c&#13;                1. Step:i&#13;                2. Step:ii&#13;          2. Step:3&#13;            a. Step:a&#13;              i. Step:i&#13;            b. Step:b&#13;          3. Step:4&#13;        1.1. Step:1.1&#13;          1. Step:1&#13;          2. Step:2&#13;          3. Step:3&#13;        1.2. Step:1.2&#13;          1. Step:1&#13;          2. Step:2">
            <text:p> <text:s text:c="7"/>1.0. Step:1.0 <text:s text:c="9"/>1. Step:1 <text:s text:c="11"/>a. Step:2 <text:s text:c="13"/>i. Step:a <text:s text:c="15"/>1. Step:i <text:s text:c="15"/>2. Step:ii <text:s text:c="15"/>3. Step:iii <text:s text:c="13"/>ii. Step:b <text:s text:c="13"/>iii. Step:c <text:s text:c="15"/>1. Step:i <text:s text:c="15"/>2. Step:ii <text:s text:c="9"/>2. Step:3 <text:s text:c="11"/>a. Step:a <text:s text:c="13"/>i. Step:i <text:s text:c="11"/>b. Step:b <text:s text:c="9"/>3. Step:4 <text:s text:c="7"/>1.1. Step:1.1 <text:s text:c="9"/>1. Step:1 <text:s text:c="9"/>2. Step:2 <text:s text:c="9"/>3. Step:3 <text:s text:c="7"/>1.2. Step:1.2 <text:s text:c="9"/>1. Step:1 <text:s text:c="9"/>2. Step:2</text:p>
          </table:table-cell>
          <table:table-cell table:style-name="ce3" table:formula="of:=[.$A34]&amp;[.C$2]&amp;[.$A34]&amp;[.C$3]&amp;[.$A34]&amp;[.C$4]&amp;[.$A34]&amp;[.C$5]&amp;[.$A34]&amp;[.C$6]&amp;[.$A34]&amp;[.C$7]&amp;[.$A34]&amp;[.C$8]&amp;[.$A34]&amp;[.C$9]&amp;[.$A34]&amp;[.C$10]&amp;[.$A34]&amp;[.C$11]&amp;[.$A34]&amp;[.C$12]&amp;[.$A34]&amp;[.C$13]&amp;[.$A34]&amp;[.C$14]&amp;[.$A34]&amp;[.C$15]&amp;[.$A34]&amp;[.C$16]&amp;[.$A34]&amp;[.C$17]&amp;[.$A34]&amp;[.C$18]&amp;[.$A34]&amp;[.C$19]&amp;[.$A34]&amp;[.C$20]&amp;[.$A34]&amp;[.C$21]&amp;[.$A34]&amp;[.C$22]&amp;[.$A34]&amp;[.C$23]&amp;[.$A34]&amp;[.C$24]" office:value-type="string" office:string-value="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  d. Step:3&#13;              i. Step:a&#13;                1. Step:i&#13;              ii. Step:b&#13;          3. Step:4&#13;        1.1. Step:1.1&#13;          1. Step:1&#13;          2. Step:2&#13;          3. Step:3&#13;        1.2. Step:1.2&#13;          1. Step:1&#13;          2. Step:2">
            <text:p>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11"/>d. Step:3 <text:s text:c="13"/>i. Step:a <text:s text:c="15"/>1. Step:i <text:s text:c="13"/>ii. Step:b <text:s text:c="9"/>3. Step:4 <text:s text:c="7"/>1.1. Step:1.1 <text:s text:c="9"/>1. Step:1 <text:s text:c="9"/>2. Step:2 <text:s text:c="9"/>3. Step:3 <text:s text:c="7"/>1.2. Step:1.2 <text:s text:c="9"/>1. Step:1 <text:s text:c="9"/>2. Step:2</text:p>
          </table:table-cell>
          <table:table-cell table:style-name="ce3" table:formula="of:=[.$A34]&amp;[.D$2]&amp;[.$A34]&amp;[.D$3]&amp;[.$A34]&amp;[.D$4]&amp;[.$A34]&amp;[.D$5]&amp;[.$A34]&amp;[.D$6]&amp;[.$A34]&amp;[.D$7]&amp;[.$A34]&amp;[.D$8]&amp;[.$A34]&amp;[.D$9]&amp;[.$A34]&amp;[.D$10]&amp;[.$A34]&amp;[.D$11]&amp;[.$A34]&amp;[.D$12]&amp;[.$A34]&amp;[.D$13]&amp;[.$A34]&amp;[.D$14]&amp;[.$A34]&amp;[.D$15]&amp;[.$A34]&amp;[.D$16]&amp;[.$A34]&amp;[.D$17]&amp;[.$A34]&amp;[.D$18]&amp;[.$A34]&amp;[.D$19]&amp;[.$A34]&amp;[.D$20]&amp;[.$A34]&amp;[.D$21]&amp;[.$A34]&amp;[.D$22]&amp;[.$A34]&amp;[.D$23]&amp;[.$A34]&amp;[.D$24]" office:value-type="string" office:string-value="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    ii. Step:b&#13;          4. Step:4&#13;        1.1. Step:1.1&#13;          1. Step:1&#13;          2. Step:2&#13;          3. Step:3&#13;        1.2. Step:1.2&#13;          1. Step:1&#13;          2. Step:2">
            <text:p>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13"/>ii. Step:b <text:s text:c="9"/>4. Step:4 <text:s text:c="7"/>1.1. Step:1.1 <text:s text:c="9"/>1. Step:1 <text:s text:c="9"/>2. Step:2 <text:s text:c="9"/>3. Step:3 <text:s text:c="7"/>1.2. Step:1.2 <text:s text:c="9"/>1. Step:1 <text:s text:c="9"/>2. Step:2</text:p>
          </table:table-cell>
          <table:table-cell table:style-name="ce3" table:formula="of:=[.$A34]&amp;[.E$2]&amp;[.$A34]&amp;[.E$3]&amp;[.$A34]&amp;[.E$4]&amp;[.$A34]&amp;[.E$5]&amp;[.$A34]&amp;[.E$6]&amp;[.$A34]&amp;[.E$7]&amp;[.$A34]&amp;[.E$8]&amp;[.$A34]&amp;[.E$9]&amp;[.$A34]&amp;[.E$10]&amp;[.$A34]&amp;[.E$11]&amp;[.$A34]&amp;[.E$12]&amp;[.$A34]&amp;[.E$13]&amp;[.$A34]&amp;[.E$14]&amp;[.$A34]&amp;[.E$15]&amp;[.$A34]&amp;[.E$16]&amp;[.$A34]&amp;[.E$17]&amp;[.$A34]&amp;[.E$18]&amp;[.$A34]&amp;[.E$19]&amp;[.$A34]&amp;[.E$20]&amp;[.$A34]&amp;[.E$21]&amp;[.$A34]&amp;[.E$22]&amp;[.$A34]&amp;[.E$23]&amp;[.$A34]&amp;[.E$24]" office:value-type="string" office:string-value="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  b. Step:b&#13;            c. Step:4&#13;        1.1. Step:1.1&#13;          1. Step:1&#13;          2. Step:2&#13;          3. Step:3&#13;        1.2. Step:1.2&#13;          1. Step:1&#13;          2. Step:2">
            <text:p>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11"/>b. Step:b <text:s text:c="11"/>c. Step:4 <text:s text:c="7"/>1.1. Step:1.1 <text:s text:c="9"/>1. Step:1 <text:s text:c="9"/>2. Step:2 <text:s text:c="9"/>3. Step:3 <text:s text:c="7"/>1.2. Step:1.2 <text:s text:c="9"/>1. Step:1 <text:s text:c="9"/>2. Step:2</text:p>
          </table:table-cell>
          <table:table-cell table:style-name="ce3" table:formula="of:=[.$A34]&amp;[.F$2]&amp;[.$A34]&amp;[.F$3]&amp;[.$A34]&amp;[.F$4]&amp;[.$A34]&amp;[.F$5]&amp;[.$A34]&amp;[.F$6]&amp;[.$A34]&amp;[.F$7]&amp;[.$A34]&amp;[.F$8]&amp;[.$A34]&amp;[.F$9]&amp;[.$A34]&amp;[.F$10]&amp;[.$A34]&amp;[.F$11]&amp;[.$A34]&amp;[.F$12]&amp;[.$A34]&amp;[.F$13]&amp;[.$A34]&amp;[.F$14]&amp;[.$A34]&amp;[.F$15]&amp;[.$A34]&amp;[.F$16]&amp;[.$A34]&amp;[.F$17]&amp;[.$A34]&amp;[.F$18]&amp;[.$A34]&amp;[.F$19]&amp;[.$A34]&amp;[.F$20]&amp;[.$A34]&amp;[.F$21]&amp;[.$A34]&amp;[.F$22]&amp;[.$A34]&amp;[.F$23]&amp;[.$A34]&amp;[.F$24]" office:value-type="string" office:string-value="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  b. Step:b&#13;          4. Step:4&#13;          5. Step:1.1&#13;            a. Step:1&#13;            b. Step:2&#13;            c. Step:3&#13;        1.1. Step:1.2&#13;          1. Step:1&#13;          2. Step:2">
            <text:p>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11"/>b. Step:b <text:s text:c="9"/>4. Step:4 <text:s text:c="9"/>5. Step:1.1 <text:s text:c="11"/>a. Step:1 <text:s text:c="11"/>b. Step:2 <text:s text:c="11"/>c. Step:3 <text:s text:c="7"/>1.1. Step:1.2 <text:s text:c="9"/>1. Step:1 <text:s text:c="9"/>2. Step:2</text:p>
          </table:table-cell>
          <table:table-cell table:style-name="ce3" table:formula="of:=[.$A34]&amp;[.G$2]&amp;[.$A34]&amp;[.G$3]&amp;[.$A34]&amp;[.G$4]&amp;[.$A34]&amp;[.G$5]&amp;[.$A34]&amp;[.G$6]&amp;[.$A34]&amp;[.G$7]&amp;[.$A34]&amp;[.G$8]&amp;[.$A34]&amp;[.G$9]&amp;[.$A34]&amp;[.G$10]&amp;[.$A34]&amp;[.G$11]&amp;[.$A34]&amp;[.G$12]&amp;[.$A34]&amp;[.G$13]&amp;[.$A34]&amp;[.G$14]&amp;[.$A34]&amp;[.G$15]&amp;[.$A34]&amp;[.G$16]&amp;[.$A34]&amp;[.G$17]&amp;[.$A34]&amp;[.G$18]&amp;[.$A34]&amp;[.G$19]&amp;[.$A34]&amp;[.G$20]&amp;[.$A34]&amp;[.G$21]&amp;[.$A34]&amp;[.G$22]&amp;[.$A34]&amp;[.G$23]&amp;[.$A34]&amp;[.G$24]" office:value-type="string" office:string-value="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  b. Step:b&#13;          4. Step:4&#13;        1.1. Step:1.1&#13;          1. Step:1&#13;            a. Step:2&#13;          2. Step:3&#13;        1.2. Step:1.2&#13;          1. Step:1&#13;          2. Step:2">
            <text:p>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11"/>a. Step:2 <text:s text:c="9"/>2. Step:3 <text:s text:c="7"/>1.2. Step:1.2 <text:s text:c="9"/>1. Step:1 <text:s text:c="9"/>2. Step:2</text:p>
          </table:table-cell>
          <table:table-cell table:style-name="ce3" table:formula="of:=[.$A34]&amp;[.H$2]&amp;[.$A34]&amp;[.H$3]&amp;[.$A34]&amp;[.H$4]&amp;[.$A34]&amp;[.H$5]&amp;[.$A34]&amp;[.H$6]&amp;[.$A34]&amp;[.H$7]&amp;[.$A34]&amp;[.H$8]&amp;[.$A34]&amp;[.H$9]&amp;[.$A34]&amp;[.H$10]&amp;[.$A34]&amp;[.H$11]&amp;[.$A34]&amp;[.H$12]&amp;[.$A34]&amp;[.H$13]&amp;[.$A34]&amp;[.H$14]&amp;[.$A34]&amp;[.H$15]&amp;[.$A34]&amp;[.H$16]&amp;[.$A34]&amp;[.H$17]&amp;[.$A34]&amp;[.H$18]&amp;[.$A34]&amp;[.H$19]&amp;[.$A34]&amp;[.H$20]&amp;[.$A34]&amp;[.H$21]&amp;[.$A34]&amp;[.H$22]&amp;[.$A34]&amp;[.H$23]&amp;[.$A34]&amp;[.H$24]" office:value-type="string" office:string-value="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  b. Step:b&#13;          4. Step:4&#13;        1.1. Step:1.1&#13;          1. Step:1&#13;          2. Step:2&#13;            a. Step:3&#13;        1.2. Step:1.2&#13;          1. Step:1&#13;          2. Step:2">
            <text:p>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9"/>2. Step:2 <text:s text:c="11"/>a. Step:3 <text:s text:c="7"/>1.2. Step:1.2 <text:s text:c="9"/>1. Step:1 <text:s text:c="9"/>2. Step:2</text:p>
          </table:table-cell>
          <table:table-cell table:style-name="ce3" office:value-type="string">
            <text:p><text:s/></text:p>
          </table:table-cell>
          <table:table-cell table:style-name="ce3"/>
          <table:table-cell table:style-name="ce3" office:value-type="string">
            <text:p><text:s/></text:p>
          </table:table-cell>
          <table:table-cell table:style-name="ce3" table:number-columns-repeated="1013"/>
        </table:table-row>
        <table:table-row table:style-name="ro1">
          <table:table-cell table:style-name="ce3"/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table:formula="of:=&quot;    &quot;&quot;&quot;&quot;&quot;&quot;)}&quot;&amp;CHAR(13)&amp;CHAR(13)" office:value-type="string" office:string-value="    &quot;&quot;&quot;)}&#13;&#13;">
            <text:p><text:s text:c="4"/>""")}</text:p>
          </table:table-cell>
          <table:table-cell table:style-name="ce3" office:value-type="string">
            <text:p><text:s/></text:p>
          </table:table-cell>
          <table:table-cell table:style-name="ce3"/>
          <table:table-cell table:style-name="ce3" office:value-type="string">
            <text:p><text:s/></text:p>
          </table:table-cell>
          <table:table-cell table:style-name="ce3" table:number-columns-repeated="1013"/>
        </table:table-row>
        <table:table-row table:style-name="ro1">
          <table:table-cell table:style-name="ce4" office:value-type="string">
            <text:p>Full Test →</text:p>
          </table:table-cell>
          <table:table-cell table:formula="of:=[.B33]&amp;[.B34]&amp;CHAR(13)&amp;[.B35]" office:value-type="string" office:string-value="&quot;increasing 1.0.2&quot; in { test(&quot;1.0.2&quot;, &quot;&quot;&quot;&#13;        1.0. Step:1.0&#13;          1. Step:1&#13;            a. Step:2&#13;              i. Step:a&#13;                1. Step:i&#13;                2. Step:ii&#13;                3. Step:iii&#13;              ii. Step:b&#13;              iii. Step:c&#13;                1. Step:i&#13;                2. Step:ii&#13;          2. Step:3&#13;            a. Step:a&#13;              i. Step:i&#13;            b. Step:b&#13;          3. Step:4&#13;        1.1. Step:1.1&#13;          1. Step:1&#13;          2. Step:2&#13;          3. Step:3&#13;        1.2. Step:1.2&#13;          1. Step:1&#13;          2. Step:2&#13;    &quot;&quot;&quot;)}&#13;&#13;">
            <text:p>"increasing 1.0.2" in { test("1.0.2", """ <text:s text:c="7"/>1.0. Step:1.0 <text:s text:c="9"/>1. Step:1 <text:s text:c="11"/>a. Step:2 <text:s text:c="13"/>i. Step:a <text:s text:c="15"/>1. Step:i <text:s text:c="15"/>2. Step:ii <text:s text:c="15"/>3. Step:iii <text:s text:c="13"/>ii. Step:b <text:s text:c="13"/>iii. Step:c <text:s text:c="15"/>1. Step:i <text:s text:c="15"/>2. Step:ii <text:s text:c="9"/>2. Step:3 <text:s text:c="11"/>a. Step:a <text:s text:c="13"/>i. Step:i <text:s text:c="11"/>b. Step:b <text:s text:c="9"/>3. Step:4 <text:s text:c="7"/>1.1. Step:1.1 <text:s text:c="9"/>1. Step:1 <text:s text:c="9"/>2. Step:2 <text:s text:c="9"/>3. Step:3 <text:s text:c="7"/>1.2. Step:1.2 <text:s text:c="9"/>1. Step:1 <text:s text:c="9"/>2. Step:2 <text:s text:c="3"/>""")}</text:p>
          </table:table-cell>
          <table:table-cell table:formula="of:=[.C33]&amp;[.C34]&amp;CHAR(13)&amp;[.C35]" office:value-type="string" office:string-value="&quot;increasing 1.0.3&quot; in { test(&quot;1.0.3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  d. Step:3&#13;              i. Step:a&#13;                1. Step:i&#13;              ii. Step:b&#13;          3. Step:4&#13;        1.1. Step:1.1&#13;          1. Step:1&#13;          2. Step:2&#13;          3. Step:3&#13;        1.2. Step:1.2&#13;          1. Step:1&#13;          2. Step:2&#13;    &quot;&quot;&quot;)}&#13;&#13;">
            <text:p>"increasing 1.0.3" in { test("1.0.3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11"/>d. Step:3 <text:s text:c="13"/>i. Step:a <text:s text:c="15"/>1. Step:i <text:s text:c="13"/>ii. Step:b <text:s text:c="9"/>3. Step:4 <text:s text:c="7"/>1.1. Step:1.1 <text:s text:c="9"/>1. Step:1 <text:s text:c="9"/>2. Step:2 <text:s text:c="9"/>3. Step:3 <text:s text:c="7"/>1.2. Step:1.2 <text:s text:c="9"/>1. Step:1 <text:s text:c="9"/>2. Step:2 <text:s text:c="3"/>""")}</text:p>
          </table:table-cell>
          <table:table-cell table:formula="of:=[.D33]&amp;[.D34]&amp;CHAR(13)&amp;[.D35]" office:value-type="string" office:string-value="&quot;increasing 1.0.3.b&quot; in { test(&quot;1.0.3.b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    ii. Step:b&#13;          4. Step:4&#13;        1.1. Step:1.1&#13;          1. Step:1&#13;          2. Step:2&#13;          3. Step:3&#13;        1.2. Step:1.2&#13;          1. Step:1&#13;          2. Step:2&#13;    &quot;&quot;&quot;)}&#13;&#13;">
            <text:p>"increasing 1.0.3.b" in { test("1.0.3.b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13"/>ii. Step:b <text:s text:c="9"/>4. Step:4 <text:s text:c="7"/>1.1. Step:1.1 <text:s text:c="9"/>1. Step:1 <text:s text:c="9"/>2. Step:2 <text:s text:c="9"/>3. Step:3 <text:s text:c="7"/>1.2. Step:1.2 <text:s text:c="9"/>1. Step:1 <text:s text:c="9"/>2. Step:2 <text:s text:c="3"/>""")}</text:p>
          </table:table-cell>
          <table:table-cell table:formula="of:=[.E33]&amp;[.E34]&amp;CHAR(13)&amp;[.E35]" office:value-type="string" office:string-value="&quot;increasing 1.0.4&quot; in { test(&quot;1.0.4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  b. Step:b&#13;            c. Step:4&#13;        1.1. Step:1.1&#13;          1. Step:1&#13;          2. Step:2&#13;          3. Step:3&#13;        1.2. Step:1.2&#13;          1. Step:1&#13;          2. Step:2&#13;    &quot;&quot;&quot;)}&#13;&#13;">
            <text:p>"increasing 1.0.4" in { test("1.0.4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11"/>b. Step:b <text:s text:c="11"/>c. Step:4 <text:s text:c="7"/>1.1. Step:1.1 <text:s text:c="9"/>1. Step:1 <text:s text:c="9"/>2. Step:2 <text:s text:c="9"/>3. Step:3 <text:s text:c="7"/>1.2. Step:1.2 <text:s text:c="9"/>1. Step:1 <text:s text:c="9"/>2. Step:2 <text:s text:c="3"/>""")}</text:p>
          </table:table-cell>
          <table:table-cell table:formula="of:=[.F33]&amp;[.F34]&amp;CHAR(13)&amp;[.F35]" office:value-type="string" office:string-value="&quot;increasing 1.1&quot; in { test(&quot;1.1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  b. Step:b&#13;          4. Step:4&#13;          5. Step:1.1&#13;            a. Step:1&#13;            b. Step:2&#13;            c. Step:3&#13;        1.1. Step:1.2&#13;          1. Step:1&#13;          2. Step:2&#13;    &quot;&quot;&quot;)}&#13;&#13;">
            <text:p>"increasing 1.1" in { test("1.1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11"/>b. Step:b <text:s text:c="9"/>4. Step:4 <text:s text:c="9"/>5. Step:1.1 <text:s text:c="11"/>a. Step:1 <text:s text:c="11"/>b. Step:2 <text:s text:c="11"/>c. Step:3 <text:s text:c="7"/>1.1. Step:1.2 <text:s text:c="9"/>1. Step:1 <text:s text:c="9"/>2. Step:2 <text:s text:c="3"/>""")}</text:p>
          </table:table-cell>
          <table:table-cell table:formula="of:=[.G33]&amp;[.G34]&amp;CHAR(13)&amp;[.G35]" office:value-type="string" office:string-value="&quot;increasing 1.1.2&quot; in { test(&quot;1.1.2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  b. Step:b&#13;          4. Step:4&#13;        1.1. Step:1.1&#13;          1. Step:1&#13;            a. Step:2&#13;          2. Step:3&#13;        1.2. Step:1.2&#13;          1. Step:1&#13;          2. Step:2&#13;    &quot;&quot;&quot;)}&#13;&#13;">
            <text:p>"increasing 1.1.2" in { test("1.1.2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11"/>a. Step:2 <text:s text:c="9"/>2. Step:3 <text:s text:c="7"/>1.2. Step:1.2 <text:s text:c="9"/>1. Step:1 <text:s text:c="9"/>2. Step:2 <text:s text:c="3"/>""")}</text:p>
          </table:table-cell>
          <table:table-cell table:formula="of:=[.H33]&amp;[.H34]&amp;CHAR(13)&amp;[.H35]" office:value-type="string" office:string-value="&quot;increasing 1.1.3&quot; in { test(&quot;1.1.3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  b. Step:b&#13;          4. Step:4&#13;        1.1. Step:1.1&#13;          1. Step:1&#13;          2. Step:2&#13;            a. Step:3&#13;        1.2. Step:1.2&#13;          1. Step:1&#13;          2. Step:2&#13;    &quot;&quot;&quot;)}&#13;&#13;">
            <text:p>"increasing 1.1.3" in { test("1.1.3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9"/>2. Step:2 <text:s text:c="11"/>a. Step:3 <text:s text:c="7"/>1.2. Step:1.2 <text:s text:c="9"/>1. Step:1 <text:s text:c="9"/>2. Step:2 <text:s text:c="3"/>""")}</text:p>
          </table:table-cell>
          <table:table-cell table:style-name="ce3" office:value-type="string">
            <text:p><text:s/></text:p>
          </table:table-cell>
          <table:table-cell/>
          <table:table-cell office:value-type="string">
            <text:p><text:s/>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All Tests →</text:p>
          </table:table-cell>
          <table:table-cell table:formula="of:=[.B36]&amp;[.C36]&amp;[.D36]&amp;[.E36]&amp;[.F36]&amp;[.G36]&amp;[.H36]&amp;[.I36]&amp;[.J36]" office:value-type="string" office:string-value="&quot;increasing 1.0.2&quot; in { test(&quot;1.0.2&quot;, &quot;&quot;&quot;&#13;        1.0. Step:1.0&#13;          1. Step:1&#13;            a. Step:2&#13;              i. Step:a&#13;                1. Step:i&#13;                2. Step:ii&#13;                3. Step:iii&#13;              ii. Step:b&#13;              iii. Step:c&#13;                1. Step:i&#13;                2. Step:ii&#13;          2. Step:3&#13;            a. Step:a&#13;              i. Step:i&#13;            b. Step:b&#13;          3. Step:4&#13;        1.1. Step:1.1&#13;          1. Step:1&#13;          2. Step:2&#13;          3. Step:3&#13;        1.2. Step:1.2&#13;          1. Step:1&#13;          2. Step:2&#13;    &quot;&quot;&quot;)}&#13;&#13;&quot;increasing 1.0.3&quot; in { test(&quot;1.0.3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  d. Step:3&#13;              i. Step:a&#13;                1. Step:i&#13;              ii. Step:b&#13;          3. Step:4&#13;        1.1. Step:1.1&#13;          1. Step:1&#13;          2. Step:2&#13;          3. Step:3&#13;        1.2. Step:1.2&#13;          1. Step:1&#13;          2. Step:2&#13;    &quot;&quot;&quot;)}&#13;&#13;&quot;increasing 1.0.3.b&quot; in { test(&quot;1.0.3.b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    ii. Step:b&#13;          4. Step:4&#13;        1.1. Step:1.1&#13;          1. Step:1&#13;          2. Step:2&#13;          3. Step:3&#13;        1.2. Step:1.2&#13;          1. Step:1&#13;          2. Step:2&#13;    &quot;&quot;&quot;)}&#13;&#13;&quot;increasing 1.0.4&quot; in { test(&quot;1.0.4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  b. Step:b&#13;            c. Step:4&#13;        1.1. Step:1.1&#13;          1. Step:1&#13;          2. Step:2&#13;          3. Step:3&#13;        1.2. Step:1.2&#13;          1. Step:1&#13;          2. Step:2&#13;    &quot;&quot;&quot;)}&#13;&#13;&quot;increasing 1.1&quot; in { test(&quot;1.1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  b. Step:b&#13;          4. Step:4&#13;          5. Step:1.1&#13;            a. Step:1&#13;            b. Step:2&#13;            c. Step:3&#13;        1.1. Step:1.2&#13;          1. Step:1&#13;          2. Step:2&#13;    &quot;&quot;&quot;)}&#13;&#13;&quot;increasing 1.1.2&quot; in { test(&quot;1.1.2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  b. Step:b&#13;          4. Step:4&#13;        1.1. Step:1.1&#13;          1. Step:1&#13;            a. Step:2&#13;          2. Step:3&#13;        1.2. Step:1.2&#13;          1. Step:1&#13;          2. Step:2&#13;    &quot;&quot;&quot;)}&#13;&#13;&quot;increasing 1.1.3&quot; in { test(&quot;1.1.3&quot;, &quot;&quot;&quot;&#13;        1.0. Step:1.0&#13;          1. Step:1&#13;          2. Step:2&#13;            a. Step:a&#13;              i. Step:i&#13;              ii. Step:ii&#13;              iii. Step:iii&#13;            b. Step:b&#13;            c. Step:c&#13;              i. Step:i&#13;              ii. Step:ii&#13;          3. Step:3&#13;            a. Step:a&#13;              i. Step:i&#13;            b. Step:b&#13;          4. Step:4&#13;        1.1. Step:1.1&#13;          1. Step:1&#13;          2. Step:2&#13;            a. Step:3&#13;        1.2. Step:1.2&#13;          1. Step:1&#13;          2. Step:2&#13;    &quot;&quot;&quot;)}&#13;&#13; ">
            <text:p>"increasing 1.0.2" in { test("1.0.2", """ <text:s text:c="7"/>1.0. Step:1.0 <text:s text:c="9"/>1. Step:1 <text:s text:c="11"/>a. Step:2 <text:s text:c="13"/>i. Step:a <text:s text:c="15"/>1. Step:i <text:s text:c="15"/>2. Step:ii <text:s text:c="15"/>3. Step:iii <text:s text:c="13"/>ii. Step:b <text:s text:c="13"/>iii. Step:c <text:s text:c="15"/>1. Step:i <text:s text:c="15"/>2. Step:ii <text:s text:c="9"/>2. Step:3 <text:s text:c="11"/>a. Step:a <text:s text:c="13"/>i. Step:i <text:s text:c="11"/>b. Step:b <text:s text:c="9"/>3. Step:4 <text:s text:c="7"/>1.1. Step:1.1 <text:s text:c="9"/>1. Step:1 <text:s text:c="9"/>2. Step:2 <text:s text:c="9"/>3. Step:3 <text:s text:c="7"/>1.2. Step:1.2 <text:s text:c="9"/>1. Step:1 <text:s text:c="9"/>2. Step:2 <text:s text:c="3"/>""")}"increasing 1.0.3" in { test("1.0.3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11"/>d. Step:3 <text:s text:c="13"/>i. Step:a <text:s text:c="15"/>1. Step:i <text:s text:c="13"/>ii. Step:b <text:s text:c="9"/>3. Step:4 <text:s text:c="7"/>1.1. Step:1.1 <text:s text:c="9"/>1. Step:1 <text:s text:c="9"/>2. Step:2 <text:s text:c="9"/>3. Step:3 <text:s text:c="7"/>1.2. Step:1.2 <text:s text:c="9"/>1. Step:1 <text:s text:c="9"/>2. Step:2 <text:s text:c="3"/>""")}"increasing 1.0.3.b" in { test("1.0.3.b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13"/>ii. Step:b <text:s text:c="9"/>4. Step:4 <text:s text:c="7"/>1.1. Step:1.1 <text:s text:c="9"/>1. Step:1 <text:s text:c="9"/>2. Step:2 <text:s text:c="9"/>3. Step:3 <text:s text:c="7"/>1.2. Step:1.2 <text:s text:c="9"/>1. Step:1 <text:s text:c="9"/>2. Step:2 <text:s text:c="3"/>""")}"increasing 1.0.4" in { test("1.0.4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11"/>b. Step:b <text:s text:c="11"/>c. Step:4 <text:s text:c="7"/>1.1. Step:1.1 <text:s text:c="9"/>1. Step:1 <text:s text:c="9"/>2. Step:2 <text:s text:c="9"/>3. Step:3 <text:s text:c="7"/>1.2. Step:1.2 <text:s text:c="9"/>1. Step:1 <text:s text:c="9"/>2. Step:2 <text:s text:c="3"/>""")}"increasing 1.1" in { test("1.1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11"/>b. Step:b <text:s text:c="9"/>4. Step:4 <text:s text:c="9"/>5. Step:1.1 <text:s text:c="11"/>a. Step:1 <text:s text:c="11"/>b. Step:2 <text:s text:c="11"/>c. Step:3 <text:s text:c="7"/>1.1. Step:1.2 <text:s text:c="9"/>1. Step:1 <text:s text:c="9"/>2. Step:2 <text:s text:c="3"/>""")}"increasing 1.1.2" in { test("1.1.2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11"/>a. Step:2 <text:s text:c="9"/>2. Step:3 <text:s text:c="7"/>1.2. Step:1.2 <text:s text:c="9"/>1. Step:1 <text:s text:c="9"/>2. Step:2 <text:s text:c="3"/>""")}"increasing 1.1.3" in { test("1.1.3", """ <text:s text:c="7"/>1.0. Step:1.0 <text:s text:c="9"/>1. Step:1 <text:s text:c="9"/>2. Step:2 <text:s text:c="11"/>a. Step:a <text:s text:c="13"/>i. Step:i <text:s text:c="13"/>ii. Step:ii <text:s text:c="13"/>iii. Step:iii <text:s text:c="11"/>b. Step:b <text:s text:c="11"/>c. Step:c <text:s text:c="13"/>i. Step:i <text:s text:c="13"/>ii. Step:ii <text:s text:c="9"/>3. Step:3 <text:s text:c="11"/>a. Step:a <text:s text:c="13"/>i. Step:i <text:s text:c="11"/>b. Step:b <text:s text:c="9"/>4. Step:4 <text:s text:c="7"/>1.1. Step:1.1 <text:s text:c="9"/>1. Step:1 <text:s text:c="9"/>2. Step:2 <text:s text:c="11"/>a. Step:3 <text:s text:c="7"/>1.2. Step:1.2 <text:s text:c="9"/>1. Step:1 <text:s text:c="9"/>2. Step:2 <text:s text:c="3"/>""")} </text:p>
          </table:table-cell>
          <table:table-cell office:value-type="string">
            <text:p><text:s/></text:p>
          </table:table-cell>
          <table:table-cell table:number-columns-repeated="1021"/>
        </table:table-row>
        <table:table-row table:style-name="ro1" table:number-rows-repeated="26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TianZhen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6T08:41:08</meta:creation-date>
    <dc:date>2013-05-07T00:11:28</dc:date>
    <meta:editing-duration>PT14H48M8S</meta:editing-duration>
    <meta:editing-cycles>11</meta:editing-cycles>
    <meta:generator>LibreOffice/4.0.2.2$Linux_X86_64 LibreOffice_project/400m0$Build-2</meta:generator>
    <meta:document-statistic meta:table-count="3" meta:cell-count="841" meta:object-count="0"/>
  </office:meta>
</office:document-meta>
</file>