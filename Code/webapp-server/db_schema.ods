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5.50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cfe7f5"/>
    </style:style>
    <style:style style:name="ce9" style:family="table-cell" style:parent-style-name="Default" style:data-style-name="N100">
      <style:table-cell-properties fo:background-color="#ffffcc"/>
      <style:text-properties fo:color="#dc2300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ffffcc"/>
      <style:text-properties fo:color="#dc2300"/>
    </style:style>
  </office:automatic-styles>
  <office:body>
    <office:spreadsheet>
      <table:table table:name="Migra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Version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date" office:date-value="2013-05-26" calcext:value-type="date">
            <text:p>26/05/20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1__humble_beginnings.sql</text:p>
          </table:table-cell>
        </table:table-row>
        <table:table-row table:style-name="ro1">
          <table:table-cell office:value-type="date" office:date-value="2013-06-10" calcext:value-type="date">
            <text:p>10/06/20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1_1__data_view.sql</text:p>
          </table:table-cell>
        </table:table-row>
        <table:table-row table:style-name="ro1">
          <table:table-cell office:value-type="date" office:date-value="2013-06-12" calcext:value-type="date">
            <text:p>12/06/20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1_2__to_iso8601_str.sql</text:p>
          </table:table-cell>
        </table:table-row>
        <table:table-row table:style-name="ro1">
          <table:table-cell office:value-type="date" office:date-value="2013-07-04" calcext:value-type="date">
            <text:p>04/07/201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2_0__users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3_0__remove_everything_but_usr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v3_1__simpler_schema.sql</text:p>
          </table:table-cell>
        </table:table-row>
        <table:table-row table:style-name="ro1">
          <table:table-cell office:value-type="date" office:date-value="2013-08-09" calcext:value-type="date">
            <text:p>09/08/201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v3_2__integrity_triggers.sql</text:p>
          </table:table-cell>
        </table:table-row>
        <table:table-row table:style-name="ro1">
          <table:table-cell office:value-type="date" office:date-value="2013-08-16" calcext:value-type="date">
            <text:p>16/08/201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v3_3__uc_views.sql</text:p>
          </table:table-cell>
        </table:table-row>
        <table:table-row table:style-name="ro1">
          <table:table-cell office:value-type="date" office:date-value="2013-09-24" calcext:value-type="date">
            <text:p>24/09/20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v4_0__projects.sql</text:p>
          </table:table-cell>
        </table:table-row>
        <table:table-row table:style-name="ro1">
          <table:table-cell office:value-type="date" office:date-value="2013-09-25" calcext:value-type="date">
            <text:p>25/09/20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v4_1__static_uc_number.sql</text:p>
          </table:table-cell>
        </table:table-row>
        <table:table-row table:style-name="ro1">
          <table:table-cell office:value-type="date" office:date-value="2013-09-26" calcext:value-type="date">
            <text:p>26/09/201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4_2__ucs_belong_to_projects.sql</text:p>
          </table:table-cell>
        </table:table-row>
        <table:table-row table:style-name="ro1">
          <table:table-cell office:value-type="date" office:date-value="2013-09-27" calcext:value-type="date">
            <text:p>27/09/201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v4_3__iso8601_fn_null_aware.sql</text:p>
          </table:table-cell>
        </table:table-row>
        <table:table-row table:style-name="ro1">
          <table:table-cell office:value-type="date" office:date-value="2013-10-28" calcext:value-type="date">
            <text:p>28/10/20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v4_4__iso8601_precision.sql</text:p>
          </table:table-cell>
        </table:table-row>
        <table:table-row table:style-name="ro1">
          <table:table-cell office:value-type="date" office:date-value="2013-10-30" calcext:value-type="date">
            <text:p>30/10/20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5_0__shares.sql</text:p>
          </table:table-cell>
        </table:table-row>
        <table:table-row table:style-name="ro1">
          <table:table-cell office:value-type="date" office:date-value="2013-11-05" calcext:value-type="date">
            <text:p>05/11/201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v5_1__usr_login_log.sql</text:p>
          </table:table-cell>
        </table:table-row>
        <table:table-row table:style-name="ro1">
          <table:table-cell office:value-type="date" office:date-value="2013-11-12" calcext:value-type="date">
            <text:p>12/11/201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v5_2__cascade_deletion.sql</text:p>
          </table:table-cell>
        </table:table-row>
        <table:table-row table:style-name="ro1">
          <table:table-cell office:value-type="date" office:date-value="2013-11-25" calcext:value-type="date">
            <text:p>25/11/201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v5_3__field_key_view.sql</text:p>
          </table:table-cell>
        </table:table-row>
        <table:table-row table:style-name="ro1">
          <table:table-cell office:value-type="date" office:date-value="2013-12-03" calcext:value-type="date">
            <text:p>03/12/201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v5_4__user_roles.sql</text:p>
          </table:table-cell>
        </table:table-row>
        <table:table-row table:style-name="ro1">
          <table:table-cell office:value-type="date" office:date-value="2013-12-16" calcext:value-type="date">
            <text:p>16/12/201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v5_5__project_deleted_flag.sql</text:p>
          </table:table-cell>
        </table:table-row>
        <table:table-row table:style-name="ro1">
          <table:table-cell office:value-type="date" office:date-value="2014-04-23" calcext:value-type="date">
            <text:p>23/04/201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v6_0__usrd.sql</text:p>
          </table:table-cell>
        </table:table-row>
        <table:table-row table:style-name="ro1"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v6_1__usrd_retro.sql</text:p>
          </table:table-cell>
        </table:table-row>
        <table:table-row table:style-name="ro1">
          <table:table-cell office:value-type="date" office:date-value="2015-08-04" calcext:value-type="date">
            <text:p>04/08/201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7_0__events.sql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g" table:style-name="ta1">
        <table:table-column table:style-name="co4" table:default-cell-style-name="ce4"/>
        <table:table-column table:style-name="co5" table:default-cell-style-name="ce7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Version</text:p>
          </table:table-cell>
          <table:table-cell table:style-name="ce6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lation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ata_type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lue_seq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ield_key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secase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ext_rev_seq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_typ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ield_key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max_text_per_fk_per_uc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1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_latest_usecase_rev_2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heck_uc_field_integrity()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max_text_per_fk_per_uc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force_uc_field_integrity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1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latest_usecase_rev_trigger_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full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shor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uc_latest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hare_seq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_view_log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hare_view_stats_update()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hare_view_stats_update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xt_rev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c_field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cas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&gt;ₜ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_field_key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&gt;ₜᵤ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&gt;ᵢ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vent</text:p>
          </table:table-cell>
        </table:table-row>
        <table:table-row table:style-name="ro1" table:number-rows-repeated="104848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urrent" table:style-name="ta1"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Added</text:p>
          </table:table-cell>
          <table:table-cell table:style-name="ce3" office:value-type="string" calcext:value-type="string">
            <text:p>Update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Pur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taskman_users_v01</text:p>
          </table:table-cell>
          <table:table-cell office:value-type="string" calcext:value-type="string">
            <text:p>Taskman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5.2</text:p>
          </table:table-cell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share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5" office:value-type="string" calcext:value-type="string">
            <text:p>Colours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share_seq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11" office:value-type="string" calcext:value-type="string">
            <text:p>Will be removed.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share_view_log</text:p>
          </table:table-cell>
          <table:table-cell table:style-name="ce10" office:value-type="string" calcext:value-type="string">
            <text:p>UC Share</text:p>
          </table:table-cell>
          <table:table-cell/>
          <table:table-cell table:style-name="ce10" office:value-type="string" calcext:value-type="string">
            <text:p>Future uncertain.</text:p>
          </table:table-cell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TRIGGER</text:p>
          </table:table-cell>
          <table:table-cell table:style-name="ce10" office:value-type="string" calcext:value-type="string">
            <text:p>share_view_stats_update</text:p>
          </table:table-cell>
          <table:table-cell table:style-name="ce10" office:value-type="string" calcext:value-type="string">
            <text:p>UC Shar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.0</text:p>
          </table:table-cell>
          <table:table-cell table:style-name="ce8"/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share_view_stats_update()</text:p>
          </table:table-cell>
          <table:table-cell table:style-name="ce10" office:value-type="string" calcext:value-type="string">
            <text:p>UC Shar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check_max_text_per_fk_per_uc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check_uc_field_integrity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enforce_max_text_per_fk_per_uc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enforce_uc_field_integrit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field_ke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field_key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field_key_type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latest_usecase_rev_trigger_1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TRIGGER</text:p>
          </table:table-cell>
          <table:table-cell table:style-name="ce11" office:value-type="string" calcext:value-type="string">
            <text:p>latest_usecase_rev_trigger_2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ext_rev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text_rev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text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c_field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update_latest_usecase_rev_1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2</text:p>
          </table:table-cell>
          <table:table-cell table:style-name="ce9"/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update_latest_usecase_rev_2()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4.{1,2}, 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secase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4.1, 5.2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usecase_rev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usecase_rev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1</text:p>
          </table:table-cell>
          <table:table-cell table:style-name="ce9"/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usecase_seq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5.3</text:p>
          </table:table-cell>
          <table:table-cell table:style-name="ce9"/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field_key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full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lates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.1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v_uc_short</text:p>
          </table:table-cell>
          <table:table-cell table:style-name="ce11" office:value-type="string" calcext:value-type="string">
            <text:p>Use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archive_usrd_name()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_login_log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_login_stats_update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sr_login_stats_update()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usr_seq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rd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usrd_name_archive_trigger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usrh_name</text:p>
          </table:table-cell>
          <table:table-cell office:value-type="string" calcext:value-type="string">
            <text:p>Us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4.{3,4}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_iso8601_str</text:p>
          </table:table-cell>
          <table:table-cell office:value-type="string" calcext:value-type="string">
            <text:p>Ut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0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4.2, 5.{2,5}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project_seq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Migration.B1:Migration.B1048576">
          <table:sort>
            <table:sort-by table:field-number="0" table:data-type="automatic"/>
          </table:sort>
        </table:database-range>
        <table:database-range table:name="__Anonymous_Sheet_DB__1" table:target-range-address="Log.E1:Log.E1048576"/>
        <table:database-range table:name="__Anonymous_Sheet_DB__2" table:target-range-address="Current.A1:Current.E44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 / </number:text>
      <number:month number:style="long"/>
      <number:text> / </number:text>
      <number:year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9:09:11.610562370</meta:creation-date>
    <dc:date>2015-08-04T10:53:42.066145426</dc:date>
    <meta:editing-duration>PT5M31S</meta:editing-duration>
    <meta:editing-cycles>5</meta:editing-cycles>
    <meta:generator>LibreOffice/4.3.7.2$Linux_X86_64 LibreOffice_project/430m0$Build-2</meta:generator>
    <meta:document-statistic meta:table-count="3" meta:cell-count="610" meta:object-count="0"/>
  </office:meta>
</office:document-meta>
</file>