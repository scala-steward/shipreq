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138cm"/>
    </style:style>
    <style:style style:name="co2" style:family="table-column">
      <style:table-column-properties fo:break-before="auto" style:column-width="0.8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4cm"/>
    </style:style>
    <style:style style:name="co5" style:family="table-column">
      <style:table-column-properties fo:break-before="auto" style:column-width="5.244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SS</text:p>
          </table:table-cell>
          <table:table-cell table:number-columns-repeated="2"/>
          <table:table-cell table:style-name="ce1" office:value-type="string" calcext:value-type="string">
            <text:p>Common CSS</text:p>
          </table:table-cell>
          <table:table-cell table:number-columns-repeated="3"/>
          <table:table-cell table:style-name="ce1" office:value-type="string" calcext:value-type="string">
            <text:p>jQuery: Linked to 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 system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<text:s/>Print media styles</text:p>
          </table:table-cell>
          <table:table-cell/>
          <table:table-cell table:style-name="ce7" office:value-type="string" calcext:value-type="string">
            <text:p>no</text:p>
          </table:table-cell>
          <table:table-cell/>
          <table:table-cell table:style-name="ce4" office:value-type="string" calcext:value-type="string">
            <text:p><text:s/>Alert dismissal</text:p>
          </table:table-cell>
          <table:table-cell table:formula="of:=[.B42]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ypography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4" office:value-type="string" calcext:value-type="string">
            <text:p><text:s/>Typography</text:p>
          </table:table-cell>
          <table:table-cell table:formula="of:=[.B3]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<text:s/>Advanced buttons</text:p>
          </table:table-cell>
          <table:table-cell/>
          <table:table-cell table:style-name="ce7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4" office:value-type="string" calcext:value-type="string">
            <text:p><text:s/>Code</text:p>
          </table:table-cell>
          <table:table-cell table:formula="of:=[.B4]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<text:s/>Carousel functionality</text:p>
          </table:table-cell>
          <table:table-cell table:formula="of:=[.B45]" office:value-type="string" office:string-value="n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<text:s/>Grid system</text:p>
          </table:table-cell>
          <table:table-cell table:formula="of:=[.B2]" office:value-type="string" office:string-value="yes" calcext:value-type="string">
            <text:p>yes</text:p>
          </table:table-cell>
          <table:table-cell table:number-columns-repeated="2"/>
          <table:table-cell table:style-name="ce4" office:value-type="string" calcext:value-type="string">
            <text:p><text:s/>Dropdowns</text:p>
          </table:table-cell>
          <table:table-cell table:formula="of:=[.B14]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ms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<text:s/>Tables</text:p>
          </table:table-cell>
          <table:table-cell table:formula="of:=[.B5]" office:value-type="string" office:string-value="n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<text:s/>Modals</text:p>
          </table:table-cell>
          <table:table-cell table:formula="of:=[.B36]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ttons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4" office:value-type="string" calcext:value-type="string">
            <text:p><text:s/>Forms</text:p>
          </table:table-cell>
          <table:table-cell table:formula="of:=[.B6]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<text:s/>Tooltips</text:p>
          </table:table-cell>
          <table:table-cell table:formula="of:=[.B40]" office:value-type="string" office:string-value="n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<text:s/>Buttons</text:p>
          </table:table-cell>
          <table:table-cell table:formula="of:=[.B7]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<text:s/>Popovers (requires Tooltips)</text:p>
          </table:table-cell>
          <table:table-cell table:formula="of:=[.B41]" office:value-type="string" office:string-value="n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elper classes</text:p>
          </table:table-cell>
          <table:table-cell table:style-name="ce3" office:value-type="string" calcext:value-type="string">
            <text:p>yes</text:p>
          </table:table-cell>
          <table:table-cell table:number-columns-repeated="5"/>
          <table:table-cell table:style-name="ce4" office:value-type="string" calcext:value-type="string">
            <text:p><text:s/>Togglable tab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sponsive utilities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Compone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Glyphicons</text:p>
          </table:table-cell>
          <table:table-cell table:formula="of:=[.B13]" office:value-type="string" office:string-value="n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jQuery: Magi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number-columns-repeated="2"/>
          <table:table-cell table:style-name="ce4" office:value-type="string" calcext:value-type="string">
            <text:p><text:s/>Button groups</text:p>
          </table:table-cell>
          <table:table-cell table:formula="of:=[.B15]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<text:s/>Affix</text:p>
          </table:table-cell>
          <table:table-cell table:formula="of:=[.B46]" office:value-type="string" office:string-value="n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Glyphicons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<text:s/>Input groups</text:p>
          </table:table-cell>
          <table:table-cell table:formula="of:=[.B17]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<text:s/>Collapse</text:p>
          </table:table-cell>
          <table:table-cell table:formula="of:=[.B44]" office:value-type="string" office:string-value="n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ropdowns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4" office:value-type="string" calcext:value-type="string">
            <text:p><text:s/>Navs</text:p>
          </table:table-cell>
          <table:table-cell table:formula="of:=[.B18]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<text:s/>Scrollspy</text:p>
          </table:table-cell>
          <table:table-cell table:formula="of:==[.B38]" office:value-type="string" office:string-value="n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utton groups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4" office:value-type="string" calcext:value-type="string">
            <text:p><text:s/>Navbar</text:p>
          </table:table-cell>
          <table:table-cell table:formula="of:=[.B19]" office:value-type="string" office:string-value="yes" calcext:value-type="string">
            <text:p>yes</text:p>
          </table:table-cell>
          <table:table-cell table:number-columns-repeated="2"/>
          <table:table-cell table:style-name="ce4" office:value-type="string" calcext:value-type="string">
            <text:p><text:s/>Transition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ton dropdowns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<text:s/>Breadcrumbs</text:p>
          </table:table-cell>
          <table:table-cell table:formula="of:=[.B20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 groups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<text:s/>Pagination</text:p>
          </table:table-cell>
          <table:table-cell table:formula="of:=[.B21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s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<text:s/>Pager</text:p>
          </table:table-cell>
          <table:table-cell/>
          <table:table-cell table:style-name="ce7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bar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<text:s/>Labels</text:p>
          </table:table-cell>
          <table:table-cell table:formula="of:=[.B22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dcrumb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<text:s/>Badges</text:p>
          </table:table-cell>
          <table:table-cell table:formula="of:=[.B23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ginati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<text:s/>Jumbotron</text:p>
          </table:table-cell>
          <table:table-cell table:formula="of:=[.B24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<text:s/>Thumbnails</text:p>
          </table:table-cell>
          <table:table-cell table:formula="of:=[.B26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dges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<text:s/>Alerts</text:p>
          </table:table-cell>
          <table:table-cell table:formula="of:=[.B27]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mbotr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<text:s/>Progress bars</text:p>
          </table:table-cell>
          <table:table-cell table:formula="of:=[.B28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ge head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<text:s/>Media items</text:p>
          </table:table-cell>
          <table:table-cell table:formula="of:=[.B29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mbnail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<text:s/>List groups</text:p>
          </table:table-cell>
          <table:table-cell table:formula="of:=[.B30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rts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4" office:value-type="string" calcext:value-type="string">
            <text:p><text:s/>Panels</text:p>
          </table:table-cell>
          <table:table-cell table:formula="of:=[.B31]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ess bars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<text:s/>Wells</text:p>
          </table:table-cell>
          <table:table-cell table:formula="of:=[.B32]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 object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<text:s/>Close icon</text:p>
          </table:table-cell>
          <table:table-cell table:style-name="ce5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 group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els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1" office:value-type="string" calcext:value-type="string">
            <text:p>JavaScript compon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ls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4" office:value-type="string" calcext:value-type="string">
            <text:p><text:s/>Dropdowns</text:p>
          </table:table-cell>
          <table:table-cell table:formula="of:=[.B14]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Tooltips</text:p>
          </table:table-cell>
          <table:table-cell table:formula="of:=[.B40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Javascript</text:p>
          </table:table-cell>
          <table:table-cell table:number-columns-repeated="2"/>
          <table:table-cell office:value-type="string" calcext:value-type="string">
            <text:p><text:s/>Popovers</text:p>
          </table:table-cell>
          <table:table-cell table:formula="of:=[.B41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itions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<text:s/>Modals</text:p>
          </table:table-cell>
          <table:table-cell table:style-name="ce6" table:formula="of:=[.B36]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al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<text:s/>Carousel</text:p>
          </table:table-cell>
          <table:table-cell table:formula="of:=[.B45]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down</text:p>
          </table:table-cell>
          <table:table-cell table:style-name="ce3" office:value-type="string" calcext:value-type="string">
            <text:p>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ollspy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string" calcext:value-type="string">
            <text:p>Utilit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4" office:value-type="string" calcext:value-type="string">
            <text:p><text:s/>Basic utilities</text:p>
          </table:table-cell>
          <table:table-cell table:formula="of:=[.E15]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tip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<text:s/>Responsive utilities</text:p>
          </table:table-cell>
          <table:table-cell/>
          <table:table-cell table:style-name="ce7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over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<text:s/>Component animations (for JS)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rt</text:p>
          </table:table-cell>
          <table:table-cell table:style-name="ce3" office:value-type="string" calcext:value-type="string">
            <text:p>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tton</text:p>
          </table:table-cell>
          <table:table-cell table:style-name="ce3" office:value-type="string" calcext:value-type="string">
            <text:p>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ousel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fix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 table:number-rows-repeated="104852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0:35:52.198952882</meta:creation-date>
    <dc:date>2013-12-06T11:31:09.508443030</dc:date>
    <meta:editing-duration>PT2M5S</meta:editing-duration>
    <meta:editing-cycles>1</meta:editing-cycles>
    <meta:document-statistic meta:table-count="1" meta:cell-count="183" meta:object-count="0"/>
    <meta:generator>LibreOffice/4.1.3.2$Linux_X86_64 LibreOffice_project/410m0$Build-2</meta:generator>
  </office:meta>
</office:document-meta>
</file>