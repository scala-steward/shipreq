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20" style:family="table-cell" style:parent-style-name="Default" style:data-style-name="N1">
      <style:text-properties fo:color="#c9211e"/>
    </style:style>
    <style:style style:name="ce5" style:family="table-cell" style:parent-style-name="Default">
      <style:text-properties fo:color="#0047ff"/>
    </style:style>
    <style:style style:name="ce4" style:family="table-cell" style:parent-style-name="Default" style:data-style-name="N1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29" style:family="table-cell" style:parent-style-name="Default" style:data-style-name="N1">
      <style:text-properties fo:font-style="italic" style:font-style-asian="italic" style:font-style-complex="italic"/>
    </style:style>
    <style:style style:name="ce30" style:family="table-cell" style:parent-style-name="Default" style:data-style-name="N1">
      <style:text-properties fo:font-style="normal" style:font-style-asian="normal" style:font-style-complex="normal"/>
    </style:style>
    <style:style style:name="ce12" style:family="table-cell" style:parent-style-name="Default" style:data-style-name="N120"/>
    <style:style style:name="ce1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/>
    <style:style style:name="ce34" style:family="table-cell" style:parent-style-name="Default" style:data-style-name="N10">
      <style:text-properties fo:color="#c9211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7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49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49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table:style-name="ce20"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table:style-name="ce20"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356.018" calcext:value-type="float">
            <text:p>356</text:p>
          </table:table-cell>
          <table:table-cell office:value-type="float" office:value="40.309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0" office:value-type="float" office:value="1910" calcext:value-type="float">
            <text:p>19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4]/[.E4]" office:value-type="float" office:value="5.36489728047458" calcext:value-type="float">
            <text:p>5.4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6]/[.E6]" office:value-type="float" office:value="6.65314058669372" calcext:value-type="float">
            <text:p>6.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7]/[.E7]" office:value-type="float" office:value="6.81477456810247" calcext:value-type="float">
            <text:p>6.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8]/[.E8]" office:value-type="float" office:value="6.9018679860887" calcext:value-type="float">
            <text:p>6.9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1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5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9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2]/[.E22]" office:value-type="float" office:value="6.50409706901985" calcext:value-type="float">
            <text:p>6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3]/[.E23]" office:value-type="float" office:value="6.41664472941973" calcext:value-type="float">
            <text:p>6.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3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4]/[.E24]" office:value-type="float" office:value="6.38631812523678" calcext:value-type="float">
            <text:p>6.4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6]/[.E26]" office:value-type="float" office:value="7.84794309880815" calcext:value-type="float">
            <text:p>7.8</text:p>
          </table:table-cell>
          <table:table-cell table:formula="of:=1-[.E26]/[.E22]" office:value-type="percentage" office:value="0.180271036873621" calcext:value-type="percentage">
            <text:p>18%</text:p>
          </table:table-cell>
          <table:table-cell table:formula="of:=1-[.H26]/[.H22]" office:value-type="percentage" office:value="0.0109024833434281" calcext:value-type="percentage">
            <text:p>1%</text:p>
          </table:table-cell>
          <table:table-cell table:formula="of:=[.E26]/[.E$6]" office:value-type="percentage" office:value="0.879533350240933" calcext:value-type="percentage">
            <text:p>88%</text:p>
          </table:table-cell>
          <table:table-cell table:formula="of:=[.H26]/[.H$6]" office:value-type="percentage" office:value="1.03748411689962" calcext:value-type="percentage">
            <text:p>104%</text:p>
          </table:table-cell>
          <table:table-cell table:number-columns-repeated="49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7]/[.E27]" office:value-type="float" office:value="7.05077825976014" calcext:value-type="float">
            <text:p>7.1</text:p>
          </table:table-cell>
          <table:table-cell table:formula="of:=1-[.E27]/[.E23]" office:value-type="percentage" office:value="0.0788706705276222" calcext:value-type="percentage">
            <text:p>8%</text:p>
          </table:table-cell>
          <table:table-cell table:formula="of:=1-[.H27]/[.H23]" office:value-type="percentage" office:value="-0.0121611721611721" calcext:value-type="percentage">
            <text:p>-1%</text:p>
          </table:table-cell>
          <table:table-cell table:formula="of:=[.E27]/[.E$7]" office:value-type="percentage" office:value="0.98579291054162" calcext:value-type="percentage">
            <text:p>99%</text:p>
          </table:table-cell>
          <table:table-cell table:formula="of:=[.H27]/[.H$7]" office:value-type="percentage" office:value="1.01993208327181" calcext:value-type="percentage">
            <text:p>102%</text:p>
          </table:table-cell>
          <table:table-cell table:number-columns-repeated="49"/>
        </table:table-row>
        <table:table-row table:style-name="ro1">
          <table:table-cell table:formula="of:=[.A27]" office:value-type="string" office:string-value="a31ba2eb5" calcext:value-type="string">
            <text:p>a31ba2eb5</text:p>
          </table:table-cell>
          <table:table-cell table:formula="of:=[.B27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8]/[.E28]" office:value-type="float" office:value="6.9602411105699" calcext:value-type="float">
            <text:p>7.0</text:p>
          </table:table-cell>
          <table:table-cell table:formula="of:=1-[.E28]/[.E24]" office:value-type="percentage" office:value="0.0643274853801169" calcext:value-type="percentage">
            <text:p>6%</text:p>
          </table:table-cell>
          <table:table-cell table:formula="of:=1-[.H28]/[.H24]" office:value-type="percentage" office:value="-0.0197591436217663" calcext:value-type="percentage">
            <text:p>-2%</text:p>
          </table:table-cell>
          <table:table-cell table:formula="of:=[.E28]/[.E$8]" office:value-type="percentage" office:value="0.981439651978535" calcext:value-type="percentage">
            <text:p>98%</text:p>
          </table:table-cell>
          <table:table-cell table:formula="of:=[.H28]/[.H$8]" office:value-type="percentage" office:value="0.98974025974026" calcext:value-type="percentage">
            <text:p>9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08f91863</text:p>
          </table:table-cell>
          <table:table-cell office:value-type="string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7.868" calcext:value-type="float">
            <text:p>18</text:p>
          </table:table-cell>
          <table:table-cell office:value-type="float" office:value="1.52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table:formula="of:=[.H30]/[.E30]" office:value-type="float" office:value="7.94716812178196" calcext:value-type="float">
            <text:p>7.9</text:p>
          </table:table-cell>
          <table:table-cell table:formula="of:=1-[.E30]/[.E26]" office:value-type="percentage" office:value="0.141291810841984" calcext:value-type="percentage">
            <text:p>14%</text:p>
          </table:table-cell>
          <table:table-cell table:formula="of:=1-[.H30]/[.H26]" office:value-type="percentage" office:value="0.130434782608696" calcext:value-type="percentage">
            <text:p>13%</text:p>
          </table:table-cell>
          <table:table-cell table:formula="of:=[.E30]/[.E$6]" office:value-type="percentage" office:value="0.755262490489475" calcext:value-type="percentage">
            <text:p>76%</text:p>
          </table:table-cell>
          <table:table-cell table:formula="of:=[.H30]/[.H$6]" office:value-type="percentage" office:value="0.902160101651842" calcext:value-type="percentage">
            <text:p>90%</text:p>
          </table:table-cell>
          <table:table-cell table:number-columns-repeated="49"/>
        </table:table-row>
        <table:table-row table:style-name="ro1">
          <table:table-cell table:formula="of:=[.A30]" office:value-type="string" office:string-value="f08f91863" calcext:value-type="string">
            <text:p>f08f91863</text:p>
          </table:table-cell>
          <table:table-cell table:formula="of:=[.B30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74.709" calcext:value-type="float">
            <text:p>75</text:p>
          </table:table-cell>
          <table:table-cell office:value-type="float" office:value="19.203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72" calcext:value-type="float">
            <text:p>572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2" table:formula="of:=[.H31]/[.E31]" office:value-type="float" office:value="7.65637339544098" calcext:value-type="float">
            <text:p>7.7</text:p>
          </table:table-cell>
          <table:table-cell table:formula="of:=1-[.E31]/[.E27]" office:value-type="percentage" office:value="0.237468742026027" calcext:value-type="percentage">
            <text:p>24%</text:p>
          </table:table-cell>
          <table:table-cell table:formula="of:=1-[.H31]/[.H27]" office:value-type="percentage" office:value="0.171974522292994" calcext:value-type="percentage">
            <text:p>17%</text:p>
          </table:table-cell>
          <table:table-cell table:formula="of:=[.E31]/[.E$7]" office:value-type="percentage" office:value="0.751697908177126" calcext:value-type="percentage">
            <text:p>75%</text:p>
          </table:table-cell>
          <table:table-cell table:formula="of:=[.H31]/[.H$7]" office:value-type="percentage" office:value="0.844529750479846" calcext:value-type="percentage">
            <text:p>84%</text:p>
          </table:table-cell>
          <table:table-cell table:number-columns-repeated="49"/>
        </table:table-row>
        <table:table-row table:style-name="ro1">
          <table:table-cell table:formula="of:=[.A31]" office:value-type="string" office:string-value="f08f91863" calcext:value-type="string">
            <text:p>f08f91863</text:p>
          </table:table-cell>
          <table:table-cell table:formula="of:=[.B31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46.888" calcext:value-type="float">
            <text:p>247</text:p>
          </table:table-cell>
          <table:table-cell office:value-type="float" office:value="38.256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05.3" calcext:value-type="float">
            <text:p>1905</text:p>
          </table:table-cell>
          <table:table-cell office:value-type="float" office:value="221.3" calcext:value-type="float">
            <text:p>221</text:p>
          </table:table-cell>
          <table:table-cell/>
          <table:table-cell table:style-name="ce12" table:formula="of:=[.H32]/[.E32]" office:value-type="float" office:value="7.71726450860309" calcext:value-type="float">
            <text:p>7.7</text:p>
          </table:table-cell>
          <table:table-cell table:formula="of:=1-[.E32]/[.E28]" office:value-type="percentage" office:value="0.248392596200682" calcext:value-type="percentage">
            <text:p>25%</text:p>
          </table:table-cell>
          <table:table-cell table:formula="of:=1-[.H32]/[.H28]" office:value-type="percentage" office:value="0.166644797270699" calcext:value-type="percentage">
            <text:p>17%</text:p>
          </table:table-cell>
          <table:table-cell table:formula="of:=[.E32]/[.E$8]" office:value-type="percentage" office:value="0.737657308809293" calcext:value-type="percentage">
            <text:p>74%</text:p>
          </table:table-cell>
          <table:table-cell table:formula="of:=[.H32]/[.H$8]" office:value-type="percentage" office:value="0.824805194805195" calcext:value-type="percentage">
            <text:p>8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54e39e3e</text:p>
          </table:table-cell>
          <table:table-cell office:value-type="string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5.775" calcext:value-type="float">
            <text:p>16</text:p>
          </table:table-cell>
          <table:table-cell office:value-type="float" office:value="1.499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35.3" calcext:value-type="float">
            <text:p>135</text:p>
          </table:table-cell>
          <table:table-cell office:value-type="float" office:value="58.6" calcext:value-type="float">
            <text:p>59</text:p>
          </table:table-cell>
          <table:table-cell/>
          <table:table-cell table:style-name="ce12" table:formula="of:=[.H34]/[.E34]" office:value-type="float" office:value="8.57686212361331" calcext:value-type="float">
            <text:p>8.6</text:p>
          </table:table-cell>
          <table:table-cell table:formula="of:=1-[.E34]/[.E30]" office:value-type="percentage" office:value="0.117136780837251" calcext:value-type="percentage">
            <text:p>12%</text:p>
          </table:table-cell>
          <table:table-cell table:formula="of:=1-[.H34]/[.H30]" office:value-type="percentage" office:value="0.0471830985915492" calcext:value-type="percentage">
            <text:p>5%</text:p>
          </table:table-cell>
          <table:table-cell table:formula="of:=[.E34]/[.E$6]" office:value-type="percentage" office:value="0.666793473666413" calcext:value-type="percentage">
            <text:p>67%</text:p>
          </table:table-cell>
          <table:table-cell table:formula="of:=[.H34]/[.H$6]" office:value-type="percentage" office:value="0.859593392630242" calcext:value-type="percentage">
            <text:p>86%</text:p>
          </table:table-cell>
          <table:table-cell table:number-columns-repeated="49"/>
        </table:table-row>
        <table:table-row table:style-name="ro1">
          <table:table-cell table:formula="of:=[.A34]" office:value-type="string" office:string-value="054e39e3e" calcext:value-type="string">
            <text:p>054e39e3e</text:p>
          </table:table-cell>
          <table:table-cell table:formula="of:=[.B34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6.62" calcext:value-type="float">
            <text:p>67</text:p>
          </table:table-cell>
          <table:table-cell office:value-type="float" office:value="14.567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28.3" calcext:value-type="float">
            <text:p>528</text:p>
          </table:table-cell>
          <table:table-cell office:value-type="float" office:value="74.2" calcext:value-type="float">
            <text:p>74</text:p>
          </table:table-cell>
          <table:table-cell/>
          <table:table-cell table:style-name="ce12" table:formula="of:=[.H35]/[.E35]" office:value-type="float" office:value="7.93005103572501" calcext:value-type="float">
            <text:p>7.9</text:p>
          </table:table-cell>
          <table:table-cell table:formula="of:=1-[.E35]/[.E31]" office:value-type="percentage" office:value="0.108273434258255" calcext:value-type="percentage">
            <text:p>11%</text:p>
          </table:table-cell>
          <table:table-cell table:formula="of:=1-[.H35]/[.H31]" office:value-type="percentage" office:value="0.0763986013986014" calcext:value-type="percentage">
            <text:p>8%</text:p>
          </table:table-cell>
          <table:table-cell table:formula="of:=[.E35]/[.E$7]" office:value-type="percentage" office:value="0.670308994134042" calcext:value-type="percentage">
            <text:p>67%</text:p>
          </table:table-cell>
          <table:table-cell table:formula="of:=[.H35]/[.H$7]" office:value-type="percentage" office:value="0.780008858703676" calcext:value-type="percentage">
            <text:p>78%</text:p>
          </table:table-cell>
          <table:table-cell table:number-columns-repeated="49"/>
        </table:table-row>
        <table:table-row table:style-name="ro1">
          <table:table-cell table:formula="of:=[.A35]" office:value-type="string" office:string-value="054e39e3e" calcext:value-type="string">
            <text:p>054e39e3e</text:p>
          </table:table-cell>
          <table:table-cell table:formula="of:=[.B35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13.312" calcext:value-type="float">
            <text:p>213</text:p>
          </table:table-cell>
          <table:table-cell office:value-type="float" office:value="19.683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78.5" calcext:value-type="float">
            <text:p>1779</text:p>
          </table:table-cell>
          <table:table-cell office:value-type="float" office:value="229.5" calcext:value-type="float">
            <text:p>230</text:p>
          </table:table-cell>
          <table:table-cell/>
          <table:table-cell table:style-name="ce12" table:formula="of:=[.H36]/[.E36]" office:value-type="float" office:value="8.33755250525052" calcext:value-type="float">
            <text:p>8.3</text:p>
          </table:table-cell>
          <table:table-cell table:formula="of:=1-[.E36]/[.E32]" office:value-type="percentage" office:value="0.135996889277729" calcext:value-type="percentage">
            <text:p>14%</text:p>
          </table:table-cell>
          <table:table-cell table:formula="of:=1-[.H36]/[.H32]" office:value-type="percentage" office:value="0.0665511992862017" calcext:value-type="percentage">
            <text:p>7%</text:p>
          </table:table-cell>
          <table:table-cell table:formula="of:=[.E36]/[.E$8]" office:value-type="percentage" office:value="0.637338209458248" calcext:value-type="percentage">
            <text:p>64%</text:p>
          </table:table-cell>
          <table:table-cell table:formula="of:=[.H36]/[.H$8]" office:value-type="percentage" office:value="0.76991341991342" calcext:value-type="percentage">
            <text:p>7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5c892acc0</text:p>
          </table:table-cell>
          <table:table-cell office:value-type="string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33" calcext:value-type="float">
            <text:p>15</text:p>
          </table:table-cell>
          <table:table-cell office:value-type="float" office:value="2.333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119.3" calcext:value-type="float">
            <text:p>119</text:p>
          </table:table-cell>
          <table:table-cell office:value-type="float" office:value="45.9" calcext:value-type="float">
            <text:p>46</text:p>
          </table:table-cell>
          <table:table-cell/>
          <table:table-cell table:style-name="ce12" table:formula="of:=[.H38]/[.E38]" office:value-type="float" office:value="8.09746826851286" calcext:value-type="float">
            <text:p>8.1</text:p>
          </table:table-cell>
          <table:table-cell table:formula="of:=1-[.E38]/[.E34]" office:value-type="percentage" office:value="0.066053882725832" calcext:value-type="percentage">
            <text:p>7%</text:p>
          </table:table-cell>
          <table:table-cell table:formula="of:=1-[.H38]/[.H34]" office:value-type="percentage" office:value="0.118255728011826" calcext:value-type="percentage">
            <text:p>12%</text:p>
          </table:table-cell>
          <table:table-cell table:formula="of:=[.E38]/[.E$6]" office:value-type="percentage" office:value="0.622749175754502" calcext:value-type="percentage">
            <text:p>62%</text:p>
          </table:table-cell>
          <table:table-cell table:formula="of:=[.H38]/[.H$6]" office:value-type="percentage" office:value="0.757941550190597" calcext:value-type="percentage">
            <text:p>76%</text:p>
          </table:table-cell>
          <table:table-cell table:number-columns-repeated="49"/>
        </table:table-row>
        <table:table-row table:style-name="ro1">
          <table:table-cell table:formula="of:=[.A38]" office:value-type="string" office:string-value="5c892acc0" calcext:value-type="string">
            <text:p>5c892acc0</text:p>
          </table:table-cell>
          <table:table-cell table:formula="of:=[.B38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3.338" calcext:value-type="float">
            <text:p>63</text:p>
          </table:table-cell>
          <table:table-cell office:value-type="float" office:value="4.501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82.4" calcext:value-type="float">
            <text:p>482</text:p>
          </table:table-cell>
          <table:table-cell office:value-type="float" office:value="43.1" calcext:value-type="float">
            <text:p>43</text:p>
          </table:table-cell>
          <table:table-cell/>
          <table:table-cell table:style-name="ce12" table:formula="of:=[.H39]/[.E39]" office:value-type="float" office:value="7.61628090561748" calcext:value-type="float">
            <text:p>7.6</text:p>
          </table:table-cell>
          <table:table-cell table:formula="of:=1-[.E39]/[.E35]" office:value-type="percentage" office:value="0.0492644851395978" calcext:value-type="percentage">
            <text:p>5%</text:p>
          </table:table-cell>
          <table:table-cell table:formula="of:=1-[.H39]/[.H35]" office:value-type="percentage" office:value="0.0868824531516183" calcext:value-type="percentage">
            <text:p>9%</text:p>
          </table:table-cell>
          <table:table-cell table:formula="of:=[.E39]/[.E$7]" office:value-type="percentage" office:value="0.637286566653587" calcext:value-type="percentage">
            <text:p>64%</text:p>
          </table:table-cell>
          <table:table-cell table:formula="of:=[.H39]/[.H$7]" office:value-type="percentage" office:value="0.712239775579507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39]" office:value-type="string" office:string-value="5c892acc0" calcext:value-type="string">
            <text:p>5c892acc0</text:p>
          </table:table-cell>
          <table:table-cell table:formula="of:=[.B39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8.519" calcext:value-type="float">
            <text:p>209</text:p>
          </table:table-cell>
          <table:table-cell office:value-type="float" office:value="4.969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573.1" calcext:value-type="float">
            <text:p>1573</text:p>
          </table:table-cell>
          <table:table-cell office:value-type="float" office:value="141.1" calcext:value-type="float">
            <text:p>141</text:p>
          </table:table-cell>
          <table:table-cell/>
          <table:table-cell table:style-name="ce12" table:formula="of:=[.H40]/[.E40]" office:value-type="float" office:value="7.54415664759566" calcext:value-type="float">
            <text:p>7.5</text:p>
          </table:table-cell>
          <table:table-cell table:formula="of:=1-[.E40]/[.E36]" office:value-type="percentage" office:value="0.0224694344434444" calcext:value-type="percentage">
            <text:p>2%</text:p>
          </table:table-cell>
          <table:table-cell table:formula="of:=1-[.H40]/[.H36]" office:value-type="percentage" office:value="0.115490581951082" calcext:value-type="percentage">
            <text:p>12%</text:p>
          </table:table-cell>
          <table:table-cell table:formula="of:=[.E40]/[.E$8]" office:value-type="percentage" office:value="0.623017580342524" calcext:value-type="percentage">
            <text:p>62%</text:p>
          </table:table-cell>
          <table:table-cell table:formula="of:=[.H40]/[.H$8]" office:value-type="percentage" office:value="0.6809956709956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33be13e5</text:p>
          </table:table-cell>
          <table:table-cell office:value-type="string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01" calcext:value-type="float">
            <text:p>15</text:p>
          </table:table-cell>
          <table:table-cell office:value-type="float" office:value="1.933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117.9" calcext:value-type="float">
            <text:p>118</text:p>
          </table:table-cell>
          <table:table-cell office:value-type="float" office:value="43.6" calcext:value-type="float">
            <text:p>44</text:p>
          </table:table-cell>
          <table:table-cell/>
          <table:table-cell table:style-name="ce12" table:formula="of:=[.H42]/[.E42]" office:value-type="float" office:value="8.01986259438134" calcext:value-type="float">
            <text:p>8.0</text:p>
          </table:table-cell>
          <table:table-cell table:formula="of:=1-[.E42]/[.E38]" office:value-type="percentage" office:value="0.0021719948415122" calcext:value-type="percentage">
            <text:p>0%</text:p>
          </table:table-cell>
          <table:table-cell table:formula="of:=1-[.H42]/[.H38]" office:value-type="percentage" office:value="0.0117351215423301" calcext:value-type="percentage">
            <text:p>1%</text:p>
          </table:table-cell>
          <table:table-cell table:formula="of:=[.E42]/[.E$6]" office:value-type="percentage" office:value="0.621396567757207" calcext:value-type="percentage">
            <text:p>62%</text:p>
          </table:table-cell>
          <table:table-cell table:formula="of:=[.H42]/[.H$6]" office:value-type="percentage" office:value="0.749047013977128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42]" office:value-type="string" office:string-value="333be13e5" calcext:value-type="string">
            <text:p>333be13e5</text:p>
          </table:table-cell>
          <table:table-cell table:formula="of:=[.B42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2.205" calcext:value-type="float">
            <text:p>62</text:p>
          </table:table-cell>
          <table:table-cell office:value-type="float" office:value="5.471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2" table:formula="of:=[.H43]/[.E43]" office:value-type="float" office:value="7.63604211880074" calcext:value-type="float">
            <text:p>7.6</text:p>
          </table:table-cell>
          <table:table-cell table:formula="of:=1-[.E43]/[.E39]" office:value-type="percentage" office:value="0.0178881556095867" calcext:value-type="percentage">
            <text:p>2%</text:p>
          </table:table-cell>
          <table:table-cell table:formula="of:=1-[.H43]/[.H39]" office:value-type="percentage" office:value="0.015339966832504" calcext:value-type="percentage">
            <text:p>2%</text:p>
          </table:table-cell>
          <table:table-cell table:formula="of:=[.E43]/[.E$7]" office:value-type="percentage" office:value="0.625886685381388" calcext:value-type="percentage">
            <text:p>63%</text:p>
          </table:table-cell>
          <table:table-cell table:formula="of:=[.H43]/[.H$7]" office:value-type="percentage" office:value="0.701314041045327" calcext:value-type="percentage">
            <text:p>70%</text:p>
          </table:table-cell>
          <table:table-cell table:number-columns-repeated="49"/>
        </table:table-row>
        <table:table-row table:style-name="ro1">
          <table:table-cell table:formula="of:=[.A43]" office:value-type="string" office:string-value="333be13e5" calcext:value-type="string">
            <text:p>333be13e5</text:p>
          </table:table-cell>
          <table:table-cell table:formula="of:=[.B43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1.108" calcext:value-type="float">
            <text:p>201</text:p>
          </table:table-cell>
          <table:table-cell office:value-type="float" office:value="44.502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589.6" calcext:value-type="float">
            <text:p>1590</text:p>
          </table:table-cell>
          <table:table-cell office:value-type="float" office:value="150.3" calcext:value-type="float">
            <text:p>150</text:p>
          </table:table-cell>
          <table:table-cell/>
          <table:table-cell table:style-name="ce12" table:formula="of:=[.H44]/[.E44]" office:value-type="float" office:value="7.90421067287229" calcext:value-type="float">
            <text:p>7.9</text:p>
          </table:table-cell>
          <table:table-cell table:formula="of:=1-[.E44]/[.E40]" office:value-type="percentage" office:value="0.0355411257487327" calcext:value-type="percentage">
            <text:p>4%</text:p>
          </table:table-cell>
          <table:table-cell table:formula="of:=1-[.H44]/[.H40]" office:value-type="percentage" office:value="-0.0104888436844448" calcext:value-type="percentage">
            <text:p>-1%</text:p>
          </table:table-cell>
          <table:table-cell table:formula="of:=[.E44]/[.E$8]" office:value-type="percentage" office:value="0.600874834175899" calcext:value-type="percentage">
            <text:p>60%</text:p>
          </table:table-cell>
          <table:table-cell table:formula="of:=[.H44]/[.H$8]" office:value-type="percentage" office:value="0.688138528138528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99f850f</text:p>
          </table:table-cell>
          <table:table-cell office:value-type="string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242" calcext:value-type="float">
            <text:p>14</text:p>
          </table:table-cell>
          <table:table-cell office:value-type="float" office:value="0.797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16.4" calcext:value-type="float">
            <text:p>116</text:p>
          </table:table-cell>
          <table:table-cell office:value-type="float" office:value="40.7" calcext:value-type="float">
            <text:p>41</text:p>
          </table:table-cell>
          <table:table-cell/>
          <table:table-cell table:style-name="ce12" table:formula="of:=[.H46]/[.E46]" office:value-type="float" office:value="8.1730094087909" calcext:value-type="float">
            <text:p>8.2</text:p>
          </table:table-cell>
          <table:table-cell table:formula="of:=1-[.E46]/[.E42]" office:value-type="percentage" office:value="0.031222365825454" calcext:value-type="percentage">
            <text:p>3%</text:p>
          </table:table-cell>
          <table:table-cell table:formula="of:=1-[.H46]/[.H42]" office:value-type="percentage" office:value="0.0127226463104325" calcext:value-type="percentage">
            <text:p>1%</text:p>
          </table:table-cell>
          <table:table-cell table:formula="of:=[.E46]/[.E$6]" office:value-type="percentage" office:value="0.60199509679601" calcext:value-type="percentage">
            <text:p>60%</text:p>
          </table:table-cell>
          <table:table-cell table:formula="of:=[.H46]/[.H$6]" office:value-type="percentage" office:value="0.739517153748412" calcext:value-type="percentage">
            <text:p>74%</text:p>
          </table:table-cell>
          <table:table-cell table:number-columns-repeated="49"/>
        </table:table-row>
        <table:table-row table:style-name="ro1">
          <table:table-cell table:formula="of:=[.A46]" office:value-type="string" office:string-value="b199f850f" calcext:value-type="string">
            <text:p>b199f850f</text:p>
          </table:table-cell>
          <table:table-cell table:formula="of:=[.B46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836" calcext:value-type="float">
            <text:p>60</text:p>
          </table:table-cell>
          <table:table-cell office:value-type="float" office:value="16.685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81.7" calcext:value-type="float">
            <text:p>482</text:p>
          </table:table-cell>
          <table:table-cell office:value-type="float" office:value="43.4" calcext:value-type="float">
            <text:p>43</text:p>
          </table:table-cell>
          <table:table-cell/>
          <table:table-cell table:style-name="ce12" table:formula="of:=[.H47]/[.E47]" office:value-type="float" office:value="8.05033758941106" calcext:value-type="float">
            <text:p>8.1</text:p>
          </table:table-cell>
          <table:table-cell table:formula="of:=1-[.E47]/[.E43]" office:value-type="percentage" office:value="0.0380837553251346" calcext:value-type="percentage">
            <text:p>4%</text:p>
          </table:table-cell>
          <table:table-cell table:formula="of:=1-[.H47]/[.H43]" office:value-type="percentage" office:value="-0.0141052631578946" calcext:value-type="percentage">
            <text:p>-1%</text:p>
          </table:table-cell>
          <table:table-cell table:formula="of:=[.E47]/[.E$7]" office:value-type="percentage" office:value="0.602050569994064" calcext:value-type="percentage">
            <text:p>60%</text:p>
          </table:table-cell>
          <table:table-cell table:formula="of:=[.H47]/[.H$7]" office:value-type="percentage" office:value="0.711206260150598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47]" office:value-type="string" office:string-value="b199f850f" calcext:value-type="string">
            <text:p>b199f850f</text:p>
          </table:table-cell>
          <table:table-cell table:formula="of:=[.B47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92.292" calcext:value-type="float">
            <text:p>192</text:p>
          </table:table-cell>
          <table:table-cell office:value-type="float" office:value="21.16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53.9" calcext:value-type="float">
            <text:p>1554</text:p>
          </table:table-cell>
          <table:table-cell office:value-type="float" office:value="133.9" calcext:value-type="float">
            <text:p>134</text:p>
          </table:table-cell>
          <table:table-cell/>
          <table:table-cell table:style-name="ce12" table:formula="of:=[.H48]/[.E48]" office:value-type="float" office:value="8.08093940465542" calcext:value-type="float">
            <text:p>8.1</text:p>
          </table:table-cell>
          <table:table-cell table:formula="of:=1-[.E48]/[.E44]" office:value-type="percentage" office:value="0.0438371422320345" calcext:value-type="percentage">
            <text:p>4%</text:p>
          </table:table-cell>
          <table:table-cell table:formula="of:=1-[.H48]/[.H44]" office:value-type="percentage" office:value="0.022458480120785" calcext:value-type="percentage">
            <text:p>2%</text:p>
          </table:table-cell>
          <table:table-cell table:formula="of:=[.E48]/[.E$8]" office:value-type="percentage" office:value="0.57453419860648" calcext:value-type="percentage">
            <text:p>57%</text:p>
          </table:table-cell>
          <table:table-cell table:formula="of:=[.H48]/[.H$8]" office:value-type="percentage" office:value="0.67268398268398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361" calcext:value-type="float">
            <text:p>14</text:p>
          </table:table-cell>
          <table:table-cell office:value-type="float" office:value="2.128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121.9" calcext:value-type="float">
            <text:p>122</text:p>
          </table:table-cell>
          <table:table-cell office:value-type="float" office:value="44.7" calcext:value-type="float">
            <text:p>45</text:p>
          </table:table-cell>
          <table:table-cell/>
          <table:table-cell table:style-name="ce12" table:formula="of:=[.H50]/[.E50]" office:value-type="float" office:value="8.48826683378595" calcext:value-type="float">
            <text:p>8.5</text:p>
          </table:table-cell>
          <table:table-cell table:formula="of:=1-[.E50]/[.E46]" office:value-type="percentage" office:value="-0.00835556803819681" calcext:value-type="percentage">
            <text:p>-1%</text:p>
          </table:table-cell>
          <table:table-cell table:formula="of:=1-[.H50]/[.H46]" office:value-type="percentage" office:value="-0.0472508591065293" calcext:value-type="percentage">
            <text:p>-5%</text:p>
          </table:table-cell>
          <table:table-cell table:formula="of:=[.E50]/[.E$6]" office:value-type="percentage" office:value="0.60702510778595" calcext:value-type="percentage">
            <text:p>61%</text:p>
          </table:table-cell>
          <table:table-cell table:formula="of:=[.H50]/[.H$6]" office:value-type="percentage" office:value="0.774459974587039" calcext:value-type="percentage">
            <text:p>77%</text:p>
          </table:table-cell>
          <table:table-cell table:number-columns-repeated="49"/>
        </table:table-row>
        <table:table-row table:style-name="ro1">
          <table:table-cell table:formula="of:=[.A50]" office:value-type="string" office:string-value="99217c96a" calcext:value-type="string">
            <text:p>99217c96a</text:p>
          </table:table-cell>
          <table:table-cell table:formula="of:=[.B50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432" calcext:value-type="float">
            <text:p>59</text:p>
          </table:table-cell>
          <table:table-cell office:value-type="float" office:value="9.444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481.8" calcext:value-type="float">
            <text:p>482</text:p>
          </table:table-cell>
          <table:table-cell office:value-type="float" office:value="41.5" calcext:value-type="float">
            <text:p>42</text:p>
          </table:table-cell>
          <table:table-cell/>
          <table:table-cell table:style-name="ce12" table:formula="of:=[.H51]/[.E51]" office:value-type="float" office:value="8.10674384170144" calcext:value-type="float">
            <text:p>8.1</text:p>
          </table:table-cell>
          <table:table-cell table:formula="of:=1-[.E51]/[.E47]" office:value-type="percentage" office:value="0.00675178822113776" calcext:value-type="percentage">
            <text:p>1%</text:p>
          </table:table-cell>
          <table:table-cell table:formula="of:=1-[.H51]/[.H47]" office:value-type="percentage" office:value="-0.000207598090097516" calcext:value-type="percentage">
            <text:p>0%</text:p>
          </table:table-cell>
          <table:table-cell table:formula="of:=[.E51]/[.E$7]" office:value-type="percentage" office:value="0.597985652047048" calcext:value-type="percentage">
            <text:p>60%</text:p>
          </table:table-cell>
          <table:table-cell table:formula="of:=[.H51]/[.H$7]" office:value-type="percentage" office:value="0.711353905211871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1]" office:value-type="string" office:string-value="99217c96a" calcext:value-type="string">
            <text:p>99217c96a</text:p>
          </table:table-cell>
          <table:table-cell table:formula="of:=[.B51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6.897" calcext:value-type="float">
            <text:p>187</text:p>
          </table:table-cell>
          <table:table-cell office:value-type="float" office:value="5.593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593.7" calcext:value-type="float">
            <text:p>1594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2" table:formula="of:=[.H52]/[.E52]" office:value-type="float" office:value="8.52715666918142" calcext:value-type="float">
            <text:p>8.5</text:p>
          </table:table-cell>
          <table:table-cell table:formula="of:=1-[.E52]/[.E48]" office:value-type="percentage" office:value="0.0280562893932146" calcext:value-type="percentage">
            <text:p>3%</text:p>
          </table:table-cell>
          <table:table-cell table:formula="of:=1-[.H52]/[.H48]" office:value-type="percentage" office:value="-0.0256129738078383" calcext:value-type="percentage">
            <text:p>-3%</text:p>
          </table:table-cell>
          <table:table-cell table:formula="of:=[.E52]/[.E$8]" office:value-type="percentage" office:value="0.558414900864078" calcext:value-type="percentage">
            <text:p>56%</text:p>
          </table:table-cell>
          <table:table-cell table:formula="of:=[.H52]/[.H$8]" office:value-type="percentage" office:value="0.68991341991342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3.641" calcext:value-type="float">
            <text:p>14</text:p>
          </table:table-cell>
          <table:table-cell office:value-type="float" office:value="0.85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118.4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2" table:formula="of:=[.H54]/[.E54]" office:value-type="float" office:value="8.67971556337512" calcext:value-type="float">
            <text:p>8.7</text:p>
          </table:table-cell>
          <table:table-cell table:formula="of:=1-[.E54]/[.E50]" office:value-type="percentage" office:value="0.0501357844161271" calcext:value-type="percentage">
            <text:p>5%</text:p>
          </table:table-cell>
          <table:table-cell table:formula="of:=1-[.H54]/[.H50]" office:value-type="percentage" office:value="0.0287120590648072" calcext:value-type="percentage">
            <text:p>3%</text:p>
          </table:table-cell>
          <table:table-cell table:formula="of:=[.E54]/[.E$6]" office:value-type="percentage" office:value="0.576591427846817" calcext:value-type="percentage">
            <text:p>58%</text:p>
          </table:table-cell>
          <table:table-cell table:formula="of:=[.H54]/[.H$6]" office:value-type="percentage" office:value="0.752223634053367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54]" office:value-type="string" office:string-value="99217c96a" calcext:value-type="string">
            <text:p>99217c96a</text:p>
          </table:table-cell>
          <table:table-cell table:formula="of:=[.B54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7.385" calcext:value-type="float">
            <text:p>57</text:p>
          </table:table-cell>
          <table:table-cell office:value-type="float" office:value="6.498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478.8" calcext:value-type="float">
            <text:p>479</text:p>
          </table:table-cell>
          <table:table-cell office:value-type="float" office:value="29.5" calcext:value-type="float">
            <text:p>30</text:p>
          </table:table-cell>
          <table:table-cell/>
          <table:table-cell table:style-name="ce12" table:formula="of:=[.H55]/[.E55]" office:value-type="float" office:value="8.34364380935785" calcext:value-type="float">
            <text:p>8.3</text:p>
          </table:table-cell>
          <table:table-cell table:formula="of:=1-[.E55]/[.E51]" office:value-type="percentage" office:value="0.0344427244582044" calcext:value-type="percentage">
            <text:p>3%</text:p>
          </table:table-cell>
          <table:table-cell table:formula="of:=1-[.H55]/[.H51]" office:value-type="percentage" office:value="0.00622665006226653" calcext:value-type="percentage">
            <text:p>1%</text:p>
          </table:table-cell>
          <table:table-cell table:formula="of:=[.E55]/[.E$7]" office:value-type="percentage" office:value="0.577389397003632" calcext:value-type="percentage">
            <text:p>58%</text:p>
          </table:table-cell>
          <table:table-cell table:formula="of:=[.H55]/[.H$7]" office:value-type="percentage" office:value="0.70692455337369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5]" office:value-type="string" office:string-value="99217c96a" calcext:value-type="string">
            <text:p>99217c96a</text:p>
          </table:table-cell>
          <table:table-cell table:formula="of:=[.B55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1.453" calcext:value-type="float">
            <text:p>181</text:p>
          </table:table-cell>
          <table:table-cell office:value-type="float" office:value="8.16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584" calcext:value-type="float">
            <text:p>1584</text:p>
          </table:table-cell>
          <table:table-cell office:value-type="float" office:value="161.2" calcext:value-type="float">
            <text:p>161</text:p>
          </table:table-cell>
          <table:table-cell/>
          <table:table-cell table:style-name="ce12" table:formula="of:=[.H56]/[.E56]" office:value-type="float" office:value="8.72953326756791" calcext:value-type="float">
            <text:p>8.7</text:p>
          </table:table-cell>
          <table:table-cell table:formula="of:=1-[.E56]/[.E52]" office:value-type="percentage" office:value="0.0291283434191024" calcext:value-type="percentage">
            <text:p>3%</text:p>
          </table:table-cell>
          <table:table-cell table:formula="of:=1-[.H56]/[.H52]" office:value-type="percentage" office:value="0.00608646545773983" calcext:value-type="percentage">
            <text:p>1%</text:p>
          </table:table-cell>
          <table:table-cell table:formula="of:=[.E56]/[.E$8]" office:value-type="percentage" office:value="0.542149199861365" calcext:value-type="percentage">
            <text:p>54%</text:p>
          </table:table-cell>
          <table:table-cell table:formula="of:=[.H56]/[.H$8]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28bd588b</text:p>
          </table:table-cell>
          <table:table-cell office:value-type="string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2.067" calcext:value-type="float">
            <text:p>12</text:p>
          </table:table-cell>
          <table:table-cell office:value-type="float" office:value="2.423" calcext:value-type="float">
            <text:p>2</text:p>
          </table:table-cell>
          <table:table-cell office:value-type="float" office:value="605" calcext:value-type="float">
            <text:p>605</text:p>
          </table:table-cell>
          <table:table-cell office:value-type="float" office:value="99.3" calcext:value-type="float">
            <text:p>99</text:p>
          </table:table-cell>
          <table:table-cell office:value-type="float" office:value="36.7" calcext:value-type="float">
            <text:p>37</text:p>
          </table:table-cell>
          <table:table-cell/>
          <table:table-cell table:style-name="ce12" table:formula="of:=[.H58]/[.E58]" office:value-type="float" office:value="8.22905444600978" calcext:value-type="float">
            <text:p>8.2</text:p>
          </table:table-cell>
          <table:table-cell table:formula="of:=1-[.E58]/[.E54]" office:value-type="percentage" office:value="0.115387434938787" calcext:value-type="percentage">
            <text:p>12%</text:p>
          </table:table-cell>
          <table:table-cell table:formula="of:=1-[.H58]/[.H54]" office:value-type="percentage" office:value="0.161317567567568" calcext:value-type="percentage">
            <text:p>16%</text:p>
          </table:table-cell>
          <table:table-cell table:formula="of:=[.E58]/[.E$6]" office:value-type="percentage" office:value="0.51006002197988" calcext:value-type="percentage">
            <text:p>51%</text:p>
          </table:table-cell>
          <table:table-cell table:formula="of:=[.H58]/[.H$6]" office:value-type="percentage" office:value="0.630876747141042" calcext:value-type="percentage">
            <text:p>63%</text:p>
          </table:table-cell>
          <table:table-cell table:number-columns-repeated="49"/>
        </table:table-row>
        <table:table-row table:style-name="ro1">
          <table:table-cell table:formula="of:=[.A58]" office:value-type="string" office:string-value="d28bd588b" calcext:value-type="string">
            <text:p>d28bd588b</text:p>
          </table:table-cell>
          <table:table-cell table:formula="of:=[.B58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8.966" calcext:value-type="float">
            <text:p>49</text:p>
          </table:table-cell>
          <table:table-cell office:value-type="float" office:value="1.196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95" calcext:value-type="float">
            <text:p>395</text:p>
          </table:table-cell>
          <table:table-cell office:value-type="float" office:value="22.2" calcext:value-type="float">
            <text:p>22</text:p>
          </table:table-cell>
          <table:table-cell/>
          <table:table-cell table:style-name="ce12" table:formula="of:=[.H59]/[.E59]" office:value-type="float" office:value="8.06682187640404" calcext:value-type="float">
            <text:p>8.1</text:p>
          </table:table-cell>
          <table:table-cell table:formula="of:=1-[.E59]/[.E55]" office:value-type="percentage" office:value="0.146710812930208" calcext:value-type="percentage">
            <text:p>15%</text:p>
          </table:table-cell>
          <table:table-cell table:formula="of:=1-[.H59]/[.H55]" office:value-type="percentage" office:value="0.175020885547201" calcext:value-type="percentage">
            <text:p>18%</text:p>
          </table:table-cell>
          <table:table-cell table:formula="of:=[.E59]/[.E$7]" office:value-type="percentage" office:value="0.492680129191947" calcext:value-type="percentage">
            <text:p>49%</text:p>
          </table:table-cell>
          <table:table-cell table:formula="of:=[.H59]/[.H$7]" office:value-type="percentage" office:value="0.583197992027167" calcext:value-type="percentage">
            <text:p>58%</text:p>
          </table:table-cell>
          <table:table-cell table:number-columns-repeated="49"/>
        </table:table-row>
        <table:table-row table:style-name="ro1">
          <table:table-cell table:formula="of:=[.A59]" office:value-type="string" office:string-value="d28bd588b" calcext:value-type="string">
            <text:p>d28bd588b</text:p>
          </table:table-cell>
          <table:table-cell table:formula="of:=[.B59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53.63" calcext:value-type="float">
            <text:p>154</text:p>
          </table:table-cell>
          <table:table-cell office:value-type="float" office:value="6.806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74" calcext:value-type="float">
            <text:p>1274</text:p>
          </table:table-cell>
          <table:table-cell office:value-type="float" office:value="146.5" calcext:value-type="float">
            <text:p>147</text:p>
          </table:table-cell>
          <table:table-cell/>
          <table:table-cell table:style-name="ce12" table:formula="of:=[.H60]/[.E60]" office:value-type="float" office:value="8.29265117490074" calcext:value-type="float">
            <text:p>8.3</text:p>
          </table:table-cell>
          <table:table-cell table:formula="of:=1-[.E60]/[.E56]" office:value-type="percentage" office:value="0.15333447228759" calcext:value-type="percentage">
            <text:p>15%</text:p>
          </table:table-cell>
          <table:table-cell table:formula="of:=1-[.H60]/[.H56]" office:value-type="percentage" office:value="0.195707070707071" calcext:value-type="percentage">
            <text:p>20%</text:p>
          </table:table-cell>
          <table:table-cell table:formula="of:=[.E60]/[.E$8]" office:value-type="percentage" office:value="0.459019038399484" calcext:value-type="percentage">
            <text:p>46%</text:p>
          </table:table-cell>
          <table:table-cell table:formula="of:=[.H60]/[.H$8]" office:value-type="percentage" office:value="0.551515151515152" calcext:value-type="percentage">
            <text:p>5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7c23ad99</text:p>
          </table:table-cell>
          <table:table-cell office:value-type="string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1.509" calcext:value-type="float">
            <text:p>12</text:p>
          </table:table-cell>
          <table:table-cell office:value-type="float" office:value="0.219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96.8" calcext:value-type="float">
            <text:p>97</text:p>
          </table:table-cell>
          <table:table-cell office:value-type="float" office:value="34.1" calcext:value-type="float">
            <text:p>34</text:p>
          </table:table-cell>
          <table:table-cell/>
          <table:table-cell table:style-name="ce12" table:formula="of:=[.H62]/[.E62]" office:value-type="float" office:value="8.41080893214006" calcext:value-type="float">
            <text:p>8.4</text:p>
          </table:table-cell>
          <table:table-cell table:formula="of:=1-[.E62]/[.E58]" office:value-type="percentage" office:value="0.0462418165244054" calcext:value-type="percentage">
            <text:p>5%</text:p>
          </table:table-cell>
          <table:table-cell table:formula="of:=1-[.H62]/[.H58]" office:value-type="percentage" office:value="0.0251762336354482" calcext:value-type="percentage">
            <text:p>3%</text:p>
          </table:table-cell>
          <table:table-cell table:formula="of:=[.E62]/[.E$6]" office:value-type="percentage" office:value="0.486473920027052" calcext:value-type="percentage">
            <text:p>49%</text:p>
          </table:table-cell>
          <table:table-cell table:formula="of:=[.H62]/[.H$6]" office:value-type="percentage" office:value="0.614993646759847" calcext:value-type="percentage">
            <text:p>61%</text:p>
          </table:table-cell>
          <table:table-cell table:number-columns-repeated="49"/>
        </table:table-row>
        <table:table-row table:style-name="ro1">
          <table:table-cell table:formula="of:=[.A62]" office:value-type="string" office:string-value="d7c23ad99" calcext:value-type="string">
            <text:p>d7c23ad99</text:p>
          </table:table-cell>
          <table:table-cell table:formula="of:=[.B62]" office:value-type="string" office:string-value="+ Optimise MTrie.foreach{,PathAnd}Value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7.908" calcext:value-type="float">
            <text:p>48</text:p>
          </table:table-cell>
          <table:table-cell office:value-type="float" office:value="3.15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76.1" calcext:value-type="float">
            <text:p>376</text:p>
          </table:table-cell>
          <table:table-cell office:value-type="float" office:value="28.3" calcext:value-type="float">
            <text:p>28</text:p>
          </table:table-cell>
          <table:table-cell/>
          <table:table-cell table:style-name="ce12" table:formula="of:=[.H63]/[.E63]" office:value-type="float" office:value="7.85046338816064" calcext:value-type="float">
            <text:p>7.9</text:p>
          </table:table-cell>
          <table:table-cell table:formula="of:=1-[.E63]/[.E59]" office:value-type="percentage" office:value="0.0216068292284443" calcext:value-type="percentage">
            <text:p>2%</text:p>
          </table:table-cell>
          <table:table-cell table:formula="of:=1-[.H63]/[.H59]" office:value-type="percentage" office:value="0.0478481012658227" calcext:value-type="percentage">
            <text:p>5%</text:p>
          </table:table-cell>
          <table:table-cell table:formula="of:=[.E63]/[.E$7]" office:value-type="percentage" office:value="0.482034873776248" calcext:value-type="percentage">
            <text:p>48%</text:p>
          </table:table-cell>
          <table:table-cell table:formula="of:=[.H63]/[.H$7]" office:value-type="percentage" office:value="0.555293075446626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63]" office:value-type="string" office:string-value="d7c23ad99" calcext:value-type="string">
            <text:p>d7c23ad99</text:p>
          </table:table-cell>
          <table:table-cell table:formula="of:=[.B63]" office:value-type="string" office:string-value="+ Optimise MTrie.foreach{,PathAnd}Value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53.797" calcext:value-type="float">
            <text:p>154</text:p>
          </table:table-cell>
          <table:table-cell office:value-type="float" office:value="1.721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233" calcext:value-type="float">
            <text:p>1233</text:p>
          </table:table-cell>
          <table:table-cell office:value-type="float" office:value="99.4" calcext:value-type="float">
            <text:p>99</text:p>
          </table:table-cell>
          <table:table-cell/>
          <table:table-cell table:style-name="ce12" table:formula="of:=[.H64]/[.E64]" office:value-type="float" office:value="8.01706145113364" calcext:value-type="float">
            <text:p>8.0</text:p>
          </table:table-cell>
          <table:table-cell table:formula="of:=1-[.E64]/[.E60]" office:value-type="percentage" office:value="-0.001087027273319" calcext:value-type="percentage">
            <text:p>0%</text:p>
          </table:table-cell>
          <table:table-cell table:formula="of:=1-[.H64]/[.H60]" office:value-type="percentage" office:value="0.0321821036106751" calcext:value-type="percentage">
            <text:p>3%</text:p>
          </table:table-cell>
          <table:table-cell table:formula="of:=[.E64]/[.E$8]" office:value-type="percentage" office:value="0.459518004613197" calcext:value-type="percentage">
            <text:p>46%</text:p>
          </table:table-cell>
          <table:table-cell table:formula="of:=[.H64]/[.H$8]" office:value-type="percentage" office:value="0.533766233766234" calcext:value-type="percentage">
            <text:p>5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7c23ad99</text:p>
          </table:table-cell>
          <table:table-cell office:value-type="string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11.453" calcext:value-type="float">
            <text:p>11</text:p>
          </table:table-cell>
          <table:table-cell office:value-type="float" office:value="0.653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table:style-name="ce20" office:value-type="float" office:value="75.8" calcext:value-type="float">
            <text:p>76</text:p>
          </table:table-cell>
          <table:table-cell office:value-type="float" office:value="29.6" calcext:value-type="float">
            <text:p>30</text:p>
          </table:table-cell>
          <table:table-cell/>
          <table:table-cell table:style-name="ce12" table:formula="of:=[.H66]/[.E66]" office:value-type="float" office:value="6.61835326988562" calcext:value-type="float">
            <text:p>6.6</text:p>
          </table:table-cell>
          <table:table-cell table:number-columns-repeated="2"/>
          <table:table-cell table:style-name="ce34" table:formula="of:=[.E66]/[.E$2]" office:value-type="percentage" office:value="0.49338732606729" calcext:value-type="percentage">
            <text:p>49%</text:p>
          </table:table-cell>
          <table:table-cell table:style-name="ce34" table:formula="of:=[.H66]/[.H$2]" office:value-type="percentage" office:value="0.588509316770186" calcext:value-type="percentage">
            <text:p>59%</text:p>
          </table:table-cell>
          <table:table-cell table:number-columns-repeated="49"/>
        </table:table-row>
        <table:table-row table:style-name="ro1">
          <table:table-cell table:formula="of:=[.A66]" office:value-type="string" office:string-value="d7c23ad99" calcext:value-type="string">
            <text:p>d7c23ad99</text:p>
          </table:table-cell>
          <table:table-cell table:formula="of:=[.B66]" office:value-type="string" office:string-value="+ Optimise MTrie.foreach{,PathAnd}Value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46.808" calcext:value-type="float">
            <text:p>47</text:p>
          </table:table-cell>
          <table:table-cell office:value-type="float" office:value="0.5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20" office:value-type="float" office:value="312.9" calcext:value-type="float">
            <text:p>313</text:p>
          </table:table-cell>
          <table:table-cell office:value-type="float" office:value="20.4" calcext:value-type="float">
            <text:p>20</text:p>
          </table:table-cell>
          <table:table-cell/>
          <table:table-cell table:style-name="ce12" table:formula="of:=[.H67]/[.E67]" office:value-type="float" office:value="6.68475474277901" calcext:value-type="float">
            <text:p>6.7</text:p>
          </table:table-cell>
          <table:table-cell table:number-columns-repeated="2"/>
          <table:table-cell table:style-name="ce34" table:formula="of:=[.E67]/[.E$3]" office:value-type="percentage" office:value="0.476999898094365" calcext:value-type="percentage">
            <text:p>48%</text:p>
          </table:table-cell>
          <table:table-cell table:style-name="ce34" table:formula="of:=[.H67]/[.H$3]" office:value-type="percentage" office:value="0.557654607021921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67]" office:value-type="string" office:string-value="d7c23ad99" calcext:value-type="string">
            <text:p>d7c23ad99</text:p>
          </table:table-cell>
          <table:table-cell table:formula="of:=[.B67]" office:value-type="string" office:string-value="+ Optimise MTrie.foreach{,PathAnd}Value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149.37" calcext:value-type="float">
            <text:p>149</text:p>
          </table:table-cell>
          <table:table-cell office:value-type="float" office:value="6.16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style-name="ce20" office:value-type="float" office:value="1026.5" calcext:value-type="float">
            <text:p>1027</text:p>
          </table:table-cell>
          <table:table-cell office:value-type="float" office:value="59.2" calcext:value-type="float">
            <text:p>59</text:p>
          </table:table-cell>
          <table:table-cell/>
          <table:table-cell table:style-name="ce12" table:formula="of:=[.H68]/[.E68]" office:value-type="float" office:value="6.87219655888063" calcext:value-type="float">
            <text:p>6.9</text:p>
          </table:table-cell>
          <table:table-cell table:number-columns-repeated="2"/>
          <table:table-cell table:style-name="ce34" table:formula="of:=[.E68]/[.E$4]" office:value-type="percentage" office:value="0.419557438107062" calcext:value-type="percentage">
            <text:p>42%</text:p>
          </table:table-cell>
          <table:table-cell table:style-name="ce34" table:formula="of:=[.H68]/[.H$4]" office:value-type="percentage" office:value="0.537434554973822" calcext:value-type="percentage">
            <text:p>5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4eb9174</text:p>
          </table:table-cell>
          <table:table-cell office:value-type="string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1.05" calcext:value-type="float">
            <text:p>11</text:p>
          </table:table-cell>
          <table:table-cell office:value-type="float" office:value="2.918" calcext:value-type="float">
            <text:p>3</text:p>
          </table:table-cell>
          <table:table-cell office:value-type="float" office:value="610" calcext:value-type="float">
            <text:p>610</text:p>
          </table:table-cell>
          <table:table-cell office:value-type="float" office:value="98.4" calcext:value-type="float">
            <text:p>98</text:p>
          </table:table-cell>
          <table:table-cell table:style-name="ce29"/>
          <table:table-cell/>
          <table:table-cell table:style-name="ce12" table:formula="of:=[.H70]/[.E70]" office:value-type="float" office:value="8.90497737556561" calcext:value-type="float">
            <text:p>8.9</text:p>
          </table:table-cell>
          <table:table-cell table:formula="of:=1-[.E70]/[.E62]" office:value-type="percentage" office:value="0.0398818316100443" calcext:value-type="percentage">
            <text:p>4%</text:p>
          </table:table-cell>
          <table:table-cell table:formula="of:=1-[.H70]/[.H62]" office:value-type="percentage" office:value="-0.0165289256198349" calcext:value-type="percentage">
            <office:annotation office:display="true" draw:style-name="gr1" draw:text-style-name="P2" svg:width="5.397cm" svg:height="1.971cm" svg:x="33.004cm" svg:y="30.787cm" draw:caption-point-x="-3.999cm" draw:caption-point-y="0.38cm">
              <dc:date>2020-04-28T00:00:00</dc:date>
              <text:p text:style-name="P1"><text:span text:style-name="T1">These JS results looks slower but it's because I rebooted. Rerunning older results show they're also slower post-reboot.</text:span></text:p>
            </office:annotation>
            <text:p>-2%</text:p>
          </table:table-cell>
          <table:table-cell table:formula="of:=[.E70]/[.E$6]" office:value-type="percentage" office:value="0.467072449065855" calcext:value-type="percentage">
            <text:p>47%</text:p>
          </table:table-cell>
          <table:table-cell table:formula="of:=[.H70]/[.H$6]" office:value-type="percentage" office:value="0.625158831003812" calcext:value-type="percentage">
            <text:p>63%</text:p>
          </table:table-cell>
          <table:table-cell table:number-columns-repeated="49"/>
        </table:table-row>
        <table:table-row table:style-name="ro1">
          <table:table-cell table:formula="of:=[.A70]" office:value-type="string" office:string-value="fa4eb9174" calcext:value-type="string">
            <text:p>fa4eb9174</text:p>
          </table:table-cell>
          <table:table-cell table:formula="of:=[.B70]" office:value-type="string" office:string-value="+ Cache codeRefs outside of AtomScan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6.055" calcext:value-type="float">
            <text:p>46</text:p>
          </table:table-cell>
          <table:table-cell office:value-type="float" office:value="3.252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93.1" calcext:value-type="float">
            <text:p>393</text:p>
          </table:table-cell>
          <table:table-cell table:number-columns-repeated="2"/>
          <table:table-cell table:style-name="ce12" table:formula="of:=[.H71]/[.E71]" office:value-type="float" office:value="8.53544674845294" calcext:value-type="float">
            <text:p>8.5</text:p>
          </table:table-cell>
          <table:table-cell table:formula="of:=1-[.E71]/[.E63]" office:value-type="percentage" office:value="0.0386783000751441" calcext:value-type="percentage">
            <text:p>4%</text:p>
          </table:table-cell>
          <table:table-cell table:formula="of:=1-[.H71]/[.H63]" office:value-type="percentage" office:value="-0.0452007444828504" calcext:value-type="percentage">
            <text:p>-5%</text:p>
          </table:table-cell>
          <table:table-cell table:formula="of:=[.E71]/[.E$7]" office:value-type="percentage" office:value="0.463390584281646" calcext:value-type="percentage">
            <text:p>46%</text:p>
          </table:table-cell>
          <table:table-cell table:formula="of:=[.H71]/[.H$7]" office:value-type="percentage" office:value="0.580392735862985" calcext:value-type="percentage">
            <text:p>58%</text:p>
          </table:table-cell>
          <table:table-cell table:number-columns-repeated="49"/>
        </table:table-row>
        <table:table-row table:style-name="ro1">
          <table:table-cell table:formula="of:=[.A71]" office:value-type="string" office:string-value="fa4eb9174" calcext:value-type="string">
            <text:p>fa4eb9174</text:p>
          </table:table-cell>
          <table:table-cell table:formula="of:=[.B71]" office:value-type="string" office:string-value="+ Cache codeRefs outside of AtomScan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42.858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1221.1" calcext:value-type="float">
            <text:p>1221</text:p>
          </table:table-cell>
          <table:table-cell table:number-columns-repeated="2"/>
          <table:table-cell table:style-name="ce12" table:formula="of:=[.H72]/[.E72]" office:value-type="float" office:value="8.54764871410771" calcext:value-type="float">
            <text:p>8.5</text:p>
          </table:table-cell>
          <table:table-cell table:formula="of:=1-[.E72]/[.E64]" office:value-type="percentage" office:value="0.0711262248288328" calcext:value-type="percentage">
            <text:p>7%</text:p>
          </table:table-cell>
          <table:table-cell table:formula="of:=1-[.H72]/[.H64]" office:value-type="percentage" office:value="0.0096512570965126" calcext:value-type="percentage">
            <text:p>1%</text:p>
          </table:table-cell>
          <table:table-cell table:formula="of:=[.E72]/[.E$8]" office:value-type="percentage" office:value="0.426834223704182" calcext:value-type="percentage">
            <text:p>43%</text:p>
          </table:table-cell>
          <table:table-cell table:formula="of:=[.H72]/[.H$8]" office:value-type="percentage" office:value="0.528614718614719" calcext:value-type="percentage">
            <text:p>5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4eb9174</text:p>
          </table:table-cell>
          <table:table-cell office:value-type="string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11.047" calcext:value-type="float">
            <text:p>11</text:p>
          </table:table-cell>
          <table:table-cell office:value-type="float" office:value="3.121" calcext:value-type="float">
            <text:p>3</text:p>
          </table:table-cell>
          <table:table-cell office:value-type="float" office:value="823" calcext:value-type="float">
            <text:p>823</text:p>
          </table:table-cell>
          <table:table-cell table:style-name="ce20" office:value-type="float" office:value="73" calcext:value-type="float">
            <text:p>73</text:p>
          </table:table-cell>
          <table:table-cell office:value-type="float" office:value="24.6" calcext:value-type="float">
            <text:p>25</text:p>
          </table:table-cell>
          <table:table-cell/>
          <table:table-cell table:style-name="ce12" table:formula="of:=[.H74]/[.E74]" office:value-type="float" office:value="6.60812890377478" calcext:value-type="float">
            <text:p>6.6</text:p>
          </table:table-cell>
          <table:table-cell table:number-columns-repeated="2"/>
          <table:table-cell table:style-name="ce34" table:formula="of:=[.E74]/[.E$2]" office:value-type="percentage" office:value="0.475897126610089" calcext:value-type="percentage">
            <text:p>48%</text:p>
          </table:table-cell>
          <table:table-cell table:style-name="ce34" table:formula="of:=[.H74]/[.H$2]" office:value-type="percentage" office:value="0.566770186335404" calcext:value-type="percentage">
            <text:p>57%</text:p>
          </table:table-cell>
          <table:table-cell table:number-columns-repeated="49"/>
        </table:table-row>
        <table:table-row table:style-name="ro1">
          <table:table-cell table:formula="of:=[.A74]" office:value-type="string" office:string-value="fa4eb9174" calcext:value-type="string">
            <text:p>fa4eb9174</text:p>
          </table:table-cell>
          <table:table-cell table:formula="of:=[.B74]" office:value-type="string" office:string-value="+ Cache codeRefs outside of AtomScan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44.688" calcext:value-type="float">
            <text:p>45</text:p>
          </table:table-cell>
          <table:table-cell office:value-type="float" office:value="11.946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table:style-name="ce20" office:value-type="float" office:value="294.6" calcext:value-type="float">
            <text:p>295</text:p>
          </table:table-cell>
          <table:table-cell office:value-type="float" office:value="18.5" calcext:value-type="float">
            <text:p>19</text:p>
          </table:table-cell>
          <table:table-cell/>
          <table:table-cell table:style-name="ce12" table:formula="of:=[.H75]/[.E75]" office:value-type="float" office:value="6.59237379162191" calcext:value-type="float">
            <text:p>6.6</text:p>
          </table:table-cell>
          <table:table-cell table:number-columns-repeated="2"/>
          <table:table-cell table:style-name="ce34" table:formula="of:=[.E75]/[.E$3]" office:value-type="percentage" office:value="0.455395903393458" calcext:value-type="percentage">
            <text:p>46%</text:p>
          </table:table-cell>
          <table:table-cell table:style-name="ce34" table:formula="of:=[.H75]/[.H$3]" office:value-type="percentage" office:value="0.525040099803957" calcext:value-type="percentage">
            <text:p>53%</text:p>
          </table:table-cell>
          <table:table-cell table:number-columns-repeated="49"/>
        </table:table-row>
        <table:table-row table:style-name="ro1">
          <table:table-cell table:formula="of:=[.A75]" office:value-type="string" office:string-value="fa4eb9174" calcext:value-type="string">
            <text:p>fa4eb9174</text:p>
          </table:table-cell>
          <table:table-cell table:formula="of:=[.B75]" office:value-type="string" office:string-value="+ Cache codeRefs outside of AtomScan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137.893" calcext:value-type="float">
            <text:p>138</text:p>
          </table:table-cell>
          <table:table-cell office:value-type="float" office:value="10.725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style-name="ce20" office:value-type="float" office:value="924.8" calcext:value-type="float">
            <text:p>925</text:p>
          </table:table-cell>
          <table:table-cell office:value-type="float" office:value="59.4" calcext:value-type="float">
            <text:p>59</text:p>
          </table:table-cell>
          <table:table-cell/>
          <table:table-cell table:style-name="ce12" table:formula="of:=[.H76]/[.E76]" office:value-type="float" office:value="6.70664935856062" calcext:value-type="float">
            <text:p>6.7</text:p>
          </table:table-cell>
          <table:table-cell table:number-columns-repeated="2"/>
          <table:table-cell table:style-name="ce34" table:formula="of:=[.E76]/[.E$4]" office:value-type="percentage" office:value="0.387320304029572" calcext:value-type="percentage">
            <text:p>39%</text:p>
          </table:table-cell>
          <table:table-cell table:style-name="ce34" table:formula="of:=[.H76]/[.H$4]" office:value-type="percentage" office:value="0.484188481675393" calcext:value-type="percentage">
            <text:p>4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4a46ccf0</text:p>
          </table:table-cell>
          <table:table-cell office:value-type="string" calcext:value-type="string">
            <text:p>Cache useCaseStepRefs outside of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0.014" calcext:value-type="float">
            <text:p>10</text:p>
          </table:table-cell>
          <table:table-cell office:value-type="float" office:value="0.865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90.4" calcext:value-type="float">
            <text:p>90</text:p>
          </table:table-cell>
          <table:table-cell table:style-name="ce30" office:value-type="float" office:value="34.3" calcext:value-type="float">
            <text:p>34</text:p>
          </table:table-cell>
          <table:table-cell/>
          <table:table-cell table:style-name="ce12" table:formula="of:=[.H78]/[.E78]" office:value-type="float" office:value="9.02736169362892" calcext:value-type="float">
            <text:p>9.0</text:p>
          </table:table-cell>
          <table:table-cell table:formula="of:=1-[.E78]/[.E70]" office:value-type="percentage" office:value="0.0937556561085974" calcext:value-type="percentage">
            <text:p>9%</text:p>
          </table:table-cell>
          <table:table-cell table:formula="of:=1-[.H78]/[.H70]" office:value-type="percentage" office:value="0.0813008130081301" calcext:value-type="percentage">
            <text:p>8%</text:p>
          </table:table-cell>
          <table:table-cell table:formula="of:=[.E78]/[.E$6]" office:value-type="percentage" office:value="0.423281765153436" calcext:value-type="percentage">
            <text:p>42%</text:p>
          </table:table-cell>
          <table:table-cell table:formula="of:=[.H78]/[.H$6]" office:value-type="percentage" office:value="0.57433290978399" calcext:value-type="percentage">
            <text:p>57%</text:p>
          </table:table-cell>
          <table:table-cell table:number-columns-repeated="49"/>
        </table:table-row>
        <table:table-row table:style-name="ro1">
          <table:table-cell table:formula="of:=[.A78]" office:value-type="string" office:string-value="14a46ccf0" calcext:value-type="string">
            <text:p>14a46ccf0</text:p>
          </table:table-cell>
          <table:table-cell table:formula="of:=[.B78]" office:value-type="string" office:string-value="Cache useCaseStepRefs outside of AtomScan" calcext:value-type="string">
            <text:p>Cache useCaseStepRefs outside of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4.031" calcext:value-type="float">
            <text:p>44</text:p>
          </table:table-cell>
          <table:table-cell office:value-type="float" office:value="17.278" calcext:value-type="float">
            <text:p>17</text:p>
          </table:table-cell>
          <table:table-cell office:value-type="float" office:value="158" calcext:value-type="float">
            <text:p>158</text:p>
          </table:table-cell>
          <table:table-cell office:value-type="float" office:value="381.6" calcext:value-type="float">
            <text:p>382</text:p>
          </table:table-cell>
          <table:table-cell table:style-name="ce30" office:value-type="float" office:value="44.6" calcext:value-type="float">
            <text:p>45</text:p>
          </table:table-cell>
          <table:table-cell/>
          <table:table-cell table:style-name="ce12" table:formula="of:=[.H79]/[.E79]" office:value-type="float" office:value="8.66662124412346" calcext:value-type="float">
            <text:p>8.7</text:p>
          </table:table-cell>
          <table:table-cell table:formula="of:=1-[.E79]/[.E71]" office:value-type="percentage" office:value="0.0439474541309304" calcext:value-type="percentage">
            <text:p>4%</text:p>
          </table:table-cell>
          <table:table-cell table:formula="of:=1-[.H79]/[.H71]" office:value-type="percentage" office:value="0.0292546425845841" calcext:value-type="percentage">
            <text:p>3%</text:p>
          </table:table-cell>
          <table:table-cell table:formula="of:=[.E79]/[.E$7]" office:value-type="percentage" office:value="0.443025747834224" calcext:value-type="percentage">
            <text:p>44%</text:p>
          </table:table-cell>
          <table:table-cell table:formula="of:=[.H79]/[.H$7]" office:value-type="percentage" office:value="0.563413553816625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79]" office:value-type="string" office:string-value="14a46ccf0" calcext:value-type="string">
            <text:p>14a46ccf0</text:p>
          </table:table-cell>
          <table:table-cell table:formula="of:=[.B79]" office:value-type="string" office:string-value="Cache useCaseStepRefs outside of AtomScan" calcext:value-type="string">
            <text:p>Cache useCaseStepRefs outside of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35.934" calcext:value-type="float">
            <text:p>136</text:p>
          </table:table-cell>
          <table:table-cell office:value-type="float" office:value="16.979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181.3" calcext:value-type="float">
            <text:p>1181</text:p>
          </table:table-cell>
          <table:table-cell table:style-name="ce30" office:value-type="float" office:value="121.3" calcext:value-type="float">
            <text:p>121</text:p>
          </table:table-cell>
          <table:table-cell/>
          <table:table-cell table:style-name="ce12" table:formula="of:=[.H80]/[.E80]" office:value-type="float" office:value="8.69024673738726" calcext:value-type="float">
            <text:p>8.7</text:p>
          </table:table-cell>
          <table:table-cell table:formula="of:=1-[.E80]/[.E72]" office:value-type="percentage" office:value="0.0484677091937449" calcext:value-type="percentage">
            <text:p>5%</text:p>
          </table:table-cell>
          <table:table-cell table:formula="of:=1-[.H80]/[.H72]" office:value-type="percentage" office:value="0.0325935631807387" calcext:value-type="percentage">
            <text:p>3%</text:p>
          </table:table-cell>
          <table:table-cell table:formula="of:=[.E80]/[.E$8]" office:value-type="percentage" office:value="0.40614654667575" calcext:value-type="percentage">
            <text:p>41%</text:p>
          </table:table-cell>
          <table:table-cell table:formula="of:=[.H80]/[.H$8]" office:value-type="percentage" office:value="0.511385281385281" calcext:value-type="percentage">
            <text:p>51%</text:p>
          </table:table-cell>
          <table:table-cell table:number-columns-repeated="49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tail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22P0" style:volatile="true">
      <number:number number:decimal-places="0" loext:min-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2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8:28:24.931662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8T12:07:20.883507329</dc:date>
    <meta:editing-duration>P1DT19H5M35S</meta:editing-duration>
    <meta:editing-cycles>32</meta:editing-cycles>
    <meta:generator>LibreOffice/6.4.3.2$Linux_X86_64 LibreOffice_project/40$Build-2</meta:generator>
    <meta:document-statistic meta:table-count="2" meta:cell-count="736" meta:object-count="0"/>
  </office:meta>
</office:document-meta>
</file>