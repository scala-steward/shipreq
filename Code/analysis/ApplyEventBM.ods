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fo:background-color="transparent"/>
    </style:style>
    <style:style style:name="ce7" style:family="table-cell" style:parent-style-name="Default" style:data-style-name="N120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3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3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7" table:formula="of:=[.H2]/[.E2]" office:value-type="float" office:value="5.5486150002154" calcext:value-type="float">
            <text:p>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7" table:formula="of:=[.H3]/[.E3]" office:value-type="float" office:value="5.71792520126363" calcext:value-type="float">
            <text:p>5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5" office:value-type="float" office:value="382" calcext:value-type="float">
            <text:p>382</text:p>
          </table:table-cell>
          <table:table-cell table:style-name="ce6" office:value-type="float" office:value="157.4" calcext:value-type="float">
            <text:p>157</text:p>
          </table:table-cell>
          <table:table-cell table:style-name="ce6" office:value-type="float" office:value="46.6" calcext:value-type="float">
            <text:p>47</text:p>
          </table:table-cell>
          <table:table-cell/>
          <table:table-cell table:style-name="ce7" table:formula="of:=[.H4]/[.E4]" office:value-type="float" office:value="6.65314058669372" calcext:value-type="float">
            <text:p>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7" table:formula="of:=[.H5]/[.E5]" office:value-type="float" office:value="6.81477456810247" calcext:value-type="float">
            <text:p>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" table:formula="of:=[.H6]/[.E6]" office:value-type="float" office:value="6.9018679860887" calcext:value-type="float">
            <text:p>6.9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1T15:07:59.016106389</dc:date>
    <meta:editing-duration>PT15M8S</meta:editing-duration>
    <meta:editing-cycles>6</meta:editing-cycles>
    <meta:generator>LibreOffice/6.4.2.2$Linux_X86_64 LibreOffice_project/40$Build-2</meta:generator>
    <meta:document-statistic meta:table-count="2" meta:cell-count="65" meta:object-count="0"/>
  </office:meta>
</office:document-meta>
</file>