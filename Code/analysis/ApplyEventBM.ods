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20" style:family="table-cell" style:parent-style-name="Default" style:data-style-name="N1">
      <style:text-properties fo:color="#c9211e"/>
    </style:style>
    <style:style style:name="ce5" style:family="table-cell" style:parent-style-name="Default">
      <style:text-properties fo:color="#0047ff"/>
    </style:style>
    <style:style style:name="ce4" style:family="table-cell" style:parent-style-name="Default" style:data-style-name="N1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29" style:family="table-cell" style:parent-style-name="Default" style:data-style-name="N1">
      <style:text-properties fo:font-style="italic" style:font-style-asian="italic" style:font-style-complex="italic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7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style-name="ce20"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style-name="ce20"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1]/[.E41]" office:value-type="float" office:value="8.01986259438134" calcext:value-type="float">
            <text:p>8.0</text:p>
          </table:table-cell>
          <table:table-cell table:formula="of:=1-[.E41]/[.E37]" office:value-type="percentage" office:value="0.0021719948415122" calcext:value-type="percentage">
            <text:p>0%</text:p>
          </table:table-cell>
          <table:table-cell table:formula="of:=1-[.H41]/[.H37]" office:value-type="percentage" office:value="0.0117351215423301" calcext:value-type="percentage">
            <text:p>1%</text:p>
          </table:table-cell>
          <table:table-cell table:formula="of:=[.E41]/[.E$5]" office:value-type="percentage" office:value="0.621396567757207" calcext:value-type="percentage">
            <text:p>62%</text:p>
          </table:table-cell>
          <table:table-cell table:formula="of:=[.H41]/[.H$5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1]" office:value-type="string" office:string-value="333be13e5" calcext:value-type="string">
            <text:p>333be13e5</text:p>
          </table:table-cell>
          <table:table-cell table:formula="of:=[.B41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2]/[.E42]" office:value-type="float" office:value="7.63604211880074" calcext:value-type="float">
            <text:p>7.6</text:p>
          </table:table-cell>
          <table:table-cell table:formula="of:=1-[.E42]/[.E38]" office:value-type="percentage" office:value="0.0178881556095867" calcext:value-type="percentage">
            <text:p>2%</text:p>
          </table:table-cell>
          <table:table-cell table:formula="of:=1-[.H42]/[.H38]" office:value-type="percentage" office:value="0.015339966832504" calcext:value-type="percentage">
            <text:p>2%</text:p>
          </table:table-cell>
          <table:table-cell table:formula="of:=[.E42]/[.E$6]" office:value-type="percentage" office:value="0.625886685381388" calcext:value-type="percentage">
            <text:p>63%</text:p>
          </table:table-cell>
          <table:table-cell table:formula="of:=[.H42]/[.H$6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3]/[.E43]" office:value-type="float" office:value="7.90421067287229" calcext:value-type="float">
            <text:p>7.9</text:p>
          </table:table-cell>
          <table:table-cell table:formula="of:=1-[.E43]/[.E39]" office:value-type="percentage" office:value="0.0355411257487327" calcext:value-type="percentage">
            <text:p>4%</text:p>
          </table:table-cell>
          <table:table-cell table:formula="of:=1-[.H43]/[.H39]" office:value-type="percentage" office:value="-0.0104888436844448" calcext:value-type="percentage">
            <text:p>-1%</text:p>
          </table:table-cell>
          <table:table-cell table:formula="of:=[.E43]/[.E$7]" office:value-type="percentage" office:value="0.600874834175899" calcext:value-type="percentage">
            <text:p>60%</text:p>
          </table:table-cell>
          <table:table-cell table:formula="of:=[.H43]/[.H$7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5]/[.E45]" office:value-type="float" office:value="8.1730094087909" calcext:value-type="float">
            <text:p>8.2</text:p>
          </table:table-cell>
          <table:table-cell table:formula="of:=1-[.E45]/[.E41]" office:value-type="percentage" office:value="0.031222365825454" calcext:value-type="percentage">
            <text:p>3%</text:p>
          </table:table-cell>
          <table:table-cell table:formula="of:=1-[.H45]/[.H41]" office:value-type="percentage" office:value="0.0127226463104325" calcext:value-type="percentage">
            <text:p>1%</text:p>
          </table:table-cell>
          <table:table-cell table:formula="of:=[.E45]/[.E$5]" office:value-type="percentage" office:value="0.60199509679601" calcext:value-type="percentage">
            <text:p>60%</text:p>
          </table:table-cell>
          <table:table-cell table:formula="of:=[.H45]/[.H$5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5]" office:value-type="string" office:string-value="b199f850f" calcext:value-type="string">
            <text:p>b199f850f</text:p>
          </table:table-cell>
          <table:table-cell table:formula="of:=[.B45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6]/[.E46]" office:value-type="float" office:value="8.05033758941106" calcext:value-type="float">
            <text:p>8.1</text:p>
          </table:table-cell>
          <table:table-cell table:formula="of:=1-[.E46]/[.E42]" office:value-type="percentage" office:value="0.0380837553251346" calcext:value-type="percentage">
            <text:p>4%</text:p>
          </table:table-cell>
          <table:table-cell table:formula="of:=1-[.H46]/[.H42]" office:value-type="percentage" office:value="-0.0141052631578946" calcext:value-type="percentage">
            <text:p>-1%</text:p>
          </table:table-cell>
          <table:table-cell table:formula="of:=[.E46]/[.E$6]" office:value-type="percentage" office:value="0.602050569994064" calcext:value-type="percentage">
            <text:p>60%</text:p>
          </table:table-cell>
          <table:table-cell table:formula="of:=[.H46]/[.H$6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7]/[.E47]" office:value-type="float" office:value="8.08093940465542" calcext:value-type="float">
            <text:p>8.1</text:p>
          </table:table-cell>
          <table:table-cell table:formula="of:=1-[.E47]/[.E43]" office:value-type="percentage" office:value="0.0438371422320345" calcext:value-type="percentage">
            <text:p>4%</text:p>
          </table:table-cell>
          <table:table-cell table:formula="of:=1-[.H47]/[.H43]" office:value-type="percentage" office:value="0.022458480120785" calcext:value-type="percentage">
            <text:p>2%</text:p>
          </table:table-cell>
          <table:table-cell table:formula="of:=[.E47]/[.E$7]" office:value-type="percentage" office:value="0.57453419860648" calcext:value-type="percentage">
            <text:p>57%</text:p>
          </table:table-cell>
          <table:table-cell table:formula="of:=[.H47]/[.H$7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49]/[.E49]" office:value-type="float" office:value="8.48826683378595" calcext:value-type="float">
            <text:p>8.5</text:p>
          </table:table-cell>
          <table:table-cell table:formula="of:=1-[.E49]/[.E45]" office:value-type="percentage" office:value="-0.00835556803819681" calcext:value-type="percentage">
            <text:p>-1%</text:p>
          </table:table-cell>
          <table:table-cell table:formula="of:=1-[.H49]/[.H45]" office:value-type="percentage" office:value="-0.0472508591065293" calcext:value-type="percentage">
            <text:p>-5%</text:p>
          </table:table-cell>
          <table:table-cell table:formula="of:=[.E49]/[.E$5]" office:value-type="percentage" office:value="0.60702510778595" calcext:value-type="percentage">
            <text:p>61%</text:p>
          </table:table-cell>
          <table:table-cell table:formula="of:=[.H49]/[.H$5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49]" office:value-type="string" office:string-value="99217c96a" calcext:value-type="string">
            <text:p>99217c96a</text:p>
          </table:table-cell>
          <table:table-cell table:formula="of:=[.B49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0]/[.E50]" office:value-type="float" office:value="8.10674384170144" calcext:value-type="float">
            <text:p>8.1</text:p>
          </table:table-cell>
          <table:table-cell table:formula="of:=1-[.E50]/[.E46]" office:value-type="percentage" office:value="0.00675178822113776" calcext:value-type="percentage">
            <text:p>1%</text:p>
          </table:table-cell>
          <table:table-cell table:formula="of:=1-[.H50]/[.H46]" office:value-type="percentage" office:value="-0.000207598090097516" calcext:value-type="percentage">
            <text:p>0%</text:p>
          </table:table-cell>
          <table:table-cell table:formula="of:=[.E50]/[.E$6]" office:value-type="percentage" office:value="0.597985652047048" calcext:value-type="percentage">
            <text:p>60%</text:p>
          </table:table-cell>
          <table:table-cell table:formula="of:=[.H50]/[.H$6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1]/[.E51]" office:value-type="float" office:value="8.52715666918142" calcext:value-type="float">
            <text:p>8.5</text:p>
          </table:table-cell>
          <table:table-cell table:formula="of:=1-[.E51]/[.E47]" office:value-type="percentage" office:value="0.0280562893932146" calcext:value-type="percentage">
            <text:p>3%</text:p>
          </table:table-cell>
          <table:table-cell table:formula="of:=1-[.H51]/[.H47]" office:value-type="percentage" office:value="-0.0256129738078383" calcext:value-type="percentage">
            <text:p>-3%</text:p>
          </table:table-cell>
          <table:table-cell table:formula="of:=[.E51]/[.E$7]" office:value-type="percentage" office:value="0.558414900864078" calcext:value-type="percentage">
            <text:p>56%</text:p>
          </table:table-cell>
          <table:table-cell table:formula="of:=[.H51]/[.H$7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3]/[.E53]" office:value-type="float" office:value="8.67971556337512" calcext:value-type="float">
            <text:p>8.7</text:p>
          </table:table-cell>
          <table:table-cell table:formula="of:=1-[.E53]/[.E49]" office:value-type="percentage" office:value="0.0501357844161271" calcext:value-type="percentage">
            <text:p>5%</text:p>
          </table:table-cell>
          <table:table-cell table:formula="of:=1-[.H53]/[.H49]" office:value-type="percentage" office:value="0.0287120590648072" calcext:value-type="percentage">
            <text:p>3%</text:p>
          </table:table-cell>
          <table:table-cell table:formula="of:=[.E53]/[.E$5]" office:value-type="percentage" office:value="0.576591427846817" calcext:value-type="percentage">
            <text:p>58%</text:p>
          </table:table-cell>
          <table:table-cell table:formula="of:=[.H53]/[.H$5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3]" office:value-type="string" office:string-value="99217c96a" calcext:value-type="string">
            <text:p>99217c96a</text:p>
          </table:table-cell>
          <table:table-cell table:formula="of:=[.B53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4]/[.E54]" office:value-type="float" office:value="8.34364380935785" calcext:value-type="float">
            <text:p>8.3</text:p>
          </table:table-cell>
          <table:table-cell table:formula="of:=1-[.E54]/[.E50]" office:value-type="percentage" office:value="0.0344427244582044" calcext:value-type="percentage">
            <text:p>3%</text:p>
          </table:table-cell>
          <table:table-cell table:formula="of:=1-[.H54]/[.H50]" office:value-type="percentage" office:value="0.00622665006226653" calcext:value-type="percentage">
            <text:p>1%</text:p>
          </table:table-cell>
          <table:table-cell table:formula="of:=[.E54]/[.E$6]" office:value-type="percentage" office:value="0.577389397003632" calcext:value-type="percentage">
            <text:p>58%</text:p>
          </table:table-cell>
          <table:table-cell table:formula="of:=[.H54]/[.H$6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5]/[.E55]" office:value-type="float" office:value="8.72953326756791" calcext:value-type="float">
            <text:p>8.7</text:p>
          </table:table-cell>
          <table:table-cell table:formula="of:=1-[.E55]/[.E51]" office:value-type="percentage" office:value="0.0291283434191024" calcext:value-type="percentage">
            <text:p>3%</text:p>
          </table:table-cell>
          <table:table-cell table:formula="of:=1-[.H55]/[.H51]" office:value-type="percentage" office:value="0.00608646545773983" calcext:value-type="percentage">
            <text:p>1%</text:p>
          </table:table-cell>
          <table:table-cell table:formula="of:=[.E55]/[.E$7]" office:value-type="percentage" office:value="0.542149199861365" calcext:value-type="percentage">
            <text:p>54%</text:p>
          </table:table-cell>
          <table:table-cell table:formula="of:=[.H55]/[.H$7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7]/[.E57]" office:value-type="float" office:value="8.22905444600978" calcext:value-type="float">
            <text:p>8.2</text:p>
          </table:table-cell>
          <table:table-cell table:formula="of:=1-[.E57]/[.E53]" office:value-type="percentage" office:value="0.115387434938787" calcext:value-type="percentage">
            <text:p>12%</text:p>
          </table:table-cell>
          <table:table-cell table:formula="of:=1-[.H57]/[.H53]" office:value-type="percentage" office:value="0.161317567567568" calcext:value-type="percentage">
            <text:p>16%</text:p>
          </table:table-cell>
          <table:table-cell table:formula="of:=[.E57]/[.E$5]" office:value-type="percentage" office:value="0.51006002197988" calcext:value-type="percentage">
            <text:p>51%</text:p>
          </table:table-cell>
          <table:table-cell table:formula="of:=[.H57]/[.H$5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7]" office:value-type="string" office:string-value="d28bd588b" calcext:value-type="string">
            <text:p>d28bd588b</text:p>
          </table:table-cell>
          <table:table-cell table:formula="of:=[.B57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8]/[.E58]" office:value-type="float" office:value="8.06682187640404" calcext:value-type="float">
            <text:p>8.1</text:p>
          </table:table-cell>
          <table:table-cell table:formula="of:=1-[.E58]/[.E54]" office:value-type="percentage" office:value="0.146710812930208" calcext:value-type="percentage">
            <text:p>15%</text:p>
          </table:table-cell>
          <table:table-cell table:formula="of:=1-[.H58]/[.H54]" office:value-type="percentage" office:value="0.175020885547201" calcext:value-type="percentage">
            <text:p>18%</text:p>
          </table:table-cell>
          <table:table-cell table:formula="of:=[.E58]/[.E$6]" office:value-type="percentage" office:value="0.492680129191947" calcext:value-type="percentage">
            <text:p>49%</text:p>
          </table:table-cell>
          <table:table-cell table:formula="of:=[.H58]/[.H$6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59]/[.E59]" office:value-type="float" office:value="8.29265117490074" calcext:value-type="float">
            <text:p>8.3</text:p>
          </table:table-cell>
          <table:table-cell table:formula="of:=1-[.E59]/[.E55]" office:value-type="percentage" office:value="0.15333447228759" calcext:value-type="percentage">
            <text:p>15%</text:p>
          </table:table-cell>
          <table:table-cell table:formula="of:=1-[.H59]/[.H55]" office:value-type="percentage" office:value="0.195707070707071" calcext:value-type="percentage">
            <text:p>20%</text:p>
          </table:table-cell>
          <table:table-cell table:formula="of:=[.E59]/[.E$7]" office:value-type="percentage" office:value="0.459019038399484" calcext:value-type="percentage">
            <text:p>46%</text:p>
          </table:table-cell>
          <table:table-cell table:formula="of:=[.H59]/[.H$7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509" calcext:value-type="float">
            <text:p>12</text:p>
          </table:table-cell>
          <table:table-cell office:value-type="float" office:value="0.219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96.8" calcext:value-type="float">
            <text:p>97</text:p>
          </table:table-cell>
          <table:table-cell office:value-type="float" office:value="34.1" calcext:value-type="float">
            <text:p>34</text:p>
          </table:table-cell>
          <table:table-cell/>
          <table:table-cell table:style-name="ce12" table:formula="of:=[.H61]/[.E61]" office:value-type="float" office:value="8.41080893214006" calcext:value-type="float">
            <text:p>8.4</text:p>
          </table:table-cell>
          <table:table-cell table:formula="of:=1-[.E61]/[.E57]" office:value-type="percentage" office:value="0.0462418165244054" calcext:value-type="percentage">
            <text:p>5%</text:p>
          </table:table-cell>
          <table:table-cell table:formula="of:=1-[.H61]/[.H57]" office:value-type="percentage" office:value="0.0251762336354482" calcext:value-type="percentage">
            <text:p>3%</text:p>
          </table:table-cell>
          <table:table-cell table:formula="of:=[.E61]/[.E$5]" office:value-type="percentage" office:value="0.486473920027052" calcext:value-type="percentage">
            <text:p>49%</text:p>
          </table:table-cell>
          <table:table-cell table:formula="of:=[.H61]/[.H$5]" office:value-type="percentage" office:value="0.614993646759847" calcext:value-type="percentage">
            <text:p>61%</text:p>
          </table:table-cell>
          <table:table-cell table:number-columns-repeated="49"/>
        </table:table-row>
        <table:table-row table:style-name="ro1">
          <table:table-cell table:formula="of:=[.A61]" office:value-type="string" office:string-value="d7c23ad99" calcext:value-type="string">
            <text:p>d7c23ad99</text:p>
          </table:table-cell>
          <table:table-cell table:formula="of:=[.B61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7.908" calcext:value-type="float">
            <text:p>48</text:p>
          </table:table-cell>
          <table:table-cell office:value-type="float" office:value="3.15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76.1" calcext:value-type="float">
            <text:p>376</text:p>
          </table:table-cell>
          <table:table-cell office:value-type="float" office:value="28.3" calcext:value-type="float">
            <text:p>28</text:p>
          </table:table-cell>
          <table:table-cell/>
          <table:table-cell table:style-name="ce12" table:formula="of:=[.H62]/[.E62]" office:value-type="float" office:value="7.85046338816064" calcext:value-type="float">
            <text:p>7.9</text:p>
          </table:table-cell>
          <table:table-cell table:formula="of:=1-[.E62]/[.E58]" office:value-type="percentage" office:value="0.0216068292284443" calcext:value-type="percentage">
            <text:p>2%</text:p>
          </table:table-cell>
          <table:table-cell table:formula="of:=1-[.H62]/[.H58]" office:value-type="percentage" office:value="0.0478481012658227" calcext:value-type="percentage">
            <text:p>5%</text:p>
          </table:table-cell>
          <table:table-cell table:formula="of:=[.E62]/[.E$6]" office:value-type="percentage" office:value="0.482034873776248" calcext:value-type="percentage">
            <text:p>48%</text:p>
          </table:table-cell>
          <table:table-cell table:formula="of:=[.H62]/[.H$6]" office:value-type="percentage" office:value="0.555293075446626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2]" office:value-type="string" office:string-value="d7c23ad99" calcext:value-type="string">
            <text:p>d7c23ad99</text:p>
          </table:table-cell>
          <table:table-cell table:formula="of:=[.B62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797" calcext:value-type="float">
            <text:p>154</text:p>
          </table:table-cell>
          <table:table-cell office:value-type="float" office:value="1.721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33" calcext:value-type="float">
            <text:p>1233</text:p>
          </table:table-cell>
          <table:table-cell office:value-type="float" office:value="99.4" calcext:value-type="float">
            <text:p>99</text:p>
          </table:table-cell>
          <table:table-cell/>
          <table:table-cell table:style-name="ce12" table:formula="of:=[.H63]/[.E63]" office:value-type="float" office:value="8.01706145113364" calcext:value-type="float">
            <text:p>8.0</text:p>
          </table:table-cell>
          <table:table-cell table:formula="of:=1-[.E63]/[.E59]" office:value-type="percentage" office:value="-0.001087027273319" calcext:value-type="percentage">
            <text:p>0%</text:p>
          </table:table-cell>
          <table:table-cell table:formula="of:=1-[.H63]/[.H59]" office:value-type="percentage" office:value="0.0321821036106751" calcext:value-type="percentage">
            <text:p>3%</text:p>
          </table:table-cell>
          <table:table-cell table:formula="of:=[.E63]/[.E$7]" office:value-type="percentage" office:value="0.459518004613197" calcext:value-type="percentage">
            <text:p>46%</text:p>
          </table:table-cell>
          <table:table-cell table:formula="of:=[.H63]/[.H$7]" office:value-type="percentage" office:value="0.533766233766234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453" calcext:value-type="float">
            <text:p>11</text:p>
          </table:table-cell>
          <table:table-cell office:value-type="float" office:value="0.653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style-name="ce20" office:value-type="float" office:value="75.8" calcext:value-type="float">
            <text:p>76</text:p>
          </table:table-cell>
          <table:table-cell office:value-type="float" office:value="29.6" calcext:value-type="float">
            <text:p>30</text:p>
          </table:table-cell>
          <table:table-cell/>
          <table:table-cell table:style-name="ce12" table:formula="of:=[.H65]/[.E65]" office:value-type="float" office:value="6.61835326988562" calcext:value-type="float">
            <text:p>6.6</text:p>
          </table:table-cell>
          <table:table-cell table:number-columns-repeated="2"/>
          <table:table-cell table:formula="of:=[.E65]/[.E$5]" office:value-type="percentage" office:value="0.484106856031786" calcext:value-type="percentage">
            <text:p>48%</text:p>
          </table:table-cell>
          <table:table-cell table:formula="of:=[.H65]/[.H$5]" office:value-type="percentage" office:value="0.481575603557814" calcext:value-type="percentage">
            <text:p>48%</text:p>
          </table:table-cell>
          <table:table-cell table:number-columns-repeated="49"/>
        </table:table-row>
        <table:table-row table:style-name="ro1">
          <table:table-cell table:formula="of:=[.A65]" office:value-type="string" office:string-value="d7c23ad99" calcext:value-type="string">
            <text:p>d7c23ad99</text:p>
          </table:table-cell>
          <table:table-cell table:formula="of:=[.B65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6.808" calcext:value-type="float">
            <text:p>47</text:p>
          </table:table-cell>
          <table:table-cell office:value-type="float" office:value="0.5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20" office:value-type="float" office:value="312.9" calcext:value-type="float">
            <text:p>313</text:p>
          </table:table-cell>
          <table:table-cell office:value-type="float" office:value="20.4" calcext:value-type="float">
            <text:p>20</text:p>
          </table:table-cell>
          <table:table-cell/>
          <table:table-cell table:style-name="ce12" table:formula="of:=[.H66]/[.E66]" office:value-type="float" office:value="6.68475474277901" calcext:value-type="float">
            <text:p>6.7</text:p>
          </table:table-cell>
          <table:table-cell table:number-columns-repeated="2"/>
          <table:table-cell table:formula="of:=[.E66]/[.E$6]" office:value-type="percentage" office:value="0.47096702788091" calcext:value-type="percentage">
            <text:p>47%</text:p>
          </table:table-cell>
          <table:table-cell table:formula="of:=[.H66]/[.H$6]" office:value-type="percentage" office:value="0.46198139672228" calcext:value-type="percentage">
            <text:p>46%</text:p>
          </table:table-cell>
          <table:table-cell table:number-columns-repeated="49"/>
        </table:table-row>
        <table:table-row table:style-name="ro1">
          <table:table-cell table:formula="of:=[.A66]" office:value-type="string" office:string-value="d7c23ad99" calcext:value-type="string">
            <text:p>d7c23ad99</text:p>
          </table:table-cell>
          <table:table-cell table:formula="of:=[.B66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49.37" calcext:value-type="float">
            <text:p>149</text:p>
          </table:table-cell>
          <table:table-cell office:value-type="float" office:value="6.16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20" office:value-type="float" office:value="1026.5" calcext:value-type="float">
            <text:p>1027</text:p>
          </table:table-cell>
          <table:table-cell office:value-type="float" office:value="59.2" calcext:value-type="float">
            <text:p>59</text:p>
          </table:table-cell>
          <table:table-cell/>
          <table:table-cell table:style-name="ce12" table:formula="of:=[.H67]/[.E67]" office:value-type="float" office:value="6.87219655888063" calcext:value-type="float">
            <text:p>6.9</text:p>
          </table:table-cell>
          <table:table-cell table:number-columns-repeated="2"/>
          <table:table-cell table:formula="of:=[.E67]/[.E$7]" office:value-type="percentage" office:value="0.446290918217346" calcext:value-type="percentage">
            <text:p>45%</text:p>
          </table:table-cell>
          <table:table-cell table:formula="of:=[.H67]/[.H$7]" office:value-type="percentage" office:value="0.444372294372294" calcext:value-type="percentage">
            <text:p>4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05" calcext:value-type="float">
            <text:p>11</text:p>
          </table:table-cell>
          <table:table-cell office:value-type="float" office:value="2.918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office:value-type="float" office:value="98.4" calcext:value-type="float">
            <text:p>98</text:p>
          </table:table-cell>
          <table:table-cell table:style-name="ce29"/>
          <table:table-cell/>
          <table:table-cell table:style-name="ce12" table:formula="of:=[.H69]/[.E69]" office:value-type="float" office:value="8.90497737556561" calcext:value-type="float">
            <text:p>8.9</text:p>
          </table:table-cell>
          <table:table-cell table:formula="of:=1-[.E69]/[.E61]" office:value-type="percentage" office:value="0.0398818316100443" calcext:value-type="percentage">
            <text:p>4%</text:p>
          </table:table-cell>
          <table:table-cell table:formula="of:=1-[.H69]/[.H61]" office:value-type="percentage" office:value="-0.0165289256198349" calcext:value-type="percentage">
            <office:annotation office:display="true" draw:style-name="gr1" draw:text-style-name="P2" svg:width="5.397cm" svg:height="1.971cm" svg:x="33.004cm" svg:y="30.335cm" draw:caption-point-x="-3.999cm" draw:caption-point-y="0.38cm">
              <dc:date>2020-04-28T00:00:00</dc:date>
              <text:p text:style-name="P1"><text:span text:style-name="T1">These JS results looks slower but it's because I rebooted. Rerunning older results show they're also slower post-reboot.</text:span></text:p>
            </office:annotation>
            <text:p>-2%</text:p>
          </table:table-cell>
          <table:table-cell table:formula="of:=[.E69]/[.E$5]" office:value-type="percentage" office:value="0.467072449065855" calcext:value-type="percentage">
            <text:p>47%</text:p>
          </table:table-cell>
          <table:table-cell table:formula="of:=[.H69]/[.H$5]" office:value-type="percentage" office:value="0.62515883100381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69]" office:value-type="string" office:string-value="fa4eb9174" calcext:value-type="string">
            <text:p>fa4eb9174</text:p>
          </table:table-cell>
          <table:table-cell table:formula="of:=[.B69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6.055" calcext:value-type="float">
            <text:p>46</text:p>
          </table:table-cell>
          <table:table-cell office:value-type="float" office:value="3.252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93.1" calcext:value-type="float">
            <text:p>393</text:p>
          </table:table-cell>
          <table:table-cell table:number-columns-repeated="2"/>
          <table:table-cell table:style-name="ce12" table:formula="of:=[.H70]/[.E70]" office:value-type="float" office:value="8.53544674845294" calcext:value-type="float">
            <text:p>8.5</text:p>
          </table:table-cell>
          <table:table-cell table:formula="of:=1-[.E70]/[.E62]" office:value-type="percentage" office:value="0.0386783000751441" calcext:value-type="percentage">
            <text:p>4%</text:p>
          </table:table-cell>
          <table:table-cell table:formula="of:=1-[.H70]/[.H62]" office:value-type="percentage" office:value="-0.0452007444828504" calcext:value-type="percentage">
            <text:p>-5%</text:p>
          </table:table-cell>
          <table:table-cell table:formula="of:=[.E70]/[.E$6]" office:value-type="percentage" office:value="0.463390584281646" calcext:value-type="percentage">
            <text:p>46%</text:p>
          </table:table-cell>
          <table:table-cell table:formula="of:=[.H70]/[.H$6]" office:value-type="percentage" office:value="0.580392735862985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70]" office:value-type="string" office:string-value="fa4eb9174" calcext:value-type="string">
            <text:p>fa4eb9174</text:p>
          </table:table-cell>
          <table:table-cell table:formula="of:=[.B70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42.858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221.1" calcext:value-type="float">
            <text:p>1221</text:p>
          </table:table-cell>
          <table:table-cell table:number-columns-repeated="2"/>
          <table:table-cell table:style-name="ce12" table:formula="of:=[.H71]/[.E71]" office:value-type="float" office:value="8.54764871410771" calcext:value-type="float">
            <text:p>8.5</text:p>
          </table:table-cell>
          <table:table-cell table:formula="of:=1-[.E71]/[.E63]" office:value-type="percentage" office:value="0.0711262248288328" calcext:value-type="percentage">
            <text:p>7%</text:p>
          </table:table-cell>
          <table:table-cell table:formula="of:=1-[.H71]/[.H63]" office:value-type="percentage" office:value="0.0096512570965126" calcext:value-type="percentage">
            <text:p>1%</text:p>
          </table:table-cell>
          <table:table-cell table:formula="of:=[.E71]/[.E$7]" office:value-type="percentage" office:value="0.426834223704182" calcext:value-type="percentage">
            <text:p>43%</text:p>
          </table:table-cell>
          <table:table-cell table:formula="of:=[.H71]/[.H$7]" office:value-type="percentage" office:value="0.528614718614719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047" calcext:value-type="float">
            <text:p>11</text:p>
          </table:table-cell>
          <table:table-cell office:value-type="float" office:value="3.121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table:style-name="ce20" office:value-type="float" office:value="73" calcext:value-type="float">
            <text:p>73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73]/[.E73]" office:value-type="float" office:value="6.60812890377478" calcext:value-type="float">
            <text:p>6.6</text:p>
          </table:table-cell>
          <table:table-cell table:number-columns-repeated="2"/>
          <table:table-cell table:formula="of:=[.E73]/[.E$5]" office:value-type="percentage" office:value="0.466945642066109" calcext:value-type="percentage">
            <text:p>47%</text:p>
          </table:table-cell>
          <table:table-cell table:formula="of:=[.H73]/[.H$5]" office:value-type="percentage" office:value="0.463786531130877" calcext:value-type="percentage">
            <text:p>46%</text:p>
          </table:table-cell>
          <table:table-cell table:number-columns-repeated="49"/>
        </table:table-row>
        <table:table-row table:style-name="ro1">
          <table:table-cell table:formula="of:=[.A73]" office:value-type="string" office:string-value="fa4eb9174" calcext:value-type="string">
            <text:p>fa4eb9174</text:p>
          </table:table-cell>
          <table:table-cell table:formula="of:=[.B73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4.688" calcext:value-type="float">
            <text:p>45</text:p>
          </table:table-cell>
          <table:table-cell office:value-type="float" office:value="11.946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style-name="ce20" office:value-type="float" office:value="294.6" calcext:value-type="float">
            <text:p>295</text:p>
          </table:table-cell>
          <table:table-cell office:value-type="float" office:value="18.5" calcext:value-type="float">
            <text:p>19</text:p>
          </table:table-cell>
          <table:table-cell/>
          <table:table-cell table:style-name="ce12" table:formula="of:=[.H74]/[.E74]" office:value-type="float" office:value="6.59237379162191" calcext:value-type="float">
            <text:p>6.6</text:p>
          </table:table-cell>
          <table:table-cell table:number-columns-repeated="2"/>
          <table:table-cell table:formula="of:=[.E74]/[.E$6]" office:value-type="percentage" office:value="0.449636270337167" calcext:value-type="percentage">
            <text:p>45%</text:p>
          </table:table-cell>
          <table:table-cell table:formula="of:=[.H74]/[.H$6]" office:value-type="percentage" office:value="0.434962350509376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74]" office:value-type="string" office:string-value="fa4eb9174" calcext:value-type="string">
            <text:p>fa4eb9174</text:p>
          </table:table-cell>
          <table:table-cell table:formula="of:=[.B74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37.893" calcext:value-type="float">
            <text:p>138</text:p>
          </table:table-cell>
          <table:table-cell office:value-type="float" office:value="10.725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924.8" calcext:value-type="float">
            <text:p>925</text:p>
          </table:table-cell>
          <table:table-cell office:value-type="float" office:value="59.4" calcext:value-type="float">
            <text:p>59</text:p>
          </table:table-cell>
          <table:table-cell/>
          <table:table-cell table:style-name="ce12" table:formula="of:=[.H75]/[.E75]" office:value-type="float" office:value="6.70664935856062" calcext:value-type="float">
            <text:p>6.7</text:p>
          </table:table-cell>
          <table:table-cell table:number-columns-repeated="2"/>
          <table:table-cell table:formula="of:=[.E75]/[.E$7]" office:value-type="percentage" office:value="0.41199968926655" calcext:value-type="percentage">
            <text:p>41%</text:p>
          </table:table-cell>
          <table:table-cell table:formula="of:=[.H75]/[.H$7]" office:value-type="percentage" office:value="0.40034632034632" calcext:value-type="percentage">
            <text:p>40%</text:p>
          </table:table-cell>
          <table:table-cell table:number-columns-repeated="49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28:24.93166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8T10:51:55.975730684</dc:date>
    <meta:editing-duration>P1DT18H43M3S</meta:editing-duration>
    <meta:editing-cycles>30</meta:editing-cycles>
    <meta:generator>LibreOffice/6.4.3.2$Linux_X86_64 LibreOffice_project/40$Build-2</meta:generator>
    <meta:document-statistic meta:table-count="2" meta:cell-count="684" meta:object-count="0"/>
  </office:meta>
</office:document-meta>
</file>