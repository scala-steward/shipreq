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2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3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3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8" table:formula="of:=[.H2]/[.E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8" table:formula="of:=[.H3]/[.E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6" office:value-type="float" office:value="382" calcext:value-type="float">
            <text:p>382</text:p>
          </table:table-cell>
          <table:table-cell table:style-name="ce7" office:value-type="float" office:value="157.4" calcext:value-type="float">
            <text:p>157</text:p>
          </table:table-cell>
          <table:table-cell table:style-name="ce7" office:value-type="float" office:value="46.6" calcext:value-type="float">
            <text:p>47</text:p>
          </table:table-cell>
          <table:table-cell/>
          <table:table-cell table:style-name="ce8" table:formula="of:=[.H5]/[.E5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8" table:formula="of:=[.H6]/[.E6]" office:value-type="float" office:value="6.81477456810247" calcext:value-type="float">
            <text:p>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 table:formula="of:=[.H7]/[.E7]" office:value-type="float" office:value="6.9018679860887" calcext:value-type="float">
            <text:p>6.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5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10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1T17:29:10.691321210</dc:date>
    <meta:editing-duration>PT19M49S</meta:editing-duration>
    <meta:editing-cycles>7</meta:editing-cycles>
    <meta:generator>LibreOffice/6.4.2.2$Linux_X86_64 LibreOffice_project/40$Build-2</meta:generator>
    <meta:document-statistic meta:table-count="2" meta:cell-count="101" meta:object-count="0"/>
  </office:meta>
</office:document-meta>
</file>